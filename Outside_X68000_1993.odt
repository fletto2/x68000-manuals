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G"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G"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G" style:family="table-column"/>
    <style:style style:name="Table24.H"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G" style:family="table-column"/>
    <style:style style:name="Table25.H"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G" style:family="table-column"/>
    <style:style style:name="Table26.H"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7.H"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H"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H" style:family="table-column"/>
    <style:style style:name="Table31.I" style:family="table-column"/>
    <style:style style:name="Table31.J" style:family="table-column"/>
    <style:style style:name="Table31.K"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5.I" style:family="table-column"/>
    <style:style style:name="Table35.J" style:family="table-column"/>
    <style:style style:name="Table35.K"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1.H"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2.G" style:family="table-column"/>
    <style:style style:name="Table42.H" style:family="table-column"/>
    <style:style style:name="Table42.I" style:family="table-column"/>
    <style:style style:name="Table42.J" style:family="table-column"/>
    <style:style style:name="Table42.K"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4.F" style:family="table-column"/>
    <text:list-style style:name="Pandoc_5f_Numbering_5f_1">
      <text:list-level-style-number text:level="1" text:style-name="Numbering_20_Symbols" style:num-format="1" style:num-suffix=")">
        <style:list-level-properties text:space-before="0.0000in" text:min-label-width="0.1965in" text:min-label-distance="0.1in"/>
      </text:list-level-style-number>
      <text:list-level-style-number text:level="2" text:style-name="Numbering_20_Symbols" style:num-format="1" style:num-suffix=")">
        <style:list-level-properties text:space-before="0.1972in" text:min-label-width="0.1965in" text:min-label-distance="0.1in"/>
      </text:list-level-style-number>
      <text:list-level-style-number text:level="3" text:style-name="Numbering_20_Symbols" style:num-format="1" style:num-suffix=")">
        <style:list-level-properties text:space-before="0.3944in" text:min-label-width="0.1965in" text:min-label-distance="0.1in"/>
      </text:list-level-style-number>
      <text:list-level-style-number text:level="4" text:style-name="Numbering_20_Symbols" style:num-format="1" style:num-suffix=")">
        <style:list-level-properties text:space-before="0.5916in" text:min-label-width="0.1965in" text:min-label-distance="0.1in"/>
      </text:list-level-style-number>
      <text:list-level-style-number text:level="5" text:style-name="Numbering_20_Symbols" style:num-format="1" style:num-suffix=")">
        <style:list-level-properties text:space-before="0.7888in" text:min-label-width="0.1965in" text:min-label-distance="0.1in"/>
      </text:list-level-style-number>
      <text:list-level-style-number text:level="6" text:style-name="Numbering_20_Symbols" style:num-format="1" style:num-suffix=")">
        <style:list-level-properties text:space-before="0.9860in" text:min-label-width="0.1965in" text:min-label-distance="0.1in"/>
      </text:list-level-style-number>
      <text:list-level-style-number text:level="7" text:style-name="Numbering_20_Symbols" style:num-format="1" style:num-suffix=")">
        <style:list-level-properties text:space-before="1.1832in" text:min-label-width="0.1965in" text:min-label-distance="0.1in"/>
      </text:list-level-style-number>
      <text:list-level-style-number text:level="8" text:style-name="Numbering_20_Symbols" style:num-format="1" style:num-suffix=")">
        <style:list-level-properties text:space-before="1.3804in" text:min-label-width="0.1965in" text:min-label-distance="0.1in"/>
      </text:list-level-style-number>
      <text:list-level-style-number text:level="9" text:style-name="Numbering_20_Symbols" style:num-format="1" style:num-suffix=")">
        <style:list-level-properties text:space-before="1.5776in" text:min-label-width="0.1965in" text:min-label-distance="0.1in"/>
      </text:list-level-style-number>
      <text:list-level-style-number text:level="10" text:style-name="Numbering_20_Symbols" style:num-format="1" style:num-suffix=")">
        <style:list-level-properties text:space-before="1.7748in" text:min-label-width="0.1965in" text:min-label-distance="0.1in"/>
      </text:list-level-style-number>
    </text:list-style>
  </office:automatic-styles>
  <office:body>
    <office:text>
      <text:h text:style-name="Heading_20_1" text:outline-level="1"><text:bookmark-start text:name="outside-x68000-1993"/>Outside X68000 (1993)<text:bookmark-end text:name="outside-x68000-1993"/></text:h>
      <text:p text:style-name="First_20_paragraph"><text:span text:style-name="Emphasis">English translation from the Japanese original — 286 pages.</text:span></text:p>
      <text:p text:style-name="Horizontal_20_Line"/>
      <text:h text:style-name="Heading_20_2" text:outline-level="2"><text:bookmark-start text:name="outs-000007"/>outs-000007<text:bookmark-end text:name="outs-000007"/></text:h>
      <text:p text:style-name="First_20_paragraph"><text:span text:style-name="Strong_20_Emphasis">Introduction</text:span></text:p>
      <text:p text:style-name="Text_20_body">Following "Inside X68000", we are now able to publish "Outside X68000". While "Inside" was oriented towards software, this book takes a closer look at the X68000 personal computer from a hardware perspective.</text:p>
      <text:p text:style-name="Text_20_body">As PCs have become more commonplace, hardware has gradually become a "black box." Articles on hardware have appeared frequently in PC magazines, but these articles primarily focus on the placement of registers and memory maps, with explanations limited to an "inside view" of the software. They often do not delve deeply into how hardware is structured, giving the impression that detailed knowledge of such hardware is unnecessary.</text:p>
      <text:p text:style-name="Text_20_body">However, the fundamental operation of computers lies in the movement of LSI chips. Users may encounter difficulties, such as knowing which joystick port to use, how to configure LSI chips and microcontrollers, or how to create self-made option boards and handle connectors for cables. The confusion does not end there, as users may also struggle to determine the function of multiple numbered pins or identify the precise role of these pins even if they were to refer back to LSI manufacturer's manuals. Such detailed information is not always conveniently available, and users are often left puzzled by incomplete or missing explanations of register setups.</text:p>
      <text:p text:style-name="Text_20_body">For personal computers to be truly "personal" and functional in user environments, having detailed information on hardware is essential. This book compiles initial views on the X68000, including its XVI model and Sharp's official option boards, along with detailed maps, pin settings, and other troubleshooting articles that have appeared in "Oh!X."</text:p>
      <text:p text:style-name="Horizontal_20_Line"/>
      <text:p text:style-name="Horizontal_20_Line"/>
      <text:h text:style-name="Heading_20_2" text:outline-level="2"><text:bookmark-start text:name="outs-000008"/>outs-000008<text:bookmark-end text:name="outs-000008"/></text:h>
      <text:p text:style-name="First_20_paragraph">It is our sincere hope that this book will be put to use as a resource for utilizing and analyzing the hardware of the X68000, helping you draw out more than 100% of its capabilities.</text:p>
      <text:p text:style-name="Text_20_body">February 1993</text:p>
      <text:p text:style-name="Text_20_body">Yukino Masahiko</text:p>
      <text:p text:style-name="Horizontal_20_Line"/>
      <text:h text:style-name="Heading_20_2" text:outline-level="2"><text:bookmark-start text:name="outs-000009"/>outs-000009<text:bookmark-end text:name="outs-000009"/></text:h>
      <text:p text:style-name="Horizontal_20_Line"/>
      <text:p text:style-name="First_20_paragraph">C O N T E N T S</text:p>
      <text:p text:style-name="Text_20_body">Introduction ................................... 3</text:p>
      <text:p text:style-name="Text_20_body">Main Body ............................................ 15</text:p>
      <text:p text:style-name="Text_20_body">Internal Circuits of X68000 .............................. 17</text:p>
      <text:list text:style-name="Numbering_20_1">
        <text:list-item>
          <text:p text:style-name="List_20_Number">Introduction ....................................... 17</text:p>
        </text:list-item>
        <text:list-item>
          <text:p text:style-name="List_20_Number">Input/Output Circuits ................................ 18</text:p>
        </text:list-item>
      </text:list>
      <text:p text:style-name="Preformatted_20_Text"><text:s text:c="2"/>2-1. Expansion Slot ................................ 18</text:p>
      <text:p text:style-name="Preformatted_20_Text"><text:s text:c="2"/>2-2. Analog RGB Connector ........................ 23</text:p>
      <text:p text:style-name="Preformatted_20_Text"><text:s text:c="2"/>2-3. Display Control Connector .................. 25</text:p>
      <text:p text:style-name="Preformatted_20_Text"><text:s text:c="2"/>2-4. Video Input Connector ..................... 26</text:p>
      <text:p text:style-name="Preformatted_20_Text"><text:s text:c="2"/>2-5. Printer Connector ............................ 26</text:p>
      <text:p text:style-name="Preformatted_20_Text"><text:s text:c="2"/>2-6. Six-Color Terminals / 3D Scope Terminal ... 29</text:p>
      <text:p text:style-name="Preformatted_20_Text"><text:s text:c="2"/>2-7. Line Output / Headphone Terminal ...... 29</text:p>
      <text:p text:style-name="Preformatted_20_Text"><text:s text:c="2"/>2-8. Joystick Connector ......................... 31</text:p>
      <text:p text:style-name="Preformatted_20_Text"><text:s text:c="2"/>2-9. RS-232C / Mouse / Keyboard ............. 32</text:p>
      <text:p text:style-name="Preformatted_20_Text"><text:s text:c="2"/>2-10. External FDD Connector .................. 34</text:p>
      <text:p text:style-name="Preformatted_20_Text"><text:s text:c="2"/>2-11. External HDD Connector .................. 36</text:p>
      <text:list text:style-name="Numbering_20_1" text:start-value="3">
        <text:list-item>
          <text:p text:style-name="List_20_Number_20_Tight">Hardware Modifications .............................. 37</text:p>
        </text:list-item>
      </text:list>
      <text:p text:style-name="Preformatted_20_Text"><text:s text:c="2"/>3-1. Gate Array Modifications .................. 37</text:p>
      <text:p text:style-name="Preformatted_20_Text"><text:s text:c="2"/>3-2. Other Major Changes ....................... 41</text:p>
      <text:p text:style-name="First_20_paragraph">Expansion Slot Specifications ........................... 43</text:p>
      <text:list text:style-name="Numbering_20_1">
        <text:list-item>
          <text:p text:style-name="List_20_Number">Introduction ......................................... 43</text:p>
        </text:list-item>
        <text:list-item>
          <text:p text:style-name="List_20_Number">Expansion Board Base Plate, Panel External Diagram ... 44</text:p>
        </text:list-item>
      </text:list>
      <text:p text:style-name="Horizontal_20_Line"/>
      <text:h text:style-name="Heading_20_2" text:outline-level="2"><text:bookmark-start text:name="outs-000010"/>outs-000010<text:bookmark-end text:name="outs-000010"/></text:h>
      <text:p text:style-name="First_20_paragraph">2-1 Expansion Board External Form ........................................ 44 2-2 Panel External Form ...................................................... 44</text:p>
      <text:p text:style-name="Text_20_body">● 3 I/O Slot Signal ................................................................... 48 ● 4 Expansion Slot Interruption ........................................... 56 ● 5 Bus Ownership from Expansion Slot ........................ 59 ● 6 I/O Slot DC Regulation .................................................. 61 ● 7 I/O Slot AC Timing ....................................................... 63 ● 8 Refresh / D-RAM Exclusive Signal Timing ........... 66</text:p>
      <text:p text:style-name="Text_20_body">● Peripheral Equipment Section ............................................. 69</text:p>
      <text:p text:style-name="Text_20_body">● Option Board .............................................................................. 71</text:p>
      <text:p text:style-name="Preformatted_20_Text"><text:s text:c="5"/>1 <text:s text:c="1"/>Introduction .............................................................................. 71</text:p>
      <text:p text:style-name="Preformatted_20_Text"><text:s text:c="5"/>2 <text:s text:c="1"/>I/O Address of Option Board ........................................ 72</text:p>
      <text:p text:style-name="First_20_paragraph">● Expansion Memory ..................................................................... 75</text:p>
      <text:p text:style-name="Preformatted_20_Text"><text:s text:c="5"/>● 1 Operational Differences by Model .......................... 75</text:p>
      <text:p text:style-name="Preformatted_20_Text"><text:s text:c="10"/>1-1 Internal Expansion Memory ..................................... 75</text:p>
      <text:p text:style-name="Preformatted_20_Text"><text:s text:c="10"/>1-2 External Expansion Memory .................................... 77</text:p>
      <text:p text:style-name="Preformatted_20_Text"/>
      <text:p text:style-name="Preformatted_20_Text"><text:s text:c="5"/>● 2 Component Arrangement .............................................. 77</text:p>
      <text:p text:style-name="Preformatted_20_Text"/>
      <text:p text:style-name="Preformatted_20_Text"><text:s text:c="5"/>● 3 Circuit Diagram / Connector Signal Arrangement</text:p>
      <text:p text:style-name="Preformatted_20_Text"><text:s text:c="10"/>3-1 Internal Exclusive Use ............................................... 80</text:p>
      <text:p text:style-name="Preformatted_20_Text"><text:s text:c="10"/>3-2 External Common Use ................................................ 81</text:p>
      <text:p text:style-name="First_20_paragraph">This is the text from the image translated to English.</text:p>
      <text:p text:style-name="Horizontal_20_Line"/>
      <text:h text:style-name="Heading_20_2" text:outline-level="2"><text:bookmark-start text:name="outs-000011"/>outs-000011<text:bookmark-end text:name="outs-000011"/></text:h>
      <text:p text:style-name="Horizontal_20_Line"/>
      <text:p text:style-name="First_20_paragraph">CONTENTS</text:p>
      <text:p text:style-name="Text_20_body">● Numeric Computation Processor Board (CZ-6BP1/CZ-6BP1A) ................................................ 83</text:p>
      <text:p text:style-name="Text_20_body">● 1 Specifications ....................................................................................................................... 83 ● 2 Circuit Overview .................................................................................................................. 84 ● 3 Main Component Layout ...................................................................................................... 84 ● 4 Settings 4-1 Port Address Setting .......................................................................................................... 87 ● 5 I/O Map ............................................................................................................................... 87 ● 6 Circuit Diagram .................................................................................................................... 88</text:p>
      <text:p text:style-name="Horizontal_20_Line"/>
      <text:p text:style-name="First_20_paragraph">● MIDI Board (CZ-6BM1) .......................................................................................................... 89</text:p>
      <text:p text:style-name="Text_20_body">● 1 Specifications ....................................................................................................................... 89 ● 2 Circuit Overview .................................................................................................................. 90 ● 3 Main Component Layout ...................................................................................................... 92 ● 4 Settings</text:p>
      <text:p text:style-name="Preformatted_20_Text"><text:s text:c="2"/>4-1 Port Address Setting .......................................................................................................... 93</text:p>
      <text:p text:style-name="Preformatted_20_Text"><text:s text:c="2"/>4-2 Cut Level Setting ................................................................................................................ 93</text:p>
      <text:p text:style-name="Preformatted_20_Text"><text:s text:c="2"/>4-3 MIDI OUT/MIDI THRU Selection ....................................................................................... 93</text:p>
      <text:p text:style-name="First_20_paragraph">● 5 I/O Map .............................................................................................................................. 93 ● 6 Connector Signal Layout .................................................................................................... 108 ● 7 Circuit Diagram .................................................................................................................. 110</text:p>
      <text:p text:style-name="Horizontal_20_Line"/>
      <text:p text:style-name="First_20_paragraph">● Parallel Board (CZ-6BN1) ..................................................................................................... 111</text:p>
      <text:p text:style-name="Text_20_body">● 1 Specifications ..................................................................................................................... 111 ● 2 Circuit Overview ................................................................................................................ 112 ● 3 Main Component Layout .................................................................................................... 113 ● 4 Settings</text:p>
      <text:p text:style-name="Preformatted_20_Text"><text:s text:c="2"/>4-1 Port Address Setting ......................................................................................................... 114</text:p>
      <text:p text:style-name="Preformatted_20_Text"><text:s text:c="2"/>4-2 Cut Level Setting .............................................................................................................. 115</text:p>
      <text:p text:style-name="Horizontal_20_Line"/>
      <text:p text:style-name="Horizontal_20_Line"/>
      <text:h text:style-name="Heading_20_2" text:outline-level="2"><text:bookmark-start text:name="outs-000012"/>outs-000012<text:bookmark-end text:name="outs-000012"/></text:h>
      <text:p text:style-name="Horizontal_20_Line"/>
      <text:p text:style-name="First_20_paragraph">5 I/O Map</text:p>
      <text:p text:style-name="Preformatted_20_Text"><text:s text:c="3"/>5-1 8255 Registers</text:p>
      <text:p text:style-name="Preformatted_20_Text"><text:s text:c="3"/>5-2 Interrupt Mask Register</text:p>
      <text:p text:style-name="Preformatted_20_Text"><text:s text:c="3"/>5-3 Interrupt Vector Number Register</text:p>
      <text:p text:style-name="First_20_paragraph">6 Connector Signal Arrangement</text:p>
      <text:p text:style-name="Text_20_body">7 Parallel Cable Connection Diagram</text:p>
      <text:p text:style-name="Text_20_body">8 Image Scanner Connection Example</text:p>
      <text:p text:style-name="Text_20_body">9 Circuit Diagram</text:p>
      <text:p text:style-name="Text_20_body">Video Board (CZ-6BV1)</text:p>
      <text:p text:style-name="Text_20_body">1 Specifications</text:p>
      <text:p text:style-name="Text_20_body">2 Circuit Outline</text:p>
      <text:p text:style-name="Text_20_body">3 Main Component Configuration</text:p>
      <text:p text:style-name="Text_20_body">4 Setting 4-1 Video Board Operation</text:p>
      <text:p text:style-name="Text_20_body">5 Connector Signal Arrangement</text:p>
      <text:p text:style-name="Text_20_body">6 Circuit Diagram</text:p>
      <text:p text:style-name="Text_20_body">SCSI Board (CZ-6BS1)</text:p>
      <text:p text:style-name="Text_20_body">1 Specifications</text:p>
      <text:p text:style-name="Text_20_body">2 Circuit Outline</text:p>
      <text:p text:style-name="Text_20_body">3 Main Component Configuration</text:p>
      <text:p text:style-name="Text_20_body">4 Setting</text:p>
      <text:p text:style-name="Preformatted_20_Text"><text:s text:c="3"/>4-1 Interrupt Level Setting</text:p>
      <text:p text:style-name="Preformatted_20_Text"><text:s text:c="3"/>4-2 Terminator</text:p>
      <text:p text:style-name="Preformatted_20_Text"><text:s text:c="3"/>4-3 Terminator Power Line</text:p>
      <text:p text:style-name="First_20_paragraph">5 I/O Map</text:p>
      <text:p text:style-name="Text_20_body">6 Connector Signal Arrangement</text:p>
      <text:p text:style-name="Text_20_body">7 Circuit Diagram</text:p>
      <text:p text:style-name="Horizontal_20_Line"/>
      <text:h text:style-name="Heading_20_2" text:outline-level="2"><text:bookmark-start text:name="outs-000013"/>outs-000013<text:bookmark-end text:name="outs-000013"/></text:h>
      <text:p text:style-name="Horizontal_20_Line"/>
      <text:p text:style-name="First_20_paragraph"><text:span text:style-name="Strong_20_Emphasis">CONTENTS</text:span></text:p>
      <text:p text:style-name="Text_20_body"><text:span text:style-name="Strong_20_Emphasis">GP-IB Board (CZ-6BG1)</text:span></text:p>
      <text:list text:style-name="Numbering_20_1">
        <text:list-item>
          <text:p text:style-name="List_20_Number_20_Tight">Specifications .......................................................... 141</text:p>
        </text:list-item>
        <text:list-item>
          <text:p text:style-name="List_20_Number_20_Tight">Circuit Overview ..................................................... 141</text:p>
        </text:list-item>
        <text:list-item>
          <text:p text:style-name="List_20_Number_20_Tight">Main Component Placement ........................... 142</text:p>
        </text:list-item>
        <text:list-item>
          <text:p text:style-name="List_20_Number_20_Tight">Settings ................................................................. 144 4-1. Address Allocation ......................................... 145</text:p>
        </text:list-item>
        <text:list-item>
          <text:p text:style-name="List_20_Number_20_Tight">I/O Map ................................................................... 145</text:p>
        </text:list-item>
        <text:list-item>
          <text:p text:style-name="List_20_Number_20_Tight">Connector Signal Layout .................................. 146</text:p>
        </text:list-item>
        <text:list-item>
          <text:p text:style-name="List_20_Number_20_Tight">Circuit Diagram ................................................. 148</text:p>
        </text:list-item>
      </text:list>
      <text:p text:style-name="First_20_paragraph"><text:span text:style-name="Strong_20_Emphasis">RS-232C Board (CZ-6BF1)</text:span></text:p>
      <text:list text:style-name="Numbering_20_1">
        <text:list-item>
          <text:p text:style-name="List_20_Number_20_Tight">Specifications .......................................................... 149</text:p>
        </text:list-item>
        <text:list-item>
          <text:p text:style-name="List_20_Number_20_Tight">Circuit Overview ..................................................... 150</text:p>
        </text:list-item>
        <text:list-item>
          <text:p text:style-name="List_20_Number_20_Tight">Main Component Placement ........................... 152</text:p>
        </text:list-item>
        <text:list-item>
          <text:p text:style-name="List_20_Number_20_Tight">Settings ................................................................. 153</text:p>
        </text:list-item>
      </text:list>
      <text:p text:style-name="Preformatted_20_Text"><text:s text:c="2"/>4-1. Board Address Setting ................................. 153</text:p>
      <text:p text:style-name="Preformatted_20_Text"><text:s text:c="2"/>4-2. Address Allocation ......................................... 153</text:p>
      <text:list text:style-name="Numbering_20_1" text:start-value="5">
        <text:list-item>
          <text:p text:style-name="List_20_Number_20_Tight">I/O Map ................................................................... 154</text:p>
        </text:list-item>
        <text:list-item>
          <text:p text:style-name="List_20_Number_20_Tight">Connector Signal Layout .................................. 155</text:p>
        </text:list-item>
        <text:list-item>
          <text:p text:style-name="List_20_Number_20_Tight">Circuit Diagram ................................................. 157</text:p>
        </text:list-item>
      </text:list>
      <text:p text:style-name="First_20_paragraph"><text:span text:style-name="Strong_20_Emphasis">FAX Board (CZ-6BC1)</text:span></text:p>
      <text:list text:style-name="Numbering_20_1">
        <text:list-item>
          <text:p text:style-name="List_20_Number_20_Tight">Specifications .......................................................... 159</text:p>
        </text:list-item>
        <text:list-item>
          <text:p text:style-name="List_20_Number_20_Tight">Circuit Overview ..................................................... 160</text:p>
        </text:list-item>
        <text:list-item>
          <text:p text:style-name="List_20_Number_20_Tight">Main Component Placement ........................... 162</text:p>
        </text:list-item>
        <text:list-item>
          <text:p text:style-name="List_20_Number_20_Tight">Settings ................................................................. 163 4-1. Setting Transmission Output Level ............ 163</text:p>
        </text:list-item>
      </text:list>
      <text:p text:style-name="Horizontal_20_Line"/>
      <text:p text:style-name="Horizontal_20_Line"/>
      <text:h text:style-name="Heading_20_2" text:outline-level="2"><text:bookmark-start text:name="outs-000014"/>outs-000014<text:bookmark-end text:name="outs-000014"/></text:h>
      <text:p text:style-name="Horizontal_20_Line"/>
      <text:p text:style-name="First_20_paragraph">4-2 Setting the Cable Equalizer ....................................................................................... 164 4-3 Setting the Clipping Level ......................................................................................... 164 5 I/O Map ......................................................................................................................... 164 6 Circuit Diagram ............................................................................................................. 172</text:p>
      <text:p text:style-name="Text_20_body">Universal I/O Board (CZ-6BU1) ......................................................................................... 175 1 Specifications ................................................................................................................. 175 2 Circuit Summary ............................................................................................................ 176 3 Main Component Arrangement ...................................................................................... 178 4 Settings .......................................................................................................................... 179</text:p>
      <text:p text:style-name="Preformatted_20_Text"><text:s text:c="2"/>4-1 Setting the Port Address ......................................................................................... 179</text:p>
      <text:p text:style-name="Preformatted_20_Text"><text:s text:c="2"/>4-2 Setting the Output Strobe Signal (OUTSB 1/2) Generation Conditions ........................ 180</text:p>
      <text:p text:style-name="Preformatted_20_Text"><text:s text:c="2"/>4-3 Data Latch Selection ............................................................................................... 180</text:p>
      <text:p text:style-name="Preformatted_20_Text"><text:s text:c="2"/>4-4 Setting the Clipping Level ...................................................................................... 181</text:p>
      <text:p text:style-name="First_20_paragraph">5 I/O Map ......................................................................................................................... 181 6 Connector Signal Arrangement ..................................................................................... 183 7 Circuit Diagram ............................................................................................................. 184</text:p>
      <text:p text:style-name="Text_20_body">Homemade Peripheral Equipment ................................................................................. 185 Examples of Homemade Peripheral Devices ................................................................. 187</text:p>
      <text:p text:style-name="Text_20_body">Random Number Generator .......................................................................................... 189</text:p>
      <text:p text:style-name="Preformatted_20_Text"><text:s text:c="2"/>1 Random Number Generation Experiment ............................................................... 190</text:p>
      <text:p text:style-name="Preformatted_20_Text"><text:s text:c="2"/>2 Circuit Design ........................................................................................................... 190</text:p>
      <text:p text:style-name="Preformatted_20_Text"><text:s text:c="4"/>2-1 About the Power Supply ...................................................................................... 190</text:p>
      <text:p text:style-name="Preformatted_20_Text"><text:s text:c="4"/>2-2 Noise Reduction Section .................................................................................... 191</text:p>
      <text:p text:style-name="Horizontal_20_Line"/>
      <text:p text:style-name="First_20_paragraph">This translation covers the visible table of contents and section titles from the provided image.</text:p>
      <text:p text:style-name="Horizontal_20_Line"/>
      <text:h text:style-name="Heading_20_2" text:outline-level="2"><text:bookmark-start text:name="outs-000015"/>outs-000015<text:bookmark-end text:name="outs-000015"/></text:h>
      <text:p text:style-name="Horizontal_20_Line"/>
      <text:p text:style-name="First_20_paragraph"><text:span text:style-name="Strong_20_Emphasis">CONTENTS</text:span></text:p>
      <text:p text:style-name="Text_20_body">2-3 Signal Amplifier Section ............................................. 192 2-4 Waveform Shaping Section ......................................... 193 2-5 Examination of Signal Level Conversion Methods ........ 193 2-6 Level Conversion Circuit ......................................... 194 2-7 Data Acquisition Section .......................................... 195 2-8 Usage Interface .......................................................... 195</text:p>
      <text:p text:style-name="Text_20_body">● 3 Precautions in Production .................................... 196 3-1 Board Creation ......................................................... 196 3-2 Component Layout ................................................. 196 3-3 Wiring Process ......................................................... 197 3-4 Check ................................................................. 197</text:p>
      <text:p text:style-name="Text_20_body">● 4 Assembly ........................................................... 198</text:p>
      <text:p text:style-name="Text_20_body">● 5 Reading Software ................................................ 198</text:p>
      <text:p text:style-name="Text_20_body">● 6 Conclusion .......................................................... 199</text:p>
      <text:p text:style-name="Text_20_body">● 7 Supplement ........................................................ 199</text:p>
      <text:p text:style-name="Text_20_body">● Radio Control Stick ................................................. 203</text:p>
      <text:p text:style-name="Text_20_body">● 1 Selection of Propeller ............................................ 204</text:p>
      <text:p text:style-name="Text_20_body">● 2 How Does the Propeller Work? ............................ 204 2-1 Calculation of Waveform ......................................... 206</text:p>
      <text:p text:style-name="Text_20_body">● 3 Circuit Design of Radio Control Stick .................. 206 3-1 Design of Propeller Receiving Circuit ................... 206 3-2 Design of Wireless Wave Shaping Circuit ............ 208 3-3 Design of Counting Circuit (1) .............................. 211 3-4 Design of Host Interface Circuit .......................... 213 3-5 Design of Counting Circuit (2) ............................. 217</text:p>
      <text:p text:style-name="Text_20_body">● 4 Production of Radio Control Stick ....................... 217</text:p>
      <text:p text:style-name="Text_20_body">● 5 Assembly .......................................................... 218</text:p>
      <text:p text:style-name="Text_20_body">● 6 Usage ............................................................... 219</text:p>
      <text:p text:style-name="Text_20_body">● 7 Conclusion ....................................................... 220</text:p>
      <text:p text:style-name="Horizontal_20_Line"/>
      <text:h text:style-name="Heading_20_2" text:outline-level="2"><text:bookmark-start text:name="outs-000016"/>outs-000016<text:bookmark-end text:name="outs-000016"/></text:h>
      <text:h text:style-name="Heading_20_3" text:outline-level="3"><text:bookmark-start text:name="universal-remote-control--233"/>Universal Remote Control ................................................................................. 233<text:bookmark-end text:name="universal-remote-control--233"/></text:h>
      <text:p text:style-name="First_20_paragraph"><text:span text:style-name="Strong_20_Emphasis">1. Infrared Remote Control Experiment</text:span> .......................................................................... 233 1-1 Measurement ................................................................................................................... 234 1-2 Light Emission Side Experiment .................................................................................. 235 1-3 Interface with Main Unit ................................................................................................ 236 1-4 Connection with X68000 ............................................................................................... 236 1-5 Extending the Distance ................................................................................................ 237</text:p>
      <text:p text:style-name="Text_20_body"><text:span text:style-name="Strong_20_Emphasis">2. Circuit Design</text:span> ............................................................................................................ 238 2-1 Circuit to Prevent Unintended Light Emission ............................................................. 238 2-2 Light Emitting Diode Drive Circuit ................................................................................ 239 2-3 Reproduction Experiment ............................................................................................ 240</text:p>
      <text:p text:style-name="Text_20_body"><text:span text:style-name="Strong_20_Emphasis">3. Cautions in Manufacturing</text:span> ......................................................................................... 240 3-1 LED ............................................................................................................................... 240 3-2 Case .............................................................................................................................. 241</text:p>
      <text:p text:style-name="Text_20_body"><text:span text:style-name="Strong_20_Emphasis">4. Sample Program</text:span> ....................................................................................................... 241 4-1 Select Mode .................................................................................................................. 242 4-2 Edit Mode ...................................................................................................................... 243 4-3 Try It Out ....................................................................................................................... 243</text:p>
      <text:p text:style-name="Text_20_body"><text:span text:style-name="Strong_20_Emphasis">5. In Conclusion</text:span> ............................................................................................................. 246</text:p>
      <text:h text:style-name="Heading_20_3" text:outline-level="3"><text:bookmark-start text:name="crt-switching-device--275"/>CRT Switching Device ......................................................................................... 275<text:bookmark-end text:name="crt-switching-device--275"/></text:h>
      <text:p text:style-name="First_20_paragraph"><text:span text:style-name="Strong_20_Emphasis">1. Switching Experiment</text:span> ................................................................................................ 276 <text:span text:style-name="Strong_20_Emphasis">2. Discussion on Switching Circuit</text:span> ................................................................................ 277</text:p>
      <text:p text:style-name="Text_20_body"><text:span text:style-name="Strong_20_Emphasis">3. Circuit Design</text:span> ............................................................................................................ 278 3-1 Display Selection Part ................................................................................................... 278 3-2 Signal Combine Part of Display Control Part ............................................................ 278 3-3 Read Drive Part ............................................................................................................ 280</text:p>
      <text:p text:style-name="Text_20_body"><text:span text:style-name="Strong_20_Emphasis">4. Cautions in Manufacturing</text:span> ......................................................................................... 280 4-1 Wiring of Analog RGB Signal ....................................................................................... 280 4-2 Attention to Relay Properties ....................................................................................... 281 4-3 About LED ..................................................................................................................... 281 4-4 Case Selection .............................................................................................................. 281 4-5 Display Device Connection Cable ............................................................................. 282</text:p>
      <text:p text:style-name="Horizontal_20_Line"/>
      <text:h text:style-name="Heading_20_2" text:outline-level="2"><text:bookmark-start text:name="outs-000017"/>outs-000017<text:bookmark-end text:name="outs-000017"/></text:h>
      <text:p text:style-name="First_20_paragraph">CONTENTS</text:p>
      <text:list text:style-name="Numbering_20_1" text:start-value="5">
        <text:list-item>
          <text:p text:style-name="List_20_Number_20_Tight">For testing....................................................................................282</text:p>
        </text:list-item>
        <text:list-item>
          <text:p text:style-name="List_20_Number_20_Tight">In conclusion..............................................................................283</text:p>
        </text:list-item>
      </text:list>
      <text:p text:style-name="First_20_paragraph">In conclusion............................................285 References................................................287 Index.........................................................288</text:p>
      <text:p text:style-name="Text_20_body">COVER DESIGN--Masaki KATSUMATA</text:p>
      <text:p text:style-name="Horizontal_20_Line"/>
      <text:h text:style-name="Heading_20_2" text:outline-level="2"><text:bookmark-start text:name="outs-000018"/>outs-000018<text:bookmark-end text:name="outs-000018"/></text:h>
      <text:p text:style-name="First_20_paragraph"><text:span text:style-name="Emphasis">(Blank page in the original.)</text:span></text:p>
      <text:p text:style-name="Horizontal_20_Line"/>
      <text:h text:style-name="Heading_20_2" text:outline-level="2"><text:bookmark-start text:name="outs-000019"/>outs-000019<text:bookmark-end text:name="outs-000019"/></text:h>
      <text:p text:style-name="First_20_paragraph">The text on the image translates to "Main Volume" in English.</text:p>
      <text:p text:style-name="Horizontal_20_Line"/>
      <text:h text:style-name="Heading_20_2" text:outline-level="2"><text:bookmark-start text:name="outs-000020"/>outs-000020<text:bookmark-end text:name="outs-000020"/></text:h>
      <text:p text:style-name="First_20_paragraph"><text:span text:style-name="Emphasis">(Blank page in the original.)</text:span></text:p>
      <text:p text:style-name="Horizontal_20_Line"/>
      <text:h text:style-name="Heading_20_2" text:outline-level="2"><text:bookmark-start text:name="outs-000021"/>outs-000021<text:bookmark-end text:name="outs-000021"/></text:h>
      <text:p text:style-name="Horizontal_20_Line"/>
      <text:p text:style-name="First_20_paragraph"><text:span text:style-name="Strong_20_Emphasis">Internal Circuits of the X68000</text:span></text:p>
      <text:p text:style-name="Text_20_body">The internal circuits of the X68000 are quite complex. In this chapter, we summarize the circuits surrounding the various input/output connectors provided in the X68000 and the changes in the main gate array.</text:p>
      <text:p text:style-name="Text_20_body"><text:span text:style-name="Strong_20_Emphasis">1 Introduction</text:span></text:p>
      <text:p text:style-name="Text_20_body">When studying hardware, particularly digital circuits, examining the internal circuits of personal computers can be very instructive. The X68000, among personal computers, incorporates many useful functions internally, and even a brief look at how interfaces are constructed and the design concepts can be more than enough to serve as practical material for learning digital circuits.</text:p>
      <text:p text:style-name="Text_20_body">In this chapter, we summarize the changes in hardware for each device category from the interface part of the X68000's circuits.</text:p>
      <text:p text:style-name="Horizontal_20_Line"/>
      <text:p text:style-name="Horizontal_20_Line"/>
      <text:h text:style-name="Heading_20_2" text:outline-level="2"><text:bookmark-start text:name="outs-000022"/>outs-000022<text:bookmark-end text:name="outs-000022"/></text:h>
      <text:p text:style-name="Horizontal_20_Line"/>
      <text:list text:style-name="Numbering_20_1" text:start-value="2">
        <text:list-item>
          <text:p text:style-name="List_20_Number_20_Tight">Input-Output Sections Circuits</text:p>
        </text:list-item>
      </text:list>
      <text:p text:style-name="First_20_paragraph">When creating peripherals for the X68000 and connecting them, it is crucial to understand how the signals on the connected side are routed. Depending on the circuit of the main unit, you must consider what level of signals you need to provide or receive on the peripheral side.</text:p>
      <text:p text:style-name="Text_20_body">This book provides the circuit diagrams for the X68000. You can trace the connections if necessary. While the internals of high-performance devices are straightforward, beginners must do extensive work just to catch up with LSI pin layouts and connections. Thus, summarizing how signals on I/O connectors are routed is useful. The values of resistors and capacitors, among other details, may vary based on individual preferences. As for power compatibility, it is ensured to a certain extent.</text:p>
      <text:p text:style-name="Text_20_body">Based on the initial schematics, compilation is done here. The specifics might vary so consult the appropriate internal circuit diagrams as needed.</text:p>
      <text:p text:style-name="Text_20_body">2.1 Expansion Slots</text:p>
      <text:p text:style-name="Text_20_body">Expansion slots include signal lines primarily for memory I/O read/write actions. Signals are placed for necessary requirements such as clock, DMA, interrupt requests, refresh timing, and sync signals. Many different types of boards can be created using these configurations.</text:p>
      <text:p text:style-name="Text_20_body">2.1.1 CPU Related Signals</text:p>
      <text:h text:style-name="Heading_20_2" text:outline-level="2"><text:bookmark-start text:name="among-the-signals-in-expansion-slots-those-directly-connected-to-the-cpu-are-shown-in-figure-1-these-are-signals-directly-related-to-the-cpu-including-address-data-and-status-signals-als-advanced-low-power-schottky-and-as-advanced-schottky-are-used-for-such-signals-logic-delay-from-the-gate-might-increase-causing-timing-mismatches-or-issues-with-ttl-family-ics-so-take-caution-with-timing-margins"/>Among the signals in expansion slots, those directly connected to the CPU are shown in Figure 1. These are signals directly related to the CPU including address, data, and status signals. ALS (Advanced Low-Power Schottky) and AS (Advanced Schottky) are used for such signals. Logic delay from the gate might increase causing timing mismatches or issues with TTL family ICs, so take caution with timing margins.<text:bookmark-end text:name="among-the-signals-in-expansion-slots-those-directly-connected-to-the-cpu-are-shown-in-figure-1-these-are-signals-directly-related-to-the-cpu-including-address-data-and-status-signals-als-advanced-low-power-schottky-and-as-advanced-schottky-are-used-for-such-signals-logic-delay-from-the-gate-might-increase-causing-timing-mismatches-or-issues-with-ttl-family-ics-so-take-caution-with-timing-margins"/></text:h>
      <text:p text:style-name="Horizontal_20_Line"/>
      <text:h text:style-name="Heading_20_2" text:outline-level="2"><text:bookmark-start text:name="outs-000023"/>outs-000023<text:bookmark-end text:name="outs-000023"/></text:h>
      <text:p text:style-name="First_20_paragraph">X68000 Internal Circuit</text:p>
      <text:p text:style-name="Text_20_body">● Fig. 1 Expansion Slot Signals (1) CPU Periphery</text:p>
      <text:p text:style-name="Text_20_body">HD68HC000</text:p>
      <text:p text:style-name="Text_20_body">A23 A1 D15 D0 FC0 - FC2 AS LDS UDS R/W VMA VPA E HALT BERR BGACK DTACK RESET</text:p>
      <text:p text:style-name="Text_20_body">ALS244 → AB23, AB1 AS245 → DB15, DB0 ALS244 → FC0 - FC2, AS, LDS, UDS, R/W, VMA</text:p>
      <text:p text:style-name="Text_20_body">S08, 2.2K Vcc1 → EXVPA ALS34 → E S09 → HALT Vcc1 2.2K → EXBERR ALS32, S09 (VRAMBERR, TIMEOUT), LS14, Vcc1 4.7K → BGACK S15, Vcc1 1K, S15 → DTACK Vcc1 2.2K, S09, ALS34 → EXRESET</text:p>
      <text:p text:style-name="Text_20_body">19</text:p>
      <text:p text:style-name="Horizontal_20_Line"/>
      <text:h text:style-name="Heading_20_2" text:outline-level="2"><text:bookmark-start text:name="outs-000024"/>outs-000024<text:bookmark-end text:name="outs-000024"/></text:h>
      <text:p text:style-name="Horizontal_20_Line"/>
      <text:p text:style-name="First_20_paragraph">We aim to minimize it as much as possible. In the open collector driver of this section, use an open collector gate or a tristate buffer, and ensure that only your access and no other LSI bus master overlaps with the clean data. In cases where power is used, it is noted that a mixed type should be used.</text:p>
      <text:p text:style-name="Text_20_body">2 - ○2 Bus Release Request, Interrupt, Synchronous Signals</text:p>
      <text:p text:style-name="Text_20_body">Bus release request, interrupt, and synchronous signals are shown in Figure 2. For each expansion slot, there are lines for bus release request, interrupt request, NMI (non-maskable interrupt), IDIDR (bus packet identification signal), etc., and these are synchronized with BUDDHA and output when BUDDHA becomes active. Bus release request signals (BRn, BGn) and interrupt request signals (IRQ 2, IRQ 4, IACK 2, IACK 4) are held by a latch for each slot. BUDDHA holds latches for each slot. For signals other than BUDDHA as source, activation to IDIDR inputs are connected to expansion slots, and for inputs when expansion slots are empty, they go to pull-up resistors connected to 2.2 KΩ for these signals. Although open collector driver types are easy to use, considering issues such as cleanliness or conflict prevention, it is better to use standard push-pull output ICs that are electrically isolated from the expansion slots at some distance.</text:p>
      <text:p text:style-name="Text_20_body">Regarding video, horizontal synchronization controller is VIA1, and VINAS1 outputs. For the CRT connector, an open collector buffer is used, in contrast, the expansion slots use LS04 buffers etc., so although there are some minor differences, they are basically the same signals as those in the CRT connector.</text:p>
      <text:p text:style-name="Text_20_body">2 - ○3 Other Signals</text:p>
      <text:p text:style-name="Text_20_body">Clock related, external power-on signals, DMA request signals, are arranged as shown in Figure 3. The clock is obtained by dividing 40 MHz oscillation into 20 MHz and 10 MHz using the LS540 buffer, and it is used for the CPU clock and the clock for the expansion slots. Dividers use JK flip-flops, with the positions of 20MHz and 10MHz being buffered.</text:p>
      <text:p text:style-name="Text_20_body">Page 20</text:p>
      <text:p text:style-name="Horizontal_20_Line"/>
      <text:h text:style-name="Heading_20_2" text:outline-level="2"><text:bookmark-start text:name="outs-000025"/>outs-000025<text:bookmark-end text:name="outs-000025"/></text:h>
      <text:p text:style-name="First_20_paragraph"><text:span text:style-name="Strong_20_Emphasis">Translation:</text:span></text:p>
      <text:p text:style-name="Text_20_body"><text:span text:style-name="Strong_20_Emphasis">Top right:</text:span> X68000 Internal Circuit</text:p>
      <text:p text:style-name="Text_20_body"><text:span text:style-name="Strong_20_Emphasis">Top left:</text:span> ●Fig:....2 Expansion Slot Signals (2) Bus Exchange, Synchronous Signal Relationships</text:p>
      <text:p text:style-name="Preformatted_20_Text"><text:s text:c="4"/>BUDDHA</text:p>
      <text:p text:style-name="Preformatted_20_Text"><text:s text:c="4"/>(System Controller)</text:p>
      <text:p text:style-name="First_20_paragraph"><text:span text:style-name="Strong_20_Emphasis">Middle of the Image:</text:span> ALS34</text:p>
      <text:p text:style-name="Text_20_body"><text:span text:style-name="Strong_20_Emphasis">Labeling various connection points on the left side of the image:</text:span></text:p>
      <text:p text:style-name="Preformatted_20_Text"><text:s text:c="4"/>IDDIR</text:p>
      <text:p text:style-name="Preformatted_20_Text"><text:s text:c="4"/>BR-1</text:p>
      <text:p text:style-name="Preformatted_20_Text"><text:s text:c="4"/>BR-2</text:p>
      <text:p text:style-name="Preformatted_20_Text"><text:s text:c="4"/>BG-1</text:p>
      <text:p text:style-name="Preformatted_20_Text"><text:s text:c="4"/>BG-2</text:p>
      <text:p text:style-name="Preformatted_20_Text"><text:s text:c="4"/>IRQ2-1</text:p>
      <text:p text:style-name="Preformatted_20_Text"><text:s text:c="4"/>IRQ4-1</text:p>
      <text:p text:style-name="Preformatted_20_Text"><text:s text:c="4"/>IACK2-1</text:p>
      <text:p text:style-name="Preformatted_20_Text"><text:s text:c="4"/>IACK4-1</text:p>
      <text:p text:style-name="Preformatted_20_Text"><text:s text:c="4"/>EXNMI</text:p>
      <text:p text:style-name="First_20_paragraph"><text:span text:style-name="Strong_20_Emphasis">Labels within the circuit:</text:span> Vcc1</text:p>
      <text:p text:style-name="Text_20_body"><text:span text:style-name="Strong_20_Emphasis">Labeling various connection points on the bottom left of the image:</text:span></text:p>
      <text:p text:style-name="Preformatted_20_Text"><text:s text:c="4"/>VINAS1</text:p>
      <text:p text:style-name="Preformatted_20_Text"><text:s text:c="4"/>(Video Controller)</text:p>
      <text:p text:style-name="Preformatted_20_Text"><text:s text:c="4"/>HSYNC</text:p>
      <text:p text:style-name="Preformatted_20_Text"><text:s text:c="4"/>VSYNC</text:p>
      <text:p text:style-name="First_20_paragraph"><text:span text:style-name="Strong_20_Emphasis">Labels within the circuit:</text:span></text:p>
      <text:p text:style-name="Preformatted_20_Text"><text:s text:c="4"/>LS04</text:p>
      <text:p text:style-name="Preformatted_20_Text"><text:s text:c="4"/>LS06</text:p>
      <text:p text:style-name="Preformatted_20_Text"><text:s text:c="4"/>IS5119</text:p>
      <text:p text:style-name="First_20_paragraph"><text:span text:style-name="Strong_20_Emphasis">Labeling connection points on the bottom of the image:</text:span></text:p>
      <text:p text:style-name="Preformatted_20_Text"><text:s text:c="4"/>1K</text:p>
      <text:p text:style-name="Preformatted_20_Text"><text:s text:c="4"/>CRT Connector</text:p>
      <text:p text:style-name="First_20_paragraph"><text:span text:style-name="Strong_20_Emphasis">Bottom right:</text:span> 21</text:p>
      <text:p text:style-name="Horizontal_20_Line"/>
      <text:h text:style-name="Heading_20_2" text:outline-level="2"><text:bookmark-start text:name="outs-000026"/>outs-000026<text:bookmark-end text:name="outs-000026"/></text:h>
      <text:p text:style-name="Horizontal_20_Line"/>
      <text:p text:style-name="First_20_paragraph">●Figure...3 Expansion Slot Signals (3) Clock, DMA Requirements, etc.</text:p>
      <text:p text:style-name="Text_20_body">Vcc1 1K</text:p>
      <text:p text:style-name="Text_20_body">LS112 Vcc1</text:p>
      <text:p text:style-name="Text_20_body">LS112 Vcc1</text:p>
      <text:p text:style-name="Text_20_body">LS540</text:p>
      <text:p text:style-name="Text_20_body">10MHz (CPU Clock etc)</text:p>
      <text:p text:style-name="Text_20_body">10MHz</text:p>
      <text:p text:style-name="Text_20_body">20MHz</text:p>
      <text:p text:style-name="Text_20_body">OSCAR 40MHz</text:p>
      <text:p text:style-name="Text_20_body">PR</text:p>
      <text:p text:style-name="Text_20_body">J</text:p>
      <text:p text:style-name="Text_20_body">CK</text:p>
      <text:p text:style-name="Text_20_body">Q</text:p>
      <text:p text:style-name="Text_20_body">K</text:p>
      <text:p text:style-name="Text_20_body">C</text:p>
      <text:p text:style-name="Text_20_body">PR</text:p>
      <text:p text:style-name="Text_20_body">J</text:p>
      <text:p text:style-name="Text_20_body">CK</text:p>
      <text:p text:style-name="Text_20_body">Q</text:p>
      <text:p text:style-name="Text_20_body">K</text:p>
      <text:p text:style-name="Text_20_body">CL</text:p>
      <text:p text:style-name="Text_20_body">Vcc2</text:p>
      <text:p text:style-name="Text_20_body">LS11</text:p>
      <text:p text:style-name="Text_20_body">Vcc2</text:p>
      <text:p text:style-name="Text_20_body">LS11 10K</text:p>
      <text:p text:style-name="Text_20_body">LS11 22K</text:p>
      <text:p text:style-name="Text_20_body">(EXP WON)</text:p>
      <text:p text:style-name="Text_20_body">0.47</text:p>
      <text:p text:style-name="Text_20_body">0.777</text:p>
      <text:p text:style-name="Text_20_body">(ALARM)</text:p>
      <text:p text:style-name="Text_20_body">(POWER OFF) (Power Switch)</text:p>
      <text:p text:style-name="Text_20_body">270 1.5K</text:p>
      <text:p text:style-name="Text_20_body">0.001</text:p>
      <text:p text:style-name="Text_20_body">LS244 × 3</text:p>
      <text:p text:style-name="Text_20_body">I1 I0 I2</text:p>
      <text:p text:style-name="Text_20_body">MC68901(MFP) E T D-RAM Controller</text:p>
      <text:p text:style-name="Horizontal_20_Line"/>
      <text:p text:style-name="First_20_paragraph">AS34 × 4</text:p>
      <text:p text:style-name="Text_20_body">INH2 SELEN CASDREN CASWRL CASWRU</text:p>
      <text:p text:style-name="Text_20_body">HD63450 (DMAC) EXOWN DONE DTC REQ2</text:p>
      <text:p text:style-name="Text_20_body">PCL2</text:p>
      <text:p text:style-name="Text_20_body">ACK2</text:p>
      <text:p text:style-name="Text_20_body">ALS244</text:p>
      <text:p text:style-name="Text_20_body">Vcc1 4.7K</text:p>
      <text:p text:style-name="Text_20_body">Vcc1 2.2K</text:p>
      <text:p text:style-name="Text_20_body">Vcc1 4.7K</text:p>
      <text:p text:style-name="Text_20_body">EXOWN</text:p>
      <text:p text:style-name="Text_20_body">DONE</text:p>
      <text:p text:style-name="Text_20_body">DTC</text:p>
      <text:p text:style-name="Text_20_body">4.7K</text:p>
      <text:p text:style-name="Text_20_body">Vcc1 2.2K</text:p>
      <text:p text:style-name="Text_20_body">EXREQ EXPCL EXACK</text:p>
      <text:p text:style-name="Text_20_body">22</text:p>
      <text:p text:style-name="Horizontal_20_Line"/>
      <text:p text:style-name="First_20_paragraph">Please note that components such as "LS112", "LS540", "MC68901", etc., are likely references to specific integrated circuits and should not be translated.</text:p>
      <text:p text:style-name="Horizontal_20_Line"/>
      <text:h text:style-name="Heading_20_2" text:outline-level="2"><text:bookmark-start text:name="outs-000027"/>outs-000027<text:bookmark-end text:name="outs-000027"/></text:h>
      <text:p text:style-name="Horizontal_20_Line"/>
      <text:p text:style-name="First_20_paragraph">It is designed so that there is no adverse effect.</text:p>
      <text:list text:style-name="List_20_1">
        <text:list-item>
          <text:p text:style-name="List_20_Bullet">EXPWON is a signal to turn on the power of the X68000. By setting it to the 'L' (low) level, the main unit's power can be turned on even when the power switch on the front of the main unit is not on. A filter circuit with a CR is included to prevent operation errors due to noise. With the power of X68000 turned on, it is determined whether an external power source should be connected by examining whether the power of the main unit is turned on by pressing the power switch on the main unit, whether the RTC frame motor (alarm function) is operating, and whether the ON signal is connected to the MFP on the GPIP terminal.</text:p>
        </text:list-item>
        <text:list-item>
          <text:p text:style-name="List_20_Bullet">INH 2, SELEN, CASDREN, CASWRL, CASWRU: These 5 signals are for the D-RAM controller and can be checked in the ET. During expansion, they are used to determine the memory refresh cycle for expansion output select, and are also used for other signals such as memory select and other chip enable lines. Only INH 2 is used to prevent signal collision with RAM.</text:p>
        </text:list-item>
        <text:list-item>
          <text:p text:style-name="List_20_Bullet">EXOWN, DONE, DTC, EXREQ, EXPCL, EXACK: These signals are related to the DMA controller. Channel #2 of the DMA controller is released for expansion board use. With proper usage, it is possible to use DMA in Channel #1 slot of the expanded RAM board. Series models post-SUPER support SCSI interface. Channel 1 or Channel 2 of the DMA is utilized when an expansion board that supports SCSI interface is installed. Even so, if the DMA channel is released, the board remains uncontrolled.</text:p>
        </text:list-item>
      </text:list>
      <text:p text:style-name="First_20_paragraph">◉ 2</text:p>
      <text:p text:style-name="Text_20_body">Analog RGB Connector</text:p>
      <text:list text:style-name="List_20_1">
        <text:list-item>
          <text:p text:style-name="List_20_Bullet">⑀ 2: The method of circuit connection of the analog RGB connector is as shown in figure 4. The analog RGB connector usually outputs RGB signals in sync, but the left and right audio power is delivered and it is stereo compatible. After passing through the buffer amplifier, the output of the NJM2070 to the RGB connector is combined with the headphone and internal speaker channels. There is volume adjustment before the output to headphone or speaker, so the RGB connector output level does not receive effects from the main volume adjustment by the main unit front.</text:p>
        </text:list-item>
        <text:list-item>
          <text:p text:style-name="List_20_Bullet">The output related to video, brightness, and sync is produced by ferrite beads, a 33 pF capacitor, and a filter. The RGB brightness consists of 2SA1015Y, YS and S 2SC1815Y transistors. The sync signal is cut by a crossover collector LS06 and KΩ level pull-up resistor.</text:p>
        </text:list-item>
      </text:list>
      <text:p text:style-name="Horizontal_20_Line"/>
      <text:p text:style-name="Horizontal_20_Line"/>
      <text:h text:style-name="Heading_20_2" text:outline-level="2"><text:bookmark-start text:name="outs-000028"/>outs-000028<text:bookmark-end text:name="outs-000028"/></text:h>
      <text:p text:style-name="First_20_paragraph">"Fig 4 Analog RGB Connector</text:p>
      <text:p text:style-name="Text_20_body">24"</text:p>
      <text:p text:style-name="Text_20_body">(Note: The schematic diagram components and labels are not translated as they are generally technical symbols and abbreviations universally understood in electronics.)</text:p>
      <text:p text:style-name="Horizontal_20_Line"/>
      <text:h text:style-name="Heading_20_2" text:outline-level="2"><text:bookmark-start text:name="outs-000029"/>outs-000029<text:bookmark-end text:name="outs-000029"/></text:h>
      <text:p text:style-name="Horizontal_20_Line"/>
      <text:p text:style-name="First_20_paragraph">2-3 Display Control Connector</text:p>
      <text:p text:style-name="Text_20_body">The display control connector is equipped with a remote control signal line, a display TV on/off status and a display TV side horizontal/vertical synchronization input signal. The periphery of the connector is as shown in the figure below.</text:p>
      <text:p text:style-name="Text_20_body">The remote control signal is treated the same as the wireless remote control signal within the display TV, and it is assumed that the remote control signal is being input wirelessly. On the X68000, the remote control input is mainly assumed to be from the keyboard. When operating the keyboard from the keyboard, if the remote control output has no purpose, you can disable remote control by disconnecting the signal from the keyboard remote control circuit.</text:p>
      <text:p text:style-name="Text_20_body">The actual connection to the main unit for display control is via TV remote (TVREMOTE) and keyboard remote control signal (KYRMT). These are connected via diodes. The KYRMT is controlled by the KEYSET signal. If set to "0", remote control from the keyboard will not be possible.</text:p>
      <text:p text:style-name="Text_20_body">■ Display Control Connector■</text:p>
      <text:p text:style-name="Text_20_body">[Image of the circuit]</text:p>
      <text:p text:style-name="Horizontal_20_Line"/>
      <text:p text:style-name="Horizontal_20_Line"/>
      <text:h text:style-name="Heading_20_2" text:outline-level="2"><text:bookmark-start text:name="outs-000030"/>outs-000030<text:bookmark-end text:name="outs-000030"/></text:h>
      <text:p text:style-name="Horizontal_20_Line"/>
      <text:p text:style-name="First_20_paragraph"><text:span text:style-name="Strong_20_Emphasis">TVREMOTE</text:span> stays in "H," the remote control signal remains in "H," and the control from the keyboard becomes unavailable. In this case, control via wireless remote control is not possible (in the case of CZ-600 DE), with the possibility of not fully connecting to the TV in the display. The synchronizing signal from the remote control is essential for the actual Superimpose action. With the Superimpose operation, the display content from the TV might overlap with that of the computer. Because the synchronizing signal from the TV broadcast and the timing of the signal reaching the TV are uncertain, the display timing of the actual device has to be matched with the TV.</text:p>
      <text:p text:style-name="Text_20_body"><text:span text:style-name="Strong_20_Emphasis">2-4 Video Input Connector</text:span></text:p>
      <text:p text:style-name="Text_20_body">The connector used for image input as an option in the Outline Menu. The sync signal pin layout is as shown in Fig.6. The signal is transmitted by the lower-bit command port, converting from parallel to serial, and transmitted to 16-byte data. The QA signal is synchronized, inserted into the D/A, and transmitted to V-RAM for image input.</text:p>
      <text:p text:style-name="Text_20_body">The power lines of the 12V and +5V supplied by the connector pass through the (*filter) and are prepared through the analog switch. Noise from internal circuits does not affect the external circuits, avoiding issues caused by internal noise.</text:p>
      <text:p text:style-name="Text_20_body"><text:span text:style-name="Strong_20_Emphasis">2-5 Printer Connector</text:span></text:p>
      <text:p text:style-name="Text_20_body">The details of the printer connector are shown in Fig. 7 as circuits. Considering the X 68000 printer board, the toggling of the printer packet is crucial, whether the data is strobed, busy, PE (paper end), ONLINE, or ACK (data reception completion indicator). The printer status is determined by monitoring the BUSY state alone.</text:p>
      <text:p text:style-name="Text_20_body">Data latch to the printer is controlled by the printer latch (LS 273). The open type lap-proof, such as LS07, sends the data to the printer, and the data latches at LSO. STROBE signals go out from BUDDHA and are also buffered by output from LS07.</text:p>
      <text:p text:style-name="Horizontal_20_Line"/>
      <text:p text:style-name="First_20_paragraph">This translated text includes technical details about the TV remote, video input connector, and printer connector, highlighting synchronization, signal processing, and circuity details.</text:p>
      <text:p text:style-name="Horizontal_20_Line"/>
      <text:h text:style-name="Heading_20_2" text:outline-level="2"><text:bookmark-start text:name="outs-000031"/>outs-000031<text:bookmark-end text:name="outs-000031"/></text:h>
      <text:p text:style-name="First_20_paragraph">Top Left: Figure 6 Video Input Connector</text:p>
      <text:p text:style-name="Text_20_body">Top Right: Internal Circuitry of X68000</text:p>
      <text:p text:style-name="Text_20_body">Bottom Right: 27</text:p>
      <text:p text:style-name="Horizontal_20_Line"/>
      <text:h text:style-name="Heading_20_2" text:outline-level="2"><text:bookmark-start text:name="outs-000032"/>outs-000032<text:bookmark-end text:name="outs-000032"/></text:h>
      <text:p text:style-name="First_20_paragraph">● Fig. 7 Printer Connector</text:p>
      <text:p text:style-name="Text_20_body">LS273 LS07 × 8 → PA0, PA1, PA2, PA3, PA4, PA5, PA6, PA7 D, Q, CK, CLR0, 1K Vcc1 Vcc1, 4.7K, 4.7K 1SS119, 1SS119 BUDDHA, LS07 → STROBE ALS244 → PRT BUSY SIOLIAN</text:p>
      <text:p text:style-name="Text_20_body">It is connected to the printer. To output the correct voltage level, it is pulled up with 4.7 KΩ, and by inserting a diode, current is prevented from flowing back from the printer into the interior of the main unit when the main unit's power is off or when the printer's output voltage is higher than that of the main unit. BUSY (PRT BUSY in Fig. 7) indicates whether or not the printer is in a state to receive data. Since it is an input pin, a pull-up is provided so that the pin does not go into a high-impedance state and cause false recognition when the printer is not connected. When the cable is not plugged in, it stays in the BUSY state. The pull-up uses the same method as for the STROBE signal.</text:p>
      <text:p text:style-name="Text_20_body">28</text:p>
      <text:p text:style-name="Horizontal_20_Line"/>
      <text:h text:style-name="Heading_20_2" text:outline-level="2"><text:bookmark-start text:name="outs-000033"/>outs-000033<text:bookmark-end text:name="outs-000033"/></text:h>
      <text:p text:style-name="Horizontal_20_Line"/>
      <text:p text:style-name="First_20_paragraph">2•6 Sleeveless Color Terminal/3D Scope Terminal</text:p>
      <text:p text:style-name="Text_20_body">The circuits around the sleeveless color terminal and the 3D scope terminal are shown in Diagram 8. The sleeveless color terminal indicates the scanning area, and the 3D scope terminal is where the shutter synchronization signal is attached when using an LCD shutter. Each signal is output as an open collector, but the sleeveless color terminal is pulled up with 270 Ω to suppress unnecessary radiation by passing through a ferrite bead.</text:p>
      <text:p text:style-name="Horizontal_20_Line"/>
      <text:p text:style-name="First_20_paragraph">Diagram 8 Sleeveless Color Terminal/3D Scope Terminal</text:p>
      <text:p text:style-name="Horizontal_20_Line"/>
      <text:p text:style-name="First_20_paragraph">2•7 Line Output/Headphone Connection</text:p>
      <text:p text:style-name="Text_20_body">The circuits related to audio, such as line output and headphone, are as shown in Diagram 9. There are many capacitors for DC protection and for DC bias cut to protect each circuit, and it seems complicated, but if you look at it step by step, it is not difficult.</text:p>
      <text:p text:style-name="Horizontal_20_Line"/>
      <text:p text:style-name="First_20_paragraph">Page 29</text:p>
      <text:p text:style-name="Horizontal_20_Line"/>
      <text:p text:style-name="Horizontal_20_Line"/>
      <text:h text:style-name="Heading_20_2" text:outline-level="2"><text:bookmark-start text:name="outs-000034"/>outs-000034<text:bookmark-end text:name="outs-000034"/></text:h>
      <text:p text:style-name="Horizontal_20_Line"/>
      <text:p text:style-name="First_20_paragraph"><text:span text:style-name="Strong_20_Emphasis">Figure 9 - Audio Related</text:span></text:p>
      <text:p text:style-name="Text_20_body">ADPCM:</text:p>
      <text:list text:style-name="List_20_1">
        <text:list-item>
          <text:p text:style-name="List_20_Bullet">MSM6258 (ADPCM)</text:p>
        </text:list-item>
        <text:list-item>
          <text:p text:style-name="List_20_Bullet">LINE IN</text:p>
        </text:list-item>
      </text:list>
      <text:p text:style-name="Horizontal_20_Line"/>
      <text:list text:style-name="List_20_1">
        <text:list-item>
          <text:p text:style-name="List_20_Bullet_20_Tight">(Circuit diagram and component names)</text:p>
        </text:list-item>
      </text:list>
      <text:p text:style-name="Horizontal_20_Line"/>
      <text:list text:style-name="List_20_1">
        <text:list-item>
          <text:p text:style-name="List_20_Bullet_20_Tight">LINE OUT</text:p>
        </text:list-item>
      </text:list>
      <text:p text:style-name="Horizontal_20_Line"/>
      <text:p text:style-name="First_20_paragraph">FM Sound:</text:p>
      <text:list text:style-name="List_20_1">
        <text:list-item>
          <text:p text:style-name="List_20_Bullet_20_Tight">YM2151 + YM3012 (FM Sound Source)</text:p>
        </text:list-item>
      </text:list>
      <text:p text:style-name="Horizontal_20_Line"/>
      <text:list text:style-name="List_20_1">
        <text:list-item>
          <text:p text:style-name="List_20_Bullet_20_Tight">R (HEAD PHONE)</text:p>
        </text:list-item>
        <text:list-item>
          <text:p text:style-name="List_20_Bullet_20_Tight">L (HEAD PHONE)</text:p>
        </text:list-item>
      </text:list>
      <text:p text:style-name="Horizontal_20_Line"/>
      <text:list text:style-name="List_20_1">
        <text:list-item>
          <text:p text:style-name="List_20_Bullet_20_Tight">R (DISPLAY)</text:p>
        </text:list-item>
        <text:list-item>
          <text:p text:style-name="List_20_Bullet_20_Tight">L (DISPLAY)</text:p>
        </text:list-item>
      </text:list>
      <text:p text:style-name="First_20_paragraph">[end of translation]</text:p>
      <text:p text:style-name="Horizontal_20_Line"/>
      <text:h text:style-name="Heading_20_2" text:outline-level="2"><text:bookmark-start text:name="outs-000035"/>outs-000035<text:bookmark-end text:name="outs-000035"/></text:h>
      <text:p text:style-name="Horizontal_20_Line"/>
      <text:p text:style-name="First_20_paragraph"><text:span text:style-name="Strong_20_Emphasis">X68000 Inside Circuit Diagrams</text:span></text:p>
      <text:p text:style-name="Text_20_body">After the line input is inverted by NJM 072, the 1 µF capacitor filters out the DC component, leaving a signal centered around 2.5 V for the ADPCM chip (MSM6258). In the inverted circuit, a 1800 pF capacitor provides a high-pass characteristic. The creation of ADPCM signals involves compressing sound waves as these ensure frequency band savings.</text:p>
      <text:p text:style-name="Text_20_body">The sound output from the ADPCM is divided into left and right channels and then passes through a low-pass filter buffer amplifier to remove unwanted frequency bands. Following this, it goes to DTC114ES's mute circuit. DTC114ES forcibly sets the ADPCM output to 0 V to prevent noise from being outputted when the volume is cut off. Each DTC114ES is controlled by PC0 and PC1, and when the output is 'H', the output of DTC114ES is muted, and the sound output is turned OFF.</text:p>
      <text:p text:style-name="Text_20_body">The sound output created in this way is combined with the FM sound source and output via the buffer amplifier. This inverted signal output is for layout, display control connectors, and split into headphone/inner speakers. The output to the headphone/inner speaker is amplified by the BA 526 for audio and ionized. The headphone volume is driven by the speaker driver.</text:p>
      <text:p text:style-name="Horizontal_20_Line"/>
      <text:p text:style-name="First_20_paragraph"><text:span text:style-name="Strong_20_Emphasis">2.8 Joystick Connector</text:span></text:p>
      <text:p text:style-name="Text_20_body">Figure 10 shows the pin assignments of the joystick connector. Joystick #2 is for PRO types only and is explained on the next page.</text:p>
      <text:p text:style-name="Text_20_body">Joysticks #1 and #2 are controlled by 8255. The data is read with port A or port B, and control is done by the PC. What’s a little different is that to joystick #1, pins 6 and 7 can also be used as output pins. This feature allows you to use it as an output pin without changing the operational mode of ports PC6 and PC7.</text:p>
      <text:p text:style-name="Text_20_body">The input lines A and B used are all pulled up to 15 kΩ resistance. These can be read as long as they are pulled down. It is better to program by avoiding using port C and ports A and B directly. Additionally, note that 8255 writes all ports to the output after the reset. It may be good to set modes as early as possible after the reset for clarity.</text:p>
      <text:p text:style-name="Horizontal_20_Line"/>
      <text:p text:style-name="First_20_paragraph"><text:span text:style-name="Strong_20_Emphasis">Page 31</text:span></text:p>
      <text:p text:style-name="Horizontal_20_Line"/>
      <text:h text:style-name="Heading_20_2" text:outline-level="2"><text:bookmark-start text:name="outs-000036"/>outs-000036<text:bookmark-end text:name="outs-000036"/></text:h>
      <text:p text:style-name="Horizontal_20_Line"/>
      <text:p text:style-name="First_20_paragraph">●Fig......10 Joystick Connector</text:p>
      <text:p text:style-name="Text_20_body">⒉•9 RS-232C/Mouse/Keyboard</text:p>
      <text:p text:style-name="Text_20_body">The circuits around the connectors for RS-232C, mouse, and keyboard are shown in Fig. 11. The X 68000 performs serial communication for both the mouse and keyboard, and since the keyboard also has a connector for the mouse, they are related to each other. Therefore, the circuits are summarized in a single diagram here.</text:p>
      <text:p text:style-name="Horizontal_20_Line"/>
      <text:p text:style-name="First_20_paragraph">Note: There might be slight differences due to context and technical terminology.</text:p>
      <text:p text:style-name="Horizontal_20_Line"/>
      <text:h text:style-name="Heading_20_2" text:outline-level="2"><text:bookmark-start text:name="outs-000037"/>outs-000037<text:bookmark-end text:name="outs-000037"/></text:h>
      <text:list text:style-name="List_20_1">
        <text:list-item>
          <text:p text:style-name="List_20_Bullet_20_Tight">RS-232C / Mouse / Keyboard connector</text:p>
        </text:list-item>
        <text:list-item>
          <text:p text:style-name="List_20_Bullet_20_Tight">X68000 internal circuits</text:p>
        </text:list-item>
        <text:list-item>
          <text:p text:style-name="List_20_Bullet_20_Tight">R S 2 3 2 C Connector</text:p>
        </text:list-item>
        <text:list-item>
          <text:p text:style-name="List_20_Bullet_20_Tight">Mouse Connector</text:p>
        </text:list-item>
        <text:list-item>
          <text:p text:style-name="List_20_Bullet_20_Tight">Keyboard Connector</text:p>
        </text:list-item>
      </text:list>
      <text:p text:style-name="Horizontal_20_Line"/>
      <text:h text:style-name="Heading_20_2" text:outline-level="2"><text:bookmark-start text:name="outs-000038"/>outs-000038<text:bookmark-end text:name="outs-000038"/></text:h>
      <text:p text:style-name="First_20_paragraph"><text:span text:style-name="Strong_20_Emphasis">External FDD Connector</text:span></text:p>
      <text:p text:style-name="Text_20_body">We'll describe the periphery around the external FDD connector at positions 12 and 11. The X68000 uses an SESD9420 for the FDD's data separator in the FDC (floppy disk controller) LH8530 or MFP (68901). Basically, reading and writing can be done by adding some LSIs (large scale integration circuits) to the FDD, but in the case of the X68000, it is a bit more complicated. To explain it simply, the X68000 converts keyboard data, mouse data, and serial data using the MFP (68901) serial port. First, viewing from LH8530, channel A usually functions as RS-232 C and channel B as mouse input; however, for LH8530, this RS232 C channel supports both transmission and reception, and channel B supports RTS and control signals when channel B's signals are routed to the RS 232 port C HIC. Channel A DCD uses DSR, and CTS and DCD are used from the external TRxCA (transmit clock) to receive buffer ON/OFF signals.</text:p>
      <text:p text:style-name="Text_20_body">MSCTRL (mouse control signal) sends data transfer start indications from the mouse. MSTDATA receive mouse movement data and button updates just like the keyboard. RS-232 C roughly works with a 12-volt setup using TTL for mouse input; however, this is complicated. Keyboard and mouse data are regulated in the same manner with TTL signals sent back when a key is pressed or released. X68000 uses LS367 for keyboard control and mouse connector data routed to RxD.</text:p>
      <text:p text:style-name="Text_20_body">Keyboard data includes control signals, now this involves various changes like LED lights on the keyboard, display TV control signal routing is meticulously organized. There are measures initiated to diminish noise due to external signals using ferrite beads and capacitors.</text:p>
      <text:p text:style-name="Text_20_body"><text:span text:style-name="Strong_20_Emphasis">2.10 External FDD Connector</text:span></text:p>
      <text:p text:style-name="Text_20_body">We'll describe the periphery around the external FDD connector at positions 12 and 11. The X68000 uses an SESD9420 for the FDC (floppy disk controller) FDD's data separator. Basically, reading and writing can be done by adding some LSIs (large scale integration circuits) to the FDD, but in the case of the X68000, it is a bit more complicated.</text:p>
      <text:p text:style-name="Horizontal_20_Line"/>
      <text:h text:style-name="Heading_20_2" text:outline-level="2"><text:bookmark-start text:name="outs-000039"/>outs-000039<text:bookmark-end text:name="outs-000039"/></text:h>
      <text:p text:style-name="First_20_paragraph">X68000 Internal Circuit</text:p>
      <text:p text:style-name="Text_20_body">● Fig. 12 External FDD Connector</text:p>
      <text:p text:style-name="Text_20_body">SIOLIAN Vcc1 1K, 7438 × 7 OP.SEL 0 → OPTION SELECT 0 OP.SEL 1 → OPTION SELECT 1 OP.SEL 2 → OPTION SELECT 2 OP.SEL 3 → OPTION SELECT 3 EJECT → EJECT EJECT MASK → EJECT MASK LED BLINK → LED BLINK</text:p>
      <text:p text:style-name="Text_20_body">Vcc1 1K, 7438 × 4, Vcc1 150 × 5 DRVSEL 0 → DRIVE SELECT 0 DRVSEL 1 → DRIVE SELECT 1 DRVSEL 2 → DRIVE SELECT 2 DRVSEL 3 / TRK0 → DRIVE SELECT 3 / TRACK00 FDDINT → FDD INT ERRDISK → ERR DISK DISKIN → DISK IN WPRT → WRITE PROTECT</text:p>
      <text:p text:style-name="Text_20_body">YM2151 no CT2 / ALS32 MIN/STD LS19 × 5, Vcc1 1K, Vcc1 150 × 3 LS19, 7438 × 7 READY → READY INDEX → INDEX MIN/STD → DISK TYPE SELECT LCT/DIR → DIRECTION (LS367) RW/SEEK → STEP (LS367) FLTR/STP → WRITE GATE WE → WRITE PROTECT WDATA → WRITE PROTECT SIDE → MOTOR ON TMOUT → READ DATA RDATA → READ DATA (LS19)</text:p>
      <text:p text:style-name="Text_20_body">µPD72065 + SED9420</text:p>
      <text:p text:style-name="Text_20_body">35</text:p>
      <text:p text:style-name="Horizontal_20_Line"/>
      <text:h text:style-name="Heading_20_2" text:outline-level="2"><text:bookmark-start text:name="outs-000040"/>outs-000040<text:bookmark-end text:name="outs-000040"/></text:h>
      <text:p text:style-name="Horizontal_20_Line"/>
      <text:p text:style-name="First_20_paragraph">The LED indicator and auto-eject feature are handled by a dedicated gate array called SICILIAN. According to the diagram, SICILIAN can support toggling between 2 HD and 2 DD, but in reality, it can only handle 2 HD.</text:p>
      <text:p text:style-name="Horizontal_20_Line"/>
      <text:h text:style-name="Heading_20_3" text:outline-level="3"><text:bookmark-start text:name="id_211-external-hdd-connector"/>2•11 External HDD Connector<text:bookmark-end text:name="id_211-external-hdd-connector"/></text:h>
      <text:p text:style-name="First_20_paragraph">◇ Diagram 13 External HDD Connector</text:p>
      <text:p text:style-name="Horizontal_20_Line"/>
      <text:p text:style-name="Horizontal_20_Line"/>
      <text:h text:style-name="Heading_20_2" text:outline-level="2"><text:bookmark-start text:name="outs-000041"/>outs-000041<text:bookmark-end text:name="outs-000041"/></text:h>
      <text:p text:style-name="Horizontal_20_Line"/>
      <text:p text:style-name="First_20_paragraph">X68000 Internal Circuit</text:p>
      <text:p text:style-name="Text_20_body">The external HDD connector peripheral circuit is shown in Figure 13. Up until the original type X68000 SUPER, the HDD interface was using a SASI bus. For traditional control input/output control, the gate array for the model SICILIAN receives everything.</text:p>
      <text:p text:style-name="Text_20_body">For the data input and output, LS 642 is used, while for control output, the open-collector buffer with high drive capability 7438 is used. For input on the PNP side, LS 19 is used, which is simulated with a pull-up resistor.</text:p>
      <text:p text:style-name="Text_20_body">Signal resistance is connected in parallel at either 220Ω or 330Ω for both pull-up and pull-down parts, and it is designed to suppress waveform disturbances due to signal reflection.</text:p>
      <text:list text:style-name="Numbering_20_1" text:start-value="3">
        <text:list-item>
          <text:p text:style-name="List_20_Number_20_Tight">Changes in Hardware</text:p>
        </text:list-item>
      </text:list>
      <text:p text:style-name="First_20_paragraph">Except for major revision changes, the basic internal architecture of the X68000 series remains mostly unchanged. As functionalities increase from the SUPER model onwards, it shifted from HDD interface SASI to SCSI, with new minute changes added. Let's organize the major areas which have transitioned over time.</text:p>
      <text:p text:style-name="Text_20_body">3.1 Changes in Gate Arrays</text:p>
      <text:p text:style-name="Text_20_body">Tables 1 to 9 show the order of the main gate arrays used in each model. Table 10 summarizes the parts that have slightly changed or relocated to another location.</text:p>
      <text:p text:style-name="Text_20_body">The composition of gate arrays has significantly changed, especially during the transition from the initial machine to the ACE model. Out of the 9 gate arrays, most were migrated to the ACE model, consolidated into 7 in total. Among the newly developed parts, SPRITE controller CYNTHIA was used initially but continued with little alteration.</text:p>
      <text:p text:style-name="Text_20_body">During the transition to the ACE model, in addition to the migration from ACE to EXPERT, the memory controller and I/O controller were altered, further during the transition to the SUPER model the HDD interface changed to SASI from SCSI, altering the internal I/O controller. With the removal of SASI interface, support for SCSI controller is assured.</text:p>
      <text:p text:style-name="Horizontal_20_Line"/>
      <text:p text:style-name="Horizontal_20_Line"/>
      <text:h text:style-name="Heading_20_2" text:outline-level="2"><text:bookmark-start text:name="outs-000042"/>outs-000042<text:bookmark-end text:name="outs-000042"/></text:h>
      <text:p text:style-name="Horizontal_20_Line"/>
      <text:p text:style-name="First_20_paragraph"><text:span text:style-name="Strong_20_Emphasis">Table 1: Main Gate Array List X 68000 (CZ-600CE)</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0904CE</text:p>
          </table:table-cell>
          <table:table-cell table:style-name="TableRowCell" office:value-type="string">
            <text:p text:style-name="Table_20_Contents">ET</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0905CE</text:p>
          </table:table-cell>
          <table:table-cell table:style-name="TableRowCell" office:value-type="string">
            <text:p text:style-name="Table_20_Contents">BUDDH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able:table-cell>
          <table:table-cell table:style-name="TableRowCell" office:value-type="string">
            <text:p text:style-name="Table_20_Contents">IX0908CE</text:p>
          </table:table-cell>
          <table:table-cell table:style-name="TableRowCell" office:value-type="string">
            <text:p text:style-name="Table_20_Contents">CYNTHIA JR</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0902CE</text:p>
          </table:table-cell>
          <table:table-cell table:style-name="TableRowCell" office:value-type="string">
            <text:p text:style-name="Table_20_Contents">VINAS 1</text:p>
          </table:table-cell>
        </table:table-row>
        <table:table-row>
          <table:table-cell table:style-name="TableRowCell" office:value-type="string">
    </table:table-cell>
          <table:table-cell table:style-name="TableRowCell" office:value-type="string">
            <text:p text:style-name="Table_20_Contents">IX0903CE</text:p>
          </table:table-cell>
          <table:table-cell table:style-name="TableRowCell" office:value-type="string">
            <text:p text:style-name="Table_20_Contents">VINAS 2</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0901CE</text:p>
          </table:table-cell>
          <table:table-cell table:style-name="TableRowCell" office:value-type="string">
            <text:p text:style-name="Table_20_Contents">VSOP</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0907CE</text:p>
          </table:table-cell>
          <table:table-cell table:style-name="TableRowCell" office:value-type="string">
            <text:p text:style-name="Table_20_Contents">RESERVE</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0909CE</text:p>
          </table:table-cell>
          <table:table-cell table:style-name="TableRowCell" office:value-type="string">
            <text:p text:style-name="Table_20_Contents">SICILIAN</text:p>
          </table:table-cell>
        </table:table-row>
      </table:table>
      <text:p text:style-name="Horizontal_20_Line"/>
      <text:p text:style-name="First_20_paragraph"><text:span text:style-name="Strong_20_Emphasis">Table 2: Main Gate Array List X 68000 ACE (CZ-601C/611C)</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097CE</text:p>
          </table:table-cell>
          <table:table-cell table:style-name="TableRowCell" office:value-type="string">
            <text:p text:style-name="Table_20_Contents">OHM</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098CE</text:p>
          </table:table-cell>
          <table:table-cell table:style-name="TableRowCell" office:value-type="string">
            <text:p text:style-name="Table_20_Contents">IOSC</text:p>
          </table:table-cell>
        </table:table-row>
      </table:table>
      <text:p text:style-name="Horizontal_20_Line"/>
      <text:p text:style-name="First_20_paragraph"><text:span text:style-name="Strong_20_Emphasis">Table 3: Main Gate Array List X 68000 EXPERT (CZ-602C/612C)</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Horizontal_20_Line"/>
      <text:p text:style-name="Horizontal_20_Line"/>
      <text:h text:style-name="Heading_20_2" text:outline-level="2"><text:bookmark-start text:name="outs-000043"/>outs-000043<text:bookmark-end text:name="outs-000043"/></text:h>
      <text:p text:style-name="Horizontal_20_Line"/>
      <text:p text:style-name="First_20_paragraph"><text:span text:style-name="Strong_20_Emphasis">Table 4: Main Gate Array List X68000 PRO (CZ-652C/662C)</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5: Main Gate Array List X68000 EXPERT 2 (CZ-603C/613C)</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First_20_paragraph"><text:span text:style-name="Strong_20_Emphasis">Table 6: Main Gate Array List X68000 PRO 2 (CZ-653C/663C)</text:span></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umber</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266CE</text:p>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267CE</text:p>
          </table:table-cell>
          <table:table-cell table:style-name="TableRowCell" office:value-type="string">
            <text:p text:style-name="Table_20_Contents">SCOTC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264CE</text:p>
          </table:table-cell>
          <table:table-cell table:style-name="TableRowCell" office:value-type="string">
            <text:p text:style-name="Table_20_Contents">IOSC-2</text:p>
          </table:table-cell>
        </table:table-row>
      </table:table>
      <text:p text:style-name="Horizontal_20_Line"/>
      <text:p text:style-name="First_20_paragraph">Page number: 39</text:p>
      <text:p text:style-name="Horizontal_20_Line"/>
      <text:p text:style-name="First_20_paragraph">This is the translated text from the image.</text:p>
      <text:p text:style-name="Horizontal_20_Line"/>
      <text:h text:style-name="Heading_20_2" text:outline-level="2"><text:bookmark-start text:name="outs-000044"/>outs-000044<text:bookmark-end text:name="outs-000044"/></text:h>
      <text:p text:style-name="Horizontal_20_Line"/>
      <text:p text:style-name="First_20_paragraph">● Table 7 Main Gate Array List X 68000 SUPER-HD (CZ-623 C)</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8 Main Gate Array List X 68000 SUPER (CZ-604 C)</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197CE</text:p>
          </table:table-cell>
          <table:table-cell table:style-name="TableRowCell" office:value-type="string">
            <text:p text:style-name="Table_20_Contents">OHM2</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099CE</text:p>
          </table:table-cell>
          <table:table-cell table:style-name="TableRowCell" office:value-type="string">
            <text:p text:style-name="Table_20_Contents">MESSIAH</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First_20_paragraph">● Table 9 Main Gate Array List X 68000 XVI (CZ-634 C/644 C)</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Function</text:p>
            </table:table-cell>
            <table:table-cell table:style-name="TableHeaderRowCell" office:value-type="string">
              <text:p text:style-name="Table_20_Heading">Model Name</text:p>
            </table:table-cell>
            <table:table-cell table:style-name="TableHeaderRowCell" office:value-type="string">
              <text:p text:style-name="Table_20_Heading">Alias</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IX1748CE</text:p>
          </table:table-cell>
          <table:table-cell table:style-name="TableRowCell" office:value-type="string">
            <text:p text:style-name="Table_20_Contents">ASA</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IX1749CE</text:p>
          </table:table-cell>
          <table:table-cell table:style-name="TableRowCell" office:value-type="string">
            <text:p text:style-name="Table_20_Contents">DOSA</text:p>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IX0906CE</text:p>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IX1093CE</text:p>
          </table:table-cell>
          <table:table-cell table:style-name="TableRowCell" office:value-type="string">
            <text:p text:style-name="Table_20_Contents">VICON</text:p>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IX1095CE</text:p>
          </table:table-cell>
          <table:table-cell table:style-name="TableRowCell" office:value-type="string">
            <text:p text:style-name="Table_20_Contents">VIPS</text:p>
          </table:table-cell>
        </table:table-row>
        <table:table-row>
          <table:table-cell table:style-name="TableRowCell" office:value-type="string">
            <text:p text:style-name="Table_20_Contents">Video Data Selector</text:p>
          </table:table-cell>
          <table:table-cell table:style-name="TableRowCell" office:value-type="string">
            <text:p text:style-name="Table_20_Contents">IX1094CE</text:p>
          </table:table-cell>
          <table:table-cell table:style-name="TableRowCell" office:value-type="string">
            <text:p text:style-name="Table_20_Contents">CATHY</text:p>
          </table:table-cell>
        </table:table-row>
        <table:table-row>
          <table:table-cell table:style-name="TableRowCell" office:value-type="string">
            <text:p text:style-name="Table_20_Contents">I/O Controller</text:p>
          </table:table-cell>
          <table:table-cell table:style-name="TableRowCell" office:value-type="string">
            <text:p text:style-name="Table_20_Contents">IX1604CE</text:p>
          </table:table-cell>
          <table:table-cell table:style-name="TableRowCell" office:value-type="string">
            <text:p text:style-name="Table_20_Contents">PEDEC</text:p>
          </table:table-cell>
        </table:table-row>
      </table:table>
      <text:p text:style-name="Horizontal_20_Line"/>
      <text:p text:style-name="Horizontal_20_Line"/>
      <text:h text:style-name="Heading_20_2" text:outline-level="2"><text:bookmark-start text:name="outs-000045"/>outs-000045<text:bookmark-end text:name="outs-000045"/></text:h>
      <text:p text:style-name="Horizontal_20_Line"/>
      <text:p text:style-name="First_20_paragraph"><text:span text:style-name="Strong_20_Emphasis">● main gate array changes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HeaderRowCell" office:value-type="string">
      </table:table-cell>
            <table:table-cell table:style-name="TableHeaderRowCell" office:value-type="string">
              <text:p text:style-name="Table_20_Heading">X68000</text:p>
            </table:table-cell>
            <table:table-cell table:style-name="TableHeaderRowCell" office:value-type="string">
              <text:p text:style-name="Table_20_Heading">ACE</text:p>
            </table:table-cell>
            <table:table-cell table:style-name="TableHeaderRowCell" office:value-type="string">
              <text:p text:style-name="Table_20_Heading">EXPERT</text:p>
            </table:table-cell>
            <table:table-cell table:style-name="TableHeaderRowCell" office:value-type="string">
              <text:p text:style-name="Table_20_Heading">EXPERT2</text:p>
            </table:table-cell>
            <table:table-cell table:style-name="TableHeaderRowCell" office:value-type="string">
              <text:p text:style-name="Table_20_Heading">SUPER</text:p>
            </table:table-cell>
            <table:table-cell table:style-name="TableHeaderRowCell" office:value-type="string">
              <text:p text:style-name="Table_20_Heading">XVI</text:p>
            </table:table-cell>
            <table:table-cell table:style-name="TableHeaderRowCell" office:value-type="string">
              <text:p text:style-name="Table_20_Heading">PRO</text:p>
            </table:table-cell>
            <table:table-cell table:style-name="TableHeaderRowCell" office:value-type="string">
              <text:p text:style-name="Table_20_Heading">PRO2</text:p>
            </table:table-cell>
          </table:table-row>
        </table:table-header-rows>
        <table:table-row>
          <table:table-cell table:style-name="TableRowCell" office:value-type="string">
            <text:p text:style-name="Table_20_Contents">Memory Controller</text:p>
          </table:table-cell>
          <table:table-cell table:style-name="TableRowCell" office:value-type="string">
            <text:p text:style-name="Table_20_Contents">ET</text:p>
          </table:table-cell>
          <table:table-cell table:style-name="TableRowCell" office:value-type="string">
            <text:p text:style-name="Table_20_Contents">OHM</text:p>
          </table:table-cell>
          <table:table-cell table:style-name="TableRowCell" office:value-type="string">
            <text:p text:style-name="Table_20_Contents">OHM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cCOY</text:p>
          </table:table-cell>
        </table:table-row>
        <table:table-row>
          <table:table-cell table:style-name="TableRowCell" office:value-type="string">
            <text:p text:style-name="Table_20_Contents">System Controller</text:p>
          </table:table-cell>
          <table:table-cell table:style-name="TableRowCell" office:value-type="string">
            <text:p text:style-name="Table_20_Contents">BUDDHA</text:p>
          </table:table-cell>
          <table:table-cell table:style-name="TableRowCell" office:value-type="string">
    </table:table-cell>
          <table:table-cell table:style-name="TableRowCell" office:value-type="string">
            <text:p text:style-name="Table_20_Contents">MESSIAH</text:p>
          </table:table-cell>
          <table:table-cell table:style-name="TableRowCell" office:value-type="string">
    </table:table-cell>
          <table:table-cell table:style-name="TableRowCell" office:value-type="string">
            <text:p text:style-name="Table_20_Contents">DOSA</text:p>
          </table:table-cell>
          <table:table-cell table:style-name="TableRowCell" office:value-type="string">
            <text:p text:style-name="Table_20_Contents">SCOTCH</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rite Controller</text:p>
          </table:table-cell>
          <table:table-cell table:style-name="TableRowCell" office:value-type="string">
            <text:p text:style-name="Table_20_Contents">CYNTHIA</text:p>
          </table:table-cell>
          <table:table-cell table:style-name="TableRowCell" office:value-type="string">
    </table:table-cell>
          <table:table-cell table:style-name="TableRowCell" office:value-type="string">
            <text:p text:style-name="Table_20_Contents">CYNTHIA J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CYNTHIA</text:p>
          </table:table-cell>
        </table:table-row>
        <table:table-row>
          <table:table-cell table:style-name="TableRowCell" office:value-type="string">
            <text:p text:style-name="Table_20_Contents">CRT Controller</text:p>
          </table:table-cell>
          <table:table-cell table:style-name="TableRowCell" office:value-type="string">
            <text:p text:style-name="Table_20_Contents">VINAS 1</text:p>
          </table:table-cell>
          <table:table-cell table:style-name="TableRowCell" office:value-type="string">
            <text:p text:style-name="Table_20_Contents">VINAS2</text:p>
          </table:table-cell>
          <table:table-cell table:style-name="TableRowCell" office:value-type="string">
    </table:table-cell>
          <table:table-cell table:style-name="TableRowCell" office:value-type="string">
            <text:p text:style-name="Table_20_Contents">VIC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Controller</text:p>
          </table:table-cell>
          <table:table-cell table:style-name="TableRowCell" office:value-type="string">
            <text:p text:style-name="Table_20_Contents">VSOP</text:p>
          </table:table-cell>
          <table:table-cell table:style-name="TableRowCell" office:value-type="string">
    </table:table-cell>
          <table:table-cell table:style-name="TableRowCell" office:value-type="string">
            <text:p text:style-name="Table_20_Contents">VIP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ideo Select</text:p>
          </table:table-cell>
          <table:table-cell table:style-name="TableRowCell" office:value-type="string">
            <text:p text:style-name="Table_20_Contents">RESERVE</text:p>
          </table:table-cell>
          <table:table-cell table:style-name="TableRowCell" office:value-type="string">
    </table:table-cell>
          <table:table-cell table:style-name="TableRowCell" office:value-type="string">
            <text:p text:style-name="Table_20_Contents">CATH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EDEC</text:p>
          </table:table-cell>
          <table:table-cell table:style-name="TableRowCell" office:value-type="string">
    </table:table-cell>
        </table:table-row>
        <table:table-row>
          <table:table-cell table:style-name="TableRowCell" office:value-type="string">
            <text:p text:style-name="Table_20_Contents">I/O Controller</text:p>
          </table:table-cell>
          <table:table-cell table:style-name="TableRowCell" office:value-type="string">
            <text:p text:style-name="Table_20_Contents">SICILIAN</text:p>
          </table:table-cell>
          <table:table-cell table:style-name="TableRowCell" office:value-type="string">
            <text:p text:style-name="Table_20_Contents">IOSC</text:p>
          </table:table-cell>
          <table:table-cell table:style-name="TableRowCell" office:value-type="string">
            <text:p text:style-name="Table_20_Contents">IOS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OSC-2</text:p>
          </table:table-cell>
        </table:table-row>
      </table:table>
      <text:p text:style-name="First_20_paragraph">The PRO series has slightly different types of machines, and the memory controller uses McCOY. The system controller uses SCOTCH. Although each component has undergone different names over the years, it is thought to be a low-cost package replacement.</text:p>
      <text:p text:style-name="Horizontal_20_Line"/>
      <text:p text:style-name="First_20_paragraph"><text:span text:style-name="Strong_20_Emphasis">Other Major Changes 3:2</text:span></text:p>
      <text:p text:style-name="Text_20_body">The main changes in the X68000 series aside from the gate array are summarized in table 11 for your reference. There are differences in the FDD unit in the early models and ACE, and also in the internal connections of the HDD in ACE, where the power supply and the FDD unit diverge. Since these were unified from the EXPERT onwards, there is no need to worry about which parts to select for products.</text:p>
      <text:p text:style-name="Text_20_body">For electrical capacity, when the HDD was initially added to the ACE, adjustments were made to the increased electrical capacity by winding a transformer. From the beginning with the EXPERT onwards, Auxiliary power to the HDD was significantly considered. Additionally, ROM chip socket changes for the IPL-ROM content changes, and the IC socket changes for spare ROM are mainly due to the software changes and expansion of SRAM.</text:p>
      <text:p text:style-name="Horizontal_20_Line"/>
      <text:p text:style-name="First_20_paragraph">Page 41</text:p>
      <text:p text:style-name="Horizontal_20_Line"/>
      <text:h text:style-name="Heading_20_2" text:outline-level="2"><text:bookmark-start text:name="outs-000046"/>outs-000046<text:bookmark-end text:name="outs-000046"/></text:h>
      <text:p text:style-name="Horizontal_20_Line"/>
      <text:p text:style-name="First_20_paragraph">Table 1.1 Main changes other than gate array</text:p>
      <table:table table:name="Table11" table:style-name="Table11">
        <table:table-column table:style-name="Table11.A"/>
        <table:table-column table:style-name="Table11.B"/>
        <table:table-header-rows>
          <table:table-row>
            <table:table-cell table:style-name="TableHeaderRowCell" office:value-type="string">
              <text:p text:style-name="Table_20_Heading">Model Change</text:p>
            </table:table-cell>
            <table:table-cell table:style-name="TableHeaderRowCell" office:value-type="string">
              <text:p text:style-name="Table_20_Heading">Main Change Details</text:p>
            </table:table-cell>
          </table:table-row>
        </table:table-header-rows>
        <table:table-row>
          <table:table-cell table:style-name="TableRowCell" office:value-type="string">
            <text:p text:style-name="Table_20_Contents">From Original to ACE</text:p>
          </table:table-cell>
          <table:table-cell table:style-name="TableRowCell" office:value-type="string">
            <text:p text:style-name="Table_20_Contents">Change in FDD unit (DUNTK5716DE01) - Removed reverse eject switch - Cannot use the initial FDD unit Change in power unit - UADP-0058CEZZ (for ACE) / UADP-0057CEZZ (for ACE-HD)</text:p>
          </table:table-cell>
        </table:table-row>
        <table:table-row>
          <table:table-cell table:style-name="TableRowCell" office:value-type="string">
            <text:p text:style-name="Table_20_Contents">From ACE to EXPERT</text:p>
          </table:table-cell>
          <table:table-cell table:style-name="TableRowCell" office:value-type="string">
            <text:p text:style-name="Table_20_Contents">Change in power unit (UADP-0059CEZZ) Change in HDD unit (DMECH0002CE01: 40M/with motor) Removed "HIGH RESO" LED</text:p>
          </table:table-cell>
        </table:table-row>
        <table:table-row>
          <table:table-cell table:style-name="TableRowCell" office:value-type="string">
            <text:p text:style-name="Table_20_Contents">From EXPERT to SUPER</text:p>
          </table:table-cell>
          <table:table-cell table:style-name="TableRowCell" office:value-type="string">
            <text:p text:style-name="Table_20_Contents">Change in HDD unit (DMECH0003CE01: 80M/with motor) Change in 4M bit mask ROM (IX1616CE/IX1615CE) Added extension IC socket for 1M mask ROM support Added SCSI controller, removed SASI interface</text:p>
          </table:table-cell>
        </table:table-row>
        <table:table-row>
          <table:table-cell table:style-name="TableRowCell" office:value-type="string">
            <text:p text:style-name="Table_20_Contents">From SUPER to XVI</text:p>
          </table:table-cell>
          <table:table-cell table:style-name="TableRowCell" office:value-type="string">
            <text:p text:style-name="Table_20_Contents">Added main memory expansion socket Change in CPU (HD68HC000PS10 -&gt; HD68HC000B16) Added FPU socket Options for MPU clock speed: 16.67MHz / 10MHz Change in 4M bit mask ROM (IX1775CE/IX1776CE) Moved BIOS ROM switching socket to additional RAM board</text:p>
          </table:table-cell>
        </table:table-row>
      </table:table>
      <text:p text:style-name="Horizontal_20_Line"/>
      <text:p text:style-name="Horizontal_20_Line"/>
      <text:h text:style-name="Heading_20_2" text:outline-level="2"><text:bookmark-start text:name="outs-000047"/>outs-000047<text:bookmark-end text:name="outs-000047"/></text:h>
      <text:p text:style-name="Horizontal_20_Line"/>
      <text:p text:style-name="First_20_paragraph"><text:span text:style-name="Strong_20_Emphasis">Expansion Slot Specifications</text:span></text:p>
      <text:p text:style-name="Text_20_body">In order to ensure high-speed data transfer or operations close to the CPU, a port to which an option board can be connected cannot beat an expansion slot. This chapter explains the electrical and mechanical regulations of the X68000 expansion slot.</text:p>
      <text:p text:style-name="Text_20_body"><text:span text:style-name="Strong_20_Emphasis">1. Introduction</text:span></text:p>
      <text:p text:style-name="Text_20_body">When creating your own option board for the X68000, or when reading the circuit diagrams of commercial boards, it is necessary to know the specifications of the expansion slot. Depending on the way you manufacture it, it may even be possible to create an original board by reading or imitating commercial boards. However, an LSI that has not been used by commercial boards or a board constructed with improper timing control may result in erratic behavior, such as the largest current passing through the slots at the maximum allowed operational timing, which may temporarily succeed but suddenly cease to operate properly.</text:p>
      <text:p text:style-name="Text_20_body">In this chapter, we organize and provide the necessary information about the electrical (standard), DC current regulations (current consumption control), and the specific operational timing peculiar to the slot for each component name of the X68000 expansion slot.</text:p>
      <text:p text:style-name="Text_20_body">The X68000 expansion slot is intended not only for direct control/light control by the CPU, but also for corresponding functions such as burst transfer, DMA, D-RAM refresh, and bus exchange.</text:p>
      <text:p text:style-name="Horizontal_20_Line"/>
      <text:p text:style-name="First_20_paragraph">Page 43</text:p>
      <text:p text:style-name="Horizontal_20_Line"/>
      <text:h text:style-name="Heading_20_2" text:outline-level="2"><text:bookmark-start text:name="outs-000048"/>outs-000048<text:bookmark-end text:name="outs-000048"/></text:h>
      <text:p text:style-name="Horizontal_20_Line"/>
      <text:p text:style-name="First_20_paragraph">This may seem quite complicated if you try to understand everything at once, but it's not too difficult if you take it step by step.</text:p>
      <text:p text:style-name="Horizontal_20_Line"/>
      <text:p text:style-name="First_20_paragraph">■2 Expansion Board Base and Panel External Shape Diagram</text:p>
      <text:p text:style-name="Text_20_body">When making an expansion board individually, it's common to use a universal base for the expansion board, but there are also places that specialize in making custom shapes. In such cases, it's faster to rely on those manufacturers. When doing so, it's essential to first grasp the correct dimensions of the panel components. Also, if you're considering whether to attach components to your own custom board for the base plate, it's more convenient if there is a dedicated method. Here, we will present the base plate and the I/O slot cover (panel) for the X 68000 expansion board. Use this as a reference for inspecting and manufacturing panel components.</text:p>
      <text:p text:style-name="Horizontal_20_Line"/>
      <text:p text:style-name="First_20_paragraph">■2-1 Expansion Board External Shape</text:p>
      <text:p text:style-name="Text_20_body">The recommended external shape for the expansion board is shown in Figure 1. The dimensions are noted in the figure. The thickness of the expansion board is 1.6 mm, which is a standard value. The upper and lower edges are 4 mm to prevent impact, so components have been installed there. The two square parts on the panel side are for securing the board ejector.</text:p>
      <text:p text:style-name="Horizontal_20_Line"/>
      <text:p text:style-name="First_20_paragraph">■2-2 Panel External Shape</text:p>
      <text:p text:style-name="Text_20_body">The panels of the X 68000 are typically either narrow, standard types, or PRO types for slot #4 or for expansion I/O box appliances. There are two types of typical slot panel shapes shown in Figure 2, and the panel external shape for the PRO type slot and the expansion I/O box is shown in Figure 3. The X 68000, especially the compact Manhattan Shinjuku model, has very narrow slot spacing, so the panel surfaces are arranged concisely. For slot #4 and the expansion I/O box, the panel surface has been widened to accommodate this.</text:p>
      <text:p text:style-name="Horizontal_20_Line"/>
      <text:p text:style-name="First_20_paragraph">Page 44</text:p>
      <text:p text:style-name="Horizontal_20_Line"/>
      <text:p text:style-name="Horizontal_20_Line"/>
      <text:h text:style-name="Heading_20_2" text:outline-level="2"><text:bookmark-start text:name="outs-000049"/>outs-000049<text:bookmark-end text:name="outs-000049"/></text:h>
      <text:p text:style-name="First_20_paragraph">Expansion Slot Specifications</text:p>
      <text:p text:style-name="Text_20_body">● Fig. 1 I/O Slot Board External Dimensions Drawing</text:p>
      <text:p text:style-name="Text_20_body">2-R3 2-R2 8.5 4.5 27.5 2-φ3.7 16.85</text:p>
      <text:p text:style-name="Text_20_body">Connector mounting position center (reference)</text:p>
      <text:p text:style-name="Text_20_body">Gold plating (Component side) Hatched area: component-prohibited range I/O Cover</text:p>
      <text:p text:style-name="Text_20_body">130.4 75.5 74.5</text:p>
      <text:p text:style-name="Text_20_body">(2/1) Board leading-edge shape 0.6 1 1.5</text:p>
      <text:p text:style-name="Text_20_body">(Note) The component height shall be MAX 13 mm from the board surface. The length of the component leads shall be MAX 3.5 mm from the board surface.</text:p>
      <text:p text:style-name="Text_20_body">45</text:p>
      <text:p text:style-name="Horizontal_20_Line"/>
      <text:h text:style-name="Heading_20_2" text:outline-level="2"><text:bookmark-start text:name="outs-000050"/>outs-000050<text:bookmark-end text:name="outs-000050"/></text:h>
      <text:p text:style-name="Horizontal_20_Line"/>
      <text:p text:style-name="First_20_paragraph">● Diagram 2 I/O Slot Cover (Main Body Slot #1 - #3)</text:p>
      <text:p text:style-name="Text_20_body">(Horizontal measurement indications)</text:p>
      <text:p text:style-name="Text_20_body">(Horizontal slot direction)</text:p>
      <text:p text:style-name="Text_20_body">(Outer slot direction)</text:p>
      <text:p text:style-name="Text_20_body">Note: Unspecified corner radius is R2.</text:p>
      <text:p text:style-name="Horizontal_20_Line"/>
      <text:p text:style-name="First_20_paragraph">Other annotations are dimension measurements.</text:p>
      <text:p text:style-name="Horizontal_20_Line"/>
      <text:h text:style-name="Heading_20_2" text:outline-level="2"><text:bookmark-start text:name="outs-000051"/>outs-000051<text:bookmark-end text:name="outs-000051"/></text:h>
      <text:p text:style-name="First_20_paragraph"><text:span text:style-name="Strong_20_Emphasis">Top right text:</text:span> Expansion Slot Specifications</text:p>
      <text:p text:style-name="Text_20_body"><text:span text:style-name="Strong_20_Emphasis">Main title text:</text:span> Figure 3 I/O Slot Cover (Main Body Slot #4, Expansion I/O Box)</text:p>
      <text:p text:style-name="Text_20_body"><text:span text:style-name="Strong_20_Emphasis">Right side middle text:</text:span> Direction of external shape hole and chamfering</text:p>
      <text:p text:style-name="Text_20_body"><text:span text:style-name="Strong_20_Emphasis">Bottom right text:</text:span> Note: The tolerance for dimensions without specified tolerances is ±0.2. The corner R without specified designation is R2.</text:p>
      <text:p text:style-name="Text_20_body"><text:span text:style-name="Strong_20_Emphasis">Bottom middle text:</text:span> A-A' SEC</text:p>
      <text:p text:style-name="Horizontal_20_Line"/>
      <text:h text:style-name="Heading_20_2" text:outline-level="2"><text:bookmark-start text:name="outs-000052"/>outs-000052<text:bookmark-end text:name="outs-000052"/></text:h>
      <text:h text:style-name="Heading_20_1" text:outline-level="1"><text:bookmark-start text:name="id_3-io-slot-signals"/>3 I/O Slot Signals<text:bookmark-end text:name="id_3-io-slot-signals"/></text:h>
      <text:p text:style-name="First_20_paragraph">Here, we explain the various signals of the expansion slot. The signals of the expansion slot are all TTL level. For the names of the signals, in addition to Totem Pole and Open Collector, Tristate Triskelion and similar signal output features, we explain how to drive these signals on the main unit side or on the option board side, depending on the type of IC driver you have. If driving the input signals indicated on the main body from the option board side, pull-up resistors, open collectors, or put Tristate Buffers in the driver ICs, if necessary, and drive the signals requiring pull-up or the 2-state ones.</text:p>
      <text:p text:style-name="Text_20_body">The signals coming from the expansion slot, such as CPU-supplied address, bus data, etc., are taken out as is from the internal LSI for bi-directional usage.</text:p>
      <text:p text:style-name="Text_20_body">*Note: Signals integrated into LSI are output from FETs; on the other hand, signals taken by CMOS L-types (main chips) with high impedance for open-collector operation are standardized as open-collectors.</text:p>
      <text:list text:style-name="Numbering_20_1">
        <text:list-item>
          <text:p text:style-name="List_20_Number_20_Tight">Clock-Related (Output: Totem Pole)</text:p>
        </text:list-item>
      </text:list>
      <text:p text:style-name="First_20_paragraph">The X68000's expansion slot outputs three types of clock signals: a 10MHz CPU clock, its inverted clock, and a 20MHz clock (Figure 4). The 10MHz clock...</text:p>
      <text:h text:style-name="Heading_20_3" text:outline-level="3"><text:bookmark-start text:name="diagram-4-clock-signals"/>Diagram 4 Clock Signals<text:bookmark-end text:name="diagram-4-clock-signals"/></text:h>
      <text:p text:style-name="First_20_paragraph">[Image Description]</text:p>
      <text:p text:style-name="Text_20_body">20 MHz Clock Signal</text:p>
      <text:p text:style-name="Text_20_body">10 MHz Clock Signal</text:p>
      <text:p text:style-name="Text_20_body">Inverted 10 MHz Clock Signal</text:p>
      <text:p text:style-name="Horizontal_20_Line"/>
      <text:h text:style-name="Heading_20_2" text:outline-level="2"><text:bookmark-start text:name="outs-000053"/>outs-000053<text:bookmark-end text:name="outs-000053"/></text:h>
      <text:p text:style-name="First_20_paragraph">●Table 1 - Expansion Slot Signal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HeaderRowCell" office:value-type="string">
              <text:p text:style-name="Table_20_Heading">No.</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cell table:style-name="TableHeaderRowCell" office:value-type="string">
              <text:p text:style-name="Table_20_Heading">Signal Name</text:p>
            </table:table-cell>
            <table:table-cell table:style-name="TableHeaderRowCell" office:value-type="string">
              <text:p text:style-name="Table_20_Heading">I/O</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text:p>
          </table:table-cell>
          <table:table-cell table:style-name="TableRowCell" office:value-type="string">
            <text:p text:style-name="Table_20_Contents">20MHz</text:p>
          </table:table-cell>
          <table:table-cell table:style-name="TableRowCell" office:value-type="string">
            <text:p text:style-name="Table_20_Contents">O</text:p>
          </table:table-cell>
          <table:table-cell table:style-name="TableRowCell" office:value-type="string">
            <text:p text:style-name="Table_20_Contents">Clock (20MHz)</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Clock (10MHz)</text:p>
          </table:table-cell>
        </table:table-row>
        <table:table-row>
          <table:table-cell table:style-name="TableRowCell" office:value-type="string">
            <text:p text:style-name="Table_20_Contents">3</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10MHz</text:p>
          </table:table-cell>
          <table:table-cell table:style-name="TableRowCell" office:value-type="string">
            <text:p text:style-name="Table_20_Contents">O</text:p>
          </table:table-cell>
          <table:table-cell table:style-name="TableRowCell" office:value-type="string">
            <text:p text:style-name="Table_20_Contents">Peripheral Device Specific Clock (10MHz)</text:p>
          </table:table-cell>
        </table:table-row>
        <table:table-row>
          <table:table-cell table:style-name="TableRowCell" office:value-type="string">
            <text:p text:style-name="Table_20_Contents">4</text:p>
          </table:table-cell>
          <table:table-cell table:style-name="TableRowCell" office:value-type="string">
            <text:p text:style-name="Table_20_Contents">DB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E</text:p>
          </table:table-cell>
          <table:table-cell table:style-name="TableRowCell" office:value-type="string">
            <text:p text:style-name="Table_20_Contents">O</text:p>
          </table:table-cell>
          <table:table-cell table:style-name="TableRowCell" office:value-type="string">
            <text:p text:style-name="Table_20_Contents">68000 Peripheral Device Clock</text:p>
          </table:table-cell>
        </table:table-row>
        <table:table-row>
          <table:table-cell table:style-name="TableRowCell" office:value-type="string">
            <text:p text:style-name="Table_20_Contents">5</text:p>
          </table:table-cell>
          <table:table-cell table:style-name="TableRowCell" office:value-type="string">
            <text:p text:style-name="Table_20_Contents">DB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6</text:p>
          </table:table-cell>
          <table:table-cell table:style-name="TableRowCell" office:value-type="string">
            <text:p text:style-name="Table_20_Contents">DB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7</text:p>
          </table:table-cell>
          <table:table-cell table:style-name="TableRowCell" office:value-type="string">
            <text:p text:style-name="Table_20_Contents">DB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8</text:p>
          </table:table-cell>
          <table:table-cell table:style-name="TableRowCell" office:value-type="string">
            <text:p text:style-name="Table_20_Contents">DB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9</text:p>
          </table:table-cell>
          <table:table-cell table:style-name="TableRowCell" office:value-type="string">
            <text:p text:style-name="Table_20_Contents">DB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0</text:p>
          </table:table-cell>
          <table:table-cell table:style-name="TableRowCell" office:value-type="string">
            <text:p text:style-name="Table_20_Contents">DB6</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2</text:p>
          </table:table-cell>
          <table:table-cell table:style-name="TableRowCell" office:value-type="string">
            <text:p text:style-name="Table_20_Contents">DB7</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3</text:p>
          </table:table-cell>
          <table:table-cell table:style-name="TableRowCell" office:value-type="string">
            <text:p text:style-name="Table_20_Contents">DB8</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4</text:p>
          </table:table-cell>
          <table:table-cell table:style-name="TableRowCell" office:value-type="string">
            <text:p text:style-name="Table_20_Contents">DB9</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5</text:p>
          </table:table-cell>
          <table:table-cell table:style-name="TableRowCell" office:value-type="string">
            <text:p text:style-name="Table_20_Contents">DB10</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6</text:p>
          </table:table-cell>
          <table:table-cell table:style-name="TableRowCell" office:value-type="string">
            <text:p text:style-name="Table_20_Contents">DB11</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7</text:p>
          </table:table-cell>
          <table:table-cell table:style-name="TableRowCell" office:value-type="string">
            <text:p text:style-name="Table_20_Contents">DB12</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8</text:p>
          </table:table-cell>
          <table:table-cell table:style-name="TableRowCell" office:value-type="string">
            <text:p text:style-name="Table_20_Contents">DB13</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19</text:p>
          </table:table-cell>
          <table:table-cell table:style-name="TableRowCell" office:value-type="string">
            <text:p text:style-name="Table_20_Contents">DB14</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4</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0</text:p>
          </table:table-cell>
          <table:table-cell table:style-name="TableRowCell" office:value-type="string">
            <text:p text:style-name="Table_20_Contents">DB15</text:p>
          </table:table-cell>
          <table:table-cell table:style-name="TableRowCell" office:value-type="string">
            <text:p text:style-name="Table_20_Contents">I/O</text:p>
          </table:table-cell>
          <table:table-cell table:style-name="TableRowCell" office:value-type="string">
            <text:p text:style-name="Table_20_Contents">Data Bus</text:p>
          </table:table-cell>
          <table:table-cell table:style-name="TableRowCell" office:value-type="string">
            <text:p text:style-name="Table_20_Contents">AB15</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2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6</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AB17</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4</text:p>
          </table:table-cell>
          <table:table-cell table:style-name="TableRowCell" office:value-type="string">
            <text:p text:style-name="Table_20_Contents">FC0</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8</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5</text:p>
          </table:table-cell>
          <table:table-cell table:style-name="TableRowCell" office:value-type="string">
            <text:p text:style-name="Table_20_Contents">FC1</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19</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6</text:p>
          </table:table-cell>
          <table:table-cell table:style-name="TableRowCell" office:value-type="string">
            <text:p text:style-name="Table_20_Contents">FC2</text:p>
          </table:table-cell>
          <table:table-cell table:style-name="TableRowCell" office:value-type="string">
            <text:p text:style-name="Table_20_Contents">I/O</text:p>
          </table:table-cell>
          <table:table-cell table:style-name="TableRowCell" office:value-type="string">
            <text:p text:style-name="Table_20_Contents">Function Code</text:p>
          </table:table-cell>
          <table:table-cell table:style-name="TableRowCell" office:value-type="string">
            <text:p text:style-name="Table_20_Contents">AB20</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7</text:p>
          </table:table-cell>
          <table:table-cell table:style-name="TableRowCell" office:value-type="string">
            <text:p text:style-name="Table_20_Contents">AS</text:p>
          </table:table-cell>
          <table:table-cell table:style-name="TableRowCell" office:value-type="string">
            <text:p text:style-name="Table_20_Contents">I/O</text:p>
          </table:table-cell>
          <table:table-cell table:style-name="TableRowCell" office:value-type="string">
            <text:p text:style-name="Table_20_Contents">Address Strobe</text:p>
          </table:table-cell>
          <table:table-cell table:style-name="TableRowCell" office:value-type="string">
            <text:p text:style-name="Table_20_Contents">AB21</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8</text:p>
          </table:table-cell>
          <table:table-cell table:style-name="TableRowCell" office:value-type="string">
            <text:p text:style-name="Table_20_Contents">LDS</text:p>
          </table:table-cell>
          <table:table-cell table:style-name="TableRowCell" office:value-type="string">
            <text:p text:style-name="Table_20_Contents">I/O</text:p>
          </table:table-cell>
          <table:table-cell table:style-name="TableRowCell" office:value-type="string">
            <text:p text:style-name="Table_20_Contents">Lower Data Strobe</text:p>
          </table:table-cell>
          <table:table-cell table:style-name="TableRowCell" office:value-type="string">
            <text:p text:style-name="Table_20_Contents">AB22</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29</text:p>
          </table:table-cell>
          <table:table-cell table:style-name="TableRowCell" office:value-type="string">
            <text:p text:style-name="Table_20_Contents">UDS</text:p>
          </table:table-cell>
          <table:table-cell table:style-name="TableRowCell" office:value-type="string">
            <text:p text:style-name="Table_20_Contents">I/O</text:p>
          </table:table-cell>
          <table:table-cell table:style-name="TableRowCell" office:value-type="string">
            <text:p text:style-name="Table_20_Contents">Upper Data Strobe</text:p>
          </table:table-cell>
          <table:table-cell table:style-name="TableRowCell" office:value-type="string">
            <text:p text:style-name="Table_20_Contents">AB23</text:p>
          </table:table-cell>
          <table:table-cell table:style-name="TableRowCell" office:value-type="string">
            <text:p text:style-name="Table_20_Contents">I/O</text:p>
          </table:table-cell>
          <table:table-cell table:style-name="TableRowCell" office:value-type="string">
            <text:p text:style-name="Table_20_Contents">Address Bus</text:p>
          </table:table-cell>
        </table:table-row>
        <table:table-row>
          <table:table-cell table:style-name="TableRowCell" office:value-type="string">
            <text:p text:style-name="Table_20_Contents">30</text:p>
          </table:table-cell>
          <table:table-cell table:style-name="TableRowCell" office:value-type="string">
            <text:p text:style-name="Table_20_Contents">R/W</text:p>
          </table:table-cell>
          <table:table-cell table:style-name="TableRowCell" office:value-type="string">
            <text:p text:style-name="Table_20_Contents">I/O</text:p>
          </table:table-cell>
          <table:table-cell table:style-name="TableRowCell" office:value-type="string">
            <text:p text:style-name="Table_20_Contents">Read/Write (L = Write)</text:p>
          </table:table-cell>
          <table:table-cell table:style-name="TableRowCell" office:value-type="string">
            <text:p text:style-name="Table_20_Contents">IDDIR</text:p>
          </table:table-cell>
          <table:table-cell table:style-name="TableRowCell" office:value-type="string">
            <text:p text:style-name="Table_20_Contents">O</text:p>
          </table:table-cell>
          <table:table-cell table:style-name="TableRowCell" office:value-type="string">
            <text:p text:style-name="Table_20_Contents">Data Bus Direction Control</text:p>
          </table:table-cell>
        </table:table-row>
        <table:table-row>
          <table:table-cell table:style-name="TableRowCell" office:value-type="string">
            <text:p text:style-name="Table_20_Contents">31</text:p>
          </table:table-cell>
          <table:table-cell table:style-name="TableRowCell" office:value-type="string">
            <text:p text:style-name="Table_20_Contents">BR</text:p>
          </table:table-cell>
          <table:table-cell table:style-name="TableRowCell" office:value-type="string">
            <text:p text:style-name="Table_20_Contents">I/O</text:p>
          </table:table-cell>
          <table:table-cell table:style-name="TableRowCell" office:value-type="string">
            <text:p text:style-name="Table_20_Contents">Bus Request</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HSYNC</text:p>
          </table:table-cell>
          <table:table-cell table:style-name="TableRowCell" office:value-type="string">
            <text:p text:style-name="Table_20_Contents">O</text:p>
          </table:table-cell>
          <table:table-cell table:style-name="TableRowCell" office:value-type="string">
            <text:p text:style-name="Table_20_Contents">Horizontal Sync</text:p>
          </table:table-cell>
        </table:table-row>
        <table:table-row>
          <table:table-cell table:style-name="TableRowCell" office:value-type="string">
            <text:p text:style-name="Table_20_Contents">33</text:p>
          </table:table-cell>
          <table:table-cell table:style-name="TableRowCell" office:value-type="string">
            <text:p text:style-name="Table_20_Contents">+12V</text:p>
          </table:table-cell>
          <table:table-cell table:style-name="TableRowCell" office:value-type="string">
            <text:p text:style-name="Table_20_Contents">O</text:p>
          </table:table-cell>
          <table:table-cell table:style-name="TableRowCell" office:value-type="string">
            <text:p text:style-name="Table_20_Contents">+12V Power</text:p>
          </table:table-cell>
          <table:table-cell table:style-name="TableRowCell" office:value-type="string">
            <text:p text:style-name="Table_20_Contents">VSYNC</text:p>
          </table:table-cell>
          <table:table-cell table:style-name="TableRowCell" office:value-type="string">
            <text:p text:style-name="Table_20_Contents">O</text:p>
          </table:table-cell>
          <table:table-cell table:style-name="TableRowCell" office:value-type="string">
            <text:p text:style-name="Table_20_Contents">Vertical Sync</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ONE</text:p>
          </table:table-cell>
          <table:table-cell table:style-name="TableRowCell" office:value-type="string">
            <text:p text:style-name="Table_20_Contents">O</text:p>
          </table:table-cell>
          <table:table-cell table:style-name="TableRowCell" office:value-type="string">
            <text:p text:style-name="Table_20_Contents">DMA Peripheral Ready Signal</text:p>
          </table:table-cell>
        </table:table-row>
        <table:table-row>
          <table:table-cell table:style-name="TableRowCell" office:value-type="string">
            <text:p text:style-name="Table_20_Contents">35</text:p>
          </table:table-cell>
          <table:table-cell table:style-name="TableRowCell" office:value-type="string">
            <text:p text:style-name="Table_20_Contents">EXVPA</text:p>
          </table:table-cell>
          <table:table-cell table:style-name="TableRowCell" office:value-type="string">
            <text:p text:style-name="Table_20_Contents">I/O</text:p>
          </table:table-cell>
          <table:table-cell table:style-name="TableRowCell" office:value-type="string">
            <text:p text:style-name="Table_20_Contents">68000 Peripheral Device Access Signal</text:p>
          </table:table-cell>
          <table:table-cell table:style-name="TableRowCell" office:value-type="string">
            <text:p text:style-name="Table_20_Contents">DTC</text:p>
          </table:table-cell>
          <table:table-cell table:style-name="TableRowCell" office:value-type="string">
            <text:p text:style-name="Table_20_Contents">O</text:p>
          </table:table-cell>
          <table:table-cell table:style-name="TableRowCell" office:value-type="string">
            <text:p text:style-name="Table_20_Contents">DMA Transfer Request Signal</text:p>
          </table:table-cell>
        </table:table-row>
        <table:table-row>
          <table:table-cell table:style-name="TableRowCell" office:value-type="string">
            <text:p text:style-name="Table_20_Contents">36</text:p>
          </table:table-cell>
          <table:table-cell table:style-name="TableRowCell" office:value-type="string">
            <text:p text:style-name="Table_20_Contents">DTACK</text:p>
          </table:table-cell>
          <table:table-cell table:style-name="TableRowCell" office:value-type="string">
            <text:p text:style-name="Table_20_Contents">I/O</text:p>
          </table:table-cell>
          <table:table-cell table:style-name="TableRowCell" office:value-type="string">
            <text:p text:style-name="Table_20_Contents">Data Transfer Acknowledge</text:p>
          </table:table-cell>
          <table:table-cell table:style-name="TableRowCell" office:value-type="string">
            <text:p text:style-name="Table_20_Contents">EXREQ</text:p>
          </table:table-cell>
          <table:table-cell table:style-name="TableRowCell" office:value-type="string">
            <text:p text:style-name="Table_20_Contents">I/O</text:p>
          </table:table-cell>
          <table:table-cell table:style-name="TableRowCell" office:value-type="string">
            <text:p text:style-name="Table_20_Contents">DMA Data Transfer Request Signal</text:p>
          </table:table-cell>
        </table:table-row>
        <table:table-row>
          <table:table-cell table:style-name="TableRowCell" office:value-type="string">
            <text:p text:style-name="Table_20_Contents">37</text:p>
          </table:table-cell>
          <table:table-cell table:style-name="TableRowCell" office:value-type="string">
            <text:p text:style-name="Table_20_Contents">XRESET</text:p>
          </table:table-cell>
          <table:table-cell table:style-name="TableRowCell" office:value-type="string">
            <text:p text:style-name="Table_20_Contents">O</text:p>
          </table:table-cell>
          <table:table-cell table:style-name="TableRowCell" office:value-type="string">
            <text:p text:style-name="Table_20_Contents">External Reset</text:p>
          </table:table-cell>
          <table:table-cell table:style-name="TableRowCell" office:value-type="string">
            <text:p text:style-name="Table_20_Contents">EXACK</text:p>
          </table:table-cell>
          <table:table-cell table:style-name="TableRowCell" office:value-type="string">
            <text:p text:style-name="Table_20_Contents">O</text:p>
          </table:table-cell>
          <table:table-cell table:style-name="TableRowCell" office:value-type="string">
            <text:p text:style-name="Table_20_Contents">DMA System Acknowledge Signal</text:p>
          </table:table-cell>
        </table:table-row>
        <table:table-row>
          <table:table-cell table:style-name="TableRowCell" office:value-type="string">
            <text:p text:style-name="Table_20_Contents">38</text:p>
          </table:table-cell>
          <table:table-cell table:style-name="TableRowCell" office:value-type="string">
            <text:p text:style-name="Table_20_Contents">HALT</text:p>
          </table:table-cell>
          <table:table-cell table:style-name="TableRowCell" office:value-type="string">
            <text:p text:style-name="Table_20_Contents">I/O</text:p>
          </table:table-cell>
          <table:table-cell table:style-name="TableRowCell" office:value-type="string">
            <text:p text:style-name="Table_20_Contents">CPU External System Halt</text:p>
          </table:table-cell>
          <table:table-cell table:style-name="TableRowCell" office:value-type="string">
            <text:p text:style-name="Table_20_Contents">EXPCL</text:p>
          </table:table-cell>
          <table:table-cell table:style-name="TableRowCell" office:value-type="string">
            <text:p text:style-name="Table_20_Contents">I/O</text:p>
          </table:table-cell>
          <table:table-cell table:style-name="TableRowCell" office:value-type="string">
            <text:p text:style-name="Table_20_Contents">DMA System Halt Output Signal</text:p>
          </table:table-cell>
        </table:table-row>
        <table:table-row>
          <table:table-cell table:style-name="TableRowCell" office:value-type="string">
            <text:p text:style-name="Table_20_Contents">39</text:p>
          </table:table-cell>
          <table:table-cell table:style-name="TableRowCell" office:value-type="string">
            <text:p text:style-name="Table_20_Contents">EXBERR</text:p>
          </table:table-cell>
          <table:table-cell table:style-name="TableRowCell" office:value-type="string">
            <text:p text:style-name="Table_20_Contents">I/O</text:p>
          </table:table-cell>
          <table:table-cell table:style-name="TableRowCell" office:value-type="string">
            <text:p text:style-name="Table_20_Contents">Bus Error</text:p>
          </table:table-cell>
          <table:table-cell table:style-name="TableRowCell" office:value-type="string">
            <text:p text:style-name="Table_20_Contents">EXOWN</text:p>
          </table:table-cell>
          <table:table-cell table:style-name="TableRowCell" office:value-type="string">
            <text:p text:style-name="Table_20_Contents">O</text:p>
          </table:table-cell>
          <table:table-cell table:style-name="TableRowCell" office:value-type="string">
            <text:p text:style-name="Table_20_Contents">DMA Transfer Grant Signal</text:p>
          </table:table-cell>
        </table:table-row>
        <table:table-row>
          <table:table-cell table:style-name="TableRowCell" office:value-type="string">
            <text:p text:style-name="Table_20_Contents">40</text:p>
          </table:table-cell>
          <table:table-cell table:style-name="TableRowCell" office:value-type="string">
            <text:p text:style-name="Table_20_Contents">EXPWON</text:p>
          </table:table-cell>
          <table:table-cell table:style-name="TableRowCell" office:value-type="string">
            <text:p text:style-name="Table_20_Contents">O</text:p>
          </table:table-cell>
          <table:table-cell table:style-name="TableRowCell" office:value-type="string">
            <text:p text:style-name="Table_20_Contents">Power On</text:p>
          </table:table-cell>
          <table:table-cell table:style-name="TableRowCell" office:value-type="string">
            <text:p text:style-name="Table_20_Contents">EXNMI</text:p>
          </table:table-cell>
          <table:table-cell table:style-name="TableRowCell" office:value-type="string">
            <text:p text:style-name="Table_20_Contents">I/O</text:p>
          </table:table-cell>
          <table:table-cell table:style-name="TableRowCell" office:value-type="string">
            <text:p text:style-name="Table_20_Contents">Non-Maskable Interrupt Signal</text:p>
          </table:table-cell>
        </table:table-row>
        <table:table-row>
          <table:table-cell table:style-name="TableRowCell" office:value-type="string">
            <text:p text:style-name="Table_20_Contents">41</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42</text:p>
          </table:table-cell>
          <table:table-cell table:style-name="TableRowCell" office:value-type="string">
            <text:p text:style-name="Table_20_Contents">Vcc 2</text:p>
          </table:table-cell>
          <table:table-cell table:style-name="TableRowCell" office:value-type="string">
            <text:p text:style-name="Table_20_Contents">O</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Horizontal_20_Line"/>
      <text:h text:style-name="Heading_20_2" text:outline-level="2"><text:bookmark-start text:name="outs-000054"/>outs-000054<text:bookmark-end text:name="outs-000054"/></text:h>
      <text:p text:style-name="Horizontal_20_Line"/>
      <text:p text:style-name="First_20_paragraph">Both are synchronized with the rising edge of 20 MHz. The phase relationship between each clock is accurate so that the clock period is the same on the expansion board side, and there is almost no need to worry about timing delays due to clock division reversals.</text:p>
      <text:list text:style-name="Numbering_20_1" text:start-value="2">
        <text:list-item>
          <text:p text:style-name="List_20_Number">Data Bus (DB0~DB15; I/O: Tri-state) The data bus and buffers of the CPU connect step by step, resulting in a 16-bit bus. The CPU's data input/output bus is also connected to this line. On IBM's PC/AT, etc., where the 8-bit bus of the past is retained to maintain compatibility, it primarily operates with an 8-bit bus, but due to its flexible specifications, such as the complete transition to a 16-bit bus, it behaves as a 16-bit bus. For the X68000, this is not the case, so it operates as a pure 16-bit bus.</text:p>
        </text:list-item>
        <text:list-item>
          <text:p text:style-name="List_20_Number">Address Bus (AB1~AB23; I/O: Tri-state) The address bus and buffers of the CPU connect step by step, resulting in a 24-bit address bus.</text:p>
        </text:list-item>
        <text:list-item>
          <text:p text:style-name="List_20_Number">Function Code (FC0~FC2; I/O: Tri-state) The function code output by the CPU is provided. (Table 2).</text:p>
        </text:list-item>
      </text:list>
      <text:list text:style-name="List_20_1">
        <text:list-item>
          <text:p text:style-name="List_20_Bullet_20_Tight">Table 2: Function Code -</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FC2</text:p>
            </table:table-cell>
            <table:table-cell table:style-name="TableHeaderRowCell" office:value-type="string">
              <text:p text:style-name="Table_20_Heading">FC1</text:p>
            </table:table-cell>
            <table:table-cell table:style-name="TableHeaderRowCell" office:value-type="string">
              <text:p text:style-name="Table_20_Heading">FC0</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User: Data</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User: Program</text:p>
          </table:table-cell>
        </table:table-row>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Undefined</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Supervisor: Data</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Supervisor: Program</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Embedded Cartridge</text:p>
          </table:table-cell>
        </table:table-row>
      </table:table>
      <text:p text:style-name="Horizontal_20_Line"/>
      <text:p text:style-name="Horizontal_20_Line"/>
      <text:h text:style-name="Heading_20_2" text:outline-level="2"><text:bookmark-start text:name="outs-000055"/>outs-000055<text:bookmark-end text:name="outs-000055"/></text:h>
      <text:p text:style-name="Horizontal_20_Line"/>
      <text:list text:style-name="Numbering_20_1" text:start-value="5">
        <text:list-item>
          <text:p text:style-name="List_20_Number">AS, R/W, LDS, UDS (Output: Tristate) These are control signals output by the CPU. AS indicates that an address is valid. R/W indicates whether the CPU will perform a read operation or a write operation. LDS/UDS indicate whether the lower 8 bits or upper 8 bits of the data bus will be used, respectively.</text:p>
        </text:list-item>
        <text:list-item>
          <text:p text:style-name="List_20_Number">DTACK (Input: Open Collector) This signal is connected to the DTACK input pin of the CPU. For option boards, it signals that data transfer has completed. The CPU knows that the read operation is complete and proceeds with the next bus cycle. In the case of a write operation, it indicates that the write operation is complete.</text:p>
        </text:list-item>
      </text:list>
      <text:p text:style-name="First_20_paragraph">When using option boards for DMA transfers, be careful not to interrupt the DMA transfer. For the X68000, after the AS signal becomes valid and 9 microseconds elapse, if the DTACK signal is not returned, a bus error will occur. Circuits should be designed with this in mind to avoid such errors.</text:p>
      <text:list text:style-name="Numbering_20_1" text:start-value="7">
        <text:list-item>
          <text:p text:style-name="List_20_Number_20_Tight">EXVPA (Input: Open Collector) This signal is connected to the VPA input pin of the CPU. For the Motorola 8-bit CPUs, such as the 6800 family, this signal is used when accessing on-board LSIs. When access is made, the CPU synchronizes to the VPA signal and returns the signal indicating that it is performing an 8-bit bus transfer.</text:p>
        </text:list-item>
      </text:list>
      <text:p text:style-name="First_20_paragraph">Since the 68000 CPU is an older device and belongs to the 6800 family LSI, it is rarely used on option boards.</text:p>
      <text:list text:style-name="Numbering_20_1" text:start-value="8">
        <text:list-item>
          <text:p text:style-name="List_20_Number">VMA (Output: Tristate) This signal is connected to the VMA output pin of the CPU. The VPA signal indicates that a family device of the 68000 has been selected, and VMA indicates that the address bus contains a valid address, meaning the processor and the address bus are operating in sync.</text:p>
        </text:list-item>
        <text:list-item>
          <text:p text:style-name="List_20_Number">E (Output: Totem Pole) This signal is connected to the E output pin of the CPU. This is a necessary signal for the 6800 family devices.</text:p>
        </text:list-item>
      </text:list>
      <text:p text:style-name="Horizontal_20_Line"/>
      <text:p text:style-name="First_20_paragraph">This translation provides an understanding of the CPU control signals and their functions as well as specific instructions for handling them in certain scenarios.</text:p>
      <text:p text:style-name="Horizontal_20_Line"/>
      <text:h text:style-name="Heading_20_2" text:outline-level="2"><text:bookmark-start text:name="outs-000056"/>outs-000056<text:bookmark-end text:name="outs-000056"/></text:h>
      <text:p text:style-name="Horizontal_20_Line"/>
      <text:p text:style-name="First_20_paragraph">The E signal cycle is 10 clock cycles (6 clocks 'LOW' and 4 clocks 'HIGH').</text:p>
      <text:p text:style-name="Text_20_body">10 EXRESET (Output: Totem Pole) This is the system reset signal. When this signal is active (at "Low" level), the conditions and duration are as follows.</text:p>
      <text:list text:style-name="List_20_1">
        <text:list-item>
          <text:p text:style-name="List_20_Bullet">When power is ON After Vcc1 is off, it becomes active for about 200 ms to 300 ms.</text:p>
        </text:list-item>
        <text:list-item>
          <text:p text:style-name="List_20_Bullet">When the RESET switch is pressed It becomes active for about 20 µs after being pressed.</text:p>
        </text:list-item>
        <text:list-item>
          <text:p text:style-name="List_20_Bullet">When a CPU reset command is executed It becomes active for about 12.4 µs after execution.</text:p>
        </text:list-item>
      </text:list>
      <text:p text:style-name="First_20_paragraph">11 HALT (Input: Open Collector) This signal is connected to the HALT line of the CPU. When it becomes active from the outside, the CPU stops executing its current cycle at the point where it ends. When this signal from the CPU is inactive, the output signal becomes a high impedance state. This signal is also used to indicate to the external device that the CPU has stopped when the CPU stops its own operation due to a double bus error, etc.</text:p>
      <text:p text:style-name="Text_20_body">12 EXBERR (Input: Open Collector) This is an external parity error signal. This signal is used to indicate to the main unit that an error has occurred inside the external device. When this signal becomes active, the software or the logic on the optional board can use it to notify the CPU of a bus error.</text:p>
      <text:p text:style-name="Text_20_body">13 EXPWON (Input: Open Collector) This is the power ON signal for X68000. When the main unit's power switch is OFF or in OFF mode (when the Vcc2 state does not exist), this signal becomes active and indicates the state to the main unit. When this signal is forced active, a power-on reset is generated in the CPU, and system reset occurs.</text:p>
      <text:p text:style-name="Horizontal_20_Line"/>
      <text:p text:style-name="First_20_paragraph">The page number in the image is "52."</text:p>
      <text:p text:style-name="Horizontal_20_Line"/>
      <text:h text:style-name="Heading_20_2" text:outline-level="2"><text:bookmark-start text:name="outs-000057"/>outs-000057<text:bookmark-end text:name="outs-000057"/></text:h>
      <text:p text:style-name="Horizontal_20_Line"/>
      <text:p text:style-name="First_20_paragraph">Use the port to drop the telephone line when the OFF process occurs. Ensure the EXPWON signal becomes Active Low after approximately 500 ms.</text:p>
      <text:list text:style-name="Numbering_20_1" text:start-value="14">
        <text:list-item>
          <text:p text:style-name="List_20_Number">IDDIR (Output: Totem Pole) The read/write signal becomes 'Low', and the light signal becomes 'High'. This signal is utilized for controlling the direction of the data bus buffer.</text:p>
        </text:list-item>
        <text:list-item>
          <text:p text:style-name="List_20_Number">Expanded Memory Board Control Signals (Output: Totem Pole) To easily extend the memory on the expanded board, the signals SELEN, CASRDEN, CASWRL, and CASWRU, the 4 signals, are prepared. SELEN is a signal indicating that it is a memory access cycle. This signal becomes ‘High’ during a memory access cycle, and becomes ‘Low’ otherwise. CASRDEN is for the refresh cycle, during CASWRL and CASWRU, the upper and lower byte signals, respectively, become ‘High’ when it’s active. It was considered to create control signals working from top down in response to AS being active. It seems like this might have been used when incorporating CAS signals in D-RAM, but looking at the schematic of a pure memory board, these signals are not used.</text:p>
        </text:list-item>
        <text:list-item>
          <text:p text:style-name="List_20_Number">INH 2 (Output: Totem Pole) This signal indicates the refresh cycle of system memory. The refresh cycle takes approximately 114 microseconds. When the AS signal is ‘Low’, if this signal is also ‘Low’, it is the refresh cycle.</text:p>
        </text:list-item>
        <text:list-item>
          <text:p text:style-name="List_20_Number">Synchronization Signal (Output: Totem Pole) HSYNC and VSYNC are horizontal and vertical synchronization signals for CRT displays, respectively. This signal, in the CZ-600 (ancestor type), is logically inverted (Going ‘Low’ during synchronization, and ‘High’ otherwise) for various models. Please be careful as it is logically inverted on some models (becomes ‘High’ during synchronization).</text:p>
        </text:list-item>
      </text:list>
      <text:p text:style-name="Horizontal_20_Line"/>
      <text:p text:style-name="Horizontal_20_Line"/>
      <text:h text:style-name="Heading_20_2" text:outline-level="2"><text:bookmark-start text:name="outs-000058"/>outs-000058<text:bookmark-end text:name="outs-000058"/></text:h>
      <text:p text:style-name="First_20_paragraph">Fig. 5 Differences in Synchronization Signals by Model</text:p>
      <text:p text:style-name="Text_20_body">CZ-600C Others</text:p>
      <text:list text:style-name="Numbering_20_1" text:start-value="18">
        <text:list-item>
          <text:p text:style-name="List_20_Number">DONE (Output: Open Collector) The DONE signal from the DMA controller is connected to the input terminals. It is used by external devices and the DMA controller to indicate that the data currently being transferred is locked (locked data). When an external device activates this signal, indicating the data currently being transferred is locked, the DMA controller accepts this as its authoritative signal. When the value of the counter register in the DMA controller reaches 0 (indicating the transfer of the preset number of bytes is complete), the DONE signal is activated.</text:p>
        </text:list-item>
        <text:list-item>
          <text:p text:style-name="List_20_Number">DTC (Output: Tristate) Connected to the DTC terminal of the DMA controller. The DTC signal indicates to the outside that data transfer operations have been successfully completed by the DMA controller.</text:p>
        </text:list-item>
        <text:list-item>
          <text:p text:style-name="List_20_Number">EXREQ (Input: Open Collector) Connected to the transfer request signal (REQ 2) of channel 2 of the DMA controller. The X68000 DMA controller has four channels, but three of those channels are used exclusively for ADPCM, floppy disk, and hard disk functions. Therefore, channel 2 is the only one that can be used for extended slots. Even if multiple slots send DMA requests simultaneously, the DMA controller cannot distinguish between and respond to multiple simultaneous requests.</text:p>
        </text:list-item>
        <text:list-item>
          <text:p text:style-name="List_20_Number">EXACK (Output: Totem Pole) Connected to the transfer acknowledgment signal (ACK 2) of channel 2 of the DMA controller. It is used to indicate to the outside that the transfer of channel #2 is taking place. The signal from the DMA controller shows that the transfer for channel #2 is taking place.</text:p>
        </text:list-item>
      </text:list>
      <text:p text:style-name="Horizontal_20_Line"/>
      <text:h text:style-name="Heading_20_2" text:outline-level="2"><text:bookmark-start text:name="outs-000059"/>outs-000059<text:bookmark-end text:name="outs-000059"/></text:h>
      <text:p text:style-name="Horizontal_20_Line"/>
      <text:p text:style-name="First_20_paragraph">When using it in single address mode, the signal will be activated on the option board side, and data input/output is performed. Since the X68000 basically uses the DMA controller in dual address mode, there is generally no need to use this signal.</text:p>
      <text:p text:style-name="Text_20_body">22 EXPCL (Input/Output: Tristate) The signal is connected to the DMA controller channel 2 peripheral control signal (PCL2). This signal can be used for various purposes such as status input, transfer start pulse output, and abort input. For more details, please refer to the manual "Inside X68000."</text:p>
      <text:p text:style-name="Text_20_body">23 EXOWN (Input/Output: Open Collector) When using a device other than the CPU with the bus, this signal is activated. It is used on the option board when data transfer operation is performed. This signal is designed to be active on the option board side as well.</text:p>
      <text:p text:style-name="Text_20_body">24 EXNMI (Input: Open Collector) This is an interrupt request signal for level 7 interrupt on the CPU or NMI. Level 7 interrupt is the highest level interrupt request and cannot be masked by the interrupt mask bit in the CPU status register. Since the X68000 normally uses NMI for auto-vector, EXNMI for interrupt requests is not active ("Low" level) during DTACK or EXVPA signals.</text:p>
      <text:p text:style-name="Text_20_body">25 Interrupt Request Signal (IRQn=m; Input: Open Collector) IRQ 2-1/IRQ 2-2, IRQ 4-1/IRQ 4-2 are interrupt request signals for slot 2 and slot 4 respectively. The numbers -1 and -2 indicate separate connections for each slot and can be viewed as two separate interrupt lines, one for level 2 and one for level 4 per slot.</text:p>
      <text:p text:style-name="Text_20_body">(Page 55)</text:p>
      <text:p text:style-name="Horizontal_20_Line"/>
      <text:p text:style-name="First_20_paragraph">Note: This translation has been formatted for readability and to convey the information clearly.</text:p>
      <text:p text:style-name="Horizontal_20_Line"/>
      <text:h text:style-name="Heading_20_2" text:outline-level="2"><text:bookmark-start text:name="outs-000060"/>outs-000060<text:bookmark-end text:name="outs-000060"/></text:h>
      <text:p text:style-name="Horizontal_20_Line"/>
      <text:list text:style-name="Numbering_20_1" text:start-value="26">
        <text:list-item>
          <text:p text:style-name="List_20_Number_20_Tight">Interrupt Acknowledge Signal (IACKn~m; Output: Totem Pole)</text:p>
        </text:list-item>
      </text:list>
      <text:p text:style-name="First_20_paragraph">IACK 2-1/IACK 2-2, IACK 4-1/IACK 4-2 are each interrupt levels 2 and 4 interrupt request acknowledge signals. The '-1,' '-2' indicate distinct request signals independently conducted per slot; they are separated from one another.</text:p>
      <text:list text:style-name="Numbering_20_1" text:start-value="27">
        <text:list-item>
          <text:p text:style-name="List_20_Number_20_Tight">Bus Request Signal (BR-1, BR-2; Input: Open Collector)</text:p>
        </text:list-item>
      </text:list>
      <text:p text:style-name="First_20_paragraph">These are bus request signals to the CPU. Each slot has independent request signals, distinguished by '-1' and '-2.'</text:p>
      <text:list text:style-name="Numbering_20_1" text:start-value="28">
        <text:list-item>
          <text:p text:style-name="List_20_Number_20_Tight">Bus Grant Signal (BG-1, BG-2; Output: Totem Pole)</text:p>
        </text:list-item>
      </text:list>
      <text:p text:style-name="First_20_paragraph">These are bus grant signals from the CPU, corresponding to bus request signals. Each slot has independent signals, denoted by '-1' and '-2.'</text:p>
      <text:list text:style-name="Numbering_20_1" text:start-value="29">
        <text:list-item>
          <text:p text:style-name="List_20_Number_20_Tight">BGACK (Input: Tri-State)</text:p>
        </text:list-item>
      </text:list>
      <text:p text:style-name="First_20_paragraph">Connected to CPU's BGACK terminal. If the CPU or its internal device (e.g., DMA controller) uses the bus, it becomes 'Low.' Please design onboard devices so bus request/bus grant signals only become 'Low' when the bus is occupied.</text:p>
      <text:list text:style-name="Numbering_20_1" text:start-value="4">
        <text:list-item>
          <text:p text:style-name="List_20_Number_20_Tight">Interrupt Assignment for Expansion Slots</text:p>
        </text:list-item>
      </text:list>
      <text:p text:style-name="First_20_paragraph">For X68000’s CPU, X68000 has interrupt levels managed sequentially from level 1 up to level 7. X68000 has two expansion slots designed with two interrupt request acknowledge signals for interrupt levels 2 and 4. Each slot’s interrupt request signal is separate, and both slots do not use the same interrupt level simultaneously.</text:p>
      <text:p text:style-name="Text_20_body">Moreover, the IACK signal giving interrupt acknowledge is assigned independently; thus, the side slot's IACK signal becomes active. Slot priority is higher for side slots, making simultaneous request handling less frequent.</text:p>
      <text:p text:style-name="Text_20_body">Page 56</text:p>
      <text:p text:style-name="Horizontal_20_Line"/>
      <text:p text:style-name="Horizontal_20_Line"/>
      <text:h text:style-name="Heading_20_2" text:outline-level="2"><text:bookmark-start text:name="outs-000061"/>outs-000061<text:bookmark-end text:name="outs-000061"/></text:h>
      <text:p text:style-name="Horizontal_20_Line"/>
      <text:p text:style-name="First_20_paragraph">If the priority of slot 1 is set higher than slot 2, and a request is made from both slots simultaneously, the request from slot 1 will be processed first. Of course, in this case, the interrupt request of slot 2 is not discarded. The CPU completes the interrupt processing and, if it is ready to accept the next interrupt, returns an ACK signal at that moment. Figures 6 and 7 show the interrupt request block from the I/O slot and the timing of the interrupt sequence for your reference.</text:p>
      <text:p text:style-name="Text_20_body">■ Figure 6 Block Diagram Relating to Interrupt Requests from I/O Slots</text:p>
      <text:p text:style-name="Text_20_body">[Diagram Labels] I/O Slot 1:</text:p>
      <text:list text:style-name="List_20_1">
        <text:list-item>
          <text:p text:style-name="List_20_Bullet_20_Tight">IRQ2-1</text:p>
        </text:list-item>
        <text:list-item>
          <text:p text:style-name="List_20_Bullet_20_Tight">IRQ4-1</text:p>
        </text:list-item>
        <text:list-item>
          <text:p text:style-name="List_20_Bullet_20_Tight">EXNMI</text:p>
        </text:list-item>
        <text:list-item>
          <text:p text:style-name="List_20_Bullet_20_Tight">IACK2-1</text:p>
        </text:list-item>
        <text:list-item>
          <text:p text:style-name="List_20_Bullet_20_Tight">IACK4-1</text:p>
        </text:list-item>
      </text:list>
      <text:p text:style-name="First_20_paragraph">8 to 3 Priority Encoder:</text:p>
      <text:list text:style-name="List_20_1">
        <text:list-item>
          <text:p text:style-name="List_20_Bullet_20_Tight">A2</text:p>
        </text:list-item>
        <text:list-item>
          <text:p text:style-name="List_20_Bullet_20_Tight">A1</text:p>
        </text:list-item>
        <text:list-item>
          <text:p text:style-name="List_20_Bullet_20_Tight">A0</text:p>
        </text:list-item>
        <text:list-item>
          <text:p text:style-name="List_20_Bullet_20_Tight">Vcc (2.2kΩ x 5)</text:p>
        </text:list-item>
        <text:list-item>
          <text:p text:style-name="List_20_Bullet_20_Tight">I/O Slot</text:p>
        </text:list-item>
        <text:list-item>
          <text:p text:style-name="List_20_Bullet_20_Tight">IRQ2-2</text:p>
        </text:list-item>
        <text:list-item>
          <text:p text:style-name="List_20_Bullet_20_Tight">IRQ4-2</text:p>
        </text:list-item>
        <text:list-item>
          <text:p text:style-name="List_20_Bullet_20_Tight">EXNMI</text:p>
        </text:list-item>
        <text:list-item>
          <text:p text:style-name="List_20_Bullet_20_Tight">IACK2-2</text:p>
        </text:list-item>
        <text:list-item>
          <text:p text:style-name="List_20_Bullet_20_Tight">IACK4-2</text:p>
        </text:list-item>
      </text:list>
      <text:p text:style-name="First_20_paragraph">MPU:</text:p>
      <text:list text:style-name="List_20_1">
        <text:list-item>
          <text:p text:style-name="List_20_Bullet_20_Tight">VPA</text:p>
        </text:list-item>
        <text:list-item>
          <text:p text:style-name="List_20_Bullet_20_Tight">LDS</text:p>
        </text:list-item>
        <text:list-item>
          <text:p text:style-name="List_20_Bullet_20_Tight">FC2</text:p>
        </text:list-item>
        <text:list-item>
          <text:p text:style-name="List_20_Bullet_20_Tight">FC1</text:p>
        </text:list-item>
        <text:list-item>
          <text:p text:style-name="List_20_Bullet_20_Tight">FC0</text:p>
        </text:list-item>
        <text:list-item>
          <text:p text:style-name="List_20_Bullet_20_Tight">A3</text:p>
        </text:list-item>
        <text:list-item>
          <text:p text:style-name="List_20_Bullet_20_Tight">A2</text:p>
        </text:list-item>
        <text:list-item>
          <text:p text:style-name="List_20_Bullet_20_Tight">A1</text:p>
        </text:list-item>
        <text:list-item>
          <text:p text:style-name="List_20_Bullet_20_Tight">3 to 8 Decoder</text:p>
        </text:list-item>
        <text:list-item>
          <text:p text:style-name="List_20_Bullet_20_Tight">Gate Array</text:p>
        </text:list-item>
      </text:list>
      <text:p text:style-name="First_20_paragraph">[On the Circuit] Interrupt Switch</text:p>
      <text:p text:style-name="Text_20_body">I/O Slot 2</text:p>
      <text:p text:style-name="Horizontal_20_Line"/>
      <text:p text:style-name="First_20_paragraph">(Note: The labels in the diagram are directly included in the translation to match the layout of the original image as closely as possible.)</text:p>
      <text:p text:style-name="Horizontal_20_Line"/>
      <text:h text:style-name="Heading_20_2" text:outline-level="2"><text:bookmark-start text:name="outs-000062"/>outs-000062<text:bookmark-end text:name="outs-000062"/></text:h>
      <text:p text:style-name="First_20_paragraph">● Fig. 7 Interrupt Sequence Timing Chart</text:p>
      <text:p text:style-name="Text_20_body">Signal lines (top to bottom): R/W AS LDS FC0 - FC2 [FC0-FC2=111] AB1 - AB7 [AB1-AB7=010] IRQ7-1 IRQ7-2 IPL0-2 IACK1 IACK2</text:p>
      <text:p text:style-name="Text_20_body">Right-side annotations (top to bottom):</text:p>
      <text:list text:style-name="List_20_1">
        <text:list-item>
          <text:p text:style-name="List_20_Bullet_20_Tight">Interrupt acknowledge processing sequence for the interrupt from the slot (for slot 1)</text:p>
        </text:list-item>
        <text:list-item>
          <text:p text:style-name="List_20_Bullet_20_Tight">Interrupt acknowledge processing sequence for the interrupt from the slot (for slot 2)</text:p>
        </text:list-item>
        <text:list-item>
          <text:p text:style-name="List_20_Bullet_20_Tight">Interrupt acknowledge processing sequence for the interrupt from the slot</text:p>
        </text:list-item>
      </text:list>
      <text:p text:style-name="First_20_paragraph">Bottom-left note: Interrupt sources occur simultaneously</text:p>
      <text:p text:style-name="Text_20_body">58</text:p>
      <text:p text:style-name="Horizontal_20_Line"/>
      <text:h text:style-name="Heading_20_2" text:outline-level="2"><text:bookmark-start text:name="outs-000063"/>outs-000063<text:bookmark-end text:name="outs-000063"/></text:h>
      <text:p text:style-name="Horizontal_20_Line"/>
      <text:h text:style-name="Heading_20_3" text:outline-level="3"><text:bookmark-start text:name="id_5-bus-occupation-from-expansion-slot"/>5. Bus Occupation from Expansion Slot<text:bookmark-end text:name="id_5-bus-occupation-from-expansion-slot"/></text:h>
      <text:p text:style-name="First_20_paragraph">In the X68000, it is possible for the DMA controller or similar to release the bus from the CPU, allowing the expansion board to occupy the bus (sometimes referred to as "taking over"). This can be done by sending a bus release request signal from the two expansion slots and the internal DMA controller.</text:p>
      <text:h text:style-name="Heading_20_4" text:outline-level="4"><text:bookmark-start text:name="figure-8-block-diagram-for-bus-requests-from-io-slot"/>Figure 8: Block Diagram for Bus Requests from I/O Slot<text:bookmark-end text:name="figure-8-block-diagram-for-bus-requests-from-io-slot"/></text:h>
      <text:p text:style-name="Horizontal_20_Line"/>
      <text:p text:style-name="First_20_paragraph">(Note: The figure numbers, labels, and technical terms are retained from the original text for clarity.)</text:p>
      <text:p text:style-name="Horizontal_20_Line"/>
      <text:h text:style-name="Heading_20_2" text:outline-level="2"><text:bookmark-start text:name="outs-000064"/>outs-000064<text:bookmark-end text:name="outs-000064"/></text:h>
      <text:p text:style-name="First_20_paragraph">Top left: "Figure 9 Bus Arbitration Timing Chart"</text:p>
      <text:p text:style-name="Text_20_body">Middle right: "Device in slot 1 asserts bus request"</text:p>
      <text:p text:style-name="Text_20_body">Right side: "Bus mastership occurs simultaneously"</text:p>
      <text:p text:style-name="Text_20_body">Bottom: "BR (DMAC) BR-1 BR-2 BR (MPU) MPU DMAC BRG BG-1 BG-2 BGACK"</text:p>
      <text:p text:style-name="Horizontal_20_Line"/>
      <text:h text:style-name="Heading_20_2" text:outline-level="2"><text:bookmark-start text:name="outs-000065"/>outs-000065<text:bookmark-end text:name="outs-000065"/></text:h>
      <text:p text:style-name="Horizontal_20_Line"/>
      <text:p text:style-name="First_20_paragraph">To occupy the bus from the expansion slot:</text:p>
      <text:p text:style-name="Text_20_body">(1) Set the BR signal to 'Low' to request bus release. (2) When the BG signal is set to 'Low' and the bus release request is accepted, set the BGCACK signal to 'Low'. (3) When usage is complete, set the BGCACK signal to 'High' to notify the CPU that bus usage has ended.</text:p>
      <text:p text:style-name="Text_20_body">For more details, please refer to [Figure 8] for the flowchart of signals related to bus release requests, and [Figure 9] for the timing of the bus occupation sequence.</text:p>
      <text:p text:style-name="Horizontal_20_Line"/>
      <text:p text:style-name="First_20_paragraph">•6 DC Specifications for I/O Slots</text:p>
      <text:p text:style-name="Text_20_body">The DC specifications for the I/O slots of the X68000 are shown below. The table lists the maximum allowable current values that can be supplied from the board and drawn from the option board when the signal levels 'L' and 'H' are reached for III/IIH signals. IOL/IOH values indicate the maximum allowable current values that must not be exceeded when driving the signals from the option board. When using driver ICs and series ICs on the option board, please select those that meet these current tolerances and have power-up/power-down resistance. Also, please receive signals taken out of the I/O slot with a buffer IC at a distance close to the board's interior to prevent issues. The cross-talk and reflection of signals from the I/O slot, distribution arrays, etc., can easily interfere with not only the board itself but also the overall system, so be careful.</text:p>
      <text:p text:style-name="Text_20_body">Page 61</text:p>
      <text:p text:style-name="Horizontal_20_Line"/>
      <text:h text:style-name="Heading_20_2" text:outline-level="2"><text:bookmark-start text:name="outs-000066"/>outs-000066<text:bookmark-end text:name="outs-000066"/></text:h>
      <text:p text:style-name="First_20_paragraph">● Table 3 I/O Slot DC Specification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Signal Name</text:p>
            </table:table-cell>
            <table:table-cell table:style-name="TableHeaderRowCell" office:value-type="string">
              <text:p text:style-name="Table_20_Heading">IIL (mA)</text:p>
            </table:table-cell>
            <table:table-cell table:style-name="TableHeaderRowCell" office:value-type="string">
              <text:p text:style-name="Table_20_Heading">IIH (µA)</text:p>
            </table:table-cell>
            <table:table-cell table:style-name="TableHeaderRowCell" office:value-type="string">
              <text:p text:style-name="Table_20_Heading">IOL (mA)</text:p>
            </table:table-cell>
            <table:table-cell table:style-name="TableHeaderRowCell" office:value-type="string">
              <text:p text:style-name="Table_20_Heading">IOH (mA)</text:p>
            </table:table-cell>
          </table:table-row>
        </table:table-header-rows>
        <table:table-row>
          <table:table-cell table:style-name="TableRowCell" office:value-type="string">
            <text:p text:style-name="Table_20_Contents">AB1～AB2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B0～DB1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DS</text:p>
          </table:table-cell>
          <table:table-cell table:style-name="TableRowCell" office:value-type="string">
            <text:p text:style-name="Table_20_Contents">-2.0</text:p>
          </table:table-cell>
          <table:table-cell table:style-name="TableRowCell" office:value-type="string">
            <text:p text:style-name="Table_20_Contents">50</text:p>
          </table:table-cell>
          <table:table-cell table:style-name="TableRowCell" office:value-type="string">
            <text:p text:style-name="Table_20_Contents">24</text:p>
          </table:table-cell>
          <table:table-cell table:style-name="TableRowCell" office:value-type="string">
            <text:p text:style-name="Table_20_Contents">-3.0</text:p>
          </table:table-cell>
        </table:table-row>
        <table:table-row>
          <table:table-cell table:style-name="TableRowCell" office:value-type="string">
            <text:p text:style-name="Table_20_Contents">UD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C0～FC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M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TACK</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VPA</text:p>
          </table:table-cell>
          <table:table-cell table:style-name="TableRowCell" office:value-type="string">
            <text:p text:style-name="Table_20_Contents">——</text:p>
          </table:table-cell>
          <table:table-cell table:style-name="TableRowCell" office:value-type="string">
            <text:p text:style-name="Table_20_Contents">total of 6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MHz / 10MHz / 20MHz</text:p>
          </table:table-cell>
          <table:table-cell table:style-name="TableRowCell" office:value-type="string">
            <text:p text:style-name="Table_20_Contents">-2.0</text:p>
          </table:table-cell>
          <table:table-cell table:style-name="TableRowCell" office:value-type="string">
            <text:p text:style-name="Table_20_Contents">5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LT</text:p>
          </table:table-cell>
          <table:table-cell table:style-name="TableRowCell" office:value-type="string">
            <text:p text:style-name="Table_20_Contents">total of -0.2</text:p>
          </table:table-cell>
          <table:table-cell table:style-name="TableRowCell" office:value-type="string">
            <text:p text:style-name="Table_20_Contents">total of 25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RESET</text:p>
          </table:table-cell>
          <table:table-cell table:style-name="TableRowCell" office:value-type="string">
            <text:p text:style-name="Table_20_Contents">-1.2</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BERR</text:p>
          </table:table-cell>
          <table:table-cell table:style-name="TableRowCell" office:value-type="string">
            <text:p text:style-name="Table_20_Contents">-0.4</text:p>
          </table:table-cell>
          <table:table-cell table:style-name="TableRowCell" office:value-type="string">
            <text:p text:style-name="Table_20_Contents">30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DDIR</text:p>
          </table:table-cell>
          <table:table-cell table:style-name="TableRowCell" office:value-type="string">
            <text:p text:style-name="Table_20_Contents">-0.8</text:p>
          </table:table-cell>
          <table:table-cell table:style-name="TableRowCell" office:value-type="string">
            <text:p text:style-name="Table_20_Contents">4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SYNC</text:p>
          </table:table-cell>
          <table:table-cell table:style-name="TableRowCell" office:value-type="string">
            <text:p text:style-name="Table_20_Contents">-0.4</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SYN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EL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RDE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L</text:p>
          </table:table-cell>
          <table:table-cell table:style-name="TableRowCell" office:value-type="string">
            <text:p text:style-name="Table_20_Contents">-3.0</text:p>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SWRU</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H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NE</text:p>
          </table:table-cell>
          <table:table-cell table:style-name="TableRowCell" office:value-type="string">
            <text:p text:style-name="Table_20_Contents">-1.2</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DTC</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REQ</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EXACK</text:p>
          </table:table-cell>
          <table:table-cell table:style-name="TableRowCell" office:value-type="string">
            <text:p text:style-name="Table_20_Contents">——</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PCL</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able:table-cell>
          <table:table-cell table:style-name="TableRowCell" office:value-type="string">
            <text:p text:style-name="Table_20_Contents">1.0</text:p>
          </table:table-cell>
        </table:table-row>
        <table:table-row>
          <table:table-cell table:style-name="TableRowCell" office:value-type="string">
            <text:p text:style-name="Table_20_Contents">EX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IRQ2-1～IRQ4-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XNMI</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ACK2-1～IACK4-2</text:p>
          </table:table-cell>
          <table:table-cell table:style-name="TableRowCell" office:value-type="string">
            <text:p text:style-name="Table_20_Contents">-0.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1, BR-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8</text:p>
          </table:table-cell>
          <table:table-cell table:style-name="TableRowCell" office:value-type="string">
    </table:table-cell>
        </table:table-row>
        <table:table-row>
          <table:table-cell table:style-name="TableRowCell" office:value-type="string">
            <text:p text:style-name="Table_20_Contents">BG-1, BG-2</text:p>
          </table:table-cell>
          <table:table-cell table:style-name="TableRowCell" office:value-type="string">
            <text:p text:style-name="Table_20_Contents">-0.8</text:p>
          </table:table-cell>
          <table:table-cell table:style-name="TableRowCell" office:value-type="string">
            <text:p text:style-name="Table_20_Contents">60</text:p>
          </table:table-cell>
          <table:table-cell table:style-name="TableRowCell" office:value-type="string">
            <text:p text:style-name="Table_20_Contents">8</text:p>
          </table:table-cell>
          <table:table-cell table:style-name="TableRowCell" office:value-type="string">
            <text:p text:style-name="Table_20_Contents">-1.0</text:p>
          </table:table-cell>
        </table:table-row>
        <table:table-row>
          <table:table-cell table:style-name="TableRowCell" office:value-type="string">
            <text:p text:style-name="Table_20_Contents">BGACK</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62</text:p>
      <text:p text:style-name="Horizontal_20_Line"/>
      <text:h text:style-name="Heading_20_2" text:outline-level="2"><text:bookmark-start text:name="outs-000067"/>outs-000067<text:bookmark-end text:name="outs-000067"/></text:h>
      <text:p text:style-name="Horizontal_20_Line"/>
      <text:p text:style-name="First_20_paragraph"><text:span text:style-name="Strong_20_Emphasis">Expansion Slot Specifications</text:span></text:p>
      <text:p text:style-name="Text_20_body"><text:span text:style-name="Strong_20_Emphasis">Power Capacity (per slot)</text:span></text:p>
      <table:table table:name="Table15" table:style-name="Table15">
        <table:table-column table:style-name="Table15.A"/>
        <table:table-column table:style-name="Table15.B"/>
        <table:table-header-rows>
          <table:table-row>
            <table:table-cell table:style-name="TableHeaderRowCell" office:value-type="string">
              <text:p text:style-name="Table_20_Heading">Vcc1 (+5V)</text:p>
            </table:table-cell>
            <table:table-cell table:style-name="TableHeaderRowCell" office:value-type="string">
              <text:p text:style-name="Table_20_Heading">600 mA</text:p>
            </table:table-cell>
          </table:table-row>
        </table:table-header-rows>
        <table:table-row>
          <table:table-cell table:style-name="TableRowCell" office:value-type="string">
            <text:p text:style-name="Table_20_Contents">Vcc2 (+5V)</text:p>
          </table:table-cell>
          <table:table-cell table:style-name="TableRowCell" office:value-type="string">
            <text:p text:style-name="Table_20_Contents">30 mA</text:p>
          </table:table-cell>
        </table:table-row>
        <table:table-row>
          <table:table-cell table:style-name="TableRowCell" office:value-type="string">
            <text:p text:style-name="Table_20_Contents">Vcc3 (+12V)</text:p>
          </table:table-cell>
          <table:table-cell table:style-name="TableRowCell" office:value-type="string">
            <text:p text:style-name="Table_20_Contents">30 mA</text:p>
          </table:table-cell>
        </table:table-row>
        <table:table-row>
          <table:table-cell table:style-name="TableRowCell" office:value-type="string">
            <text:p text:style-name="Table_20_Contents">Vcc4 (-12V)</text:p>
          </table:table-cell>
          <table:table-cell table:style-name="TableRowCell" office:value-type="string">
            <text:p text:style-name="Table_20_Contents">30 mA</text:p>
          </table:table-cell>
        </table:table-row>
      </table:table>
      <text:p text:style-name="First_20_paragraph"><text:span text:style-name="Strong_20_Emphasis">7 I/O Slot AC Timing</text:span></text:p>
      <text:p text:style-name="Text_20_body">The X68000 expansion slot operation is fundamentally categorized into three cycles: read cycles, write cycles, and memory refresh cycles. By using DMA for data transfer with the X68000, where it employs dual address mode, there is little to no change in the operation from when only the CPU is used. When accessed by the CPU, the EXOWN signal is 'H'; for access by the DMA controller, the EXOWN signal is 'L', allowing distinction between the access cycles.</text:p>
      <text:p text:style-name="Text_20_body">The read/write timing is illustrated in figure 10. Below are the operations during read time:</text:p>
      <text:list text:style-name="Numbering_20_1">
        <text:list-item>
          <text:p text:style-name="List_20_Number">The CPU or DMA controller (simply referred to as CPU) outputs the address bus signals to designate the address, specifying the FCn and ABn to validate AS (Address Strobe). At this time, UDS/LDS (upper data strobe/lower data strobe) signals are 'L.' During this time, the R/W signal is in the read status and IDDIR is 'H'.</text:p>
        </text:list-item>
        <text:list-item>
          <text:p text:style-name="List_20_Number">The accessed side (option board side) places data on the bus and raises the DTACK signal to indicate that valid data is available on the bus to the CPU.</text:p>
        </text:list-item>
        <text:list-item>
          <text:p text:style-name="List_20_Number">The CPU receives the DTACK and hence AS, UDS, and LDS signals turn 'H,' reflected back to the DTACK signal to the option board side as 'H.'</text:p>
        </text:list-item>
      </text:list>
      <text:p text:style-name="First_20_paragraph">During memory access/refresh cycles, such as vector table setting cycles based on CPU instructions and for IACKn signal handling, the operation mirrors read cycles. The write cycle details, after the address is designated by AS and access size decision, the CPU writes data onto the data bus, setting UDS, LDS to 'L'. This time, the R/W signal turns to write status with IDDIR as 'L'.</text:p>
      <text:p text:style-name="Horizontal_20_Line"/>
      <text:p text:style-name="First_20_paragraph">(Page 63)</text:p>
      <text:p text:style-name="Horizontal_20_Line"/>
      <text:h text:style-name="Heading_20_2" text:outline-level="2"><text:bookmark-start text:name="outs-000068"/>outs-000068<text:bookmark-end text:name="outs-000068"/></text:h>
      <text:p text:style-name="First_20_paragraph">● Fig. 10 Read/Write Cycle Timing Chart</text:p>
      <text:p text:style-name="Text_20_body">(a) Read Cycle</text:p>
      <text:p text:style-name="Text_20_body">(b) Write Cycle</text:p>
      <text:p text:style-name="Text_20_body">*1 In the interrupt acknowledge cycle, the IACKn signal becomes 'L'. (n is the interrupt level and slot number)</text:p>
      <text:p text:style-name="Text_20_body">*2 In the MPU cycle, the EXOWN signal becomes 'H', and in the DMAC cycle, it becomes 'L'.</text:p>
      <text:p text:style-name="Text_20_body">64</text:p>
      <text:p text:style-name="Horizontal_20_Line"/>
      <text:h text:style-name="Heading_20_2" text:outline-level="2"><text:bookmark-start text:name="outs-000069"/>outs-000069<text:bookmark-end text:name="outs-000069"/></text:h>
      <text:p text:style-name="Horizontal_20_Line"/>
      <text:p text:style-name="First_20_paragraph"><text:span text:style-name="Strong_20_Emphasis">Table 4 Characteristics of I/O Slot A and C</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Item No.</text:p>
            </table:table-cell>
            <table:table-cell table:style-name="TableHeaderRowCell" office:value-type="string">
              <text:p text:style-name="Table_20_Heading">Item</text:p>
            </table:table-cell>
            <table:table-cell table:style-name="TableHeaderRowCell" office:value-type="string">
              <text:p text:style-name="Table_20_Heading">Description</text:p>
            </table:table-cell>
            <table:table-cell table:style-name="TableHeaderRowCell" office:value-type="string">
              <text:p text:style-name="Table_20_Heading">Delay Time (ns)</text:p>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Min</text:p>
          </table:table-cell>
          <table:table-cell table:style-name="TableRowCell" office:value-type="string">
            <text:p text:style-name="Table_20_Contents">Max</text:p>
          </table:table-cell>
        </table:table-row>
        <table:table-row>
          <table:table-cell table:style-name="TableRowCell" office:value-type="string">
            <text:p text:style-name="Table_20_Contents">1</text:p>
          </table:table-cell>
          <table:table-cell table:style-name="TableRowCell" office:value-type="string">
    </table:table-cell>
          <table:table-cell table:style-name="TableRowCell" office:value-type="string">
            <text:p text:style-name="Table_20_Contents">Until FC assertion by AS, UDS, LDS = "L"</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able:table-cell>
          <table:table-cell table:style-name="TableRowCell" office:value-type="string">
            <text:p text:style-name="Table_20_Contents">From AS, UDS, LDS = "H" until FC is valid</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able:table-cell>
          <table:table-cell table:style-name="TableRowCell" office:value-type="string">
            <text:p text:style-name="Table_20_Contents">Until AS, UDS, LDS = "L" assertion from address determin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able:table-cell>
          <table:table-cell table:style-name="TableRowCell" office:value-type="string">
            <text:p text:style-name="Table_20_Contents">Valid address period after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Until AS, UDS, LDS = "L" from R/W = "H"</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able:table-cell>
          <table:table-cell table:style-name="TableRowCell" office:value-type="string">
            <text:p text:style-name="Table_20_Contents">Until R/W = "L" from AS, UDS, L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Until data phase wait after DTACK assertion</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able:table-cell>
          <table:table-cell table:style-name="TableRowCell" office:value-type="string">
            <text:p text:style-name="Table_20_Contents">Data hold period from DS = "H"</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Until data = "Z" from DS = "H"</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able:table-cell>
          <table:table-cell table:style-name="TableRowCell" office:value-type="string">
            <text:p text:style-name="Table_20_Contents">Until DTACK = "Z" from DS = "H"</text:p>
          </table:table-cell>
          <table:table-cell table:style-name="TableRowCell" office:value-type="string">
            <text:p text:style-name="Table_20_Contents">130</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Until IDDIR = "L" from AS, UDS, LDS = "L"</text:p>
          </table:table-cell>
          <table:table-cell table:style-name="TableRowCell" office:value-type="string">
            <text:p text:style-name="Table_20_Contents">150</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Until IDDIR = "H" from AS, UDS, LDS = "H"</text:p>
          </table:table-cell>
          <table:table-cell table:style-name="TableRowCell" office:value-type="string">
            <text:p text:style-name="Table_20_Contents">45</text:p>
          </table:table-cell>
          <table:table-cell table:style-name="TableRowCell" office:value-type="string">
            <text:p text:style-name="Table_20_Contents">150</text:p>
          </table:table-cell>
        </table:table-row>
        <table:table-row>
          <table:table-cell table:style-name="TableRowCell" office:value-type="string">
            <text:p text:style-name="Table_20_Contents">13</text:p>
          </table:table-cell>
          <table:table-cell table:style-name="TableRowCell" office:value-type="string">
    </table:table-cell>
          <table:table-cell table:style-name="TableRowCell" office:value-type="string">
            <text:p text:style-name="Table_20_Contents">Until DS = "L" assertion from address confirmation</text:p>
          </table:table-cell>
          <table:table-cell table:style-name="TableRowCell" office:value-type="string">
            <text:p text:style-name="Table_20_Contents">90</text:p>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Until DS = "L" from address determination</text:p>
          </table:table-cell>
          <table:table-cell table:style-name="TableRowCell" office:value-type="string">
            <text:p text:style-name="Table_20_Contents">45</text:p>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able:table-cell>
          <table:table-cell table:style-name="TableRowCell" office:value-type="string">
            <text:p text:style-name="Table_20_Contents">Until DS = "L" from R/W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Until R/W = "H" from AS, UDS, L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able:table-cell>
          <table:table-cell table:style-name="TableRowCell" office:value-type="string">
            <text:p text:style-name="Table_20_Contents">Until DS = "L" after data confirmation</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Valid data period from DS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able:table-cell>
          <table:table-cell table:style-name="TableRowCell" office:value-type="string">
            <text:p text:style-name="Table_20_Contents">Until data = "Z" from R/W = "H"</text:p>
          </table:table-cell>
          <table:table-cell table:style-name="TableRowCell" office:value-type="string">
            <text:p text:style-name="Table_20_Contents">35</text:p>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Until AS, UDS, LDS = "H" from DTACK = "L"</text:p>
          </table:table-cell>
          <table:table-cell table:style-name="TableRowCell" office:value-type="string">
            <text:p text:style-name="Table_20_Contents">80</text:p>
          </table:table-cell>
          <table:table-cell table:style-name="TableRowCell" office:value-type="string">
            <text:p text:style-name="Table_20_Contents">300</text:p>
          </table:table-cell>
        </table:table-row>
        <table:table-row>
          <table:table-cell table:style-name="TableRowCell" office:value-type="string">
            <text:p text:style-name="Table_20_Contents">21</text:p>
          </table:table-cell>
          <table:table-cell table:style-name="TableRowCell" office:value-type="string">
    </table:table-cell>
          <table:table-cell table:style-name="TableRowCell" office:value-type="string">
            <text:p text:style-name="Table_20_Contents">Until AS, R/W = "L" from IDDIR = "H"</text:p>
          </table:table-cell>
          <table:table-cell table:style-name="TableRowCell" office:value-type="string">
            <text:p text:style-name="Table_20_Contents">10</text:p>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Until IDDIR = "L" from AS, UDS, LDS = "H"</text:p>
          </table:table-cell>
          <table:table-cell table:style-name="TableRowCell" office:value-type="string">
            <text:p text:style-name="Table_20_Contents">180</text:p>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Until IACKn = "L" from UDS, LDS = "L"</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24</text:p>
          </table:table-cell>
          <table:table-cell table:style-name="TableRowCell" office:value-type="string">
    </table:table-cell>
          <table:table-cell table:style-name="TableRowCell" office:value-type="string">
            <text:p text:style-name="Table_20_Contents">Until IACKn = "H" from UDS, LDS = "H"</text:p>
          </table:table-cell>
          <table:table-cell table:style-name="TableRowCell" office:value-type="string">
            <text:p text:style-name="Table_20_Contents">5</text:p>
          </table:table-cell>
          <table:table-cell table:style-name="TableRowCell" office:value-type="string">
            <text:p text:style-name="Table_20_Contents">40</text:p>
          </table:table-cell>
        </table:table-row>
      </table:table>
      <text:p text:style-name="Horizontal_20_Line"/>
      <text:p text:style-name="First_20_paragraph">This should help in understanding the contents and delay times for the I/O slot characteristics!</text:p>
      <text:p text:style-name="Horizontal_20_Line"/>
      <text:h text:style-name="Heading_20_2" text:outline-level="2"><text:bookmark-start text:name="outs-000070"/>outs-000070<text:bookmark-end text:name="outs-000070"/></text:h>
      <text:p text:style-name="Horizontal_20_Line"/>
      <text:p text:style-name="First_20_paragraph"><text:span text:style-name="Strong_20_Emphasis">8 Refresh/D-RAM Signal Timing</text:span></text:p>
      <text:p text:style-name="Text_20_body">Below, the timing of the group of signals designed to facilitate refresh and D-RAM control is shown in Figure 11.</text:p>
      <text:p text:style-name="Text_20_body"><text:span text:style-name="Strong_20_Emphasis">Figure 11 Memory Read/Write Cycle Timing Chart</text:span></text:p>
      <text:p text:style-name="Text_20_body"><text:span text:style-name="Strong_20_Emphasis">Read Cycle</text:span> | <text:span text:style-name="Strong_20_Emphasis">Write Cycle</text:span></text:p>
      <text:p text:style-name="Text_20_body"><text:span text:style-name="Strong_20_Emphasis">Refresh Cycle</text:span> | <text:span text:style-name="Strong_20_Emphasis">Memory Cycle</text:span></text:p>
      <text:p text:style-name="Horizontal_20_Line"/>
      <text:p text:style-name="Horizontal_20_Line"/>
      <text:h text:style-name="Heading_20_2" text:outline-level="2"><text:bookmark-start text:name="outs-000071"/>outs-000071<text:bookmark-end text:name="outs-000071"/></text:h>
      <text:p text:style-name="Horizontal_20_Line"/>
      <text:p text:style-name="First_20_paragraph">Expansion Slot Specification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No.</text:p>
            </table:table-cell>
            <table:table-cell table:style-name="TableHeaderRowCell" office:value-type="string">
              <text:p text:style-name="Table_20_Heading">Item</text:p>
            </table:table-cell>
            <table:table-cell table:style-name="TableHeaderRowCell" office:value-type="string">
              <text:p text:style-name="Table_20_Heading">Delay Time (unit: ns)</text:p>
            </table:table-cell>
            <table:table-cell table:style-name="TableHeaderRowCell" office:value-type="string">
      </table:table-cell>
            <table:table-cell table:style-name="TableHeaderRowCell" office:value-type="string">
              <text:p text:style-name="Table_20_Heading">Remark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ext:p text:style-name="Table_20_Contents">Minimum</text:p>
          </table:table-cell>
          <table:table-cell table:style-name="TableRowCell" office:value-type="string">
            <text:p text:style-name="Table_20_Contents">Maximum</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rom AS/UDS, LDS to SEL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1A</text:p>
          </table:table-cell>
          <table:table-cell table:style-name="TableRowCell" office:value-type="string">
            <text:p text:style-name="Table_20_Contents">(During Refresh Cycle)</text:p>
          </table:table-cell>
          <table:table-cell table:style-name="TableRowCell" office:value-type="string">
            <text:p text:style-name="Table_20_Contents">100N+40</text:p>
          </table:table-cell>
          <table:table-cell table:style-name="TableRowCell" office:value-type="string">
            <text:p text:style-name="Table_20_Contents">100N+120</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From AS/UDS, LDS to SEL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From AS/UDS, LDS to CASDEN=L</text:p>
          </table:table-cell>
          <table:table-cell table:style-name="TableRowCell" office:value-type="string">
            <text:p text:style-name="Table_20_Contents">40</text:p>
          </table:table-cell>
          <table:table-cell table:style-name="TableRowCell" office:value-type="string">
            <text:p text:style-name="Table_20_Contents">12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rom AS/UDS, LDS to CASDEN=H</text:p>
          </table:table-cell>
          <table:table-cell table:style-name="TableRowCell" office:value-type="string">
            <text:p text:style-name="Table_20_Contents">0</text:p>
          </table:table-cell>
          <table:table-cell table:style-name="TableRowCell" office:value-type="string">
            <text:p text:style-name="Table_20_Contents">40</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From UDS, LDS to CASWRU/CASWRL=L</text:p>
          </table:table-cell>
          <table:table-cell table:style-name="TableRowCell" office:value-type="string">
            <text:p text:style-name="Table_20_Contents">0</text:p>
          </table:table-cell>
          <table:table-cell table:style-name="TableRowCell" office:value-type="string">
            <text:p text:style-name="Table_20_Contents">80</text:p>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From AS/UDS, LDS to CASWRU/CASWRL=H</text:p>
          </table:table-cell>
          <table:table-cell table:style-name="TableRowCell" office:value-type="string">
            <text:p text:style-name="Table_20_Contents">0</text:p>
          </table:table-cell>
          <table:table-cell table:style-name="TableRowCell" office:value-type="string">
            <text:p text:style-name="Table_20_Contents">30</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NH2 to Pulse Width</text:p>
          </table:table-cell>
          <table:table-cell table:style-name="TableRowCell" office:value-type="string">
            <text:p text:style-name="Table_20_Contents">390</text:p>
          </table:table-cell>
          <table:table-cell table:style-name="TableRowCell" office:value-type="string">
            <text:p text:style-name="Table_20_Contents">410</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rom INH2 to CASDEN/SELEN=H</text:p>
          </table:table-cell>
          <table:table-cell table:style-name="TableRowCell" office:value-type="string">
            <text:p text:style-name="Table_20_Contents">100M+90</text:p>
          </table:table-cell>
          <table:table-cell table:style-name="TableRowCell" office:value-type="string">
            <text:p text:style-name="Table_20_Contents">100M+120</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From INH2 to CASWRU/CASWRL=H</text:p>
          </table:table-cell>
          <table:table-cell table:style-name="TableRowCell" office:value-type="string">
            <text:p text:style-name="Table_20_Contents">75</text:p>
          </table:table-cell>
          <table:table-cell table:style-name="TableRowCell" office:value-type="string">
            <text:p text:style-name="Table_20_Contents">110</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CASWRU/CASWRL Pulse Width (Refresh Cycle)</text:p>
          </table:table-cell>
          <table:table-cell table:style-name="TableRowCell" office:value-type="string">
            <text:p text:style-name="Table_20_Contents">190</text:p>
          </table:table-cell>
          <table:table-cell table:style-name="TableRowCell" office:value-type="string">
            <text:p text:style-name="Table_20_Contents">210</text:p>
          </table:table-cell>
          <table:table-cell table:style-name="TableRowCell" office:value-type="string">
    </table:table-cell>
        </table:table-row>
      </table:table>
      <text:p text:style-name="First_20_paragraph">67</text:p>
      <text:p text:style-name="Horizontal_20_Line"/>
      <text:p text:style-name="First_20_paragraph">This should capture the translated content and structure of the document.</text:p>
      <text:p text:style-name="Horizontal_20_Line"/>
      <text:h text:style-name="Heading_20_2" text:outline-level="2"><text:bookmark-start text:name="outs-000072"/>outs-000072<text:bookmark-end text:name="outs-000072"/></text:h>
      <text:p text:style-name="First_20_paragraph"><text:span text:style-name="Emphasis">(Blank page in the original.)</text:span></text:p>
      <text:p text:style-name="Horizontal_20_Line"/>
      <text:h text:style-name="Heading_20_2" text:outline-level="2"><text:bookmark-start text:name="outs-000073"/>outs-000073<text:bookmark-end text:name="outs-000073"/></text:h>
      <text:p text:style-name="First_20_paragraph">The text on the image translates to "Peripheral Devices Edition."</text:p>
      <text:p text:style-name="Horizontal_20_Line"/>
      <text:h text:style-name="Heading_20_2" text:outline-level="2"><text:bookmark-start text:name="outs-000074"/>outs-000074<text:bookmark-end text:name="outs-000074"/></text:h>
      <text:p text:style-name="First_20_paragraph"><text:span text:style-name="Emphasis">(Blank page in the original.)</text:span></text:p>
      <text:p text:style-name="Horizontal_20_Line"/>
      <text:h text:style-name="Heading_20_2" text:outline-level="2"><text:bookmark-start text:name="outs-000075"/>outs-000075<text:bookmark-end text:name="outs-000075"/></text:h>
      <text:p text:style-name="First_20_paragraph"><text:span text:style-name="Strong_20_Emphasis">Option Board</text:span></text:p>
      <text:p text:style-name="Text_20_body">The X68000 is a machine that initially had many standard features equipped in the main unit. At first, there was no need for an option board, but now, there are various optional and official option boards. Here, we will summarize Sharp's official boards.</text:p>
      <text:p text:style-name="Text_20_body"><text:span text:style-name="Strong_20_Emphasis">1. Introduction</text:span></text:p>
      <text:p text:style-name="Text_20_body">The option board is inserted into the expansion slot to compensate for the functionalities not present in the main unit. For those who are interested in hardware, you may want to try creating your own option board, using the expansion slot and leveraging RS-232C and AVercoristic boards for high-speed communication transfers. This makes the design relatively easier. If you already have a functioning circuit, you can modify it as a reference. By understanding signal meanings and handshakes (such as returning DTACK, etc.), you can avoid mistakes.</text:p>
      <text:p text:style-name="Text_20_body">In this document, we will overview and conceptualize the option boards provided by Sharp, each with their own functionalities. The X68000 already has many standard features, however, by using the option board, various enhancements enhance the unit's usability and provide great assistance for personal hobbies.</text:p>
      <text:p text:style-name="Text_20_body">The types and model numbers of the option boards covered in this chapter are as follows.</text:p>
      <text:p text:style-name="Text_20_body">(Page 71)</text:p>
      <text:p text:style-name="Horizontal_20_Line"/>
      <text:h text:style-name="Heading_20_2" text:outline-level="2"><text:bookmark-start text:name="outs-000076"/>outs-000076<text:bookmark-end text:name="outs-000076"/></text:h>
      <text:p text:style-name="Horizontal_20_Line"/>
      <text:p text:style-name="First_20_paragraph"><text:span text:style-name="Strong_20_Emphasis">Internal Expansion Memory Board</text:span></text:p>
      <text:list text:style-name="List_20_1">
        <text:list-item>
          <text:p text:style-name="List_20_Bullet_20_Tight">CZ-6BE1: For original type</text:p>
        </text:list-item>
        <text:list-item>
          <text:p text:style-name="List_20_Bullet_20_Tight">CZ-6BE1A: For ACE</text:p>
        </text:list-item>
        <text:list-item>
          <text:p text:style-name="List_20_Bullet_20_Tight">CZ-6BE1A(A): For ACE/PRO</text:p>
        </text:list-item>
        <text:list-item>
          <text:p text:style-name="List_20_Bullet_20_Tight">CZ-6BE2A: For XVI</text:p>
        </text:list-item>
        <text:list-item>
          <text:p text:style-name="List_20_Bullet_20_Tight">CZ-6BE2D: For Compact</text:p>
        </text:list-item>
        <text:list-item>
          <text:p text:style-name="List_20_Bullet_20_Tight">CZ-6BE2B: Additional memory for CZ-6BE2A/D</text:p>
        </text:list-item>
      </text:list>
      <text:p text:style-name="First_20_paragraph"><text:span text:style-name="Strong_20_Emphasis">External Expansion Memory Board</text:span></text:p>
      <text:list text:style-name="List_20_1">
        <text:list-item>
          <text:p text:style-name="List_20_Bullet_20_Tight">CZ-6BE2/CZ-6BE4: 2 MB/4 MB board</text:p>
        </text:list-item>
        <text:list-item>
          <text:p text:style-name="List_20_Bullet_20_Tight">CZ-6BEC2/CZ-6BE4C: 2 MB/4 MB</text:p>
        </text:list-item>
      </text:list>
      <text:p text:style-name="First_20_paragraph"><text:span text:style-name="Strong_20_Emphasis">Video Board</text:span></text:p>
      <text:list text:style-name="List_20_1">
        <text:list-item>
          <text:p text:style-name="List_20_Bullet_20_Tight">CZ-6BV1</text:p>
        </text:list-item>
      </text:list>
      <text:p text:style-name="First_20_paragraph"><text:span text:style-name="Strong_20_Emphasis">GP-IB Board</text:span></text:p>
      <text:list text:style-name="List_20_1">
        <text:list-item>
          <text:p text:style-name="List_20_Bullet_20_Tight">CZ-6BG1</text:p>
        </text:list-item>
      </text:list>
      <text:p text:style-name="First_20_paragraph"><text:span text:style-name="Strong_20_Emphasis">Universal I/O Board</text:span></text:p>
      <text:list text:style-name="List_20_1">
        <text:list-item>
          <text:p text:style-name="List_20_Bullet_20_Tight">CZ-6BU1</text:p>
        </text:list-item>
      </text:list>
      <text:p text:style-name="First_20_paragraph"><text:span text:style-name="Strong_20_Emphasis">RS-232C Board</text:span></text:p>
      <text:list text:style-name="List_20_1">
        <text:list-item>
          <text:p text:style-name="List_20_Bullet_20_Tight">CZ-6BF1</text:p>
        </text:list-item>
      </text:list>
      <text:p text:style-name="First_20_paragraph"><text:span text:style-name="Strong_20_Emphasis">MIDI Board</text:span></text:p>
      <text:list text:style-name="List_20_1">
        <text:list-item>
          <text:p text:style-name="List_20_Bullet_20_Tight">CZ-6BM1</text:p>
        </text:list-item>
      </text:list>
      <text:p text:style-name="First_20_paragraph"><text:span text:style-name="Strong_20_Emphasis">Parallel Board</text:span></text:p>
      <text:list text:style-name="List_20_1">
        <text:list-item>
          <text:p text:style-name="List_20_Bullet_20_Tight">CZ-6BN1</text:p>
        </text:list-item>
      </text:list>
      <text:p text:style-name="First_20_paragraph"><text:span text:style-name="Strong_20_Emphasis">FAX Board</text:span></text:p>
      <text:list text:style-name="List_20_1">
        <text:list-item>
          <text:p text:style-name="List_20_Bullet_20_Tight">CZ-6BC1</text:p>
        </text:list-item>
      </text:list>
      <text:p text:style-name="First_20_paragraph"><text:span text:style-name="Strong_20_Emphasis">SCSI Board</text:span></text:p>
      <text:list text:style-name="List_20_1">
        <text:list-item>
          <text:p text:style-name="List_20_Bullet_20_Tight">CZ-6BS1</text:p>
        </text:list-item>
      </text:list>
      <text:p text:style-name="First_20_paragraph"><text:span text:style-name="Strong_20_Emphasis">Scientific Calculator Board</text:span></text:p>
      <text:list text:style-name="List_20_1">
        <text:list-item>
          <text:p text:style-name="List_20_Bullet_20_Tight">CZ-6BPI/CZ-6BPIA</text:p>
        </text:list-item>
      </text:list>
      <text:p text:style-name="Horizontal_20_Line"/>
      <text:list text:style-name="Numbering_20_1" text:start-value="2">
        <text:list-item>
          <text:p text:style-name="List_20_Number_20_Tight"><text:span text:style-name="Strong_20_Emphasis">I/O Addresses of Optional Boards</text:span></text:p>
        </text:list-item>
      </text:list>
      <text:p text:style-name="First_20_paragraph">This section displays the address space used by each optional board. It explains the settings of the board address, indicating that some parts allow a choice between various addresses through settings such as switches on the board. Some address parts may have numbers ranging from 0-F.</text:p>
      <text:p text:style-name="Text_20_body">The addresses used by each board are distinguished by board type, and efforts are made to ensure that these address settings do not overlap. Additionally, the optional board addresses are generally assigned to the memory-mapped I/O space. Unless it is a user I/O board made by Sharp or a compatible board, it will typically be considered a universal I/O address.</text:p>
      <text:p text:style-name="Horizontal_20_Line"/>
      <text:h text:style-name="Heading_20_2" text:outline-level="2"><text:bookmark-start text:name="outs-000077"/>outs-000077<text:bookmark-end text:name="outs-000077"/></text:h>
      <text:p text:style-name="First_20_paragraph">Option Board</text:p>
      <text:p text:style-name="Text_20_body">Since the space (<draw:frame draw:style-name="fr1" text:anchor-type="as-char"><draw:object xlink:href="Formula-0/" xlink:type="simple" xlink:show="embed" xlink:actuate="onLoad"/></draw:frame>ECFFFF) is supposed to be used, there is basically no risk of these causing an address conflict with the installed option boards.</text:p>
      <text:p text:style-name="Text_20_body">● Table 1 Option Board I/O Addresses</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Board Category</text:p>
            </table:table-cell>
            <table:table-cell table:style-name="TableHeaderRowCell" office:value-type="string">
              <text:p text:style-name="Table_20_Heading">Board Name</text:p>
            </table:table-cell>
            <table:table-cell table:style-name="TableHeaderRowCell" office:value-type="string">
              <text:p text:style-name="Table_20_Heading">Address</text:p>
            </table:table-cell>
          </table:table-row>
        </table:table-header-rows>
        <table:table-row>
          <table:table-cell table:style-name="TableRowCell" office:value-type="string">
            <text:p text:style-name="Table_20_Contents">Numeric Processor Board</text:p>
          </table:table-cell>
          <table:table-cell table:style-name="TableRowCell" office:value-type="string">
            <text:p text:style-name="Table_20_Contents">CZ-6BP1/CZ-6BP1A</text:p>
          </table:table-cell>
          <table:table-cell table:style-name="TableRowCell" office:value-type="string">
            <text:p text:style-name="Table_20_Contents"><draw:frame draw:style-name="fr1" text:anchor-type="as-char"><draw:object xlink:href="Formula-2/" xlink:type="simple" xlink:show="embed" xlink:actuate="onLoad"/></draw:frame>E9E01F <draw:frame draw:style-name="fr1" text:anchor-type="as-char"><draw:object xlink:href="Formula-4/" xlink:type="simple" xlink:show="embed" xlink:actuate="onLoad"/></draw:frame>E9E09F</text:p>
          </table:table-cell>
        </table:table-row>
        <table:table-row>
          <table:table-cell table:style-name="TableRowCell" office:value-type="string">
            <text:p text:style-name="Table_20_Contents">SCSI Board</text:p>
          </table:table-cell>
          <table:table-cell table:style-name="TableRowCell" office:value-type="string">
            <text:p text:style-name="Table_20_Contents">CZ-6BS1</text:p>
          </table:table-cell>
          <table:table-cell table:style-name="TableRowCell" office:value-type="string">
            <text:p text:style-name="Table_20_Contents"><draw:frame draw:style-name="fr1" text:anchor-type="as-char"><draw:object xlink:href="Formula-6/" xlink:type="simple" xlink:show="embed" xlink:actuate="onLoad"/></draw:frame>EA1FFF</text:p>
          </table:table-cell>
        </table:table-row>
        <table:table-row>
          <table:table-cell table:style-name="TableRowCell" office:value-type="string">
            <text:p text:style-name="Table_20_Contents">FAX Board</text:p>
          </table:table-cell>
          <table:table-cell table:style-name="TableRowCell" office:value-type="string">
            <text:p text:style-name="Table_20_Contents">CZ-6BC1</text:p>
          </table:table-cell>
          <table:table-cell table:style-name="TableRowCell" office:value-type="string">
            <text:p text:style-name="Table_20_Contents"><draw:frame draw:style-name="fr1" text:anchor-type="as-char"><draw:object xlink:href="Formula-8/" xlink:type="simple" xlink:show="embed" xlink:actuate="onLoad"/></draw:frame>EAF95F</text:p>
          </table:table-cell>
        </table:table-row>
        <table:table-row>
          <table:table-cell table:style-name="TableRowCell" office:value-type="string">
            <text:p text:style-name="Table_20_Contents">MIDI Board</text:p>
          </table:table-cell>
          <table:table-cell table:style-name="TableRowCell" office:value-type="string">
            <text:p text:style-name="Table_20_Contents">CZ-6BM1</text:p>
          </table:table-cell>
          <table:table-cell table:style-name="TableRowCell" office:value-type="string">
            <text:p text:style-name="Table_20_Contents"><draw:frame draw:style-name="fr1" text:anchor-type="as-char"><draw:object xlink:href="Formula-10/" xlink:type="simple" xlink:show="embed" xlink:actuate="onLoad"/></draw:frame>EAFA0F <draw:frame draw:style-name="fr1" text:anchor-type="as-char"><draw:object xlink:href="Formula-12/" xlink:type="simple" xlink:show="embed" xlink:actuate="onLoad"/></draw:frame>EAFA1F</text:p>
          </table:table-cell>
        </table:table-row>
        <table:table-row>
          <table:table-cell table:style-name="TableRowCell" office:value-type="string">
            <text:p text:style-name="Table_20_Contents">Parallel Board</text:p>
          </table:table-cell>
          <table:table-cell table:style-name="TableRowCell" office:value-type="string">
            <text:p text:style-name="Table_20_Contents">CZ-6BN1</text:p>
          </table:table-cell>
          <table:table-cell table:style-name="TableRowCell" office:value-type="string">
            <text:p text:style-name="Table_20_Contents"><draw:frame draw:style-name="fr1" text:anchor-type="as-char"><draw:object xlink:href="Formula-14/" xlink:type="simple" xlink:show="embed" xlink:actuate="onLoad"/></draw:frame>EAFB0F <draw:frame draw:style-name="fr1" text:anchor-type="as-char"><draw:object xlink:href="Formula-16/" xlink:type="simple" xlink:show="embed" xlink:actuate="onLoad"/></draw:frame>EAFB1F</text:p>
          </table:table-cell>
        </table:table-row>
        <table:table-row>
          <table:table-cell table:style-name="TableRowCell" office:value-type="string">
            <text:p text:style-name="Table_20_Contents">RS-232C Board</text:p>
          </table:table-cell>
          <table:table-cell table:style-name="TableRowCell" office:value-type="string">
            <text:p text:style-name="Table_20_Contents">CZ-6BF1</text:p>
          </table:table-cell>
          <table:table-cell table:style-name="TableRowCell" office:value-type="string">
            <text:p text:style-name="Table_20_Contents"><draw:frame draw:style-name="fr1" text:anchor-type="as-char"><draw:object xlink:href="Formula-18/" xlink:type="simple" xlink:show="embed" xlink:actuate="onLoad"/></draw:frame>EAFC0F <draw:frame draw:style-name="fr1" text:anchor-type="as-char"><draw:object xlink:href="Formula-20/" xlink:type="simple" xlink:show="embed" xlink:actuate="onLoad"/></draw:frame>EAFC19</text:p>
          </table:table-cell>
        </table:table-row>
        <table:table-row>
          <table:table-cell table:style-name="TableRowCell" office:value-type="string">
            <text:p text:style-name="Table_20_Contents">Universal I/O Board</text:p>
          </table:table-cell>
          <table:table-cell table:style-name="TableRowCell" office:value-type="string">
            <text:p text:style-name="Table_20_Contents">CZ-6BU1</text:p>
          </table:table-cell>
          <table:table-cell table:style-name="TableRowCell" office:value-type="string">
            <text:p text:style-name="Table_20_Contents"><draw:frame draw:style-name="fr1" text:anchor-type="as-char"><draw:object xlink:href="Formula-22/" xlink:type="simple" xlink:show="embed" xlink:actuate="onLoad"/></draw:frame>EAFC29 <draw:frame draw:style-name="fr1" text:anchor-type="as-char"><draw:object xlink:href="Formula-24/" xlink:type="simple" xlink:show="embed" xlink:actuate="onLoad"/></draw:frame>EAFC39</text:p>
          </table:table-cell>
        </table:table-row>
        <table:table-row>
          <table:table-cell table:style-name="TableRowCell" office:value-type="string">
            <text:p text:style-name="Table_20_Contents">GP-IB Board</text:p>
          </table:table-cell>
          <table:table-cell table:style-name="TableRowCell" office:value-type="string">
            <text:p text:style-name="Table_20_Contents">CZ-6BG1</text:p>
          </table:table-cell>
          <table:table-cell table:style-name="TableRowCell" office:value-type="string">
            <text:p text:style-name="Table_20_Contents"><draw:frame draw:style-name="fr1" text:anchor-type="as-char"><draw:object xlink:href="Formula-26/" xlink:type="simple" xlink:show="embed" xlink:actuate="onLoad"/></draw:frame>EAFDX3 <draw:frame draw:style-name="fr1" text:anchor-type="as-char"><draw:object xlink:href="Formula-28/" xlink:type="simple" xlink:show="embed" xlink:actuate="onLoad"/></draw:frame>EAFDX7</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raw:frame draw:style-name="fr1" text:anchor-type="as-char"><draw:object xlink:href="Formula-30/" xlink:type="simple" xlink:show="embed" xlink:actuate="onLoad"/></draw:frame>EAFDXB <draw:frame draw:style-name="fr1" text:anchor-type="as-char"><draw:object xlink:href="Formula-32/" xlink:type="simple" xlink:show="embed" xlink:actuate="onLoad"/></draw:frame>EAFDXF</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draw:frame draw:style-name="fr1" text:anchor-type="as-char"><draw:object xlink:href="Formula-34/" xlink:type="simple" xlink:show="embed" xlink:actuate="onLoad"/></draw:frame>EAFE1F</text:p>
          </table:table-cell>
        </table:table-row>
      </table:table>
      <text:p text:style-name="First_20_paragraph">73</text:p>
      <text:p text:style-name="Horizontal_20_Line"/>
      <text:h text:style-name="Heading_20_2" text:outline-level="2"><text:bookmark-start text:name="outs-000078"/>outs-000078<text:bookmark-end text:name="outs-000078"/></text:h>
      <text:p text:style-name="First_20_paragraph"><text:span text:style-name="Emphasis">(Blank page in the original.)</text:span></text:p>
      <text:p text:style-name="Horizontal_20_Line"/>
      <text:h text:style-name="Heading_20_2" text:outline-level="2"><text:bookmark-start text:name="outs-000079"/>outs-000079<text:bookmark-end text:name="outs-000079"/></text:h>
      <text:p text:style-name="Horizontal_20_Line"/>
      <text:p text:style-name="First_20_paragraph"><text:span text:style-name="Strong_20_Emphasis">Expanded Memory</text:span></text:p>
      <text:p text:style-name="Text_20_body">Increasing memory capacity will definitely lead to free area expansion. For X68000 users, memory expansion is probably the first functional enhancement they strive for. Here, we will explain the memory expansion methods for each model and the expansion memory boards.</text:p>
      <text:p text:style-name="Horizontal_20_Line"/>
      <text:p text:style-name="First_20_paragraph"><text:span text:style-name="Strong_20_Emphasis">1. Differences in Expansion Methods by Model</text:span></text:p>
      <text:p text:style-name="Text_20_body">The X68000 series can expand up to a maximum of 12 MB of main memory. The methods of expansion vary by model. For models before the X68000 XVI, internal expansion is up to 2 MB, and for additional expansion, a memory board must be inserted into the expansion slot. On the XVI, internal expansion can reach up to 8 MB (6 MB from standard expansion + 2 MB internal).</text:p>
      <text:p text:style-name="Text_20_body">Moreover, for the Compact, an internal expansion memory board is provided along with a socket for attaching a mathematical computation co-processor (CZ-6BP2).</text:p>
      <text:p text:style-name="Horizontal_20_Line"/>
      <text:p text:style-name="First_20_paragraph"><text:span text:style-name="Strong_20_Emphasis">1.1 Internal Expansion Memory</text:span></text:p>
      <text:p text:style-name="Text_20_body">Below is a list of internal expansion memory boards. The original X68000, as well as ACE and PRO models, internally have up to 1 MB of memory, and an additional 1 MB is added through an expansion memory board.</text:p>
      <text:p text:style-name="Horizontal_20_Line"/>
      <text:p text:style-name="First_20_paragraph">(75)</text:p>
      <text:p text:style-name="Horizontal_20_Line"/>
      <text:h text:style-name="Heading_20_2" text:outline-level="2"><text:bookmark-start text:name="outs-000080"/>outs-000080<text:bookmark-end text:name="outs-000080"/></text:h>
      <text:p text:style-name="Horizontal_20_Line"/>
      <text:p text:style-name="First_20_paragraph">As such, the original type of memory board for this purpose is CZ-6BE1 for CZ-6BE1, ACE is CZ-6BE1, PRO is CZ-6BE1A (A). This is because CZ-6BE1A (A) has been used to respond to both ACE and PRO in addition to the conventional ones, so it can also be used with ACE.</text:p>
      <text:p text:style-name="Text_20_body">XVI/Compact internal expansion memory board (CZ-6BE2A, CZ-6BE2D) is equipped with not only 2MB (2M bytes for the board alone), but also 2 small 2MB memory modules (CZ-6BE2B), which allows it to be used as a 6MB memory board in combination with this.</text:p>
      <text:p text:style-name="Text_20_body">The CZ-6BE2A/6BE2D itself detects whether or not a memory module is installed, and the socket installation status and stage are automatically determined and conveyed to the main body memory controller LSI. This allows memory boards to be installed in internal expansion slots and expanded for use. The original type that used DRAM for 256 x 16-bit chips represents 1MB memory site, but ACE now supports 1MB x 8 pieces, and further, XVI/Compact has 4MB x 8 with the DRAM method, but 4 pieces with 2MB x 4, enabling flexible utilization.</text:p>
      <text:p text:style-name="Text_20_body">● Figure - 1 Internal Expansion Memory Board List</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Board Model</text:p>
            </table:table-cell>
            <table:table-cell table:style-name="TableHeaderRowCell" office:value-type="string">
              <text:p text:style-name="Table_20_Heading">Applicable Models</text:p>
            </table:table-cell>
            <table:table-cell table:style-name="TableHeaderRowCell" office:value-type="string">
              <text:p text:style-name="Table_20_Heading">Capacity</text:p>
            </table:table-cell>
          </table:table-row>
        </table:table-header-rows>
        <table:table-row>
          <table:table-cell table:style-name="TableRowCell" office:value-type="string">
            <text:p text:style-name="Table_20_Contents">CZ-6BE2D (CZ-6BE2B)</text:p>
          </table:table-cell>
          <table:table-cell table:style-name="TableRowCell" office:value-type="string">
            <text:p text:style-name="Table_20_Contents">X68000 Compact (with socket for CZ-6BP2)</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bit : 70ns) x 4 pieces</text:p>
          </table:table-cell>
          <table:table-cell table:style-name="TableRowCell" office:value-type="string">
    </table:table-cell>
        </table:table-row>
        <table:table-row>
          <table:table-cell table:style-name="TableRowCell" office:value-type="string">
            <text:p text:style-name="Table_20_Contents">CZ-6BE2A (CZ-6BE2B)</text:p>
          </table:table-cell>
          <table:table-cell table:style-name="TableRowCell" office:value-type="string">
            <text:p text:style-name="Table_20_Contents">X68000 XVI/XVI-HD</text:p>
          </table:table-cell>
          <table:table-cell table:style-name="TableRowCell" office:value-type="string">
            <text:p text:style-name="Table_20_Contents">2 MB</text:p>
          </table:table-cell>
        </table:table-row>
        <table:table-row>
          <table:table-cell table:style-name="TableRowCell" office:value-type="string">
    </table:table-cell>
          <table:table-cell table:style-name="TableRowCell" office:value-type="string">
            <text:p text:style-name="Table_20_Contents">HM514402 (1M x 4 bit : 70ns) x 4 pieces</text:p>
          </table:table-cell>
          <table:table-cell table:style-name="TableRowCell" office:value-type="string">
    </table:table-cell>
        </table:table-row>
        <table:table-row>
          <table:table-cell table:style-name="TableRowCell" office:value-type="string">
            <text:p text:style-name="Table_20_Contents">CZ-6BE1A (A)</text:p>
          </table:table-cell>
          <table:table-cell table:style-name="TableRowCell" office:value-type="string">
            <text:p text:style-name="Table_20_Contents">X68000 ACE/ACE-HD/PRO/PRO-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A</text:p>
          </table:table-cell>
          <table:table-cell table:style-name="TableRowCell" office:value-type="string">
            <text:p text:style-name="Table_20_Contents">X68000 ACE/ACE-HD</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SM44256AL (256K x 4 bit : 100ns) x 8 pieces</text:p>
          </table:table-cell>
          <table:table-cell table:style-name="TableRowCell" office:value-type="string">
    </table:table-cell>
        </table:table-row>
        <table:table-row>
          <table:table-cell table:style-name="TableRowCell" office:value-type="string">
            <text:p text:style-name="Table_20_Contents">CZ-6BE1</text:p>
          </table:table-cell>
          <table:table-cell table:style-name="TableRowCell" office:value-type="string">
            <text:p text:style-name="Table_20_Contents">X68000</text:p>
          </table:table-cell>
          <table:table-cell table:style-name="TableRowCell" office:value-type="string">
            <text:p text:style-name="Table_20_Contents">1 MB</text:p>
          </table:table-cell>
        </table:table-row>
        <table:table-row>
          <table:table-cell table:style-name="TableRowCell" office:value-type="string">
    </table:table-cell>
          <table:table-cell table:style-name="TableRowCell" office:value-type="string">
            <text:p text:style-name="Table_20_Contents">MB81256 (256K x 1 bit : 120ns) x 32 pieces</text:p>
          </table:table-cell>
          <table:table-cell table:style-name="TableRowCell" office:value-type="string">
    </table:table-cell>
        </table:table-row>
      </table:table>
      <text:p text:style-name="Horizontal_20_Line"/>
      <text:p text:style-name="First_20_paragraph">Page 76.</text:p>
      <text:p text:style-name="Horizontal_20_Line"/>
      <text:h text:style-name="Heading_20_2" text:outline-level="2"><text:bookmark-start text:name="outs-000081"/>outs-000081<text:bookmark-end text:name="outs-000081"/></text:h>
      <text:p text:style-name="Horizontal_20_Line"/>
      <text:p text:style-name="First_20_paragraph"><text:span text:style-name="Strong_20_Emphasis">2 External Expansion Memory</text:span></text:p>
      <text:p text:style-name="Text_20_body">Below is a list of external expansion memory boards. The memory used has access times that range from 120 ns to 80 ns, and due to this timing, the CAS timings differ slightly. The specifications, however, remain the same. CZ-6BEXC/6BE4C and CZ-6BE2/6BE4 have the same substrate, but the memory capacities are different (2 MB and 4 MB respectively). If the board is set to 2 MB through a jumper setting, removing the jumper will change it to 4 MB.</text:p>
      <text:p text:style-name="Text_20_body"><text:span text:style-name="Strong_20_Emphasis">2 Parts Layout</text:span></text:p>
      <text:p text:style-name="Text_20_body">The parts layouts for CZ-6BE1/6BEA1A (6BEIA (AA))/6BE2A/6BE2B/6BE2D and CZ-6BE2 (6BEA)/6BE2C (6BE4C) are shown in Figures 6 and 7.</text:p>
      <text:p text:style-name="Text_20_body">Page 77</text:p>
      <text:p text:style-name="Horizontal_20_Line"/>
      <text:h text:style-name="Heading_20_2" text:outline-level="2"><text:bookmark-start text:name="outs-000082"/>outs-000082<text:bookmark-end text:name="outs-000082"/></text:h>
      <text:p text:style-name="First_20_paragraph">● Fig. 1 Component Layout of CZ-6BE1 CZ-6BE1 SHARP</text:p>
      <text:p text:style-name="Text_20_body">● Fig. 2 Component Layout of 6BE1A (6BE1A(A)) SHARP CZ-6BE1A</text:p>
      <text:p text:style-name="Text_20_body">78</text:p>
      <text:p text:style-name="Horizontal_20_Line"/>
      <text:h text:style-name="Heading_20_2" text:outline-level="2"><text:bookmark-start text:name="outs-000083"/>outs-000083<text:bookmark-end text:name="outs-000083"/></text:h>
      <text:p text:style-name="First_20_paragraph">Expansion Memory</text:p>
      <text:p text:style-name="Text_20_body">● Fig. 3 Component Layout of 6BE2A CZ-6BE2A SHARP</text:p>
      <text:p text:style-name="Text_20_body">● Fig. 4 Component Layout of 6BE2B CZ-6BE2B</text:p>
      <text:p text:style-name="Text_20_body">● Fig. 5 Component Layout of 6BE2D SHARP CZ-6BE2D</text:p>
      <text:p text:style-name="Text_20_body">79</text:p>
      <text:p text:style-name="Horizontal_20_Line"/>
      <text:h text:style-name="Heading_20_2" text:outline-level="2"><text:bookmark-start text:name="outs-000084"/>outs-000084<text:bookmark-end text:name="outs-000084"/></text:h>
      <text:p text:style-name="Horizontal_20_Line"/>
      <text:p text:style-name="First_20_paragraph"><text:span text:style-name="Strong_20_Emphasis">Figure 6 CZ-6BE2 (6BE4) Component Layout</text:span></text:p>
      <text:p text:style-name="Text_20_body"><text:span text:style-name="Strong_20_Emphasis">3 Circuit Diagram/Connector Signal Layout</text:span></text:p>
      <text:p text:style-name="Text_20_body">3.1 Internal Expansion</text:p>
      <text:p text:style-name="Text_20_body">The circuit diagrams for the CZ-6BE1 and 6BE1A (6BE1A(A)) are shown in Figures 8 and 9. The circuit diagrams for CZ-6BE2A and CZ-6BE2D, along with their connector signal layout diagrams, are shown in Figures 10 through 12. The memory module for CZ-6BE2A(6BE2D) is the same as CZ-6BE2B, hence the connector signals are also the same.</text:p>
      <text:p text:style-name="Text_20_body">Page 80</text:p>
      <text:p text:style-name="Horizontal_20_Line"/>
      <text:h text:style-name="Heading_20_2" text:outline-level="2"><text:bookmark-start text:name="outs-000085"/>outs-000085<text:bookmark-end text:name="outs-000085"/></text:h>
      <text:p text:style-name="First_20_paragraph">Diagram 7 - 6BE2C (6BE4C) Parts Arrangement</text:p>
      <text:p text:style-name="Text_20_body">Diagram 8 - CZ-6BE1 Circuit Diagram (Reference Manual)</text:p>
      <text:p text:style-name="Text_20_body">Diagram 9 - 6BE1A (6BE1A(A)) Circuit Diagram (Reference Manual)</text:p>
      <text:p text:style-name="Text_20_body">Diagram 10 - CZ-6BE2A Circuit Diagram (Reference Manual)</text:p>
      <text:p text:style-name="Text_20_body">Diagram 11 - CZ-6BE2D Circuit Diagram (Reference Manual)</text:p>
      <text:p text:style-name="Text_20_body">3.2 External Expansion The circuit diagram for CZ-6BE2 (6BE4)/6BE2C (6BEAC) is shown in Diagram 13 and Diagram 14.</text:p>
      <text:p text:style-name="Horizontal_20_Line"/>
      <text:h text:style-name="Heading_20_2" text:outline-level="2"><text:bookmark-start text:name="outs-000086"/>outs-000086<text:bookmark-end text:name="outs-000086"/></text:h>
      <text:h text:style-name="Heading_20_3" text:outline-level="3"><text:bookmark-start text:name="fig-12-connector-signal-configuration-of-expansion-memory-board"/>Fig. 12 Connector Signal Configuration of Expansion Memory Board<text:bookmark-end text:name="fig-12-connector-signal-configuration-of-expansion-memory-board"/></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cell table:style-name="TableHeaderRowCell" office:value-type="string">
              <text:p text:style-name="Table_20_Heading">Pin Name</text:p>
            </table:table-cell>
            <table:table-cell table:style-name="TableHeaderRowCell" office:value-type="string">
              <text:p text:style-name="Table_20_Heading">Signal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TB1-A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1</text:p>
          </table:table-cell>
          <table:table-cell table:style-name="TableRowCell" office:value-type="string">
            <text:p text:style-name="Table_20_Contents">MD15</text:p>
          </table:table-cell>
          <table:table-cell table:style-name="TableRowCell" office:value-type="string">
            <text:p text:style-name="Table_20_Contents">Data</text:p>
          </table:table-cell>
        </table:table-row>
        <table:table-row>
          <table:table-cell table:style-name="TableRowCell" office:value-type="string">
            <text:p text:style-name="Table_20_Contents">TB1-A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2</text:p>
          </table:table-cell>
          <table:table-cell table:style-name="TableRowCell" office:value-type="string">
            <text:p text:style-name="Table_20_Contents">MD14</text:p>
          </table:table-cell>
          <table:table-cell table:style-name="TableRowCell" office:value-type="string">
            <text:p text:style-name="Table_20_Contents">Data</text:p>
          </table:table-cell>
        </table:table-row>
        <table:table-row>
          <table:table-cell table:style-name="TableRowCell" office:value-type="string">
            <text:p text:style-name="Table_20_Contents">TB1-A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cell table:style-name="TableRowCell" office:value-type="string">
            <text:p text:style-name="Table_20_Contents">TB2-A3</text:p>
          </table:table-cell>
          <table:table-cell table:style-name="TableRowCell" office:value-type="string">
            <text:p text:style-name="Table_20_Contents">MD7</text:p>
          </table:table-cell>
          <table:table-cell table:style-name="TableRowCell" office:value-type="string">
            <text:p text:style-name="Table_20_Contents">Data</text:p>
          </table:table-cell>
        </table:table-row>
        <table:table-row>
          <table:table-cell table:style-name="TableRowCell" office:value-type="string">
            <text:p text:style-name="Table_20_Contents">TB1-A4</text:p>
          </table:table-cell>
          <table:table-cell table:style-name="TableRowCell" office:value-type="string">
            <text:p text:style-name="Table_20_Contents">RAS1</text:p>
          </table:table-cell>
          <table:table-cell table:style-name="TableRowCell" office:value-type="string">
            <text:p text:style-name="Table_20_Contents">Row Address Strobe 1</text:p>
          </table:table-cell>
          <table:table-cell table:style-name="TableRowCell" office:value-type="string">
            <text:p text:style-name="Table_20_Contents">TB2-A4</text:p>
          </table:table-cell>
          <table:table-cell table:style-name="TableRowCell" office:value-type="string">
            <text:p text:style-name="Table_20_Contents">MD5</text:p>
          </table:table-cell>
          <table:table-cell table:style-name="TableRowCell" office:value-type="string">
            <text:p text:style-name="Table_20_Contents">Data</text:p>
          </table:table-cell>
        </table:table-row>
        <table:table-row>
          <table:table-cell table:style-name="TableRowCell" office:value-type="string">
            <text:p text:style-name="Table_20_Contents">TB1-A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5</text:p>
          </table:table-cell>
          <table:table-cell table:style-name="TableRowCell" office:value-type="string">
            <text:p text:style-name="Table_20_Contents">MD7</text:p>
          </table:table-cell>
          <table:table-cell table:style-name="TableRowCell" office:value-type="string">
            <text:p text:style-name="Table_20_Contents">Memory Data</text:p>
          </table:table-cell>
        </table:table-row>
        <table:table-row>
          <table:table-cell table:style-name="TableRowCell" office:value-type="string">
            <text:p text:style-name="Table_20_Contents">TB1-A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6</text:p>
          </table:table-cell>
          <table:table-cell table:style-name="TableRowCell" office:value-type="string">
            <text:p text:style-name="Table_20_Contents">MD4</text:p>
          </table:table-cell>
          <table:table-cell table:style-name="TableRowCell" office:value-type="string">
            <text:p text:style-name="Table_20_Contents">Data</text:p>
          </table:table-cell>
        </table:table-row>
        <table:table-row>
          <table:table-cell table:style-name="TableRowCell" office:value-type="string">
            <text:p text:style-name="Table_20_Contents">TB1-A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cell table:style-name="TableRowCell" office:value-type="string">
            <text:p text:style-name="Table_20_Contents">TB2-A7</text:p>
          </table:table-cell>
          <table:table-cell table:style-name="TableRowCell" office:value-type="string">
            <text:p text:style-name="Table_20_Contents">MD2</text:p>
          </table:table-cell>
          <table:table-cell table:style-name="TableRowCell" office:value-type="string">
            <text:p text:style-name="Table_20_Contents">Data</text:p>
          </table:table-cell>
        </table:table-row>
        <table:table-row>
          <table:table-cell table:style-name="TableRowCell" office:value-type="string">
            <text:p text:style-name="Table_20_Contents">TB1-A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A8</text:p>
          </table:table-cell>
          <table:table-cell table:style-name="TableRowCell" office:value-type="string">
            <text:p text:style-name="Table_20_Contents">MD0</text:p>
          </table:table-cell>
          <table:table-cell table:style-name="TableRowCell" office:value-type="string">
            <text:p text:style-name="Table_20_Contents">Data</text:p>
          </table:table-cell>
        </table:table-row>
        <table:table-row>
          <table:table-cell table:style-name="TableRowCell" office:value-type="string">
            <text:p text:style-name="Table_20_Contents">TB1-B1</text:p>
          </table:table-cell>
          <table:table-cell table:style-name="TableRowCell" office:value-type="string">
            <text:p text:style-name="Table_20_Contents">DRAM SENSE3</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B1</text:p>
          </table:table-cell>
          <table:table-cell table:style-name="TableRowCell" office:value-type="string">
            <text:p text:style-name="Table_20_Contents">MD12</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600000H ~ 7FFFFFH</text:p>
          </table:table-cell>
          <table:table-cell table:style-name="TableRowCell" office:value-type="string">
            <text:p text:style-name="Table_20_Contents">TB2-B2</text:p>
          </table:table-cell>
          <table:table-cell table:style-name="TableRowCell" office:value-type="string">
            <text:p text:style-name="Table_20_Contents">MD11</text:p>
          </table:table-cell>
          <table:table-cell table:style-name="TableRowCell" office:value-type="string">
            <text:p text:style-name="Table_20_Contents">Data</text:p>
          </table:table-cell>
        </table:table-row>
        <table:table-row>
          <table:table-cell table:style-name="TableRowCell" office:value-type="string">
            <text:p text:style-name="Table_20_Contents">TB1-B2</text:p>
          </table:table-cell>
          <table:table-cell table:style-name="TableRowCell" office:value-type="string">
            <text:p text:style-name="Table_20_Contents">DRAM SENSE1</text:p>
          </table:table-cell>
          <table:table-cell table:style-name="TableRowCell" office:value-type="string">
            <text:p text:style-name="Table_20_Contents">Memory Board Present (0) Not Present (1) (CZ6BE2A)</text:p>
          </table:table-cell>
          <table:table-cell table:style-name="TableRowCell" office:value-type="string">
            <text:p text:style-name="Table_20_Contents">TB2-B3</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200000H ~ 3FFFFFH</text:p>
          </table:table-cell>
          <table:table-cell table:style-name="TableRowCell" office:value-type="string">
            <text:p text:style-name="Table_20_Contents">TB2-B4</text:p>
          </table:table-cell>
          <table:table-cell table:style-name="TableRowCell" office:value-type="string">
            <text:p text:style-name="Table_20_Contents">MA9</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3</text:p>
          </table:table-cell>
          <table:table-cell table:style-name="TableRowCell" office:value-type="string">
            <text:p text:style-name="Table_20_Contents">RAS2</text:p>
          </table:table-cell>
          <table:table-cell table:style-name="TableRowCell" office:value-type="string">
            <text:p text:style-name="Table_20_Contents">Row Address Strobe 2</text:p>
          </table:table-cell>
          <table:table-cell table:style-name="TableRowCell" office:value-type="string">
            <text:p text:style-name="Table_20_Contents">TB2-B5</text:p>
          </table:table-cell>
          <table:table-cell table:style-name="TableRowCell" office:value-type="string">
            <text:p text:style-name="Table_20_Contents">MA5</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B4</text:p>
          </table:table-cell>
          <table:table-cell table:style-name="TableRowCell" office:value-type="string">
            <text:p text:style-name="Table_20_Contents">RAS3</text:p>
          </table:table-cell>
          <table:table-cell table:style-name="TableRowCell" office:value-type="string">
            <text:p text:style-name="Table_20_Contents">Row Address Strobe 3</text:p>
          </table:table-cell>
          <table:table-cell table:style-name="TableRowCell" office:value-type="string">
            <text:p text:style-name="Table_20_Contents">TB2-B6</text:p>
          </table:table-cell>
          <table:table-cell table:style-name="TableRowCell" office:value-type="string">
            <text:p text:style-name="Table_20_Contents">MD3</text:p>
          </table:table-cell>
          <table:table-cell table:style-name="TableRowCell" office:value-type="string">
            <text:p text:style-name="Table_20_Contents">Data</text:p>
          </table:table-cell>
        </table:table-row>
        <table:table-row>
          <table:table-cell table:style-name="TableRowCell" office:value-type="string">
            <text:p text:style-name="Table_20_Contents">TB1-B5</text:p>
          </table:table-cell>
          <table:table-cell table:style-name="TableRowCell" office:value-type="string">
            <text:p text:style-name="Table_20_Contents">CASL</text:p>
          </table:table-cell>
          <table:table-cell table:style-name="TableRowCell" office:value-type="string">
            <text:p text:style-name="Table_20_Contents">Lower Byte Column Address Strobe</text:p>
          </table:table-cell>
          <table:table-cell table:style-name="TableRowCell" office:value-type="string">
            <text:p text:style-name="Table_20_Contents">TB2-C1</text:p>
          </table:table-cell>
          <table:table-cell table:style-name="TableRowCell" office:value-type="string">
            <text:p text:style-name="Table_20_Contents">MD13</text:p>
          </table:table-cell>
          <table:table-cell table:style-name="TableRowCell" office:value-type="string">
            <text:p text:style-name="Table_20_Contents">Data</text:p>
          </table:table-cell>
        </table:table-row>
        <table:table-row>
          <table:table-cell table:style-name="TableRowCell" office:value-type="string">
            <text:p text:style-name="Table_20_Contents">TB1-B6</text:p>
          </table:table-cell>
          <table:table-cell table:style-name="TableRowCell" office:value-type="string">
            <text:p text:style-name="Table_20_Contents">CASUT</text:p>
          </table:table-cell>
          <table:table-cell table:style-name="TableRowCell" office:value-type="string">
            <text:p text:style-name="Table_20_Contents">Upper Byte Column Address Strobe 1</text:p>
          </table:table-cell>
          <table:table-cell table:style-name="TableRowCell" office:value-type="string">
            <text:p text:style-name="Table_20_Contents">TB2-C2</text:p>
          </table:table-cell>
          <table:table-cell table:style-name="TableRowCell" office:value-type="string">
            <text:p text:style-name="Table_20_Contents">MD10</text:p>
          </table:table-cell>
          <table:table-cell table:style-name="TableRowCell" office:value-type="string">
            <text:p text:style-name="Table_20_Contents">Data</text:p>
          </table:table-cell>
        </table:table-row>
        <table:table-row>
          <table:table-cell table:style-name="TableRowCell" office:value-type="string">
            <text:p text:style-name="Table_20_Contents">TB1-B7</text:p>
          </table:table-cell>
          <table:table-cell table:style-name="TableRowCell" office:value-type="string">
            <text:p text:style-name="Table_20_Contents">SOCKET OE</text:p>
          </table:table-cell>
          <table:table-cell table:style-name="TableRowCell" office:value-type="string">
            <text:p text:style-name="Table_20_Contents">ROM/Memory Board OE (Output Enable)</text:p>
          </table:table-cell>
          <table:table-cell table:style-name="TableRowCell" office:value-type="string">
            <text:p text:style-name="Table_20_Contents">TB2-C3</text:p>
          </table:table-cell>
          <table:table-cell table:style-name="TableRowCell" office:value-type="string">
            <text:p text:style-name="Table_20_Contents">MD8</text:p>
          </table:table-cell>
          <table:table-cell table:style-name="TableRowCell" office:value-type="string">
            <text:p text:style-name="Table_20_Contents">Data</text:p>
          </table:table-cell>
        </table:table-row>
        <table:table-row>
          <table:table-cell table:style-name="TableRowCell" office:value-type="string">
            <text:p text:style-name="Table_20_Contents">TB1-C1</text:p>
          </table:table-cell>
          <table:table-cell table:style-name="TableRowCell" office:value-type="string">
            <text:p text:style-name="Table_20_Contents">DRAM SENSE2</text:p>
          </table:table-cell>
          <table:table-cell table:style-name="TableRowCell" office:value-type="string">
            <text:p text:style-name="Table_20_Contents">Memory Board Present (0) Not Present (1) (CZ6BE2B)</text:p>
          </table:table-cell>
          <table:table-cell table:style-name="TableRowCell" office:value-type="string">
            <text:p text:style-name="Table_20_Contents">TB2-C4</text:p>
          </table:table-cell>
          <table:table-cell table:style-name="TableRowCell" office:value-type="string">
            <text:p text:style-name="Table_20_Contents">MD9</text:p>
          </table:table-cell>
          <table:table-cell table:style-name="TableRowCell" office:value-type="string">
            <text:p text:style-name="Table_20_Contents">Data</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mory Address 400000H ~ 5FFFFFH</text:p>
          </table:table-cell>
          <table:table-cell table:style-name="TableRowCell" office:value-type="string">
            <text:p text:style-name="Table_20_Contents">TB2-C5</text:p>
          </table:table-cell>
          <table:table-cell table:style-name="TableRowCell" office:value-type="string">
            <text:p text:style-name="Table_20_Contents">MA8</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2</text:p>
          </table:table-cell>
          <table:table-cell table:style-name="TableRowCell" office:value-type="string">
            <text:p text:style-name="Table_20_Contents">OE1</text:p>
          </table:table-cell>
          <table:table-cell table:style-name="TableRowCell" office:value-type="string">
            <text:p text:style-name="Table_20_Contents">Memory Control Signal (Output Enable)</text:p>
          </table:table-cell>
          <table:table-cell table:style-name="TableRowCell" office:value-type="string">
            <text:p text:style-name="Table_20_Contents">TB2-C6</text:p>
          </table:table-cell>
          <table:table-cell table:style-name="TableRowCell" office:value-type="string">
            <text:p text:style-name="Table_20_Contents">MA4</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4</text:p>
          </table:table-cell>
          <table:table-cell table:style-name="TableRowCell" office:value-type="string">
            <text:p text:style-name="Table_20_Contents">MA17</text:p>
          </table:table-cell>
          <table:table-cell table:style-name="TableRowCell" office:value-type="string">
            <text:p text:style-name="Table_20_Contents">Memory Address</text:p>
          </table:table-cell>
          <table:table-cell table:style-name="TableRowCell" office:value-type="string">
            <text:p text:style-name="Table_20_Contents">TB2-C7</text:p>
          </table:table-cell>
          <table:table-cell table:style-name="TableRowCell" office:value-type="string">
            <text:p text:style-name="Table_20_Contents">MA3</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5</text:p>
          </table:table-cell>
          <table:table-cell table:style-name="TableRowCell" office:value-type="string">
            <text:p text:style-name="Table_20_Contents">MA15</text:p>
          </table:table-cell>
          <table:table-cell table:style-name="TableRowCell" office:value-type="string">
            <text:p text:style-name="Table_20_Contents">Memory Address</text:p>
          </table:table-cell>
          <table:table-cell table:style-name="TableRowCell" office:value-type="string">
            <text:p text:style-name="Table_20_Contents">TB2-C8</text:p>
          </table:table-cell>
          <table:table-cell table:style-name="TableRowCell" office:value-type="string">
            <text:p text:style-name="Table_20_Contents">MA2</text:p>
          </table:table-cell>
          <table:table-cell table:style-name="TableRowCell" office:value-type="string">
            <text:p text:style-name="Table_20_Contents">Memory Address</text:p>
          </table:table-cell>
        </table:table-row>
        <table:table-row>
          <table:table-cell table:style-name="TableRowCell" office:value-type="string">
            <text:p text:style-name="Table_20_Contents">TB1-C6</text:p>
          </table:table-cell>
          <table:table-cell table:style-name="TableRowCell" office:value-type="string">
            <text:p text:style-name="Table_20_Contents">MA14</text:p>
          </table:table-cell>
          <table:table-cell table:style-name="TableRowCell" office:value-type="string">
            <text:p text:style-name="Table_20_Contents">Memory Address</text:p>
          </table:table-cell>
          <table:table-cell table:style-name="TableRowCell" office:value-type="string">
            <text:p text:style-name="Table_20_Contents">TB2-D1</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7</text:p>
          </table:table-cell>
          <table:table-cell table:style-name="TableRowCell" office:value-type="string">
            <text:p text:style-name="Table_20_Contents">MA10</text:p>
          </table:table-cell>
          <table:table-cell table:style-name="TableRowCell" office:value-type="string">
            <text:p text:style-name="Table_20_Contents">Memory Address</text:p>
          </table:table-cell>
          <table:table-cell table:style-name="TableRowCell" office:value-type="string">
            <text:p text:style-name="Table_20_Contents">TB2-D2</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C8</text:p>
          </table:table-cell>
          <table:table-cell table:style-name="TableRowCell" office:value-type="string">
            <text:p text:style-name="Table_20_Contents">N.C.</text:p>
          </table:table-cell>
          <table:table-cell table:style-name="TableRowCell" office:value-type="string">
    </table:table-cell>
          <table:table-cell table:style-name="TableRowCell" office:value-type="string">
            <text:p text:style-name="Table_20_Contents">TB2-D3</text:p>
          </table:table-cell>
          <table:table-cell table:style-name="TableRowCell" office:value-type="string">
            <text:p text:style-name="Table_20_Contents">GND</text:p>
          </table:table-cell>
          <table:table-cell table:style-name="TableRowCell" office:value-type="string">
            <text:p text:style-name="Table_20_Contents">Ground</text:p>
          </table:table-cell>
        </table:table-row>
        <table:table-row>
          <table:table-cell table:style-name="TableRowCell" office:value-type="string">
            <text:p text:style-name="Table_20_Contents">TB1-D1</text:p>
          </table:table-cell>
          <table:table-cell table:style-name="TableRowCell" office:value-type="string">
            <text:p text:style-name="Table_20_Contents">ROMSEL</text:p>
          </table:table-cell>
          <table:table-cell table:style-name="TableRowCell" office:value-type="string">
            <text:p text:style-name="Table_20_Contents">Select 64Mx4M Mask ROM/Memory Board/EPROM</text:p>
          </table:table-cell>
          <table:table-cell table:style-name="TableRowCell" office:value-type="string">
            <text:p text:style-name="Table_20_Contents">TB2-D4</text:p>
          </table:table-cell>
          <table:table-cell table:style-name="TableRowCell" office:value-type="string">
            <text:p text:style-name="Table_20_Contents">MA6</text:p>
          </table:table-cell>
          <table:table-cell table:style-name="TableRowCell" office:value-type="string">
            <text:p text:style-name="Table_20_Contents">Memory Addres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witching Signal</text:p>
          </table:table-cell>
          <table:table-cell table:style-name="TableRowCell" office:value-type="string">
            <text:p text:style-name="Table_20_Contents">TB2-D5</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2</text:p>
          </table:table-cell>
          <table:table-cell table:style-name="TableRowCell" office:value-type="string">
            <text:p text:style-name="Table_20_Contents">WE1</text:p>
          </table:table-cell>
          <table:table-cell table:style-name="TableRowCell" office:value-type="string">
            <text:p text:style-name="Table_20_Contents">Memory Write Signal</text:p>
          </table:table-cell>
          <table:table-cell table:style-name="TableRowCell" office:value-type="string">
            <text:p text:style-name="Table_20_Contents">TB2-D6</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3</text:p>
          </table:table-cell>
          <table:table-cell table:style-name="TableRowCell" office:value-type="string">
            <text:p text:style-name="Table_20_Contents">MA11</text:p>
          </table:table-cell>
          <table:table-cell table:style-name="TableRowCell" office:value-type="string">
            <text:p text:style-name="Table_20_Contents">Memory Address</text:p>
          </table:table-cell>
          <table:table-cell table:style-name="TableRowCell" office:value-type="string">
            <text:p text:style-name="Table_20_Contents">TB2-D7</text:p>
          </table:table-cell>
          <table:table-cell table:style-name="TableRowCell" office:value-type="string">
            <text:p text:style-name="Table_20_Contents">Vcc1</text:p>
          </table:table-cell>
          <table:table-cell table:style-name="TableRowCell" office:value-type="string">
            <text:p text:style-name="Table_20_Contents">+5V</text:p>
          </table:table-cell>
        </table:table-row>
        <table:table-row>
          <table:table-cell table:style-name="TableRowCell" office:value-type="string">
            <text:p text:style-name="Table_20_Contents">TB1-D4</text:p>
          </table:table-cell>
          <table:table-cell table:style-name="TableRowCell" office:value-type="string">
            <text:p text:style-name="Table_20_Contents">MA13</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5</text:p>
          </table:table-cell>
          <table:table-cell table:style-name="TableRowCell" office:value-type="string">
            <text:p text:style-name="Table_20_Contents">MA16</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6</text:p>
          </table:table-cell>
          <table:table-cell table:style-name="TableRowCell" office:value-type="string">
            <text:p text:style-name="Table_20_Contents">MA12</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B1-D7</text:p>
          </table:table-cell>
          <table:table-cell table:style-name="TableRowCell" office:value-type="string">
            <text:p text:style-name="Table_20_Contents">MA1</text:p>
          </table:table-cell>
          <table:table-cell table:style-name="TableRowCell" office:value-type="string">
            <text:p text:style-name="Table_20_Contents">Memory Addres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4" text:outline-level="4"><text:bookmark-start text:name="fig-13-cz-6be26be4-circuit-diagram-refer-to-end-of-volume"/>Fig. 13 CZ-6BE2(6BE4) Circuit Diagram (Refer to End of Volume)<text:bookmark-end text:name="fig-13-cz-6be26be4-circuit-diagram-refer-to-end-of-volume"/></text:h>
      <text:h text:style-name="Heading_20_4" text:outline-level="4"><text:bookmark-start text:name="fig-14-cz-6be2c6be4c-circuit-diagram-refer-to-end-of-volume"/>Fig. 14 CZ-6BE2C(6BE4C) Circuit Diagram (Refer to End of Volume)<text:bookmark-end text:name="fig-14-cz-6be2c6be4c-circuit-diagram-refer-to-end-of-volume"/></text:h>
      <text:p text:style-name="First_20_paragraph">(Page 82)</text:p>
      <text:p text:style-name="Horizontal_20_Line"/>
      <text:h text:style-name="Heading_20_2" text:outline-level="2"><text:bookmark-start text:name="outs-000087"/>outs-000087<text:bookmark-end text:name="outs-000087"/></text:h>
      <text:p text:style-name="First_20_paragraph"><text:span text:style-name="Strong_20_Emphasis">Numerical Calculation Processor Board (CZ-6BP1/CZ-6BP1A)</text:span></text:p>
      <text:p text:style-name="Text_20_body">By greatly enhancing the actual calculation performance, the numerical calculation processor board greatly shortens the calculation time from one day to less than an hour. This board is indispensable for applications such as 3D graphics and ray tracing, but can also be used effectively in other purposes.</text:p>
      <text:p text:style-name="Text_20_body"><text:span text:style-name="Strong_20_Emphasis">Specifications</text:span></text:p>
      <text:p text:style-name="Text_20_body"><text:span text:style-name="Strong_20_Emphasis">Main LSI</text:span></text:p>
      <text:list text:style-name="List_20_1">
        <text:list-item>
          <text:p text:style-name="List_20_Bullet_20_Tight">Floating-point processor: MC 68881</text:p>
        </text:list-item>
        <text:list-item>
          <text:p text:style-name="List_20_Bullet_20_Tight">Clock frequency: 16.6 MHz</text:p>
        </text:list-item>
        <text:list-item>
          <text:p text:style-name="List_20_Bullet_20_Tight">Floating-point calculation specifications: IEEE std P754 compliance</text:p>
        </text:list-item>
      </text:list>
      <text:p text:style-name="First_20_paragraph"><text:span text:style-name="Strong_20_Emphasis">Power Supply</text:span></text:p>
      <text:list text:style-name="List_20_1">
        <text:list-item>
          <text:p text:style-name="List_20_Bullet_20_Tight">Supply voltage: +5V</text:p>
        </text:list-item>
        <text:list-item>
          <text:p text:style-name="List_20_Bullet_20_Tight">Current consumption: Approximately 250 mA</text:p>
        </text:list-item>
        <text:list-item>
          <text:p text:style-name="List_20_Bullet_20_Tight">Operating temperature range: 10-35°C</text:p>
        </text:list-item>
      </text:list>
      <text:p text:style-name="Horizontal_20_Line"/>
      <text:h text:style-name="Heading_20_2" text:outline-level="2"><text:bookmark-start text:name="outs-000088"/>outs-000088<text:bookmark-end text:name="outs-000088"/></text:h>
      <text:p text:style-name="Horizontal_20_Line"/>
      <text:p text:style-name="First_20_paragraph">Port Address <draw:frame draw:style-name="fr1" text:anchor-type="as-char"><draw:object xlink:href="Formula-36/" xlink:type="simple" xlink:show="embed" xlink:actuate="onLoad"/></draw:frame>E9E01F/<draw:frame draw:style-name="fr1" text:anchor-type="as-char"><draw:object xlink:href="Formula-38/" xlink:type="simple" xlink:show="embed" xlink:actuate="onLoad"/></draw:frame>E9E09F (select with jumper switch)</text:p>
      <text:p text:style-name="Text_20_body">Cutout Do not use</text:p>
      <text:list text:style-name="Numbering_20_1" text:start-value="2">
        <text:list-item>
          <text:p text:style-name="List_20_Number_20_Tight">Circuit Overview</text:p>
        </text:list-item>
      </text:list>
      <text:p text:style-name="First_20_paragraph">The block diagram of CZ-6BP1/CZ-6BP1A is shown in Figure 1. In the case of 68000, the CPU itself does not have the function to directly interface with the coprocessor, so CZ-6BP1/CZ-6BP1A uses MC68881 as an I/O device.</text:p>
      <text:p text:style-name="Text_20_body">Since the MC68881 is connected as an I/O device, it is not necessary to operate at the same clock speed as the X68000. CZ-6BP1/CZ-6BP1A operates the MC68881 at the chip's maximum speed of 16.665 MHz.</text:p>
      <text:list text:style-name="Numbering_20_1" text:start-value="3">
        <text:list-item>
          <text:p text:style-name="List_20_Number_20_Tight">Main Parts Layout</text:p>
        </text:list-item>
      </text:list>
      <text:p text:style-name="First_20_paragraph">The layout of the parts for CZ-6BP1/CZ-6BP1A is shown in Figure 2.</text:p>
      <text:p text:style-name="Horizontal_20_Line"/>
      <text:p text:style-name="Horizontal_20_Line"/>
      <text:h text:style-name="Heading_20_2" text:outline-level="2"><text:bookmark-start text:name="outs-000089"/>outs-000089<text:bookmark-end text:name="outs-000089"/></text:h>
      <text:p text:style-name="First_20_paragraph">Top center: "Block Diagram of Numeric Processing Board"</text:p>
      <text:p text:style-name="Text_20_body">Inside the chart: Top block: "Address Decoder" Middle block: "Timing Generation Circuit" Bottom block: "Bus Buffer" Below bus buffer: "DTACK Generation Circuit"</text:p>
      <text:p text:style-name="Text_20_body">Left side: "Expansion Slot"</text:p>
      <text:p text:style-name="Text_20_body">Right side: Top to bottom (keywords associated with different lines): "RESET" "CS" "AS" "DS" "D0~D31" "A1~A4" Bottom right: "MC68881"</text:p>
      <text:p text:style-name="Horizontal_20_Line"/>
      <text:h text:style-name="Heading_20_2" text:outline-level="2"><text:bookmark-start text:name="outs-000090"/>outs-000090<text:bookmark-end text:name="outs-000090"/></text:h>
      <text:p text:style-name="First_20_paragraph">"Figure 2 - Part arrangement of CZ-6BP1/CZ-6BP1A"</text:p>
      <text:p text:style-name="Horizontal_20_Line"/>
      <text:h text:style-name="Heading_20_2" text:outline-level="2"><text:bookmark-start text:name="outs-000091"/>outs-000091<text:bookmark-end text:name="outs-000091"/></text:h>
      <text:p text:style-name="Horizontal_20_Line"/>
      <text:h text:style-name="Heading_20_4" text:outline-level="4"><text:bookmark-start text:name="id_4-settings"/>4 Settings<text:bookmark-end text:name="id_4-settings"/></text:h>
      <text:h text:style-name="Heading_20_5" text:outline-level="5"><text:bookmark-start text:name="id_41-port-address-settings"/>4.1 Port Address Settings<text:bookmark-end text:name="id_41-port-address-settings"/></text:h>
      <text:p text:style-name="First_20_paragraph">CZ-6BPI/CZ-6BPIA can switch the port address using a jumper switch (SW1) on the board (see figure 3). When the address switch is set to side 1, the port address will be <draw:frame draw:style-name="fr1" text:anchor-type="as-char"><draw:object xlink:href="Formula-40/" xlink:type="simple" xlink:show="embed" xlink:actuate="onLoad"/></draw:frame>E9E01F, and when set to side 2, the port address will be <draw:frame draw:style-name="fr1" text:anchor-type="as-char"><draw:object xlink:href="Formula-42/" xlink:type="simple" xlink:show="embed" xlink:actuate="onLoad"/></draw:frame>E9E09F.</text:p>
      <text:p text:style-name="Text_20_body"><text:span text:style-name="Strong_20_Emphasis">Figure 3 Jumper Switch (SW1)</text:span></text:p>
      <table:table table:name="Table21" table:style-name="Table21">
        <table:table-column table:style-name="Table21.A"/>
        <table:table-column table:style-name="Table21.B"/>
        <table:table-header-rows>
          <table:table-row>
            <table:table-cell table:style-name="TableHeaderRowCell" office:value-type="string">
              <text:p text:style-name="Table_20_Heading">Address SW</text:p>
            </table:table-cell>
            <table:table-cell table:style-name="TableHeaderRowCell" office:value-type="string">
              <text:p text:style-name="Table_20_Heading">Port Address</text:p>
            </table:table-cell>
          </table:table-row>
        </table:table-header-rows>
        <table:table-row>
          <table:table-cell table:style-name="TableRowCell" office:value-type="string">
            <text:p text:style-name="Table_20_Contents">Side 1</text:p>
          </table:table-cell>
          <table:table-cell table:style-name="TableRowCell" office:value-type="string">
            <text:p text:style-name="Table_20_Contents"><draw:frame draw:style-name="fr1" text:anchor-type="as-char"><draw:object xlink:href="Formula-44/" xlink:type="simple" xlink:show="embed" xlink:actuate="onLoad"/></draw:frame>E9E020</text:p>
          </table:table-cell>
        </table:table-row>
        <table:table-row>
          <table:table-cell table:style-name="TableRowCell" office:value-type="string">
            <text:p text:style-name="Table_20_Contents">Side 2</text:p>
          </table:table-cell>
          <table:table-cell table:style-name="TableRowCell" office:value-type="string">
            <text:p text:style-name="Table_20_Contents"><draw:frame draw:style-name="fr1" text:anchor-type="as-char"><draw:object xlink:href="Formula-46/" xlink:type="simple" xlink:show="embed" xlink:actuate="onLoad"/></draw:frame>E9EA0A</text:p>
          </table:table-cell>
        </table:table-row>
      </table:table>
      <text:p text:style-name="First_20_paragraph">The factory setting is on side "1".</text:p>
      <text:p text:style-name="Text_20_body">The floating-point driver provided by Software House that supports this board is set to side 1. Therefore, if you set it to side 2, you will need to either modify the driver or write a program to operate the coprocessor directly.</text:p>
      <text:h text:style-name="Heading_20_4" text:outline-level="4"><text:bookmark-start text:name="id_5-io-map"/>5 I/O Map<text:bookmark-end text:name="id_5-io-map"/></text:h>
      <text:p text:style-name="First_20_paragraph">The MC 68881 has 8 floating-point registers and status registers inside. When performing actual arithmetic operations, you will use these registers. However, the CPU cannot directly access these registers. Instead, you need to be aware that indirect access is required using a register group called CIR (Coprocessor Interface Register).</text:p>
      <text:p text:style-name="Text_20_body">(Page 87)</text:p>
      <text:p text:style-name="Horizontal_20_Line"/>
      <text:h text:style-name="Heading_20_2" text:outline-level="2"><text:bookmark-start text:name="outs-000092"/>outs-000092<text:bookmark-end text:name="outs-000092"/></text:h>
      <text:p text:style-name="Horizontal_20_Line"/>
      <text:p text:style-name="First_20_paragraph">CZ-6BP1/CZ-6BP1A I/O address map is shown in Figure 4. As mentioned previously, the base address can be selected from either $E9E000 or $E9E080. For an in-depth explanation on how to use the MC68881, refer to the book "Inside X68000" with examples.</text:p>
      <text:p text:style-name="Text_20_body">● Figure 4: I/O Address Map of the Arithmetic Processor Bo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able:table-cell>
            <table:table-cell table:style-name="TableHeaderRowCell" office:value-type="string">
              <text:p text:style-name="Table_20_Heading">bit 31</text:p>
            </table:table-cell>
            <table:table-cell table:style-name="TableHeaderRowCell" office:value-type="string">
      </table:table-cell>
            <table:table-cell table:style-name="TableHeaderRowCell" office:value-type="string">
              <text:p text:style-name="Table_20_Heading">16</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00</text:p>
          </table:table-cell>
          <table:table-cell table:style-name="TableRowCell" office:value-type="string">
            <text:p text:style-name="Table_20_Contents">Response CIR (R)</text:p>
          </table:table-cell>
          <table:table-cell table:style-name="TableRowCell" office:value-type="string">
    </table:table-cell>
          <table:table-cell table:style-name="TableRowCell" office:value-type="string">
            <text:p text:style-name="Table_20_Contents">Control CIR (W)</text:p>
          </table:table-cell>
          <table:table-cell table:style-name="TableRowCell" office:value-type="string">
            <text:p text:style-name="Table_20_Contents">+$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4</text:p>
          </table:table-cell>
          <table:table-cell table:style-name="TableRowCell" office:value-type="string">
            <text:p text:style-name="Table_20_Contents">Safe CIR (R)</text:p>
          </table:table-cell>
          <table:table-cell table:style-name="TableRowCell" office:value-type="string">
    </table:table-cell>
          <table:table-cell table:style-name="TableRowCell" office:value-type="string">
            <text:p text:style-name="Table_20_Contents">List CIR (R/W)</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8</text:p>
          </table:table-cell>
          <table:table-cell table:style-name="TableRowCell" office:value-type="string">
            <text:p text:style-name="Table_20_Contents">(Overrun Code CIR)</text:p>
          </table:table-cell>
          <table:table-cell table:style-name="TableRowCell" office:value-type="string">
    </table:table-cell>
          <table:table-cell table:style-name="TableRowCell" office:value-type="string">
            <text:p text:style-name="Table_20_Contents">Command CIR (W)</text:p>
          </table:table-cell>
          <table:table-cell table:style-name="TableRowCell" office:value-type="string">
            <text:p text:style-name="Table_20_Contents">+$0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0C</text:p>
          </table:table-cell>
          <table:table-cell table:style-name="TableRowCell" office:value-type="string">
    </table:table-cell>
          <table:table-cell table:style-name="TableRowCell" office:value-type="string">
    </table:table-cell>
          <table:table-cell table:style-name="TableRowCell" office:value-type="string">
            <text:p text:style-name="Table_20_Contents">Condition CIR (W)</text:p>
          </table:table-cell>
          <table:table-cell table:style-name="TableRowCell" office:value-type="string">
            <text:p text:style-name="Table_20_Contents">+$0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Response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List Select CIR (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Executor Get Address CIR (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C</text:p>
          </table:table-cell>
          <table:table-cell table:style-name="TableRowCell" office:value-type="string">
            <text:p text:style-name="Table_20_Contents">(Overrun Address CI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Base Address: $E9E000 (Standard) $E9E080 (Second Card)</text:p>
      <text:p text:style-name="Text_20_body">(R) : Read Only (W) : Write Only (R/W) : Read/Write</text:p>
      <text:list text:style-name="Numbering_20_1" text:start-value="6">
        <text:list-item>
          <text:p text:style-name="List_20_Number_20_Tight">Circuit Diagram</text:p>
        </text:list-item>
      </text:list>
      <text:p text:style-name="First_20_paragraph">The circuit diagrams for CZ-6BP1/CZ-6BP1A are shown in Figures 5 and 6.</text:p>
      <text:p text:style-name="Text_20_body">● Figure 5: Circuit Diagram of CZ-6BP1 (No appendix) ● Figure 6: Circuit Diagram of CZ-6BP1A (No appendix)</text:p>
      <text:p text:style-name="Horizontal_20_Line"/>
      <text:p text:style-name="Horizontal_20_Line"/>
      <text:h text:style-name="Heading_20_2" text:outline-level="2"><text:bookmark-start text:name="outs-000093"/>outs-000093<text:bookmark-end text:name="outs-000093"/></text:h>
      <text:p text:style-name="Horizontal_20_Line"/>
      <text:p text:style-name="First_20_paragraph">MIDI Board (CZ-6BM1)</text:p>
      <text:p text:style-name="Text_20_body">With the release of affordable sound sources, MIDI, which used to be the domain of professional musicians, has become a mainstay of Desktop Music (DTM). The MIDI board is an interface board that connects this MIDI world with the X68000.</text:p>
      <text:p text:style-name="Text_20_body">The MIDI board (CZ-6BM1) is a real-time communication interface that allows connection to synthesizers, sequencers, rhythm machines, etc., supporting the MIDI (Music Instrument Device Interface) standard. (To actually enjoy playing music, MIDI instruments in addition to this board are required.)</text:p>
      <text:p text:style-name="Text_20_body">The CZ-6BM1 has 2 MIDI OUT ports and 1 MIDI IN port, and one of the MIDI OUT ports can also be used as a MIDI THRU port. Additionally, it has a tape-sync input/output port, allowing for synchronized performance with multi-track recorders.</text:p>
      <text:p text:style-name="Text_20_body">Specifications:</text:p>
      <text:p text:style-name="Text_20_body">Main LSI: MIDI Controller (MCS) YM 3802 Clock Frequency: 4 MHz</text:p>
      <text:p text:style-name="Text_20_body">Page 89</text:p>
      <text:p text:style-name="Horizontal_20_Line"/>
      <text:h text:style-name="Heading_20_2" text:outline-level="2"><text:bookmark-start text:name="outs-000094"/>outs-000094<text:bookmark-end text:name="outs-000094"/></text:h>
      <text:p text:style-name="First_20_paragraph"><text:span text:style-name="Strong_20_Emphasis">MIDI Bus Specification</text:span></text:p>
      <text:p text:style-name="Text_20_body"><text:span text:style-name="Emphasis">MIDI Specifications</text:span></text:p>
      <text:list text:style-name="List_20_1">
        <text:list-item>
          <text:p text:style-name="List_20_Bullet_20_Tight"><text:span text:style-name="Strong_20_Emphasis">Standard Compliance</text:span>: MIDI Specification 1.0</text:p>
        </text:list-item>
        <text:list-item>
          <text:p text:style-name="List_20_Bullet_20_Tight"><text:span text:style-name="Strong_20_Emphasis">Transmission Speed</text:span>: 31.25 Kbps</text:p>
        </text:list-item>
        <text:list-item>
          <text:p text:style-name="List_20_Bullet_20_Tight"><text:span text:style-name="Strong_20_Emphasis">MIDI Ports</text:span>:</text:p>
        </text:list-item>
      </text:list>
      <text:p text:style-name="Preformatted_20_Text"><text:s text:c="2"/>- MIDI OUTx2 (one of which can be switched to MIDI THRU)</text:p>
      <text:p text:style-name="Preformatted_20_Text"><text:s text:c="2"/>- MIDI IN x1</text:p>
      <text:list text:style-name="List_20_1">
        <text:list-item>
          <text:p text:style-name="List_20_Bullet_20_Tight"><text:span text:style-name="Strong_20_Emphasis">Synchronous Signal</text:span>: FSK 1200 bps</text:p>
        </text:list-item>
      </text:list>
      <text:p text:style-name="First_20_paragraph"><text:span text:style-name="Strong_20_Emphasis">Power Requirements</text:span></text:p>
      <text:list text:style-name="List_20_1">
        <text:list-item>
          <text:p text:style-name="List_20_Bullet_20_Tight"><text:span text:style-name="Strong_20_Emphasis">Supply Voltage</text:span>: +5 V</text:p>
        </text:list-item>
        <text:list-item>
          <text:p text:style-name="List_20_Bullet_20_Tight"><text:span text:style-name="Strong_20_Emphasis">Power Consumption</text:span>: Approximately 180 mA</text:p>
        </text:list-item>
      </text:list>
      <text:p text:style-name="First_20_paragraph"><text:span text:style-name="Strong_20_Emphasis">Port Address</text:span></text:p>
      <text:list text:style-name="List_20_1">
        <text:list-item>
          <text:p text:style-name="List_20_Bullet_20_Tight">$EAFA01 ～ $EAFA0F / $EAFA11 ～ $EAFA1F</text:p>
          <text:list text:style-name="List_20_1">
            <text:list-item>
              <text:p text:style-name="List_20_Bullet_20_Tight"><text:span text:style-name="Emphasis">(Selectable via jumper switch)</text:span></text:p>
            </text:list-item>
          </text:list>
        </text:list-item>
      </text:list>
      <text:p text:style-name="First_20_paragraph"><text:span text:style-name="Strong_20_Emphasis">Interrupts</text:span></text:p>
      <text:list text:style-name="List_20_1">
        <text:list-item>
          <text:p text:style-name="List_20_Bullet_20_Tight">Level 2 / Level 4 <text:span text:style-name="Emphasis">(Selectable via jumper switch)</text:span></text:p>
        </text:list-item>
      </text:list>
      <text:p text:style-name="Horizontal_20_Line"/>
      <text:p text:style-name="First_20_paragraph"><text:span text:style-name="Strong_20_Emphasis">2. Circuit Overview</text:span></text:p>
      <text:p text:style-name="Text_20_body">Figure 1 shows the block diagram of the CZ-6BM1. The MIDI control LSI uses the Yamaha YM3802. The YM3802 requires three different clock frequencies. The CZ-6BM1 divides a 16 MHz frequency to obtain a 4 MHz system clock by a factor of 1/4, divides it further by 1/16 to obtain a 1 MHz clock for internal operation, and additionally derives a 4.9152 MHz clock from an external source. Furthermore, it uses a 614.4 kHz clock as the MIDI active sensing and real-time clock, output to the CLKF terminal.</text:p>
      <text:p text:style-name="Text_20_body">MIDI input is received by a phototransistor, and output is buffered by an open collector. One of the MIDI output ports can be switched to MIDI THRU (MIDI IN → as an output without going through processing) via a jumper switch.</text:p>
      <text:p text:style-name="Text_20_body">The SYNC OUT output clock is a MIDI clock signal of 1200 bps FSK. The amplified and limited signal output from this port is converted and received by the YM3802 as a differential signal via a comparator to form wave shaping.</text:p>
      <text:p text:style-name="Horizontal_20_Line"/>
      <text:h text:style-name="Heading_20_2" text:outline-level="2"><text:bookmark-start text:name="outs-000095"/>outs-000095<text:bookmark-end text:name="outs-000095"/></text:h>
      <text:p text:style-name="First_20_paragraph">MIDI Board</text:p>
      <text:p text:style-name="Text_20_body">● Fig. 1 MIDI Board Block Diagram</text:p>
      <text:p text:style-name="Text_20_body">X'tal 16MHz X'tal 4.915MHz 1/4 divide, 1/4 divide 1/2 divide 49MHz 1MHz 614.4K 4MHz CLK CLKAM CLKF</text:p>
      <text:p text:style-name="Text_20_body">Expansion I/O Slot</text:p>
      <text:p text:style-name="Text_20_body">Buffer IDDIR D0 - D7 → DC, D7</text:p>
      <text:p text:style-name="Text_20_body">Bus Controller AS, LDS, R/W +5V DTACK VR, CS, RD, WR, IC</text:p>
      <text:p text:style-name="Text_20_body">Address Decoder A4 - A23 → A0</text:p>
      <text:p text:style-name="Text_20_body">Vector Controller A1 - A3 → A2</text:p>
      <text:p text:style-name="Text_20_body">Interrupt Controller IACK 4 IACK 2 IRQ4 IRQ2 IRQ</text:p>
      <text:p text:style-name="Text_20_body">MCS YM3802</text:p>
      <text:p text:style-name="Text_20_body">TxD → (buffer) → MIDI OUT → MIDI OUT/THRU RxD → Optocoupler → MIDI IN</text:p>
      <text:p text:style-name="Text_20_body">TxF → TTL Level → FSK Sync Signal Output Circuit → SYNC OUT RxF → TTL Level → FSK Sync Signal Input Circuit ← SYNC IN VoCF</text:p>
      <text:p text:style-name="Text_20_body">X68000</text:p>
      <text:p text:style-name="Text_20_body">91</text:p>
      <text:p text:style-name="Horizontal_20_Line"/>
      <text:h text:style-name="Heading_20_2" text:outline-level="2"><text:bookmark-start text:name="outs-000096"/>outs-000096<text:bookmark-end text:name="outs-000096"/></text:h>
      <text:p text:style-name="First_20_paragraph">"●3 Main Component Layout</text:p>
      <text:p text:style-name="Text_20_body">The component layout of the CZ-6BM1 is shown in Diagram 2 below.</text:p>
      <text:p text:style-name="Text_20_body">●Diagram 2: Component layout of the CZ-6BM1"</text:p>
      <text:p text:style-name="Text_20_body">(Note: The image below the text appears to be a diagram of an electronic circuit board.)</text:p>
      <text:p text:style-name="Horizontal_20_Line"/>
      <text:h text:style-name="Heading_20_2" text:outline-level="2"><text:bookmark-start text:name="outs-000097"/>outs-000097<text:bookmark-end text:name="outs-000097"/></text:h>
      <text:p text:style-name="Horizontal_20_Line"/>
      <text:p text:style-name="First_20_paragraph"><text:span text:style-name="Strong_20_Emphasis">4 Settings</text:span></text:p>
      <text:p text:style-name="Text_20_body"><text:span text:style-name="Strong_20_Emphasis">4-1 Setting the Port Address</text:span> The CZ-6BM1 can select the port address using the jumper switch (JP1). When set to 1, the address becomes SEFA A01 to SEFA A0F, and when set to 2, the address becomes SEFA A11 to SEFA A1F. The default factory setting is 1.</text:p>
      <text:p text:style-name="Text_20_body"><text:span text:style-name="Strong_20_Emphasis">4-2 Setting the Clipping Level</text:span> The board's DIP switch has two settings (Switch 1-1), which can be used to select the clipping level. When set to ON, clipping level 4 is used, while when set to OFF, clipping level 2 is used.</text:p>
      <text:p text:style-name="Text_20_body"><text:span text:style-name="Strong_20_Emphasis">4-3 Selecting MIDI OUT/MIDI THRU</text:span> The board's DIP switch has two settings (Switch 1-2), which can be used to select whether the terminal functions as MIDI OUT or MIDI THRU. When set to ON, it functions as MIDI OUT, and when set to OFF, it functions as MIDI THRU.</text:p>
      <text:p text:style-name="Text_20_body"><text:span text:style-name="Strong_20_Emphasis">5 I/O Map</text:span> The I/O address map of the CZ-6BM1 is shown in Fig 3. The YM3802 has 38 registers grouped together, indicating the addresses of the I/O.</text:p>
      <text:p text:style-name="Horizontal_20_Line"/>
      <text:p text:style-name="Horizontal_20_Line"/>
      <text:h text:style-name="Heading_20_2" text:outline-level="2"><text:bookmark-start text:name="outs-000098"/>outs-000098<text:bookmark-end text:name="outs-000098"/></text:h>
      <text:p text:style-name="First_20_paragraph">● Fig. 3 MIDI Board I/O Address Map</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 Accessed</text:p>
            </table:table-cell>
          </table:table-row>
        </table:table-header-rows>
        <table:table-row>
          <table:table-cell table:style-name="TableRowCell" office:value-type="string">
            <text:p text:style-name="Table_20_Contents">YM3802</text:p>
          </table:table-cell>
          <table:table-cell table:style-name="TableRowCell" office:value-type="string">
            <text:p text:style-name="Table_20_Contents">Base address + $01</text:p>
          </table:table-cell>
          <table:table-cell table:style-name="TableRowCell" office:value-type="string">
            <text:p text:style-name="Table_20_Contents">R00</text:p>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R01</text:p>
          </table:table-cell>
        </table:table-row>
        <table:table-row>
          <table:table-cell table:style-name="TableRowCell" office:value-type="string">
    </table:table-cell>
          <table:table-cell table:style-name="TableRowCell" office:value-type="string">
            <text:p text:style-name="Table_20_Contents">+ $05</text:p>
          </table:table-cell>
          <table:table-cell table:style-name="TableRowCell" office:value-type="string">
            <text:p text:style-name="Table_20_Contents">R02</text:p>
          </table:table-cell>
        </table:table-row>
        <table:table-row>
          <table:table-cell table:style-name="TableRowCell" office:value-type="string">
    </table:table-cell>
          <table:table-cell table:style-name="TableRowCell" office:value-type="string">
            <text:p text:style-name="Table_20_Contents">+ $07</text:p>
          </table:table-cell>
          <table:table-cell table:style-name="TableRowCell" office:value-type="string">
            <text:p text:style-name="Table_20_Contents">R03</text:p>
          </table:table-cell>
        </table:table-row>
        <table:table-row>
          <table:table-cell table:style-name="TableRowCell" office:value-type="string">
    </table:table-cell>
          <table:table-cell table:style-name="TableRowCell" office:value-type="string">
            <text:p text:style-name="Table_20_Contents">+ $09</text:p>
          </table:table-cell>
          <table:table-cell table:style-name="TableRowCell" office:value-type="string">
            <text:p text:style-name="Table_20_Contents">R04, R14, R24, R34, R44, R54, R64, R74, R84, R94</text:p>
          </table:table-cell>
        </table:table-row>
        <table:table-row>
          <table:table-cell table:style-name="TableRowCell" office:value-type="string">
    </table:table-cell>
          <table:table-cell table:style-name="TableRowCell" office:value-type="string">
            <text:p text:style-name="Table_20_Contents">+ $0B</text:p>
          </table:table-cell>
          <table:table-cell table:style-name="TableRowCell" office:value-type="string">
            <text:p text:style-name="Table_20_Contents">R05, R15, R25, R35, R45, R55, R65, R75, R85, R95</text:p>
          </table:table-cell>
        </table:table-row>
        <table:table-row>
          <table:table-cell table:style-name="TableRowCell" office:value-type="string">
    </table:table-cell>
          <table:table-cell table:style-name="TableRowCell" office:value-type="string">
            <text:p text:style-name="Table_20_Contents">+ $0D</text:p>
          </table:table-cell>
          <table:table-cell table:style-name="TableRowCell" office:value-type="string">
            <text:p text:style-name="Table_20_Contents">R06, R16, R26, R36, R56, R66, R76, R86, R96</text:p>
          </table:table-cell>
        </table:table-row>
        <table:table-row>
          <table:table-cell table:style-name="TableRowCell" office:value-type="string">
    </table:table-cell>
          <table:table-cell table:style-name="TableRowCell" office:value-type="string">
            <text:p text:style-name="Table_20_Contents">+ $0F</text:p>
          </table:table-cell>
          <table:table-cell table:style-name="TableRowCell" office:value-type="string">
            <text:p text:style-name="Table_20_Contents">R17, R27, R67, R77, R87</text:p>
          </table:table-cell>
        </table:table-row>
      </table:table>
      <text:p text:style-name="First_20_paragraph">Base address: $EAFA00 (1st board) / $EAFA10 (2nd board)</text:p>
      <text:p text:style-name="Text_20_body">The four registers R00 through R03 are located at <draw:frame draw:style-name="fr1" text:anchor-type="as-char"><draw:object xlink:href="Formula-48/" xlink:type="simple" xlink:show="embed" xlink:actuate="onLoad"/></draw:frame>EAFA11 through <draw:frame draw:style-name="fr1" text:anchor-type="as-char"><draw:object xlink:href="Formula-50/" xlink:type="simple" xlink:show="embed" xlink:actuate="onLoad"/></draw:frame>EAFA17 respectively, and can be accessed at any time.</text:p>
      <text:p text:style-name="Text_20_body">For the other registers, you first write the upper value of the register number (for example, 4 in the case of R45) to R01, and then access the port address corresponding to the lower value (5 in the case of R45; for R45 this is <draw:frame draw:style-name="fr1" text:anchor-type="as-char"><draw:object xlink:href="Formula-52/" xlink:type="simple" xlink:show="embed" xlink:actuate="onLoad"/></draw:frame>EAFA1B). In other words, registers that share the same lower digit of the register number share the same port address, and among them, the register whose upper digit matches the value written to R01 is the one that gets accessed. In the YM3802, the upper data of the register number is called the "group number." Since the value written to R01 does not change even after register access, you may omit rewriting R01 when accessing registers with the same group number. The bit layout of each YM3802 register is shown in Fig. 4 through Fig. 39; please refer to them.</text:p>
      <text:p text:style-name="Text_20_body">94</text:p>
      <text:p text:style-name="Horizontal_20_Line"/>
      <text:h text:style-name="Heading_20_2" text:outline-level="2"><text:bookmark-start text:name="outs-000099"/>outs-000099<text:bookmark-end text:name="outs-000099"/></text:h>
      <text:p text:style-name="Horizontal_20_Line"/>
      <text:p text:style-name="First_20_paragraph">● Figure 4 R00 (Read): Interrupt Vector</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7"/>Vector Offset <text:s text:c="7"/>| <text:s text:c="5"/>Vector <text:s text:c="4"/>| <text:s text:c="3"/>'0'</text:p>
      <text:p text:style-name="Preformatted_20_Text"><text:s text:c="5"/>----------------------------------------------</text:p>
      <text:p text:style-name="Preformatted_20_Text"><text:s text:c="42"/>(always '0')</text:p>
      <text:p text:style-name="First_20_paragraph">Upper bits of Vector (Same as upper 3 bits of R04)</text:p>
      <text:p text:style-name="Text_20_body">Indicates the cause of the interrupt: '1000': No current active interrupt cause '0111': General Timer (timer count reached) '0110': FIFO-Tx empty (transmit FIFO emptied) '0101': FIFO-Rx ready (receive FIFO data full) '0100': Off-line / Break detected (300 ms continuous break, or a 2+ character-frame break signal) '0011': Recording Counter (recording counter count reached) '0010': Play-back Counter (play-back counter count changed) '0001': Click Counter (count value reached) / MIDI-clock detected (FIFO-IRx data: SF8) '0000': MIDI real-time message detected (FIFO-IRx end data: SF9–SFF)</text:p>
      <text:p text:style-name="Text_20_body">[Vector→cause mapping corrected against the MAME ym3802 model: Off-line and Break share interrupt bit 4 (one vector code), and Click Counter and MIDI-clock detection share bit 1; the source table gave Break its own code, shifting the lower entries and duplicating '0001'.]</text:p>
      <text:p text:style-name="Horizontal_20_Line"/>
      <text:p text:style-name="First_20_paragraph">● Figure 5 R01 (Write): System Status</text:p>
      <text:p text:style-name="Preformatted_20_Text"><text:s text:c="5"/>bit 7 <text:s text:c="4"/>6 <text:s text:c="4"/>5 <text:s text:c="4"/>4 <text:s text:c="4"/>3 <text:s text:c="4"/>2 <text:s text:c="4"/>1 <text:s text:c="4"/>0</text:p>
      <text:p text:style-name="Preformatted_20_Text"><text:s text:c="5"/>----------------------------------------------</text:p>
      <text:p text:style-name="Preformatted_20_Text"><text:s text:c="4"/>| <text:s text:c="4"/>IC <text:s text:c="4"/>| <text:s text:c="10"/>Group Number <text:s text:c="10"/>|</text:p>
      <text:p text:style-name="Preformatted_20_Text"><text:s text:c="5"/>----------------------------------------------</text:p>
      <text:p text:style-name="First_20_paragraph">Group number of the register to access:</text:p>
      <text:p text:style-name="Text_20_body">Initial Clear Request: Setting bit 2 to '1' resets the YM3802. If reusing, revert to '0'.</text:p>
      <text:p text:style-name="Horizontal_20_Line"/>
      <text:h text:style-name="Heading_20_2" text:outline-level="2"><text:bookmark-start text:name="outs-000100"/>outs-000100<text:bookmark-end text:name="outs-000100"/></text:h>
      <text:p text:style-name="Horizontal_20_Line"/>
      <text:p text:style-name="First_20_paragraph">●Diagram·····6 R02 (Read), R03 (Write), R06 (Write)</text:p>
      <text:list text:style-name="List_20_1">
        <text:list-item>
          <text:p text:style-name="List_20_Bullet_20_Tight">R02 (Read): Interrupt status (“1”: Interrupt requested)</text:p>
        </text:list-item>
        <text:list-item>
          <text:p text:style-name="List_20_Bullet_20_Tight">R03 (Write): Clear interrupt (“1”: Clear)</text:p>
        </text:list-item>
        <text:list-item>
          <text:p text:style-name="List_20_Bullet_20_Tight">R06 (Write): Enable interrupt key table (“1”: Interrupt enabled)</text:p>
        </text:list-item>
      </text:list>
      <text:p text:style-name="First_20_paragraph">![Bit layout] GT TX RX OL RC PC CC MM bit 7 6 5 4 3 2 1 bit 0</text:p>
      <text:p text:style-name="Text_20_body">General Timer FIFO - Tx empty FIFO - Rx ready Off-line detected/Break detected Recording Counter Play-back Counter Click Counter/MIDI-clock detected MIDI real-time message detected</text:p>
      <text:p text:style-name="Text_20_body">Please refer to Diagram 4 for the contents of each bit.</text:p>
      <text:p text:style-name="Horizontal_20_Line"/>
      <text:p text:style-name="First_20_paragraph">●Diagram·····7 R04 (Write): Interrupt Vector Offset</text:p>
      <text:p text:style-name="Preformatted_20_Text"><text:s text:c="16"/>Vector Offset</text:p>
      <text:p text:style-name="First_20_paragraph">![Bit layout] bit 7 6 5 4 3 2 1 0</text:p>
      <text:p text:style-name="Text_20_body">Specify the upper 3 bits of the interrupt vector (The lower bits vary depending on the interrupt cause)</text:p>
      <text:p text:style-name="Horizontal_20_Line"/>
      <text:p text:style-name="First_20_paragraph">●Diagram·····8 R05 (Write): Interrupt Mode Control</text:p>
      <text:p text:style-name="Text_20_body">![Bit layout] bit 7 6 5 4 3 2 1 0 C/T O/B VE VM</text:p>
      <text:p text:style-name="Text_20_body">Select vector output timing</text:p>
      <text:p text:style-name="Preformatted_20_Text"><text:s text:c="4"/>'1': Always output vector</text:p>
      <text:p text:style-name="Preformatted_20_Text"><text:s text:c="4"/>'0': Only during IRQ acknowledge</text:p>
      <text:p text:style-name="First_20_paragraph">Enable vector output</text:p>
      <text:p text:style-name="Preformatted_20_Text"><text:s text:c="4"/>'1': Allow interrupt vector output</text:p>
      <text:p text:style-name="Preformatted_20_Text"><text:s text:c="4"/>'0': Disable</text:p>
      <text:p text:style-name="First_20_paragraph">Select IRQ-4 source</text:p>
      <text:p text:style-name="Preformatted_20_Text"><text:s text:c="4"/>IRQ-4 (Select interrupt cause other than R02/03/06)</text:p>
      <text:p text:style-name="Preformatted_20_Text"><text:s text:c="4"/>'1': Use for Break detected interrupt</text:p>
      <text:p text:style-name="Preformatted_20_Text"><text:s text:c="4"/>'0': Use for Off-line detected interrupt</text:p>
      <text:p text:style-name="First_20_paragraph">Select IRQ-1 source</text:p>
      <text:p text:style-name="Preformatted_20_Text"><text:s text:c="4"/>IRQ-1 (Select interrupt cause included in the bits of R02/03/06)</text:p>
      <text:p text:style-name="Preformatted_20_Text"><text:s text:c="4"/>'1': Use for MIDI-clock detected interrupt</text:p>
      <text:p text:style-name="Preformatted_20_Text"><text:s text:c="4"/>'0': Use for Click Counter detected interrupt</text:p>
      <text:p text:style-name="First_20_paragraph">Page 96</text:p>
      <text:p text:style-name="Horizontal_20_Line"/>
      <text:h text:style-name="Heading_20_2" text:outline-level="2"><text:bookmark-start text:name="outs-000101"/>outs-000101<text:bookmark-end text:name="outs-000101"/></text:h>
      <text:p text:style-name="Horizontal_20_Line"/>
      <text:p text:style-name="First_20_paragraph">MIDI Board</text:p>
      <text:p text:style-name="Text_20_body">■ Diagram ...... 9 R14 (Write): Control for MIDI Real-Time Messages</text:p>
      <text:p text:style-name="Text_20_body">bit 7 | 6 | 5 | 4 | 3 | 2 | 1 | 0 ASE MCE CDE MCDS MCFS</text:p>
      <text:p text:style-name="Text_20_body">Select MIDI-clock or FIFO-IRx (The setting for the clock source used by FIFO-Rx) 11 : MIDI-clock Timer 10 : SYNC Detector 01 : MIDI message Detector 00 : (Inhibited) (The source table collapsed this 2-bit MCFS selector to "11" and "00" only; the codes 11/10/01/00 are restored here. Confirmed against the rp3802 YM3802 emulator (github.com/hyano/rp3802): MCFS=11 selects the MIDI-clock timer as the internal clock source, and MCFS=01 takes the MIDI clock from received serial data (MIDI-message detector); 10 = SYNC detector and 00 = inhibited follow by elimination.)</text:p>
      <text:p text:style-name="Text_20_body">Select MIDI-clock for distributor (MIDI message distributor internal MID-clock signal selection) 1 : user (Operation of R15) 0 : FIFO-IRx</text:p>
      <text:p text:style-name="Text_20_body">Enable MIDI-control (SF8 ~ SFD) detection (Detection control of system real-time messages from SF9 to SFD) 1 : Enable 0 : Disable</text:p>
      <text:p text:style-name="Text_20_body">Enable auto MIDI-clock (SF8) output (MIDI message distributor's chronology message transmission control) 1 : Enable 0 : Disable</text:p>
      <text:p text:style-name="Text_20_body">Enable auto active-sense (SFE) output (Permit active sense message transmission by idle detection) 1 : Enable 0 : Disable</text:p>
      <text:p text:style-name="Horizontal_20_Line"/>
      <text:p text:style-name="Horizontal_20_Line"/>
      <text:h text:style-name="Heading_20_2" text:outline-level="2"><text:bookmark-start text:name="outs-000102"/>outs-000102<text:bookmark-end text:name="outs-000102"/></text:h>
      <text:p text:style-name="Horizontal_20_Line"/>
      <text:p text:style-name="First_20_paragraph">● Fig. 10 R15 (Write): MIDI Real-Time Message Request</text:p>
      <text:p text:style-name="Text_20_body">bit 7 - 6 - 5 - 4 - 3 - 2 - 1 - bit 0 Tx - SYNC - CC - PC - RC - contents of message bit 3-0:</text:p>
      <text:p text:style-name="Preformatted_20_Text"><text:s text:c="2"/>"111": (inhibited)</text:p>
      <text:p text:style-name="Preformatted_20_Text"><text:s text:c="2"/>"110": (inhibited)</text:p>
      <text:p text:style-name="Preformatted_20_Text"><text:s text:c="2"/>"101": SFD</text:p>
      <text:p text:style-name="Preformatted_20_Text"><text:s text:c="2"/>"100": SFC/stop</text:p>
      <text:p text:style-name="Preformatted_20_Text"><text:s text:c="2"/>"011": SFB/continue</text:p>
      <text:p text:style-name="Preformatted_20_Text"><text:s text:c="2"/>"010": SFA/start</text:p>
      <text:p text:style-name="Preformatted_20_Text"><text:s text:c="2"/>"001": SF9</text:p>
      <text:p text:style-name="Preformatted_20_Text"><text:s text:c="2"/>"000": SF8/clock</text:p>
      <text:p text:style-name="Preformatted_20_Text"><text:s text:c="2"/>* SF8 (clock) is sent to all units, regardless of the settings in bit 3-0</text:p>
      <text:p text:style-name="First_20_paragraph">Recording Counter Play-back Counter Click Counter Sync Controller FIFO-ITx '1': Send message '0': Do not send message</text:p>
      <text:p text:style-name="Text_20_body">● Fig. 11 R16 (Read): FIFO-IRx data</text:p>
      <text:p text:style-name="Text_20_body">bit 7 - 6 - 5 - 4 - 3 - 2 - 1 - bit 0 FIFO-IRx data Data received from MIDI</text:p>
      <text:p text:style-name="Text_20_body">● Fig. 12 R17 (Write): FIFO-IRx Control</text:p>
      <text:p text:style-name="Text_20_body">bit 7 - 6 - 5 - 4 - 3 - 2 - 1 - bit 0 CLK</text:p>
      <text:p text:style-name="Text_20_body">FIFO-IRx increment clock '1': An increment clock is sent to FIFO-IRx (and read data is extracted) '0': Normal operation</text:p>
      <text:p text:style-name="Horizontal_20_Line"/>
      <text:p text:style-name="Horizontal_20_Line"/>
      <text:h text:style-name="Heading_20_2" text:outline-level="2"><text:bookmark-start text:name="outs-000103"/>outs-000103<text:bookmark-end text:name="outs-000103"/></text:h>
      <text:h text:style-name="Heading_20_3" text:outline-level="3"><text:bookmark-start text:name="image-translation-from-japanese-to-english"/>Image Translation from Japanese to English:<text:bookmark-end text:name="image-translation-from-japanese-to-english"/></text:h>
      <text:h text:style-name="Heading_20_4" text:outline-level="4"><text:bookmark-start text:name="top-section"/>Top Section:<text:bookmark-end text:name="top-section"/></text:h>
      <text:p text:style-name="First_20_paragraph">■13 R24 (Write): Rx Communication Rate</text:p>
      <text:p text:style-name="Text_20_body">bit 7 6 5 4 3 2 1 bit 0 | RxD/F | communication rate |</text:p>
      <text:p text:style-name="Text_20_body">Determines the MIDI reception rate: "00XXX": CLKM/16 (prohibited when RxD/F= '1') "01XXX": CLKM/32 "10XXX": CLKF/32 "11000": CLKF/64 "11001": CLKF/128 "11010": CLKF/256 "11011": CLKF/512 "11100": CLKF/1024 "11101": CLKF/2048 "11110": CLKF/4096 "11111": CLKF/8192</text:p>
      <text:p text:style-name="Text_20_body">Select Receiver input connection Determine where the receiver input is taken from: '1': FSK demodulator '0': RxD</text:p>
      <text:h text:style-name="Heading_20_4" text:outline-level="4"><text:bookmark-start text:name="bottom-section"/>Bottom Section:<text:bookmark-end text:name="bottom-section"/></text:h>
      <text:p text:style-name="First_20_paragraph">■14 R25 (Write): Rx Communication Mode</text:p>
      <text:p text:style-name="Text_20_body">bit 7 6 5 4 3 2 1 bit 0 | RxCL RxPE RxPL RxE/O RxSL RxST |</text:p>
      <text:p text:style-name="Text_20_body">Select stop-bit type in 2-bit length: '1': LH '0': HH</text:p>
      <text:p text:style-name="Text_20_body">Select stop-bit length: '1': 2 bit '0': 1 bit</text:p>
      <text:p text:style-name="Text_20_body">Select parity-bit polarity: '1': odd '0': even</text:p>
      <text:p text:style-name="Text_20_body">Select parity-bit length: '1': 4 bit '0': 1 bit</text:p>
      <text:p text:style-name="Text_20_body">Enable parity-bit check: '1': enable '0': disable</text:p>
      <text:p text:style-name="Text_20_body">Select data bit length: '1': 7 bit '0': 8 bit</text:p>
      <text:p text:style-name="Horizontal_20_Line"/>
      <text:h text:style-name="Heading_20_2" text:outline-level="2"><text:bookmark-start text:name="outs-000104"/>outs-000104<text:bookmark-end text:name="outs-000104"/></text:h>
      <text:p text:style-name="First_20_paragraph">● Fig. 15 R26 (Write): Address-hunter Control (1)</text:p>
      <text:p text:style-name="Text_20_body">bit 7 6 5 4 3 2 1 bit 0 IDCL | define maker-ID code</text:p>
      <text:p text:style-name="Text_20_body">Sets the maker ID code Specifies whether or not to check the device ID code '1': Maker-ID &amp; device-ID '0': Maker-ID only</text:p>
      <text:p text:style-name="Text_20_body">● Fig. 16 R27 (Write): Address-hunter Control (2)</text:p>
      <text:p text:style-name="Text_20_body">bit 7 6 5 4 3 2 1 bit 0 BORE | define device-ID code</text:p>
      <text:p text:style-name="Text_20_body">Sets the device ID code Determines whether or not to accept data with address $7F '1': In addition to the set address, also accepts $7F '0': Does not accept data other than the set address</text:p>
      <text:p text:style-name="Text_20_body">● Fig. 17 R34 (Write): FIFO-Rx Status</text:p>
      <text:p text:style-name="Text_20_body">bit 7 6 5 4 3 2 1 bit 0 RxRDY RxOV RxF RxP BRK RxOL AHBSY RxBSY</text:p>
      <text:p text:style-name="Text_20_body">Receiver busy flag '1': Receiver busy '0': Receiver idle</text:p>
      <text:p text:style-name="Text_20_body">Address-hunter busy flag '1': Address-hunter busy (during address hunting, after a system exclusive code with the matching ID has been received) '0': Address-hunter idle</text:p>
      <text:p text:style-name="Text_20_body">Off-line detected flag '1': Off-line state detected '0': Normal operation</text:p>
      <text:p text:style-name="Text_20_body">Break detected flag '1': BREAK state detected '0': Normal operation</text:p>
      <text:p text:style-name="Text_20_body">Parity error flag '1': Parity error detected '0': Normal operation</text:p>
      <text:p text:style-name="Text_20_body">Framing error flag '1': Framing error detected '0': Normal operation</text:p>
      <text:p text:style-name="Text_20_body">FIFO-Rx overflow detected flag '1': Overflow occurred (the next data was received while the receive buffer was already full) '0': Normal operation</text:p>
      <text:p text:style-name="Text_20_body">FIFO-Rx ready flag '1': There is data in the buffer to be read out '0': The buffer is empty</text:p>
      <text:p text:style-name="Text_20_body">100</text:p>
      <text:p text:style-name="Horizontal_20_Line"/>
      <text:h text:style-name="Heading_20_2" text:outline-level="2"><text:bookmark-start text:name="outs-000105"/>outs-000105<text:bookmark-end text:name="outs-000105"/></text:h>
      <text:p text:style-name="Horizontal_20_Line"/>
      <text:p text:style-name="First_20_paragraph"><text:span text:style-name="Strong_20_Emphasis">MIDI Board</text:span></text:p>
      <text:p text:style-name="Text_20_body">18 R35 (Write): FIFO-Rx Control</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RxC</text:p>
          </table:table-cell>
          <table:table-cell table:style-name="TableRowCell" office:value-type="string">
            <text:p text:style-name="Table_20_Contents">RxOVC</text:p>
          </table:table-cell>
          <table:table-cell table:style-name="TableRowCell" office:value-type="string">
            <text:p text:style-name="Table_20_Contents">FLTE</text:p>
          </table:table-cell>
          <table:table-cell table:style-name="TableRowCell" office:value-type="string">
            <text:p text:style-name="Table_20_Contents">BLKC</text:p>
          </table:table-cell>
          <table:table-cell table:style-name="TableRowCell" office:value-type="string">
            <text:p text:style-name="Table_20_Contents">RxOLC</text:p>
          </table:table-cell>
          <table:table-cell table:style-name="TableRowCell" office:value-type="string">
            <text:p text:style-name="Table_20_Contents">AHE</text:p>
          </table:table-cell>
          <table:table-cell table:style-name="TableRowCell" office:value-type="string">
            <text:p text:style-name="Table_20_Contents">RxE</text:p>
          </table:table-cell>
          <table:table-cell table:style-name="TableRowCell" office:value-type="string">
    </table:table-cell>
        </table:table-row>
      </table:table>
      <text:list text:style-name="List_20_1">
        <text:list-item>
          <text:p text:style-name="List_20_Bullet_20_Tight">Enable receiver</text:p>
        </text:list-item>
      </text:list>
      <text:p text:style-name="Preformatted_20_Text"><text:s text:c="2"/>- '1': Enable</text:p>
      <text:p text:style-name="Preformatted_20_Text"><text:s text:c="2"/>- '0': Disable</text:p>
      <text:list text:style-name="List_20_1">
        <text:list-item>
          <text:p text:style-name="List_20_Bullet_20_Tight">Enable Address-hunter</text:p>
        </text:list-item>
      </text:list>
      <text:p text:style-name="Preformatted_20_Text"><text:s text:c="2"/>- '1': Enable</text:p>
      <text:p text:style-name="Preformatted_20_Text"><text:s text:c="2"/>- '0': Disable</text:p>
      <text:list text:style-name="List_20_1">
        <text:list-item>
          <text:p text:style-name="List_20_Bullet_20_Tight">Clear off-line detected flag</text:p>
        </text:list-item>
      </text:list>
      <text:p text:style-name="Preformatted_20_Text"><text:s text:c="2"/>- '1': Clear off-line detected flag</text:p>
      <text:p text:style-name="Preformatted_20_Text"><text:s text:c="2"/>- '0': Normal operation</text:p>
      <text:list text:style-name="List_20_1">
        <text:list-item>
          <text:p text:style-name="List_20_Bullet_20_Tight">Clear break detected flag</text:p>
        </text:list-item>
      </text:list>
      <text:p text:style-name="Preformatted_20_Text"><text:s text:c="2"/>- '1': Clear break detected flag</text:p>
      <text:p text:style-name="Preformatted_20_Text"><text:s text:c="2"/>- '0': Normal operation</text:p>
      <text:list text:style-name="List_20_1">
        <text:list-item>
          <text:p text:style-name="List_20_Bullet_20_Tight">Enable MIDI-clock Filter</text:p>
        </text:list-item>
      </text:list>
      <text:p text:style-name="Preformatted_20_Text"><text:s text:c="2"/>- '1': Enable MIDI clock filter operation</text:p>
      <text:p text:style-name="Preformatted_20_Text"><text:s text:c="2"/>- '0': Disable</text:p>
      <text:list text:style-name="List_20_1">
        <text:list-item>
          <text:p text:style-name="List_20_Bullet_20_Tight">Clear overflow detected flag</text:p>
        </text:list-item>
      </text:list>
      <text:p text:style-name="Preformatted_20_Text"><text:s text:c="2"/>- '1': Clear overflow detected flag</text:p>
      <text:p text:style-name="Preformatted_20_Text"><text:s text:c="2"/>- '0': Normal operation</text:p>
      <text:list text:style-name="List_20_1">
        <text:list-item>
          <text:p text:style-name="List_20_Bullet_20_Tight">Clear FIFO-Rx</text:p>
        </text:list-item>
      </text:list>
      <text:p text:style-name="Preformatted_20_Text"><text:s text:c="2"/>- '1': Clear the contents of FIFO-Rx</text:p>
      <text:p text:style-name="Preformatted_20_Text"><text:s text:c="2"/>- '0': Normal operation</text:p>
      <text:p text:style-name="First_20_paragraph">19 R36 (Read): FIFO-Rx data</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get data from FIFO-R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Read the oldest data from FIFO-Rx</text:p>
        </text:list-item>
      </text:list>
      <text:p text:style-name="Horizontal_20_Line"/>
      <text:p text:style-name="First_20_paragraph">The translated text preserves the structure and technical meaning of the original text.</text:p>
      <text:p text:style-name="Horizontal_20_Line"/>
      <text:h text:style-name="Heading_20_2" text:outline-level="2"><text:bookmark-start text:name="outs-000106"/>outs-000106<text:bookmark-end text:name="outs-000106"/></text:h>
      <text:p text:style-name="Horizontal_20_Line"/>
      <text:p text:style-name="First_20_paragraph">● Diagram-20 R44 (Write): Tx Communication Rate</text:p>
      <text:p text:style-name="Text_20_body">bit 7 6 5 4 3 2 1 bit 0 +++++++++++++++++++++++++++++++++++++++++++++++++++++++++++ | TxRx | TxD/F | Communication rate | +++++++++++++++++++++++++++++++++++++++++++++++++++++++++++</text:p>
      <text:p text:style-name="Text_20_body">Select MIDI communication rate</text:p>
      <text:p text:style-name="Preformatted_20_Text"><text:s text:c="4"/>`00XXX`: CLKIN/16 (Prohibited if TxD/F = '1')</text:p>
      <text:p text:style-name="Preformatted_20_Text"><text:s text:c="4"/>`01XXX`: CLKIN/32</text:p>
      <text:p text:style-name="Preformatted_20_Text"><text:s text:c="4"/>`100XX`: CLKF/32</text:p>
      <text:p text:style-name="Preformatted_20_Text"><text:s text:c="4"/>`10100`: CLKF/64</text:p>
      <text:p text:style-name="Preformatted_20_Text"><text:s text:c="4"/>`10101`: CLKF/128</text:p>
      <text:p text:style-name="Preformatted_20_Text"><text:s text:c="4"/>`10110`: CLKF/256</text:p>
      <text:p text:style-name="Preformatted_20_Text"><text:s text:c="4"/>`10111`: CLKF/512</text:p>
      <text:p text:style-name="Preformatted_20_Text"><text:s text:c="4"/>`11000`: CLKF/1024</text:p>
      <text:p text:style-name="Preformatted_20_Text"><text:s text:c="4"/>`11001`: CLKF/2048</text:p>
      <text:p text:style-name="Preformatted_20_Text"><text:s text:c="4"/>`11010`: CLKF/4096</text:p>
      <text:p text:style-name="Preformatted_20_Text"><text:s text:c="4"/>`11011`: CLKF/8192</text:p>
      <text:p text:style-name="First_20_paragraph">Select transmitter output connection</text:p>
      <text:p text:style-name="Preformatted_20_Text"><text:s text:c="4"/>'1': FSK modulator</text:p>
      <text:p text:style-name="Preformatted_20_Text"><text:s text:c="4"/>'0': TXD</text:p>
      <text:p text:style-name="First_20_paragraph">Select TxD connection</text:p>
      <text:p text:style-name="Preformatted_20_Text"><text:s text:c="4"/>'1': RxD (Transmits received data from RxD directly to TxD)</text:p>
      <text:p text:style-name="Preformatted_20_Text"><text:s text:c="4"/>'0': Transmitter (Normal transmission)</text:p>
      <text:p text:style-name="Horizontal_20_Line"/>
      <text:p text:style-name="First_20_paragraph">● Diagram-21 R45 (Write): Tx Communication Mode</text:p>
      <text:p text:style-name="Text_20_body">bit 7 6 5 4 3 2 1 bit 0 ++++++++++++++++++++++++++++++++++++++++++++++++++ | | | | | | | | | TxCL | TxPE | TxPL | TxE/O | TxSL | TxST | | ++++++++++++++++++++++++++++++++++++++++++++++++++</text:p>
      <text:p text:style-name="Text_20_body">Select stop-bit type in 2 bit length</text:p>
      <text:p text:style-name="Preformatted_20_Text"><text:s text:c="4"/>'1': LH</text:p>
      <text:p text:style-name="Preformatted_20_Text"><text:s text:c="4"/>'0': HH</text:p>
      <text:p text:style-name="First_20_paragraph">Select stop-bit length</text:p>
      <text:p text:style-name="Preformatted_20_Text"><text:s text:c="4"/>'1': 2 bits</text:p>
      <text:p text:style-name="Preformatted_20_Text"><text:s text:c="4"/>'0': 1 bit</text:p>
      <text:p text:style-name="First_20_paragraph">Select parity-bit polarity</text:p>
      <text:p text:style-name="Preformatted_20_Text"><text:s text:c="4"/>'1': Odd</text:p>
      <text:p text:style-name="Preformatted_20_Text"><text:s text:c="4"/>'0': Even</text:p>
      <text:p text:style-name="First_20_paragraph">Select parity-bit length</text:p>
      <text:p text:style-name="Preformatted_20_Text"><text:s text:c="4"/>'1': 4 bits</text:p>
      <text:p text:style-name="Preformatted_20_Text"><text:s text:c="4"/>'0': 1 bit</text:p>
      <text:p text:style-name="First_20_paragraph">Enable parity-bit generation</text:p>
      <text:p text:style-name="Preformatted_20_Text"><text:s text:c="4"/>'1': Enable</text:p>
      <text:p text:style-name="Preformatted_20_Text"><text:s text:c="4"/>'0': Disable</text:p>
      <text:p text:style-name="First_20_paragraph">Select data-bit length</text:p>
      <text:p text:style-name="Preformatted_20_Text"><text:s text:c="4"/>'1': 7 bits</text:p>
      <text:p text:style-name="Preformatted_20_Text"><text:s text:c="4"/>'0': 8 bits</text:p>
      <text:p text:style-name="Horizontal_20_Line"/>
      <text:p text:style-name="First_20_paragraph">Page: 102</text:p>
      <text:p text:style-name="Horizontal_20_Line"/>
      <text:h text:style-name="Heading_20_2" text:outline-level="2"><text:bookmark-start text:name="outs-000107"/>outs-000107<text:bookmark-end text:name="outs-000107"/></text:h>
      <text:p text:style-name="First_20_paragraph"><text:span text:style-name="Strong_20_Emphasis">MIDI Board</text:span></text:p>
      <text:p text:style-name="Text_20_body"><text:span text:style-name="Strong_20_Emphasis">Figure 22</text:span> R54 (Read) : FIFO-Tx Sta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EMP</text:p>
          </table:table-cell>
          <table:table-cell table:style-name="TableRowCell" office:value-type="string">
            <text:p text:style-name="Table_20_Contents">TxRD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xIDL</text:p>
          </table:table-cell>
          <table:table-cell table:style-name="TableRowCell" office:value-type="string">
    </table:table-cell>
          <table:table-cell table:style-name="TableRowCell" office:value-type="string">
            <text:p text:style-name="Table_20_Contents">TxBSY</text:p>
          </table:table-cell>
        </table:table-row>
      </table:table>
      <text:p text:style-name="First_20_paragraph"><text:span text:style-name="Strong_20_Emphasis">Descriptions:</text:span></text:p>
      <text:list text:style-name="List_20_1">
        <text:list-item>
          <text:p text:style-name="List_20_Bullet_20_Tight"><text:span text:style-name="Strong_20_Emphasis">TxEMP: FIFO-Tx empty flag</text:span></text:p>
        </text:list-item>
      </text:list>
      <text:p text:style-name="Preformatted_20_Text"><text:s text:c="2"/>- ‘1’: FIFO-Tx is empty</text:p>
      <text:p text:style-name="Preformatted_20_Text"><text:s text:c="2"/>- ‘0’: Data is present</text:p>
      <text:list text:style-name="List_20_1">
        <text:list-item>
          <text:p text:style-name="List_20_Bullet_20_Tight"><text:span text:style-name="Strong_20_Emphasis">TxRDY: FIFO-Tx ready flag</text:span></text:p>
        </text:list-item>
      </text:list>
      <text:p text:style-name="Preformatted_20_Text"><text:s text:c="2"/>- ‘1’: FIFO-Tx is empty</text:p>
      <text:p text:style-name="Preformatted_20_Text"><text:s text:c="2"/>- ‘0’: Not empty (Note: Will be ignored even if written when not empty)</text:p>
      <text:list text:style-name="List_20_1">
        <text:list-item>
          <text:p text:style-name="List_20_Bullet_20_Tight"><text:span text:style-name="Strong_20_Emphasis">TxIDL: Tx idle detected flag</text:span></text:p>
        </text:list-item>
      </text:list>
      <text:p text:style-name="Preformatted_20_Text"><text:s text:c="2"/>- ‘1’: Idle status detected by idle detector</text:p>
      <text:p text:style-name="Preformatted_20_Text"><text:s text:c="2"/>- ‘0’: Normal operation</text:p>
      <text:list text:style-name="List_20_1">
        <text:list-item>
          <text:p text:style-name="List_20_Bullet_20_Tight"><text:span text:style-name="Strong_20_Emphasis">TxBSY: Transmitter busy flag</text:span></text:p>
        </text:list-item>
      </text:list>
      <text:p text:style-name="Preformatted_20_Text"><text:s text:c="2"/>- ‘1’: Transmitter in operation</text:p>
      <text:p text:style-name="Preformatted_20_Text"><text:s text:c="2"/>- ‘0’: Transmitter idle</text:p>
      <text:p text:style-name="Horizontal_20_Line"/>
      <text:p text:style-name="First_20_paragraph"><text:span text:style-name="Strong_20_Emphasis">Figure 23</text:span> R55 (Write) : FIFO-Tx Control</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Tx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BRKE</text:p>
          </table:table-cell>
          <table:table-cell table:style-name="TableRowCell" office:value-type="string">
            <text:p text:style-name="Table_20_Contents">TxIDLC</text:p>
          </table:table-cell>
          <table:table-cell table:style-name="TableRowCell" office:value-type="string">
            <text:p text:style-name="Table_20_Contents">TxE</text:p>
          </table:table-cell>
        </table:table-row>
      </table:table>
      <text:p text:style-name="First_20_paragraph"><text:span text:style-name="Strong_20_Emphasis">Descriptions:</text:span></text:p>
      <text:list text:style-name="List_20_1">
        <text:list-item>
          <text:p text:style-name="List_20_Bullet_20_Tight"><text:span text:style-name="Strong_20_Emphasis">TxC: Clear FIFO-Tx &amp; FIFO-ITx</text:span></text:p>
        </text:list-item>
      </text:list>
      <text:p text:style-name="Preformatted_20_Text"><text:s text:c="2"/>- ‘1’: Clear FIFO-Tx and FIFO-ITx contents</text:p>
      <text:p text:style-name="Preformatted_20_Text"><text:s text:c="2"/>- ‘0’: Normal operation</text:p>
      <text:list text:style-name="List_20_1">
        <text:list-item>
          <text:p text:style-name="List_20_Bullet_20_Tight"><text:span text:style-name="Strong_20_Emphasis">TxIDL: Clear Tx idle flag</text:span></text:p>
        </text:list-item>
      </text:list>
      <text:p text:style-name="Preformatted_20_Text"><text:s text:c="2"/>- ‘1’: Clear Tx idle flag</text:p>
      <text:p text:style-name="Preformatted_20_Text"><text:s text:c="2"/>- ‘0’: Normal operation</text:p>
      <text:list text:style-name="List_20_1">
        <text:list-item>
          <text:p text:style-name="List_20_Bullet_20_Tight"><text:span text:style-name="Strong_20_Emphasis">BRKE: Enable send-break</text:span></text:p>
        </text:list-item>
      </text:list>
      <text:p text:style-name="Preformatted_20_Text"><text:s text:c="2"/>- ‘1’: Fix transmitter output signal to ‘1’ (break state)</text:p>
      <text:p text:style-name="Preformatted_20_Text"><text:s text:c="2"/>- ‘0’: Normal operation</text:p>
      <text:list text:style-name="List_20_1">
        <text:list-item>
          <text:p text:style-name="List_20_Bullet_20_Tight"><text:span text:style-name="Strong_20_Emphasis">TxE: Enable transmitter</text:span></text:p>
        </text:list-item>
      </text:list>
      <text:p text:style-name="Preformatted_20_Text"><text:s text:c="2"/>- ‘1’: Enable transmission</text:p>
      <text:p text:style-name="Preformatted_20_Text"><text:s text:c="2"/>- ‘0’: Disable</text:p>
      <text:p text:style-name="Horizontal_20_Line"/>
      <text:p text:style-name="First_20_paragraph"><text:span text:style-name="Strong_20_Emphasis">Figure 24</text:span> R56 (Write) : FIFO-Tx Data</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header-rows>
          <table:table-row>
            <table:table-cell table:style-name="TableHeaderRowCell" office:value-type="string">
              <text:p text:style-name="Table_20_Heading">bit 7</text:p>
            </table:table-cell>
            <table:table-cell table:style-name="TableHeaderRowCell" office:value-type="string">
              <text:p text:style-name="Table_20_Heading">bit 6</text:p>
            </table:table-cell>
            <table:table-cell table:style-name="TableHeaderRowCell" office:value-type="string">
              <text:p text:style-name="Table_20_Heading">bit 5</text:p>
            </table:table-cell>
            <table:table-cell table:style-name="TableHeaderRowCell" office:value-type="string">
              <text:p text:style-name="Table_20_Heading">bit 4</text:p>
            </table:table-cell>
            <table:table-cell table:style-name="TableHeaderRowCell" office:value-type="string">
              <text:p text:style-name="Table_20_Heading">bit 3</text:p>
            </table:table-cell>
            <table:table-cell table:style-name="TableHeaderRowCell" office:value-type="string">
              <text:p text:style-name="Table_20_Heading">bit 2</text:p>
            </table:table-cell>
            <table:table-cell table:style-name="TableHeaderRowCell" office:value-type="string">
              <text:p text:style-name="Table_20_Heading">bit 1</text:p>
            </table:table-cell>
            <table:table-cell table:style-name="TableHeaderRowCell" office:value-type="string">
              <text:p text:style-name="Table_20_Heading">bit 0</text:p>
            </table:table-cell>
          </table:table-row>
        </table:table-header-rows>
        <table:table-row>
          <table:table-cell table:style-name="TableRowCell" office:value-type="string">
            <text:p text:style-name="Table_20_Contents">set data to FIFO-T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Strong_20_Emphasis">Description:</text:span></text:p>
      <text:list text:style-name="List_20_1">
        <text:list-item>
          <text:p text:style-name="List_20_Bullet_20_Tight">Data to be sent is written into FIFO-Tx.</text:p>
        </text:list-item>
      </text:list>
      <text:p text:style-name="Horizontal_20_Line"/>
      <text:p text:style-name="First_20_paragraph">Bottom page number: <text:span text:style-name="Strong_20_Emphasis">103</text:span></text:p>
      <text:p text:style-name="Horizontal_20_Line"/>
      <text:h text:style-name="Heading_20_2" text:outline-level="2"><text:bookmark-start text:name="outs-000108"/>outs-000108<text:bookmark-end text:name="outs-000108"/></text:h>
      <text:p text:style-name="Horizontal_20_Line"/>
      <text:p text:style-name="First_20_paragraph">Diagram 25 R64 (Read): FSK Status</text:p>
      <table:table table:name="Table29" table:style-name="Table29">
        <table:table-column table:style-name="Table29.A"/>
        <table:table-column table:style-name="Table29.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RxFS SS CSF CFF PS PDF</text:p>
          </table:table-cell>
        </table:table-row>
      </table:table>
      <text:list text:style-name="List_20_1">
        <text:list-item>
          <text:p text:style-name="List_20_Bullet_20_Tight">PDF</text:p>
        </text:list-item>
      </text:list>
      <text:p text:style-name="Preformatted_20_Text"><text:s text:c="2"/>- Polarity detected flag</text:p>
      <text:p text:style-name="Preformatted_20_Text"><text:s text:c="4"/>- '1' : Polarity detected</text:p>
      <text:p text:style-name="Preformatted_20_Text"><text:s text:c="4"/>- '0' : Not detected</text:p>
      <text:list text:style-name="List_20_1">
        <text:list-item>
          <text:p text:style-name="List_20_Bullet_20_Tight">PS</text:p>
        </text:list-item>
      </text:list>
      <text:p text:style-name="Preformatted_20_Text"><text:s text:c="2"/>- Polarity status</text:p>
      <text:p text:style-name="Preformatted_20_Text"><text:s text:c="4"/>- '1' : Negative polarity</text:p>
      <text:p text:style-name="Preformatted_20_Text"><text:s text:c="4"/>- '0' : Positive polarity</text:p>
      <text:list text:style-name="List_20_1">
        <text:list-item>
          <text:p text:style-name="List_20_Bullet_20_Tight">CFF</text:p>
        </text:list-item>
      </text:list>
      <text:p text:style-name="Preformatted_20_Text"><text:s text:c="2"/>- Carrier fast detected flag</text:p>
      <text:p text:style-name="Preformatted_20_Text"><text:s text:c="4"/>- '1' : A signal faster than the configured tone is input</text:p>
      <text:p text:style-name="Preformatted_20_Text"><text:s text:c="4"/>- '0' : Normal operation</text:p>
      <text:list text:style-name="List_20_1">
        <text:list-item>
          <text:p text:style-name="List_20_Bullet_20_Tight">CSF</text:p>
        </text:list-item>
      </text:list>
      <text:p text:style-name="Preformatted_20_Text"><text:s text:c="2"/>- Carrier slow detected flag</text:p>
      <text:p text:style-name="Preformatted_20_Text"><text:s text:c="4"/>- '1' : A signal slower than the configured tone is input</text:p>
      <text:p text:style-name="Preformatted_20_Text"><text:s text:c="4"/>- '0' : Normal operation</text:p>
      <text:list text:style-name="List_20_1">
        <text:list-item>
          <text:p text:style-name="List_20_Bullet_20_Tight">SS</text:p>
        </text:list-item>
      </text:list>
      <text:p text:style-name="Preformatted_20_Text"><text:s text:c="2"/>- Demodulated serial signal status</text:p>
      <text:p text:style-name="Preformatted_20_Text"><text:s text:c="4"/>- '1' : Mark ('H')</text:p>
      <text:p text:style-name="Preformatted_20_Text"><text:s text:c="4"/>- '0' : Space ('L')</text:p>
      <text:list text:style-name="List_20_1">
        <text:list-item>
          <text:p text:style-name="List_20_Bullet_20_Tight">RxFS</text:p>
        </text:list-item>
      </text:list>
      <text:p text:style-name="Preformatted_20_Text"><text:s text:c="2"/>- RxF pin status</text:p>
      <text:p text:style-name="Preformatted_20_Text"><text:s text:c="4"/>- '1' : 'H' level</text:p>
      <text:p text:style-name="Preformatted_20_Text"><text:s text:c="4"/>- '0' : 'L' level</text:p>
      <text:p text:style-name="Horizontal_20_Line"/>
      <text:p text:style-name="First_20_paragraph">Diagram 26 R65 (Write): FSK Control</text:p>
      <table:table table:name="Table30" table:style-name="Table30">
        <table:table-column table:style-name="Table30.A"/>
        <table:table-column table:style-name="Table30.B"/>
        <table:table-header-rows>
          <table:table-row>
            <table:table-cell table:style-name="TableHeaderRowCell" office:value-type="string">
              <text:p text:style-name="Table_20_Heading">Bit</text:p>
            </table:table-cell>
            <table:table-cell table:style-name="TableHeaderRowCell" office:value-type="string">
              <text:p text:style-name="Table_20_Heading">7 6 5 4 3 2 1 0</text:p>
            </table:table-cell>
          </table:table-row>
        </table:table-header-rows>
        <table:table-row>
          <table:table-cell table:style-name="TableRowCell" office:value-type="string">
    </table:table-cell>
          <table:table-cell table:style-name="TableRowCell" office:value-type="string">
            <text:p text:style-name="Table_20_Contents">ME CFC DE APD P/N PDFC</text:p>
          </table:table-cell>
        </table:table-row>
      </table:table>
      <text:list text:style-name="List_20_1">
        <text:list-item>
          <text:p text:style-name="List_20_Bullet_20_Tight">PDFC</text:p>
        </text:list-item>
      </text:list>
      <text:p text:style-name="Preformatted_20_Text"><text:s text:c="2"/>- Clear polarity detected flag</text:p>
      <text:p text:style-name="Preformatted_20_Text"><text:s text:c="4"/>- '1' : Clear polarity detected flag</text:p>
      <text:p text:style-name="Preformatted_20_Text"><text:s text:c="4"/>- '0' : Normal operation</text:p>
      <text:list text:style-name="List_20_1">
        <text:list-item>
          <text:p text:style-name="List_20_Bullet_20_Tight">P/N</text:p>
        </text:list-item>
      </text:list>
      <text:p text:style-name="Preformatted_20_Text"><text:s text:c="2"/>- Set polarity by manual</text:p>
      <text:p text:style-name="Preformatted_20_Text"><text:s text:c="4"/>- If auto polarity detector is disabled</text:p>
      <text:p text:style-name="Preformatted_20_Text"><text:s text:c="6"/>- '1' : Negative polarity</text:p>
      <text:p text:style-name="Preformatted_20_Text"><text:s text:c="6"/>- '0' : Positive polarity</text:p>
      <text:list text:style-name="List_20_1">
        <text:list-item>
          <text:p text:style-name="List_20_Bullet_20_Tight">APD</text:p>
        </text:list-item>
      </text:list>
      <text:p text:style-name="Preformatted_20_Text"><text:s text:c="2"/>- Disable auto polarity detector</text:p>
      <text:p text:style-name="Preformatted_20_Text"><text:s text:c="4"/>- '1' : Disable auto polarity detector</text:p>
      <text:p text:style-name="Preformatted_20_Text"><text:s text:c="4"/>- '0' : Enable</text:p>
      <text:list text:style-name="List_20_1">
        <text:list-item>
          <text:p text:style-name="List_20_Bullet_20_Tight">DE</text:p>
        </text:list-item>
      </text:list>
      <text:p text:style-name="Preformatted_20_Text"><text:s text:c="2"/>- Enable demodulator</text:p>
      <text:p text:style-name="Preformatted_20_Text"><text:s text:c="4"/>- '1' : Enable FSK demodulator</text:p>
      <text:p text:style-name="Preformatted_20_Text"><text:s text:c="4"/>- '0' : Disable</text:p>
      <text:list text:style-name="List_20_1">
        <text:list-item>
          <text:p text:style-name="List_20_Bullet_20_Tight">CFC</text:p>
        </text:list-item>
      </text:list>
      <text:p text:style-name="Preformatted_20_Text"><text:s text:c="2"/>- Clear carrier S/F detected flag</text:p>
      <text:p text:style-name="Preformatted_20_Text"><text:s text:c="4"/>- '1' : Clear carrier slow/fast detected flags</text:p>
      <text:p text:style-name="Preformatted_20_Text"><text:s text:c="4"/>- '0' : Normal operation</text:p>
      <text:list text:style-name="List_20_1">
        <text:list-item>
          <text:p text:style-name="List_20_Bullet_20_Tight">ME</text:p>
        </text:list-item>
      </text:list>
      <text:p text:style-name="Preformatted_20_Text"><text:s text:c="2"/>- Enable modulator</text:p>
      <text:p text:style-name="Preformatted_20_Text"><text:s text:c="4"/>- '1' : Enable FSK modulator</text:p>
      <text:p text:style-name="Preformatted_20_Text"><text:s text:c="4"/>- '0' : Disable </text:p>
      <text:p text:style-name="Horizontal_20_Line"/>
      <text:p text:style-name="First_20_paragraph">Page 104</text:p>
      <text:p text:style-name="Horizontal_20_Line"/>
      <text:h text:style-name="Heading_20_2" text:outline-level="2"><text:bookmark-start text:name="outs-000109"/>outs-000109<text:bookmark-end text:name="outs-000109"/></text:h>
      <text:p text:style-name="Horizontal_20_Line"/>
      <text:p text:style-name="First_20_paragraph"><text:span text:style-name="Strong_20_Emphasis">MIDI Board</text:span></text:p>
      <text:p text:style-name="Text_20_body">● Fig...27 R66 (Write): Click Counter Control</text:p>
      <text:p text:style-name="Text_20_body">(bit 7 to bit 0) CLKM OUTE</text:p>
      <text:p text:style-name="Text_20_body">Enable CLICK output</text:p>
      <text:p text:style-name="Preformatted_20_Text"><text:s text:c="4"/>'1': Outputs pulses to the CLICK terminal</text:p>
      <text:p text:style-name="Preformatted_20_Text"><text:s text:c="4"/>'0': Fixes the CLICK terminal at the 'L' level</text:p>
      <text:p text:style-name="First_20_paragraph">Select CLKM frequency</text:p>
      <text:p text:style-name="Preformatted_20_Text"><text:s text:c="4"/>'1': 1.0 MHz</text:p>
      <text:p text:style-name="Preformatted_20_Text"><text:s text:c="4"/>'0': 0.5 MHz</text:p>
      <text:p text:style-name="First_20_paragraph">● Fig...28 R67 (Write): Click Counter Value</text:p>
      <text:p text:style-name="Text_20_body">(bit 7 to bit 0) LD interval count data</text:p>
      <text:p text:style-name="Text_20_body">Determines the load value for the CLICK counter</text:p>
      <text:p text:style-name="Text_20_body">Immediate load request</text:p>
      <text:p text:style-name="Preformatted_20_Text"><text:s text:c="4"/>'1': Loads the data of the lower 7 bits into the CLICK counter</text:p>
      <text:p text:style-name="Preformatted_20_Text"><text:s text:c="4"/>'0': Normal operation</text:p>
      <text:p text:style-name="First_20_paragraph">● Fig...29 R74 (Read): Recording Counter Current Value</text:p>
      <text:p text:style-name="Text_20_body">(bit 7 to bit 0) current value</text:p>
      <text:p text:style-name="Text_20_body">Current count value of the recording counter</text:p>
      <text:p text:style-name="Horizontal_20_Line"/>
      <text:p text:style-name="First_20_paragraph">This should provide a clear understanding of the text on the image in English.</text:p>
      <text:p text:style-name="Horizontal_20_Line"/>
      <text:h text:style-name="Heading_20_2" text:outline-level="2"><text:bookmark-start text:name="outs-000110"/>outs-000110<text:bookmark-end text:name="outs-000110"/></text:h>
      <text:p text:style-name="Horizontal_20_Line"/>
      <text:p text:style-name="First_20_paragraph">■●□□...30 R75 (Write): Interpolator Control bit | 7 | 6 | 5 | 4 | 3 | 2 | 1 | bit 0 |</text:p>
      <text:p text:style-name="Preformatted_20_Text"><text:s text:c="8"/>ADD <text:s text:c="5"/>CLR <text:s text:c="4"/>interpolation rate</text:p>
      <text:p text:style-name="Preformatted_20_Text"><text:s text:c="14"/></text:p>
      <text:p text:style-name="Preformatted_20_Text"><text:s text:c="14"/>Setting the interpolation rate of the MIDI clock interpolation generator</text:p>
      <text:p text:style-name="Preformatted_20_Text"><text:s text:c="14"/>('0000' is invalid)</text:p>
      <text:p text:style-name="Preformatted_20_Text"/>
      <text:p text:style-name="Preformatted_20_Text"><text:s text:c="14"/>Play-back Counter clear request</text:p>
      <text:p text:style-name="Preformatted_20_Text"><text:s text:c="14"/>'1': Sets the playback counter value to 0</text:p>
      <text:p text:style-name="Preformatted_20_Text"><text:s text:c="14"/>'0': Normal operation</text:p>
      <text:p text:style-name="Preformatted_20_Text"/>
      <text:p text:style-name="Preformatted_20_Text"><text:s text:c="14"/>Play-back Counter addition request</text:p>
      <text:p text:style-name="Preformatted_20_Text"><text:s text:c="14"/>'1': The 15-bit data set in R76 and R77 is added to the playback counter</text:p>
      <text:p text:style-name="Preformatted_20_Text"><text:s text:c="14"/>'0': Normal operation</text:p>
      <text:p text:style-name="First_20_paragraph">■●□□...31 R76 (Write): Play-back Counter value(L) bit | 7 | 6 | 5 | 4 | 3 | 2 | 1 | bit 0 | lower 8 bit data to add Play-back counter 15-bit data lower 8 bits to be added</text:p>
      <text:p text:style-name="Text_20_body">■●□□...32 R77 (Write): Play-back Counter value(H) bit | 7 | 6 | 5 | 4 | 3 | 2 | 1 | bit 0 | higher 7 bit data to add Play-back Counter 15-bit data upper 7 bits to be added</text:p>
      <text:p text:style-name="Text_20_body">■●□□...33 R84 (Write): General Timer value(L) bit | 7 | 6 | 5 | 4 | 3 | 2 | 1 | bit 0 | lower 8 bit data Lower 8 bits of general timer load value</text:p>
      <text:p text:style-name="Horizontal_20_Line"/>
      <text:p text:style-name="Horizontal_20_Line"/>
      <text:h text:style-name="Heading_20_2" text:outline-level="2"><text:bookmark-start text:name="outs-000111"/>outs-000111<text:bookmark-end text:name="outs-000111"/></text:h>
      <text:p text:style-name="First_20_paragraph">Of course, here is the translated text from Japanese to English:</text:p>
      <text:p text:style-name="Horizontal_20_Line"/>
      <text:p text:style-name="First_20_paragraph"><text:span text:style-name="Strong_20_Emphasis">Top Section:</text:span></text:p>
      <text:list text:style-name="List_20_1">
        <text:list-item>
          <text:p text:style-name="List_20_Bullet_20_Tight">General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general timer</text:p>
      <text:p text:style-name="Preformatted_20_Text"><text:s text:c="2"/>- '0': Normal operation</text:p>
      <text:p text:style-name="First_20_paragraph"><text:span text:style-name="Strong_20_Emphasis">Middle Section:</text:span></text:p>
      <text:list text:style-name="List_20_1">
        <text:list-item>
          <text:p text:style-name="List_20_Bullet_20_Tight">MIDI-clock Timer value(L)</text:p>
        </text:list-item>
        <text:list-item>
          <text:p text:style-name="List_20_Bullet_20_Tight">Figure: bit 7, bit 6, bit 5, bit 4, bit 3, bit 2, bit 1, bit 0</text:p>
        </text:list-item>
        <text:list-item>
          <text:p text:style-name="List_20_Bullet_20_Tight">Lower 8 bit data</text:p>
        </text:list-item>
      </text:list>
      <text:p text:style-name="First_20_paragraph"><text:span text:style-name="Strong_20_Emphasis">Bottom Section:</text:span></text:p>
      <text:list text:style-name="List_20_1">
        <text:list-item>
          <text:p text:style-name="List_20_Bullet_20_Tight">MIDI-clock Timer value(H)</text:p>
        </text:list-item>
        <text:list-item>
          <text:p text:style-name="List_20_Bullet_20_Tight">Figure: bit 7, bit 6, bit 5, bit 4, bit 3, bit 2, bit 1, bit 0</text:p>
        </text:list-item>
        <text:list-item>
          <text:p text:style-name="List_20_Bullet_20_Tight">Higher 6 bit data</text:p>
        </text:list-item>
        <text:list-item>
          <text:p text:style-name="List_20_Bullet_20_Tight">Immediate load request:</text:p>
        </text:list-item>
      </text:list>
      <text:p text:style-name="Preformatted_20_Text"><text:s text:c="2"/>- '1': Load preset value to timer</text:p>
      <text:p text:style-name="Preformatted_20_Text"><text:s text:c="2"/>- '0': Normal operation</text:p>
      <text:p text:style-name="Horizontal_20_Line"/>
      <text:p text:style-name="Horizontal_20_Line"/>
      <text:h text:style-name="Heading_20_2" text:outline-level="2"><text:bookmark-start text:name="outs-000112"/>outs-000112<text:bookmark-end text:name="outs-000112"/></text:h>
      <text:list text:style-name="List_20_1">
        <text:list-item>
          <text:p text:style-name="List_20_Bullet_20_Tight">Diagram 37 R94 (Write): External I/O direction</text:p>
        </text:list-item>
      </text:list>
      <text:p text:style-name="Preformatted_20_Text"><text:s text:c="2"/>bit 7 6 5 4 3 2 1 bit 0</text:p>
      <text:p text:style-name="Preformatted_20_Text"><text:s text:c="2"/>Direction of each I/O port</text:p>
      <text:p text:style-name="Preformatted_20_Text"><text:s text:c="2"/></text:p>
      <text:p text:style-name="Preformatted_20_Text"><text:s text:c="2"/>Determining whether to use each of the 8 I/O pins of YM3802 as output or input</text:p>
      <text:p text:style-name="Preformatted_20_Text"><text:s text:c="2"/>'1': output</text:p>
      <text:p text:style-name="Preformatted_20_Text"><text:s text:c="2"/>'0': input</text:p>
      <text:list text:style-name="List_20_1">
        <text:list-item>
          <text:p text:style-name="List_20_Bullet_20_Tight">Diagram 38 R95 (Write): External I/O output data</text:p>
        </text:list-item>
      </text:list>
      <text:p text:style-name="Preformatted_20_Text"><text:s text:c="2"/>bit 7 6 5 4 3 2 1 bit 0</text:p>
      <text:p text:style-name="Preformatted_20_Text"><text:s text:c="2"/>Output request of each I/O port</text:p>
      <text:p text:style-name="Preformatted_20_Text"><text:s text:c="2"/></text:p>
      <text:p text:style-name="Preformatted_20_Text"><text:s text:c="2"/>Setting the state of the outputs of the 8 I/O pins of YM3802 which are set to output</text:p>
      <text:p text:style-name="Preformatted_20_Text"><text:s text:c="2"/>'1': 'H' level</text:p>
      <text:p text:style-name="Preformatted_20_Text"><text:s text:c="2"/>'0': 'L' level</text:p>
      <text:list text:style-name="List_20_1">
        <text:list-item>
          <text:p text:style-name="List_20_Bullet_20_Tight">Diagram 39 R96 (Write): External I/O input data</text:p>
        </text:list-item>
      </text:list>
      <text:p text:style-name="Preformatted_20_Text"><text:s text:c="2"/>bit 7 6 5 4 3 2 1 bit 0</text:p>
      <text:p text:style-name="Preformatted_20_Text"><text:s text:c="2"/>Pin level of each I/O port</text:p>
      <text:p text:style-name="Preformatted_20_Text"><text:s text:c="2"/></text:p>
      <text:p text:style-name="Preformatted_20_Text"><text:s text:c="2"/>Reading the states of the inputs of the 8 I/O pins of YM3802 which are set to input</text:p>
      <text:p text:style-name="Preformatted_20_Text"><text:s text:c="2"/>'1': 'H' level</text:p>
      <text:p text:style-name="Preformatted_20_Text"><text:s text:c="2"/>'0': 'L' level</text:p>
      <text:list text:style-name="List_20_1">
        <text:list-item>
          <text:p text:style-name="List_20_Bullet_20_Tight">6 Connector Sign Arrangement The signal arrangement of each connector of CZ-6BM1 is as shown in diagram 40.</text:p>
        </text:list-item>
      </text:list>
      <text:p text:style-name="Horizontal_20_Line"/>
      <text:h text:style-name="Heading_20_2" text:outline-level="2"><text:bookmark-start text:name="outs-000113"/>outs-000113<text:bookmark-end text:name="outs-000113"/></text:h>
      <text:p text:style-name="Horizontal_20_Line"/>
      <text:p text:style-name="First_20_paragraph">● Figure 40 MIDI Board Connector Signal Arrangement</text:p>
      <text:p text:style-name="Text_20_body">■ MIDI OUT, MIDI THRU</text:p>
      <text:p text:style-name="Text_20_body">--- (diagram) ---</text:p>
      <text:p text:style-name="Text_20_body">No. | Signal Name | Remarks<text:line-break/>1 | N.C. |<text:line-break/>2 | GND |<text:line-break/>3 | N.C. |<text:line-break/>4 | MIDI Signal + | OUT<text:line-break/>5 | MIDI Signal - | IN</text:p>
      <text:p text:style-name="Text_20_body">■ MIDI IN</text:p>
      <text:p text:style-name="Text_20_body">--- (diagram) ---</text:p>
      <text:p text:style-name="Text_20_body">No. | Signal Name | Remarks<text:line-break/>1 | N.C. |<text:line-break/>2 | GND |<text:line-break/>3 | N.C. |<text:line-break/>4 | MIDI Signal + | IN<text:line-break/>5 | MIDI Signal - | OUT</text:p>
      <text:p text:style-name="Text_20_body">■ TAPE SYNC OUT</text:p>
      <text:p text:style-name="Text_20_body">--- (diagram) ---</text:p>
      <text:p text:style-name="Text_20_body">No. | Signal Name | Remarks<text:line-break/>1 | TAPE SYNC OUT | OUT<text:line-break/>2 | GND |</text:p>
      <text:p text:style-name="Text_20_body">■ TAPE SYNC IN</text:p>
      <text:p text:style-name="Text_20_body">--- (diagram) ---</text:p>
      <text:p text:style-name="Text_20_body">No. | Signal Name | Remarks<text:line-break/>1 | TAPE SYNC IN | IN<text:line-break/>2 | GND |</text:p>
      <text:p text:style-name="Horizontal_20_Line"/>
      <text:p text:style-name="First_20_paragraph">(Page number at the bottom: 109)</text:p>
      <text:p text:style-name="Horizontal_20_Line"/>
      <text:h text:style-name="Heading_20_2" text:outline-level="2"><text:bookmark-start text:name="outs-000114"/>outs-000114<text:bookmark-end text:name="outs-000114"/></text:h>
      <text:p text:style-name="First_20_paragraph">7 Circuit Diagram</text:p>
      <text:p text:style-name="Text_20_body">The circuit diagram of CZ-6BM1 is shown in Figure 41.</text:p>
      <text:p text:style-name="Text_20_body">● Figure ...... 41 Circuit Diagram of CZ-6M1 (See Reference Appendix)</text:p>
      <text:p text:style-name="Horizontal_20_Line"/>
      <text:h text:style-name="Heading_20_2" text:outline-level="2"><text:bookmark-start text:name="outs-000115"/>outs-000115<text:bookmark-end text:name="outs-000115"/></text:h>
      <text:p text:style-name="First_20_paragraph"><text:span text:style-name="Strong_20_Emphasis">Parallel Board (CZ-6BN1)</text:span></text:p>
      <text:p text:style-name="Text_20_body">The parallel board is designed primarily for connection with image scanners and is an interface board capable of high-speed data input and output of large volumes of data. It can also be expected to be used for various purposes, such as connecting with X68000.</text:p>
      <text:p text:style-name="Text_20_body">The parallel board is a board that can connect with Sharp's color image scanner (CZ-8NS1) or Japan Radio Co.'s image scanner (PC-IN 500 series) to perform high-speed data transfer. It can also be used as a digital output board for non-image scanner connections.</text:p>
      <text:p text:style-name="Text_20_body"><text:span text:style-name="Strong_20_Emphasis">1 Specifications</text:span></text:p>
      <text:p text:style-name="Quotations">Main LSI Parallel I/O IC µPD 8255 A Input/output buffer IC SN 74 LS 244</text:p>
      <text:p text:style-name="First_20_paragraph"><text:span text:style-name="Strong_20_Emphasis">Parallel Interface</text:span></text:p>
      <text:p text:style-name="Quotations">Data input/output lines 8 bits each</text:p>
      <text:p text:style-name="Quotations">Handshake lines 2 bits each</text:p>
      <text:p text:style-name="Quotations">Others (status, etc.) 4 bits</text:p>
      <text:p text:style-name="Quotations">I/O connector 37-pin D-SUB connector</text:p>
      <text:p text:style-name="Horizontal_20_Line"/>
      <text:h text:style-name="Heading_20_2" text:outline-level="2"><text:bookmark-start text:name="outs-000116"/>outs-000116<text:bookmark-end text:name="outs-000116"/></text:h>
      <text:p text:style-name="First_20_paragraph"><text:span text:style-name="Strong_20_Emphasis">Power supply</text:span> Power supply voltage: +5V Power consumption: approximately 370 mA Operating temperature range: 10–35°C Port address: <draw:frame draw:style-name="fr1" text:anchor-type="as-char"><draw:object xlink:href="Formula-54/" xlink:type="simple" xlink:show="embed" xlink:actuate="onLoad"/></draw:frame>EAFB0F/<draw:frame draw:style-name="fr1" text:anchor-type="as-char"><draw:object xlink:href="Formula-56/" xlink:type="simple" xlink:show="embed" xlink:actuate="onLoad"/></draw:frame>EAFB1F (Select with jumper switch) Interrupt: Level 2/Level 4 (Select with jumper switch)</text:p>
      <text:p text:style-name="Text_20_body"><text:span text:style-name="Strong_20_Emphasis">2. Circuit Overview</text:span></text:p>
      <text:p text:style-name="Text_20_body">The block diagram for the CZ-6BN1 is shown in Figure 1. The IC used for parallel I/O output is the µPD8255, which is also used in the joystick and quick interface of the X68000. It is connected to a 37-pin D-SUB connector via a buffer IC (74 LS 244). This interface conforms to the parallel interface specifications of the image scanner. When connected to an image scanner through an RS-232C interface, it enables high-speed data transfer.</text:p>
      <text:p text:style-name="Text_20_body">The 8255 has several operating modes. When connected to an image scanner, set the 8255 to operate in group A or group B mode for input, and group B mode for output. In this mode, the 8255 uses I/O pins 3C, 6, and 7 for control signals in group control, or for input and output.</text:p>
      <text:p text:style-name="Text_20_body">The remaining pins 0, 1, 2, as well as PC 4, 5 are used for input or output programming. For the CZ-6BN1, these pins are for the control bus. The terminal connected to the image scanner is used for status signals from the scanner or reset output signals from the scanner's bus controller.</text:p>
      <text:p text:style-name="Text_20_body">Of these pins, the input pins from the 8255's PC2 are connected to the interrupt pin. When connected to a scanner, a status signal (IBF) of the scanner is issued to indicate that the data sent from the X68000 to the scanner has been received, enabling interrupt processing for the X68000.</text:p>
      <text:p text:style-name="Horizontal_20_Line"/>
      <text:h text:style-name="Heading_20_2" text:outline-level="2"><text:bookmark-start text:name="outs-000117"/>outs-000117<text:bookmark-end text:name="outs-000117"/></text:h>
      <text:p text:style-name="First_20_paragraph">Parallel Board</text:p>
      <text:p text:style-name="Text_20_body">● Fig. 1 CZ-6BN1 Block Diagram</text:p>
      <text:p text:style-name="Text_20_body">8255 PPI CN1</text:p>
      <text:p text:style-name="Text_20_body">JP1 Address Decoder → A0, A1</text:p>
      <text:p text:style-name="Text_20_body">Expansion Slot</text:p>
      <text:p text:style-name="Text_20_body">Bus Controller → RD, WR, CS, RESET Bus Buffer → D0 - D7 Interrupt Controller JP2</text:p>
      <text:p text:style-name="Text_20_body">PB → Buffer PA → Buffer PC0 PC1 PC2 PC3 → Buffer PC4 PC5 PC6 PC7</text:p>
      <text:p text:style-name="Text_20_body">37-Pin External Connector</text:p>
      <text:p text:style-name="Text_20_body">● 3 Main Component Layout</text:p>
      <text:p text:style-name="Text_20_body">The component layout of the CZ-6BN1 is shown in Fig. 2.</text:p>
      <text:p text:style-name="Text_20_body">113</text:p>
      <text:p text:style-name="Horizontal_20_Line"/>
      <text:h text:style-name="Heading_20_2" text:outline-level="2"><text:bookmark-start text:name="outs-000118"/>outs-000118<text:bookmark-end text:name="outs-000118"/></text:h>
      <text:p text:style-name="Horizontal_20_Line"/>
      <text:p text:style-name="First_20_paragraph">● Figure -2 Components of CZ-6BN1</text:p>
      <text:p text:style-name="Text_20_body">● 4 Setting</text:p>
      <text:p text:style-name="Text_20_body">1 Setting the Port Address</text:p>
      <text:p text:style-name="Text_20_body">The port address of CZ-6BN1 can be switched with jumper switch (JP1). When JP1 is on side 1, the area from $EAFB00 to $EAFB0F is used, and when it is on side 2, the area from $EAFB10 to $EAFB1F is used.</text:p>
      <text:p text:style-name="Text_20_body">114</text:p>
      <text:p text:style-name="Horizontal_20_Line"/>
      <text:h text:style-name="Heading_20_2" text:outline-level="2"><text:bookmark-start text:name="outs-000119"/>outs-000119<text:bookmark-end text:name="outs-000119"/></text:h>
      <text:p text:style-name="Horizontal_20_Line"/>
      <text:p text:style-name="First_20_paragraph">4.2 Setting the Interrupt Level</text:p>
      <text:p text:style-name="Text_20_body">You can choose to use either level 2 or level 4 as the interrupt level using the jumper switch (JP2). When set to 2, it will be level 2, and when set to 4, it will be recognized as level 4. Additionally, the interrupt mask register (<draw:frame draw:style-name="fr1" text:anchor-type="as-char"><draw:object xlink:href="Formula-58/" xlink:type="simple" xlink:show="embed" xlink:actuate="onLoad"/></draw:frame>EAFB19) can prevent the occurrence of interrupts. In this case, it is independent of the JP2 selection, and interrupt signals may be used by other boards.</text:p>
      <text:p text:style-name="Text_20_body">5 I/O Map</text:p>
      <text:p text:style-name="Text_20_body">CZ-6BN1 I/O map is shown here: <draw:frame draw:style-name="fr1" text:anchor-type="as-char"><draw:object xlink:href="Formula-60/" xlink:type="simple" xlink:show="embed" xlink:actuate="onLoad"/></draw:frame>EAFB11 to <draw:frame draw:style-name="fr1" text:anchor-type="as-char"><draw:object xlink:href="Formula-62/" xlink:type="simple" xlink:show="embed" xlink:actuate="onLoad"/></draw:frame>EAFB17 to 8255 AP Ports and Control Word Registers, <draw:frame draw:style-name="fr1" text:anchor-type="as-char"><draw:object xlink:href="Formula-64/" xlink:type="simple" xlink:show="embed" xlink:actuate="onLoad"/></draw:frame>EAFB19 is interrupt mask register. <draw:frame draw:style-name="fr1" text:anchor-type="as-char"><draw:object xlink:href="Formula-66/" xlink:type="simple" xlink:show="embed" xlink:actuate="onLoad"/></draw:frame>EAFB18 becomes interrupt vector registers.</text:p>
      <text:p text:style-name="Text_20_body">(●▢):3 Parallel Board I/O Address Map</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Base Address + S01</text:p>
          </table:table-cell>
          <table:table-cell table:style-name="TableRowCell" office:value-type="string">
            <text:p text:style-name="Table_20_Contents">Port 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END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3</text:p>
          </table:table-cell>
          <table:table-cell table:style-name="TableRowCell" office:value-type="string">
            <text:p text:style-name="Table_20_Contents">Port B</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ECEIVE 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5</text:p>
          </table:table-cell>
          <table:table-cell table:style-name="TableRowCell" office:value-type="string">
            <text:p text:style-name="Table_20_Contents">Port C</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OBF ACK CACK RESET INTR IBF READY DC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7</text:p>
          </table:table-cell>
          <table:table-cell table:style-name="TableRowCell" office:value-type="string">
            <text:p text:style-name="Table_20_Contents">Control Word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9</text:p>
          </table:table-cell>
          <table:table-cell table:style-name="TableRowCell" office:value-type="string">
            <text:p text:style-name="Table_20_Contents">Interrupt Mask Register</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IN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ase Address + S0B</text:p>
          </table:table-cell>
          <table:table-cell table:style-name="TableRowCell" office:value-type="string">
            <text:p text:style-name="Table_20_Contents">Interrupt Vector Address Registe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VEC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base-address-eafb00-1st-page--eafb10-2nd-page"/>Base Address: $EAFB00 (1st page) / $EAFB10 (2nd page)<text:bookmark-end text:name="base-address-eafb00-1st-page--eafb10-2nd-page"/></text:h>
      <text:p text:style-name="First_20_paragraph">Note: The text layout has been represented as closely as possible to the original format.</text:p>
      <text:p text:style-name="Horizontal_20_Line"/>
      <text:h text:style-name="Heading_20_2" text:outline-level="2"><text:bookmark-start text:name="outs-000120"/>outs-000120<text:bookmark-end text:name="outs-000120"/></text:h>
      <text:h text:style-name="Heading_20_3" text:outline-level="3"><text:bookmark-start text:name="id_51-8255-register"/>5.1 8255 Register<text:bookmark-end text:name="id_51-8255-register"/></text:h>
      <text:p text:style-name="First_20_paragraph">The bit arrangement of the 8255 register is shown in Figure 4-7. When connecting to a scanner, group A should be programmed as mode 1, group B as mode 0, and port C's lower bits as input.</text:p>
      <text:p text:style-name="Text_20_body">In the parallel board, since port C's bits are mixed between input and output, ensure group A is programmed to mode 1 output. To avoid conflicts, you may program port C's upper bits as mode 0 input, or buffer the output of port C with an output buffer (LS 244) to avoid data collision.</text:p>
      <text:p text:style-name="Text_20_body">For details on the operation and programming methods of each mode in the 8255, these are also touched upon in the joystick interface chapter of my book "Inside X68000," so please refer to it.</text:p>
      <text:h text:style-name="Heading_20_4" text:outline-level="4"><text:bookmark-start text:name="figure-4-8255-port-a"/>Figure 4 8255 Port A<text:bookmark-end text:name="figure-4-8255-port-a"/></text:h>
      <text:p text:style-name="First_20_paragraph">|---------------------------------------------------| | bit 7 6 5 4 3 2 1 0 | | SEND DATA | |---------------------------------------------------|</text:p>
      <text:list text:style-name="List_20_1">
        <text:list-item>
          <text:p text:style-name="List_20_Bullet_20_Tight">Data output to the scanner</text:p>
        </text:list-item>
      </text:list>
      <text:h text:style-name="Heading_20_4" text:outline-level="4"><text:bookmark-start text:name="figure-5-8255-port-b"/>Figure 5 8255 Port B<text:bookmark-end text:name="figure-5-8255-port-b"/></text:h>
      <text:p text:style-name="First_20_paragraph">|---------------------------------------------------| | bit 7 6 5 4 3 2 1 0 | | RECEIVE DATA | |---------------------------------------------------|</text:p>
      <text:list text:style-name="List_20_1">
        <text:list-item>
          <text:p text:style-name="List_20_Bullet_20_Tight">Data input from the scanner</text:p>
        </text:list-item>
      </text:list>
      <text:p text:style-name="First_20_paragraph">Page 116</text:p>
      <text:p text:style-name="Horizontal_20_Line"/>
      <text:h text:style-name="Heading_20_2" text:outline-level="2"><text:bookmark-start text:name="outs-000121"/>outs-000121<text:bookmark-end text:name="outs-000121"/></text:h>
      <text:p text:style-name="Horizontal_20_Line"/>
      <text:p text:style-name="First_20_paragraph">Figure - 6 8255 Port C</text:p>
      <text:p text:style-name="Text_20_body">bit 7 | 6 | 5 | 4 | 3 | 2 | 1 | 0</text:p>
      <text:p text:style-name="Text_20_body">OBF | ACK | CACK | RESET | INTR | IBF | READY | DCN</text:p>
      <text:p text:style-name="Text_20_body">Shows whether the scanner is connected or not</text:p>
      <text:list text:style-name="List_20_1">
        <text:list-item>
          <text:p text:style-name="List_20_Bullet_20_Tight">'1': Not connected</text:p>
        </text:list-item>
        <text:list-item>
          <text:p text:style-name="List_20_Bullet_20_Tight">'0': Connected</text:p>
        </text:list-item>
      </text:list>
      <text:p text:style-name="First_20_paragraph">Indicates the state of the scanner's Ready signal</text:p>
      <text:list text:style-name="List_20_1">
        <text:list-item>
          <text:p text:style-name="List_20_Bullet_20_Tight">'1': Busy</text:p>
        </text:list-item>
        <text:list-item>
          <text:p text:style-name="List_20_Bullet_20_Tight">'0': Ready</text:p>
        </text:list-item>
      </text:list>
      <text:p text:style-name="First_20_paragraph">Scanner IBF (Input Buffer Full) signal status</text:p>
      <text:list text:style-name="List_20_1">
        <text:list-item>
          <text:p text:style-name="List_20_Bullet_20_Tight">'1': Buffer is free</text:p>
        </text:list-item>
        <text:list-item>
          <text:p text:style-name="List_20_Bullet_20_Tight">'0': Data is in the buffer</text:p>
        </text:list-item>
      </text:list>
      <text:p text:style-name="First_20_paragraph">Indicates the receipt and completion of data using the port</text:p>
      <text:list text:style-name="List_20_1">
        <text:list-item>
          <text:p text:style-name="List_20_Bullet_20_Tight">'1': X68000 has start assembling data from port A</text:p>
        </text:list-item>
        <text:list-item>
          <text:p text:style-name="List_20_Bullet_20_Tight">'0': Scanner retrieved data successfully This signal is not used by the scanner</text:p>
        </text:list-item>
      </text:list>
      <text:p text:style-name="First_20_paragraph">Scanner reset</text:p>
      <text:list text:style-name="List_20_1">
        <text:list-item>
          <text:p text:style-name="List_20_Bullet_20_Tight">'1': Normal operation</text:p>
        </text:list-item>
        <text:list-item>
          <text:p text:style-name="List_20_Bullet_20_Tight">'0': Resets the scanner</text:p>
        </text:list-item>
      </text:list>
      <text:p text:style-name="First_20_paragraph">Response output to data transmission from the scanner to X68000</text:p>
      <text:list text:style-name="List_20_1">
        <text:list-item>
          <text:p text:style-name="List_20_Bullet_20_Tight">'1': Normal</text:p>
        </text:list-item>
        <text:list-item>
          <text:p text:style-name="List_20_Bullet_20_Tight">'0': Data received from the scanner</text:p>
        </text:list-item>
      </text:list>
      <text:p text:style-name="First_20_paragraph">Response input to data sent from scanner</text:p>
      <text:list text:style-name="List_20_1">
        <text:list-item>
          <text:p text:style-name="List_20_Bullet_20_Tight">'1': Normal</text:p>
        </text:list-item>
        <text:list-item>
          <text:p text:style-name="List_20_Bullet_20_Tight">'0': X68000 received data sent by scanner</text:p>
        </text:list-item>
      </text:list>
      <text:p text:style-name="First_20_paragraph">Status of Port A (output buffer)</text:p>
      <text:list text:style-name="List_20_1">
        <text:list-item>
          <text:p text:style-name="List_20_Bullet_20_Tight">'1': Output buffer is free</text:p>
        </text:list-item>
        <text:list-item>
          <text:p text:style-name="List_20_Bullet_20_Tight">'0': Data is in output buffer</text:p>
        </text:list-item>
      </text:list>
      <text:p text:style-name="Horizontal_20_Line"/>
      <text:p text:style-name="Horizontal_20_Line"/>
      <text:h text:style-name="Heading_20_2" text:outline-level="2"><text:bookmark-start text:name="outs-000122"/>outs-000122<text:bookmark-end text:name="outs-000122"/></text:h>
      <text:p text:style-name="Horizontal_20_Line"/>
      <text:p text:style-name="First_20_paragraph">● Fig. 7 8255 Control Word Register</text:p>
      <text:p text:style-name="Text_20_body">(1) Bit Set / Reset bit 7 6 5 4 3 2 1 bit 0 '0' BITSEL DATA</text:p>
      <text:p text:style-name="Text_20_body">BITSEL: The data in the selected Port C bit Bit to be set or reset data '1': Set the corresponding bit to High level '0': Set the corresponding bit to Low level</text:p>
      <text:p text:style-name="Text_20_body">Position of the bit in Port C to set data: 000: bit 0 001: bit 1 010: bit 2 011: bit 3 100: bit 4 101: bit 5 110: bit 6 111: bit 7</text:p>
      <text:p text:style-name="Text_20_body">(2) Operation Mode Selection bit 7 6 5 4 3 2 1 bit 0 '1' GROUP A MODE PORT A IN/OUT PORT C (HIGH) IN/OUT Group B MODE PORT B IN/OUT PORT C (LOW) IN/OUT</text:p>
      <text:p text:style-name="Text_20_body">Group B (Port B and lower bits of Port C) Operation Mode Selection:</text:p>
      <text:p text:style-name="Preformatted_20_Text"><text:s text:c="1"/>'1': Mode 1</text:p>
      <text:p text:style-name="Preformatted_20_Text"><text:s text:c="1"/>'0': Mode 0</text:p>
      <text:p text:style-name="Preformatted_20_Text"><text:s text:c="1"/>'1': Lower bits of Port C are input </text:p>
      <text:p text:style-name="Preformatted_20_Text"><text:s text:c="6"/>// Output</text:p>
      <text:p text:style-name="First_20_paragraph">Group A (Port A and upper bits of Port C) Operation Mode Selection:</text:p>
      <text:p text:style-name="Preformatted_20_Text"><text:s text:c="1"/>'11': Mode 2</text:p>
      <text:p text:style-name="Preformatted_20_Text"><text:s text:c="1"/>'10': Mode 1</text:p>
      <text:p text:style-name="Preformatted_20_Text"><text:s text:c="1"/>'01': Mode 1</text:p>
      <text:p text:style-name="Preformatted_20_Text"><text:s text:c="1"/>'00': Mode 0</text:p>
      <text:p text:style-name="First_20_paragraph">'1': Port A is input // Output</text:p>
      <text:p text:style-name="Text_20_body">5.2 Interrupt Mask Register</text:p>
      <text:p text:style-name="Text_20_body">The bit assignment of the interrupt mask register is shown in Fig. 8. Only the least significant bit of this register is valid, and setting this bit to '1' permits the interrupt request to occur. Setting it to '0' prohibits it. The reset ...</text:p>
      <text:p text:style-name="Horizontal_20_Line"/>
      <text:h text:style-name="Heading_20_2" text:outline-level="2"><text:bookmark-start text:name="outs-000123"/>outs-000123<text:bookmark-end text:name="outs-000123"/></text:h>
      <text:p text:style-name="First_20_paragraph">Parallel Board</text:p>
      <text:p text:style-name="Text_20_body">...this bit is set to '0'.</text:p>
      <text:p text:style-name="Text_20_body">● Fig. 8 Interrupt Mask Register</text:p>
      <text:p text:style-name="Text_20_body">bit 7 6 5 4 3 2 1 bit 0 INT</text:p>
      <text:p text:style-name="Text_20_body">Interrupt generation control from the parallel board</text:p>
      <text:p text:style-name="Preformatted_20_Text"><text:s text:c="3"/>'1': Interrupt generation enabled</text:p>
      <text:p text:style-name="Preformatted_20_Text"><text:s text:c="3"/>'0': Interrupt generation disabled</text:p>
      <text:p text:style-name="First_20_paragraph">● 3 Interrupt Vector Number Register</text:p>
      <text:p text:style-name="Text_20_body">Sets the vector number generated in the interrupt acknowledge cycle (Fig. 9). The vector number is fixed in hardware, so any value would do, but since on the X68000 the vectors <draw:frame draw:style-name="fr1" text:anchor-type="as-char"><draw:object xlink:href="Formula-68/" xlink:type="simple" xlink:show="embed" xlink:actuate="onLoad"/></draw:frame>FF are unused vectors that are not used by TRAP instructions in the device or software inside the X68000, the CZ-6BN1 support software uses $F9 (1st board) and $FA (2nd board) as vector numbers. Be sure to set the vector number before enabling the interrupt in the interrupt mask register.</text:p>
      <text:p text:style-name="Text_20_body">● Fig. 9 Interrupt Vector Register</text:p>
      <text:p text:style-name="Text_20_body">bit 7 6 5 4 3 2 1 bit 0 VECT</text:p>
      <text:p text:style-name="Text_20_body">Sets the vector number to be output in the interrupt acknowledge cycle Recommended value: $F9 (1st board), $FA (2nd board)</text:p>
      <text:p text:style-name="Text_20_body">● 6 Connector Signal Layout</text:p>
      <text:p text:style-name="Text_20_body">The pin layout of the 37-pin D-SUB connector on the CZ-6BN1 is shown in Fig. 10.</text:p>
      <text:p text:style-name="Text_20_body">119</text:p>
      <text:p text:style-name="Horizontal_20_Line"/>
      <text:h text:style-name="Heading_20_2" text:outline-level="2"><text:bookmark-start text:name="outs-000124"/>outs-000124<text:bookmark-end text:name="outs-000124"/></text:h>
      <text:p text:style-name="First_20_paragraph">Figure ⨀……10 Parallel Board Connector Signal Arrangement</text:p>
      <text:h text:style-name="Heading_20_2" text:outline-level="2"><text:bookmark-start text:name="terminal-number--port-number--signal-name--inputoutput--function"/>Terminal Number | Port Number | Signal Name | Input/Output | Function<text:bookmark-end text:name="terminal-number--port-number--signal-name--inputoutput--function"/></text:h>
      <text:p text:style-name="First_20_paragraph">1 | PB0 | SEND DATA 0 | Input | Parallel Data Input 2 | PB1 | SEND DATA 1 | Input | Parallel Data Input 3 | PB2 | SEND DATA 2 | Input | Parallel Data Input 4 | PB3 | SEND DATA 3 | Input | Parallel Data Input 5 | PB4 | SEND DATA 4 | Input | Parallel Data Input 6 | PB5 | SEND DATA 5 | Input | Parallel Data Input 7 | PB6 | SEND DATA 6 | Input | Parallel Data Input 8 | PB7 | SEND DATA 7 | Input | Parallel Data Input 9 | NC | | | Unused 10 | GND | GND | | Signal Ground 11 | GND | GND | | Signal Ground 12 | GND | GND | | Signal Ground 13 | GND | GND | | Signal Ground 14 | GND | GND | | Signal Ground 15 | GND | GND | | Signal Ground 16 | GND | GND | | Signal Ground 17 | GND | GND | | Signal Ground 18 | GND | GND | | Signal Ground 19 | PA0 | RECEIVE DATA 0 | Output | Parallel Data Output 20 | PA1 | RECEIVE DATA 1 | Output | Parallel Data Output 21 | PA2 | RECEIVE DATA 2 | Output | Parallel Data Output 22 | PA3 | RECEIVE DATA 3 | Output | Parallel Data Output 23 | PA4 | RECEIVE DATA 4 | Output | Parallel Data Output 24 | PA5 | RECEIVE DATA 5 | Output | Parallel Data Output 25 | PA6 | RECEIVE DATA 6 | Output | Parallel Data Output 26 | PA7 | RECEIVE DATA 7 | Output | Parallel Data Output 27 | PC4 | RESET | Output | External Reset Output 28 | PC5 | CACK | Output | A Port Output Acknowledge 29 | PC6 | ACK | Input | B Port Input Acknowledge 30 | PC7 | OBF | Output | A Port Output Buffer Full 31 | PC0 | DCN | Input | External Device Connection Confirmation Input Signal 32 | PC1 | READY | Input | External Device Operation Ready Input Signal 33 | PC2 | IBF | Input | B Port Input Buffer Full 34 | PC3 | INTR | Output | A Port Output Buffer Full 35 | NC | | | Unused 36 | GND | GND | | Signal Ground 37 | NC | | | Unused</text:p>
      <text:p text:style-name="Text_20_body">Plug: DCLC-J37PAF-10L8 (Japanese Kludge Wire Code) Applicable Product</text:p>
      <text:p text:style-name="Horizontal_20_Line"/>
      <text:h text:style-name="Heading_20_2" text:outline-level="2"><text:bookmark-start text:name="outs-000125"/>outs-000125<text:bookmark-end text:name="outs-000125"/></text:h>
      <text:h text:style-name="Heading_20_2" text:outline-level="2"><text:bookmark-start text:name="id_7-parallel-cable-connection-diagram"/>7 Parallel Cable Connection Diagram<text:bookmark-end text:name="id_7-parallel-cable-connection-diagram"/></text:h>
      <text:p text:style-name="First_20_paragraph">The connection diagram for the parallel cable (connecting cable with the scanner), which is attached to the board, is shown in Figure 11.</text:p>
      <text:list text:style-name="List_20_1">
        <text:list-item>
          <text:p text:style-name="List_20_Bullet_20_Tight"><text:span text:style-name="Strong_20_Emphasis">Figure 11 Parallel Cable Connection (example of cable 1FV-SB-18P)</text:span></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HeaderRowCell" office:value-type="string">
              <text:p text:style-name="Table_20_Heading">57E - 30360</text:p>
            </table:table-cell>
            <table:table-cell table:style-name="TableHeaderRowCell" office:value-type="string">
              <text:p text:style-name="Table_20_Heading">Line Color</text:p>
            </table:table-cell>
            <table:table-cell table:style-name="TableHeaderRowCell" office:value-type="string">
              <text:p text:style-name="Table_20_Heading">Mark</text:p>
            </table:table-cell>
            <table:table-cell table:style-name="TableHeaderRowCell" office:value-type="string">
              <text:p text:style-name="Table_20_Heading">17UE - 23370-02</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ed A1</text:p>
          </table:table-cell>
          <table:table-cell table:style-name="TableRowCell" office:value-type="string">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Blue</text:p>
          </table:table-cell>
          <table:table-cell table:style-name="TableRowCell" office:value-type="string">
            <text:p text:style-name="Table_20_Contents">//</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Red</text:p>
          </table:table-cell>
          <table:table-cell table:style-name="TableRowCell" office:value-type="string">
            <text:p text:style-name="Table_20_Contents">//</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Gray</text:p>
          </table:table-cell>
          <table:table-cell table:style-name="TableRowCell" office:value-type="string">
            <text:p text:style-name="Table_20_Contents">Blue</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7</text:p>
          </table:table-cell>
        </table:table-row>
        <table:table-row>
          <table:table-cell table:style-name="TableRowCell" office:value-type="string">
            <text:p text:style-name="Table_20_Contents">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8</text:p>
          </table:table-cell>
        </table:table-row>
        <table:table-row>
          <table:table-cell table:style-name="TableRowCell" office:value-type="string">
            <text:p text:style-name="Table_20_Contents">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9</text:p>
          </table:table-cell>
        </table:table-row>
        <table:table-row>
          <table:table-cell table:style-name="TableRowCell" office:value-type="string">
            <text:p text:style-name="Table_20_Contents">10</text:p>
          </table:table-cell>
          <table:table-cell table:style-name="TableRowCell" office:value-type="string">
            <text:p text:style-name="Table_20_Contents">Peach</text:p>
          </table:table-cell>
          <table:table-cell table:style-name="TableRowCell" office:value-type="string">
            <text:p text:style-name="Table_20_Contents">//</text:p>
          </table:table-cell>
          <table:table-cell table:style-name="TableRowCell" office:value-type="string">
            <text:p text:style-name="Table_20_Contents">10</text:p>
          </table:table-cell>
        </table:table-row>
        <table:table-row>
          <table:table-cell table:style-name="TableRowCell" office:value-type="string">
            <text:p text:style-name="Table_20_Contents">11</text:p>
          </table:table-cell>
          <table:table-cell table:style-name="TableRowCell" office:value-type="string">
    </table:table-cell>
          <table:table-cell table:style-name="TableRowCell" office:value-type="string">
            <text:p text:style-name="Table_20_Contents">A2</text:p>
          </table:table-cell>
          <table:table-cell table:style-name="TableRowCell" office:value-type="string">
            <text:p text:style-name="Table_20_Contents">11</text:p>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2</text:p>
          </table:table-cell>
        </table:table-row>
        <table:table-row>
          <table:table-cell table:style-name="TableRowCell" office:value-type="string">
            <text:p text:style-name="Table_20_Contents">13</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13</text:p>
          </table:table-cell>
        </table:table-row>
        <table:table-row>
          <table:table-cell table:style-name="TableRowCell" office:value-type="string">
            <text:p text:style-name="Table_20_Contents">14</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4</text:p>
          </table:table-cell>
        </table:table-row>
        <table:table-row>
          <table:table-cell table:style-name="TableRowCell" office:value-type="string">
            <text:p text:style-name="Table_20_Contents">15</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15</text:p>
          </table:table-cell>
        </table:table-row>
        <table:table-row>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6</text:p>
          </table:table-cell>
        </table:table-row>
        <table:table-row>
          <table:table-cell table:style-name="TableRowCell" office:value-type="string">
            <text:p text:style-name="Table_20_Contents">17</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17</text:p>
          </table:table-cell>
        </table:table-row>
        <table:table-row>
          <table:table-cell table:style-name="TableRowCell" office:value-type="string">
            <text:p text:style-name="Table_20_Contents">18</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18</text:p>
          </table:table-cell>
        </table:table-row>
        <table:table-row>
          <table:table-cell table:style-name="TableRowCell" office:value-type="string">
            <text:p text:style-name="Table_20_Contents">19</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19</text:p>
          </table:table-cell>
        </table:table-row>
        <table:table-row>
          <table:table-cell table:style-name="TableRowCell" office:value-type="string">
            <text:p text:style-name="Table_20_Contents">20</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0</text:p>
          </table:table-cell>
        </table:table-row>
        <table:table-row>
          <table:table-cell table:style-name="TableRowCell" office:value-type="string">
            <text:p text:style-name="Table_20_Contents">21</text:p>
          </table:table-cell>
          <table:table-cell table:style-name="TableRowCell" office:value-type="string">
            <text:p text:style-name="Table_20_Contents">Red</text:p>
          </table:table-cell>
          <table:table-cell table:style-name="TableRowCell" office:value-type="string">
            <text:p text:style-name="Table_20_Contents">A3</text:p>
          </table:table-cell>
          <table:table-cell table:style-name="TableRowCell" office:value-type="string">
            <text:p text:style-name="Table_20_Contents">21</text:p>
          </table:table-cell>
        </table:table-row>
        <table:table-row>
          <table:table-cell table:style-name="TableRowCell" office:value-type="string">
            <text:p text:style-name="Table_20_Contents">2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2</text:p>
          </table:table-cell>
        </table:table-row>
        <table:table-row>
          <table:table-cell table:style-name="TableRowCell" office:value-type="string">
            <text:p text:style-name="Table_20_Contents">23</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3</text:p>
          </table:table-cell>
        </table:table-row>
        <table:table-row>
          <table:table-cell table:style-name="TableRowCell" office:value-type="string">
            <text:p text:style-name="Table_20_Contents">24</text:p>
          </table:table-cell>
          <table:table-cell table:style-name="TableRowCell" office:value-type="string">
            <text:p text:style-name="Table_20_Contents">Gray</text:p>
          </table:table-cell>
          <table:table-cell table:style-name="TableRowCell" office:value-type="string">
            <text:p text:style-name="Table_20_Contents">//</text:p>
          </table:table-cell>
          <table:table-cell table:style-name="TableRowCell" office:value-type="string">
            <text:p text:style-name="Table_20_Contents">24</text:p>
          </table:table-cell>
        </table:table-row>
        <table:table-row>
          <table:table-cell table:style-name="TableRowCell" office:value-type="string">
            <text:p text:style-name="Table_20_Contents">25</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5</text:p>
          </table:table-cell>
        </table:table-row>
        <table:table-row>
          <table:table-cell table:style-name="TableRowCell" office:value-type="string">
            <text:p text:style-name="Table_20_Contents">26</text:p>
          </table:table-cell>
          <table:table-cell table:style-name="TableRowCell" office:value-type="string">
            <text:p text:style-name="Table_20_Contents">White</text:p>
          </table:table-cell>
          <table:table-cell table:style-name="TableRowCell" office:value-type="string">
            <text:p text:style-name="Table_20_Contents">//</text:p>
          </table:table-cell>
          <table:table-cell table:style-name="TableRowCell" office:value-type="string">
            <text:p text:style-name="Table_20_Contents">26</text:p>
          </table:table-cell>
        </table:table-row>
        <table:table-row>
          <table:table-cell table:style-name="TableRowCell" office:value-type="string">
            <text:p text:style-name="Table_20_Contents">27</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7</text:p>
          </table:table-cell>
        </table:table-row>
        <table:table-row>
          <table:table-cell table:style-name="TableRowCell" office:value-type="string">
            <text:p text:style-name="Table_20_Contents">28</text:p>
          </table:table-cell>
          <table:table-cell table:style-name="TableRowCell" office:value-type="string">
            <text:p text:style-name="Table_20_Contents">Yellow</text:p>
          </table:table-cell>
          <table:table-cell table:style-name="TableRowCell" office:value-type="string">
            <text:p text:style-name="Table_20_Contents">//</text:p>
          </table:table-cell>
          <table:table-cell table:style-name="TableRowCell" office:value-type="string">
            <text:p text:style-name="Table_20_Contents">28</text:p>
          </table:table-cell>
        </table:table-row>
        <table:table-row>
          <table:table-cell table:style-name="TableRowCell" office:value-type="string">
            <text:p text:style-name="Table_20_Contents">29</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29</text:p>
          </table:table-cell>
        </table:table-row>
        <table:table-row>
          <table:table-cell table:style-name="TableRowCell" office:value-type="string">
            <text:p text:style-name="Table_20_Contents">30</text:p>
          </table:table-cell>
          <table:table-cell table:style-name="TableRowCell" office:value-type="string">
            <text:p text:style-name="Table_20_Contents">Peach</text:p>
          </table:table-cell>
          <table:table-cell table:style-name="TableRowCell" office:value-type="string">
    </table:table-cell>
          <table:table-cell table:style-name="TableRowCell" office:value-type="string">
            <text:p text:style-name="Table_20_Contents">30</text:p>
          </table:table-cell>
        </table:table-row>
        <table:table-row>
          <table:table-cell table:style-name="TableRowCell" office:value-type="string">
            <text:p text:style-name="Table_20_Contents">31</text:p>
          </table:table-cell>
          <table:table-cell table:style-name="TableRowCell" office:value-type="string">
    </table:table-cell>
          <table:table-cell table:style-name="TableRowCell" office:value-type="string">
            <text:p text:style-name="Table_20_Contents">A4</text:p>
          </table:table-cell>
          <table:table-cell table:style-name="TableRowCell" office:value-type="string">
            <text:p text:style-name="Table_20_Contents">31</text:p>
          </table:table-cell>
        </table:table-row>
        <table:table-row>
          <table:table-cell table:style-name="TableRowCell" office:value-type="string">
            <text:p text:style-name="Table_20_Contents">32</text:p>
          </table:table-cell>
          <table:table-cell table:style-name="TableRowCell" office:value-type="string">
    </table:table-cell>
          <table:table-cell table:style-name="TableRowCell" office:value-type="string">
            <text:p text:style-name="Table_20_Contents">//</text:p>
          </table:table-cell>
          <table:table-cell table:style-name="TableRowCell" office:value-type="string">
            <text:p text:style-name="Table_20_Contents">32</text:p>
          </table:table-cell>
        </table:table-row>
      </table:table>
      <text:p text:style-name="Horizontal_20_Line"/>
      <text:h text:style-name="Heading_20_2" text:outline-level="2"><text:bookmark-start text:name="outs-000126"/>outs-000126<text:bookmark-end text:name="outs-000126"/></text:h>
      <text:p text:style-name="First_20_paragraph"><text:span text:style-name="Strong_20_Emphasis">8 Example of Image Scanner Connection</text:span></text:p>
      <text:p text:style-name="Text_20_body">When connected to an image scanner, the interface part of the circuit is shown in Figure 12. Naturally, the part on the image scanner side connector towards the interior can be changed due to model changes, etc., so please consider this figure as a reference.</text:p>
      <text:p text:style-name="Text_20_body"><text:span text:style-name="Strong_20_Emphasis">9 Circuit Diagram</text:span></text:p>
      <text:p text:style-name="Text_20_body">The circuit diagram of CZ-6BN1 is as shown in Figure 13.</text:p>
      <text:p text:style-name="Text_20_body">122</text:p>
      <text:p text:style-name="Horizontal_20_Line"/>
      <text:h text:style-name="Heading_20_2" text:outline-level="2"><text:bookmark-start text:name="outs-000127"/>outs-000127<text:bookmark-end text:name="outs-000127"/></text:h>
      <text:p text:style-name="First_20_paragraph">Top Middle: "Figure 12 Interface circuit when connecting an image scanner"</text:p>
      <text:p text:style-name="Text_20_body">Middle Left: "CZ-6BN1 board side"</text:p>
      <text:p text:style-name="Text_20_body">Middle Right: "Parallel board" "Image Scanner Side" "Sharp CZ-8NS1" "NEC PC-IN500 Series"</text:p>
      <text:p text:style-name="Text_20_body">Middle Board 1: "[X68000]" "µPD8255"</text:p>
      <text:p text:style-name="Text_20_body">Middle Board 2: "CN1" "Parallel Cable"</text:p>
      <text:p text:style-name="Text_20_body">Bottom of the page: "Figure 13 Circuit diagram of CZ-6BN1 (reference at the end of the volume)" Page 123</text:p>
      <text:p text:style-name="Horizontal_20_Line"/>
      <text:h text:style-name="Heading_20_2" text:outline-level="2"><text:bookmark-start text:name="outs-000128"/>outs-000128<text:bookmark-end text:name="outs-000128"/></text:h>
      <text:p text:style-name="First_20_paragraph"><text:span text:style-name="Emphasis">(Blank page in the original.)</text:span></text:p>
      <text:p text:style-name="Horizontal_20_Line"/>
      <text:h text:style-name="Heading_20_2" text:outline-level="2"><text:bookmark-start text:name="outs-000129"/>outs-000129<text:bookmark-end text:name="outs-000129"/></text:h>
      <text:p text:style-name="First_20_paragraph"><text:span text:style-name="Strong_20_Emphasis">Video Board</text:span><text:line-break/>(CZ-6BV1)</text:p>
      <text:p text:style-name="Text_20_body">The Video Board is an adapter board that allows you to display the 15 kHz mode screen of the X68000 on a video deck or TV. It is an ideal board for projecting graphics on a large screen or recording to video.</text:p>
      <text:p text:style-name="Text_20_body"><text:span text:style-name="Emphasis">The Video Board is an adaptor that converts the X68000's analog RGB signal to composite video signal and S-video signal (Y/C separated signal). This allows you to record 15 kHz mode screen of the X68000 on a video deck or display it on a large TV or video projector.</text:span></text:p>
      <text:p text:style-name="Text_20_body"><text:span text:style-name="Strong_20_Emphasis">1. Specifications</text:span></text:p>
      <text:p text:style-name="Text_20_body">Main LSI:<text:line-break/>NTSC Encoder IC: CXA1145P<text:line-break/>Sync Signal Generator IC: CXD1217M</text:p>
      <text:p text:style-name="Text_20_body">Input signals:<text:line-break/>Analog RGB signal<text:line-break/>TV control signal</text:p>
      <text:p text:style-name="Text_20_body">Output signals:<text:line-break/>Analog RGB signal<text:line-break/>TV control signal<text:line-break/>S-video signal<text:line-break/>Composite video signal</text:p>
      <text:p text:style-name="Text_20_body">Page: 125</text:p>
      <text:p text:style-name="Horizontal_20_Line"/>
      <text:h text:style-name="Heading_20_2" text:outline-level="2"><text:bookmark-start text:name="outs-000130"/>outs-000130<text:bookmark-end text:name="outs-000130"/></text:h>
      <text:p text:style-name="First_20_paragraph">I/O Connectors Analog RGB             15-pin D-SUB TV Control                 8-pin DIN S-Video Signal             4-pin Mini-DIN Composite Video        Pin Jack</text:p>
      <text:p text:style-name="Text_20_body">Power Supply Voltage                       + 5 V / + 12 V Power Consumption                         + 5 V   100 mA                         + 12 V  150 mA Operating Temperature Range                         0 ~ 35°C</text:p>
      <text:p text:style-name="Text_20_body">2 Circuit Overview</text:p>
      <text:p text:style-name="Text_20_body">The CZ-6BV1 block diagram is shown in Figure 1. The analog RGB signal output from the X68000 main unit is input as-is to the NTSC encoder via the buffer where it is converted to an analog RGB signal. The video board is inserted into the X68000's expansion slot, but because it does not take any additional action besides entering the expansion slot, it has no I/O port or other design specific to its function.</text:p>
      <text:p text:style-name="Text_20_body">Upon detecting that X68000's horizontal frequency is 15 kHz, the NTSC encoder starts operating, and outputs composite video and S-Video signals. The video board has a video board operation switch, which allows the user to forcibly turn off the video board's operation when not needed.</text:p>
      <text:p text:style-name="Text_20_body">The composition of video and analog RGB signals on the X68000 occurs within the dedicated display circuitry, allowing composite video and S-Video signal outputs by connecting the video board. However, in TV mode display (also known as video display), only the TV mode display is shown. In computer mode, super imposed mode, or tele-mode, the composition (computer super imposed) is displayed, and the super imposed display or tele-moderator's display is not shown.</text:p>
      <text:p text:style-name="Horizontal_20_Line"/>
      <text:h text:style-name="Heading_20_2" text:outline-level="2"><text:bookmark-start text:name="outs-000131"/>outs-000131<text:bookmark-end text:name="outs-000131"/></text:h>
      <text:p text:style-name="First_20_paragraph"><text:span text:style-name="Strong_20_Emphasis">Diagram 1: Block Diagram of CZ-6BV1</text:span></text:p>
      <text:list text:style-name="List_20_1">
        <text:list-item>
          <text:p text:style-name="List_20_Bullet_20_Tight">Analog RGB --&gt; Buffer --&gt; Analog RGB</text:p>
        </text:list-item>
        <text:list-item>
          <text:p text:style-name="List_20_Bullet_20_Tight">Video port</text:p>
        </text:list-item>
        <text:list-item>
          <text:p text:style-name="List_20_Bullet_20_Tight">Composite Video Output</text:p>
        </text:list-item>
        <text:list-item>
          <text:p text:style-name="List_20_Bullet_20_Tight">S Video Output</text:p>
        </text:list-item>
        <text:list-item>
          <text:p text:style-name="List_20_Bullet_20_Tight">RGB --&gt; NTSC Encoder --&gt; Composite Video Output</text:p>
        </text:list-item>
        <text:list-item>
          <text:p text:style-name="List_20_Bullet_20_Tight">Operation SW</text:p>
        </text:list-item>
        <text:list-item>
          <text:p text:style-name="List_20_Bullet_20_Tight">Operation Control Unit (Detecting Resolution)</text:p>
        </text:list-item>
        <text:list-item>
          <text:p text:style-name="List_20_Bullet_20_Tight">Synchronization Signal Switching</text:p>
        </text:list-item>
        <text:list-item>
          <text:p text:style-name="List_20_Bullet_20_Tight">H SYNC --&gt; H SYNC</text:p>
        </text:list-item>
        <text:list-item>
          <text:p text:style-name="List_20_Bullet_20_Tight">V SYNC --&gt; V SYNC</text:p>
        </text:list-item>
        <text:list-item>
          <text:p text:style-name="List_20_Bullet_20_Tight">EX H SYNC</text:p>
        </text:list-item>
        <text:list-item>
          <text:p text:style-name="List_20_Bullet_20_Tight">TV Synchronization Signal Generator</text:p>
        </text:list-item>
      </text:list>
      <text:p text:style-name="First_20_paragraph">TV Control --&gt; TV Control</text:p>
      <text:list text:style-name="List_20_1">
        <text:list-item>
          <text:p text:style-name="List_20_Bullet_20_Tight">Computer Main Unit Side Display Side</text:p>
        </text:list-item>
      </text:list>
      <text:p text:style-name="First_20_paragraph"><text:span text:style-name="Strong_20_Emphasis">3. Major Component Layout</text:span></text:p>
      <text:p text:style-name="Text_20_body">The component layout of CZ-6BV1 is shown in Figure 2.</text:p>
      <text:p text:style-name="Horizontal_20_Line"/>
      <text:h text:style-name="Heading_20_2" text:outline-level="2"><text:bookmark-start text:name="outs-000132"/>outs-000132<text:bookmark-end text:name="outs-000132"/></text:h>
      <text:p text:style-name="Horizontal_20_Line"/>
      <text:p text:style-name="First_20_paragraph">● Figure ······ 2 CZ-6BV1 Part Placement</text:p>
      <text:p text:style-name="Text_20_body">●4 Settings</text:p>
      <text:p text:style-name="Preformatted_20_Text"><text:s text:c="2"/>4·1 <text:s text:c="1"/>Video Board Operation</text:p>
      <text:p text:style-name="Preformatted_20_Text"><text:s text:c="2"/></text:p>
      <text:p text:style-name="Preformatted_20_Text"><text:s text:c="2"/>You can turn the video board operation ON/OFF with the video board operation switch. If it is turned OFF, the display on the video display will be stopped.</text:p>
      <text:p text:style-name="First_20_paragraph">128</text:p>
      <text:p text:style-name="Horizontal_20_Line"/>
      <text:p text:style-name="Horizontal_20_Line"/>
      <text:h text:style-name="Heading_20_2" text:outline-level="2"><text:bookmark-start text:name="outs-000133"/>outs-000133<text:bookmark-end text:name="outs-000133"/></text:h>
      <text:p text:style-name="Horizontal_20_Line"/>
      <text:h text:style-name="Heading_20_4" text:outline-level="4"><text:bookmark-start text:name="connector-signal-layout"/>Connector Signal Layout<text:bookmark-end text:name="connector-signal-layout"/></text:h>
      <text:p text:style-name="First_20_paragraph">CZ-6BVI connector signal layout is shown in Figure 3.</text:p>
      <text:p text:style-name="Text_20_body">■ Figure 3. Video Board Connector Signal Layout</text:p>
      <text:list text:style-name="List_20_1">
        <text:list-item>
          <text:p text:style-name="List_20_Bullet_20_Tight">Analog RGB Signal Connector, Cable</text:p>
        </text:list-item>
      </text:list>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3</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4</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5</text:p>
          </table:table-cell>
          <table:table-cell table:style-name="TableRowCell" office:value-type="string">
            <text:p text:style-name="Table_20_Contents">R OUT</text:p>
          </table:table-cell>
          <table:table-cell table:style-name="TableRowCell" office:value-type="string">
            <text:p text:style-name="Table_20_Contents">C→M</text:p>
          </table:table-cell>
          <table:table-cell table:style-name="TableRowCell" office:value-type="string">
            <text:p text:style-name="Table_20_Contents">Analog 0.7Vp-p (75Ω terminal)</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YS</text:p>
          </table:table-cell>
          <table:table-cell table:style-name="TableRowCell" office:value-type="string">
            <text:p text:style-name="Table_20_Contents">-</text:p>
          </table:table-cell>
          <table:table-cell table:style-name="TableRowCell" office:value-type="string">
            <text:p text:style-name="Table_20_Contents">Represents presence or absence of composite data</text:p>
          </table:table-cell>
        </table:table-row>
        <table:table-row>
          <table:table-cell table:style-name="TableRowCell" office:value-type="string">
            <text:p text:style-name="Table_20_Contents">8</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9</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0</text:p>
          </table:table-cell>
          <table:table-cell table:style-name="TableRowCell" office:value-type="string">
            <text:p text:style-name="Table_20_Contents">AUDIO L</text:p>
          </table:table-cell>
          <table:table-cell table:style-name="TableRowCell" office:value-type="string">
            <text:p text:style-name="Table_20_Contents">C→M</text:p>
          </table:table-cell>
          <table:table-cell table:style-name="TableRowCell" office:value-type="string">
            <text:p text:style-name="Table_20_Contents">Audio Signal Left</text:p>
          </table:table-cell>
        </table:table-row>
        <table:table-row>
          <table:table-cell table:style-name="TableRowCell" office:value-type="string">
            <text:p text:style-name="Table_20_Contents">11</text:p>
          </table:table-cell>
          <table:table-cell table:style-name="TableRowCell" office:value-type="string">
            <text:p text:style-name="Table_20_Contents">AUDIO R</text:p>
          </table:table-cell>
          <table:table-cell table:style-name="TableRowCell" office:value-type="string">
            <text:p text:style-name="Table_20_Contents">C→M</text:p>
          </table:table-cell>
          <table:table-cell table:style-name="TableRowCell" office:value-type="string">
            <text:p text:style-name="Table_20_Contents">Audio Signal Right</text:p>
          </table:table-cell>
        </table:table-row>
        <table:table-row>
          <table:table-cell table:style-name="TableRowCell" office:value-type="string">
            <text:p text:style-name="Table_20_Contents">12</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13</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row>
          <table:table-cell table:style-name="TableRowCell" office:value-type="string">
            <text:p text:style-name="Table_20_Contents">14</text:p>
          </table:table-cell>
          <table:table-cell table:style-name="TableRowCell" office:value-type="string">
            <text:p text:style-name="Table_20_Contents">HSYNC</text:p>
          </table:table-cell>
          <table:table-cell table:style-name="TableRowCell" office:value-type="string">
            <text:p text:style-name="Table_20_Contents">C→M</text:p>
          </table:table-cell>
          <table:table-cell table:style-name="TableRowCell" office:value-type="string">
            <text:p text:style-name="Table_20_Contents">Horizontal Sync Signal TTL Level</text:p>
          </table:table-cell>
        </table:table-row>
        <table:table-row>
          <table:table-cell table:style-name="TableRowCell" office:value-type="string">
            <text:p text:style-name="Table_20_Contents">15</text:p>
          </table:table-cell>
          <table:table-cell table:style-name="TableRowCell" office:value-type="string">
            <text:p text:style-name="Table_20_Contents">VSYNC</text:p>
          </table:table-cell>
          <table:table-cell table:style-name="TableRowCell" office:value-type="string">
            <text:p text:style-name="Table_20_Contents">C→M</text:p>
          </table:table-cell>
          <table:table-cell table:style-name="TableRowCell" office:value-type="string">
            <text:p text:style-name="Table_20_Contents">Vertical Sync Signal TTL Level</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Connect the unused terminals (N.C) and GND (Ground).</text:p>
        </text:list-item>
      </text:list>
      <text:list text:style-name="List_20_1">
        <text:list-item>
          <text:p text:style-name="List_20_Bullet_20_Tight">TV Control Connector, Cable</text:p>
        </text:list-item>
      </text:list>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HeaderRowCell" office:value-type="string">
              <text:p text:style-name="Table_20_Heading">Pin No.</text:p>
            </table:table-cell>
            <table:table-cell table:style-name="TableHeaderRowCell" office:value-type="string">
              <text:p text:style-name="Table_20_Heading">Signal Name</text:p>
            </table:table-cell>
            <table:table-cell table:style-name="TableHeaderRowCell" office:value-type="string">
              <text:p text:style-name="Table_20_Heading">Direc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HSYNC</text:p>
          </table:table-cell>
          <table:table-cell table:style-name="TableRowCell" office:value-type="string">
            <text:p text:style-name="Table_20_Contents">M→C</text:p>
          </table:table-cell>
          <table:table-cell table:style-name="TableRowCell" office:value-type="string">
            <text:p text:style-name="Table_20_Contents">External Horizontal Sync Signal TTL Level</text:p>
          </table:table-cell>
        </table:table-row>
        <table:table-row>
          <table:table-cell table:style-name="TableRowCell" office:value-type="string">
            <text:p text:style-name="Table_20_Contents">2</text:p>
          </table:table-cell>
          <table:table-cell table:style-name="TableRowCell" office:value-type="string">
            <text:p text:style-name="Table_20_Contents">EXVSYNC</text:p>
          </table:table-cell>
          <table:table-cell table:style-name="TableRowCell" office:value-type="string">
            <text:p text:style-name="Table_20_Contents">M→C</text:p>
          </table:table-cell>
          <table:table-cell table:style-name="TableRowCell" office:value-type="string">
            <text:p text:style-name="Table_20_Contents">External Vertical Sync Signal TTL Level</text:p>
          </table:table-cell>
        </table:table-row>
        <table:table-row>
          <table:table-cell table:style-name="TableRowCell" office:value-type="string">
            <text:p text:style-name="Table_20_Contents">3</text:p>
          </table:table-cell>
          <table:table-cell table:style-name="TableRowCell" office:value-type="string">
            <text:p text:style-name="Table_20_Contents">TVPOWERON/OFF</text:p>
          </table:table-cell>
          <table:table-cell table:style-name="TableRowCell" office:value-type="string">
            <text:p text:style-name="Table_20_Contents">M→C</text:p>
          </table:table-cell>
          <table:table-cell table:style-name="TableRowCell" office:value-type="string">
            <text:p text:style-name="Table_20_Contents">TV Power On/Off Signal</text:p>
          </table:table-cell>
        </table:table-row>
        <table:table-row>
          <table:table-cell table:style-name="TableRowCell" office:value-type="string">
            <text:p text:style-name="Table_20_Contents">4</text:p>
          </table:table-cell>
          <table:table-cell table:style-name="TableRowCell" office:value-type="string">
            <text:p text:style-name="Table_20_Contents">TVREMOTE</text:p>
          </table:table-cell>
          <table:table-cell table:style-name="TableRowCell" office:value-type="string">
            <text:p text:style-name="Table_20_Contents">C→M</text:p>
          </table:table-cell>
          <table:table-cell table:style-name="TableRowCell" office:value-type="string">
            <text:p text:style-name="Table_20_Contents">TV Remote Signal</text:p>
          </table:table-cell>
        </table:table-row>
        <table:table-row>
          <table:table-cell table:style-name="TableRowCell" office:value-type="string">
            <text:p text:style-name="Table_20_Contents">5</text:p>
          </table:table-cell>
          <table:table-cell table:style-name="TableRowCell" office:value-type="string">
            <text:p text:style-name="Table_20_Contents">Vcc1</text:p>
          </table:table-cell>
          <table:table-cell table:style-name="TableRowCell" office:value-type="string">
            <text:p text:style-name="Table_20_Contents">-</text:p>
          </table:table-cell>
          <table:table-cell table:style-name="TableRowCell" office:value-type="string">
            <text:p text:style-name="Table_20_Contents">5V</text:p>
          </table:table-cell>
        </table:table-row>
        <table:table-row>
          <table:table-cell table:style-name="TableRowCell" office:value-type="string">
            <text:p text:style-name="Table_20_Contents">6</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7</text:p>
          </table:table-cell>
          <table:table-cell table:style-name="TableRowCell" office:value-type="string">
            <text:p text:style-name="Table_20_Contents">GND</text:p>
          </table:table-cell>
          <table:table-cell table:style-name="TableRowCell" office:value-type="string">
            <text:p text:style-name="Table_20_Contents">-</text:p>
          </table:table-cell>
          <table:table-cell table:style-name="TableRowCell" office:value-type="string">
            <text:p text:style-name="Table_20_Contents">Ground</text:p>
          </table:table-cell>
        </table:table-row>
        <table:table-row>
          <table:table-cell table:style-name="TableRowCell" office:value-type="string">
            <text:p text:style-name="Table_20_Contents">8</text:p>
          </table:table-cell>
          <table:table-cell table:style-name="TableRowCell" office:value-type="string">
            <text:p text:style-name="Table_20_Contents">N.C</text:p>
          </table:table-cell>
          <table:table-cell table:style-name="TableRowCell" office:value-type="string">
            <text:p text:style-name="Table_20_Contents">-</text:p>
          </table:table-cell>
          <table:table-cell table:style-name="TableRowCell" office:value-type="string">
            <text:p text:style-name="Table_20_Contents">Not Connected</text:p>
          </table:table-cell>
        </table:table-row>
      </table:table>
      <text:p text:style-name="First_20_paragraph">(Notes)</text:p>
      <text:list text:style-name="Numbering_20_1">
        <text:list-item>
          <text:p text:style-name="List_20_Number_20_Tight">C→M: Signals from Computer Body to Display Video Board.</text:p>
        </text:list-item>
        <text:list-item>
          <text:p text:style-name="List_20_Number_20_Tight">M→C: Signals from Display Board to Computer Body.</text:p>
        </text:list-item>
      </text:list>
      <text:h text:style-name="Heading_20_2" text:outline-level="2"><text:bookmark-start text:name="page-129"/>Page 129<text:bookmark-end text:name="page-129"/></text:h>
      <text:p text:style-name="Horizontal_20_Line"/>
      <text:h text:style-name="Heading_20_2" text:outline-level="2"><text:bookmark-start text:name="outs-000134"/>outs-000134<text:bookmark-end text:name="outs-000134"/></text:h>
      <text:p text:style-name="First_20_paragraph">Diagram: 3 Video Board Connector Signal Arrangement (continued)</text:p>
      <text:p text:style-name="Text_20_body">• S-Video Output | Pin No. | Signal Name | I/O | Remarks | | ------- | ------------ | --- | ------- | | 1 | GND | - | Ground | | 2 | GND | - | Ground | | 3 | Y | OUT | Luminance signal, 1 Vp-p | | 4 | C | OUT | Chrominance signal, burst: 0.286 Vp-p |</text:p>
      <text:p text:style-name="Text_20_body">• Composite Video Output |Pin No.| Signal Name | I/O | Remarks | |-------|---------------|-----|------------------| | 1 | COMP. VIDEO | OUT | Composite Video Signal | | 2 | GND | - | Ground |</text:p>
      <text:p text:style-name="Text_20_body">6 Circuit Diagram</text:p>
      <text:p text:style-name="Text_20_body">CZ-6BV1 circuitry is shown in Fig. 4.</text:p>
      <text:p text:style-name="Text_20_body">● Diagram: 4 CZ-6BV1 circuit diagram (reference only, not included in this volume)</text:p>
      <text:p text:style-name="Horizontal_20_Line"/>
      <text:h text:style-name="Heading_20_2" text:outline-level="2"><text:bookmark-start text:name="outs-000135"/>outs-000135<text:bookmark-end text:name="outs-000135"/></text:h>
      <text:p text:style-name="Horizontal_20_Line"/>
      <text:p text:style-name="First_20_paragraph">SCSI Board (CZ-6BS1)</text:p>
      <text:p text:style-name="Text_20_body">SCSI is noted as an interface for external media of the next generation such as CD-ROM, optical disk, DAT, etc. This SCSI board is a board that supports SCSI for machines that do not have a built-in SCSI interface prior to SUPER.</text:p>
      <text:p text:style-name="Text_20_body">The SCSI Board (CZ-6BS1) allows the use of SCSI on the X68000 series, which do not have built-in SCSI interfaces.</text:p>
      <text:p text:style-name="Text_20_body">In the X68000, before the SUPER or XVI models, SASI was used instead of the hard disk interface SCSI. SCSI was developed from SASI and standardized by ANSI, enabling the use of SCSI not only with hard disks but also with various devices such as CD-ROMs and optical disks as a common interface.</text:p>
      <text:list text:style-name="Numbering_20_1">
        <text:list-item>
          <text:p text:style-name="List_20_Number_20_Tight">Specifications</text:p>
        </text:list-item>
      </text:list>
      <text:p text:style-name="First_20_paragraph">Main LSI:</text:p>
      <text:p text:style-name="Text_20_body">SCSI Controller (SPC): MB 89352 Clock Frequency: 5 MHz SCSI Bus:</text:p>
      <text:p text:style-name="Text_20_body">Standard Compliance: ANSI X3.131-1986</text:p>
      <text:p text:style-name="Text_20_body">(131)</text:p>
      <text:p text:style-name="Horizontal_20_Line"/>
      <text:h text:style-name="Heading_20_2" text:outline-level="2"><text:bookmark-start text:name="outs-000136"/>outs-000136<text:bookmark-end text:name="outs-000136"/></text:h>
      <text:p text:style-name="First_20_paragraph">Transmission Method: Asynchronous Data Transfer Mode: Asynchronous Transfer Power Supply Voltage: +5V Operating Temperature Range: 10–35°C Port Address: <draw:frame draw:style-name="fr1" text:anchor-type="as-char"><draw:object xlink:href="Formula-70/" xlink:type="simple" xlink:show="embed" xlink:actuate="onLoad"/></draw:frame>EA 1FFF (SCSI Controller: <draw:frame draw:style-name="fr1" text:anchor-type="as-char"><draw:object xlink:href="Formula-72/" xlink:type="simple" xlink:show="embed" xlink:actuate="onLoad"/></draw:frame>EA001F) (SCSI ROM: <draw:frame draw:style-name="fr1" text:anchor-type="as-char"><draw:object xlink:href="Formula-74/" xlink:type="simple" xlink:show="embed" xlink:actuate="onLoad"/></draw:frame>EA1FFF) Interrupt Level: Level 2/Level 4 (Selectable by Jumper Switch) DMA: DMA Channel #1</text:p>
      <text:p text:style-name="Text_20_body">■2 Circuit Overview Figure 1 shows the block diagram of the CZ-6BS1. The SCSI control LSI is the commonly used Fujitsu MB89352 (SCSI Protocol Controller: abbreviated as SPC). The SPC's clock receives a 10 MHz signal and outputs a 5 MHz signal.</text:p>
      <text:p text:style-name="Text_20_body">The SCSI ROM contains software to support the SCSI bus card's booting and other functions. The IPL-ROM on the SUPER machine does not boot from SCSI, so the ROM on the CZ-6BS1 with the program is provided to solve this problem.</text:p>
      <text:p text:style-name="Text_20_body">The CZ-6BS1 uses interrupt signals and DMA channel #1. Since DMA channel #1 is shared with SASI, when directly operating SPC to access the SCSI bus, attention is required to avoid conflicts with programs accessing the SASI bus.</text:p>
      <text:p text:style-name="Horizontal_20_Line"/>
      <text:h text:style-name="Heading_20_2" text:outline-level="2"><text:bookmark-start text:name="outs-000137"/>outs-000137<text:bookmark-end text:name="outs-000137"/></text:h>
      <text:p text:style-name="Horizontal_20_Line"/>
      <text:p text:style-name="First_20_paragraph">SCSI Board</text:p>
      <text:p text:style-name="Text_20_body">Figure 1: CZ-6BS1 Block Diagram</text:p>
      <text:p text:style-name="Text_20_body">Expansion Slot Data Bus Control Bus Address Bus 10 MHz Buffer Control Circuit Buffer Address Decoder Circuit 5 MHz</text:p>
      <text:p text:style-name="Text_20_body">Buffer Buffer Buffer SCSI ROM Interrupt Control Circuit Clock Division Circuit</text:p>
      <text:p text:style-name="Text_20_body">SPC SCSI Protocol Controller SCSI Bus Terminator</text:p>
      <text:p text:style-name="Text_20_body">3 Main Part Layout</text:p>
      <text:p text:style-name="Text_20_body">Figure 2 shows the component layout of the CZ-6BS1.</text:p>
      <text:p text:style-name="Horizontal_20_Line"/>
      <text:p text:style-name="First_20_paragraph">Page 133</text:p>
      <text:p text:style-name="Horizontal_20_Line"/>
      <text:h text:style-name="Heading_20_2" text:outline-level="2"><text:bookmark-start text:name="outs-000138"/>outs-000138<text:bookmark-end text:name="outs-000138"/></text:h>
      <text:p text:style-name="Horizontal_20_Line"/>
      <text:p text:style-name="First_20_paragraph">● Diagram 2 - CZ-6BS1 Component Placement</text:p>
      <text:p text:style-name="Text_20_body">● 4 Settings</text:p>
      <text:p text:style-name="Text_20_body">4.1 Interrupt Level Settings</text:p>
      <text:p text:style-name="Text_20_body">The CZ-6BS1 allows switching the interrupt used by the jumper switches on the board (JP1 and JP2) (Figure 3). JP1 switches the interrupt acknowledge (IACK) signal from the main unit and JP2 switches the interrupt request (IREQ).</text:p>
      <text:p text:style-name="Text_20_body">134</text:p>
      <text:p text:style-name="Horizontal_20_Line"/>
      <text:h text:style-name="Heading_20_2" text:outline-level="2"><text:bookmark-start text:name="outs-000139"/>outs-000139<text:bookmark-end text:name="outs-000139"/></text:h>
      <text:p text:style-name="Horizontal_20_Line"/>
      <text:p text:style-name="First_20_paragraph"><text:span text:style-name="Strong_20_Emphasis">Figure 3 Jumper Switch (JP1, JP2)</text:span></text:p>
      <text:p text:style-name="Text_20_body">---</text:p>
      <text:p text:style-name="Text_20_body"><text:span text:style-name="Strong_20_Emphasis">Usage Setting Level</text:span> | Level 2 | | Setting: JP1 - pin 1 to pin 2 short, JP2 - open |</text:p>
      <text:p text:style-name="Text_20_body"><text:span text:style-name="Strong_20_Emphasis">Usage Setting Level</text:span> | Level 4 | | Setting: JP2 - pin 2 to pin 3 short, JP1 - open |</text:p>
      <text:p text:style-name="Horizontal_20_Line"/>
      <text:p text:style-name="First_20_paragraph">When pins 1-2 of the jumper switch are shorted, setting level 2 is selected. When pins 2-3 are shorted, setting level 4 is selected. Since IREQ and IACK are generally used side by side, do not set the same level by any means.</text:p>
      <text:p text:style-name="Horizontal_20_Line"/>
      <text:p text:style-name="First_20_paragraph"><text:span text:style-name="Strong_20_Emphasis">4-2 Terminating Resistor</text:span></text:p>
      <text:p text:style-name="Text_20_body">The SCSI bus allows for the connection of up to 8 devices. It is generally recognized that a terminal must be divided appropriately in the middle of the bus, and the terminal requires processing with resistances as shown in figure 4, using resistances from 220 ohms to 330 ohms (called termination resistors). In the case of the CZ-6BS1, RM1 and RM3 are the termination resistors.</text:p>
      <text:p text:style-name="Horizontal_20_Line"/>
      <text:p text:style-name="First_20_paragraph">Page 135</text:p>
      <text:p text:style-name="Horizontal_20_Line"/>
      <text:h text:style-name="Heading_20_2" text:outline-level="2"><text:bookmark-start text:name="outs-000140"/>outs-000140<text:bookmark-end text:name="outs-000140"/></text:h>
      <text:p text:style-name="Horizontal_20_Line"/>
      <text:p text:style-name="First_20_paragraph">Figure 4-4: Terminator Resistor</text:p>
      <text:p text:style-name="Text_20_body">In normal use, the CZ-6BS1 is positioned at the end, so the terminator resistor should be attached in such cases. However, when the CZ-6BS1 is located in the middle of the loop, the terminator resistor should not be removed. You can easily attach the terminator resistor using the provided socket.</text:p>
      <text:p text:style-name="Text_20_body">4.3 Terminator Power Line</text:p>
      <text:p text:style-name="Text_20_body">There is no terminator power in the basic configuration, but a little attention is required for the terminator power (TERMPWR) explained here. The terminator power is a power supply provided to the terminator resistor on the SCSI bus to ensure at least one device on the SCSI bus is always supplying power to make sure the bus operates correctly.</text:p>
      <text:p text:style-name="Text_20_body">SCSI standards require that TERMPWR can supply up to 0.8A (with a Schottky barrier diode type) and ensure that no more than 1A flows in the event of a fault by protecting the circuit with a fuse. Diodes are used to block reverse current to ensure multiple devices can supply TERMPWR.</text:p>
      <text:p text:style-name="Text_20_body">The TERMPWR circuitry in the CZ-6BS1 is illustrated in Figure 5. The CZ-6BS1 includes a 1A fuse in the TERMPWR power supply line. The SCSI bus operates normally without the TERMPWR, but the fuse might blow. Also, do note that other SCSI devices may not notice abnormalities in cases where TERMPWR is supplied.</text:p>
      <text:p text:style-name="Text_20_body">Page 136</text:p>
      <text:p text:style-name="Horizontal_20_Line"/>
      <text:p text:style-name="First_20_paragraph">This translation retains the original technical context and detailed information.</text:p>
      <text:p text:style-name="Horizontal_20_Line"/>
      <text:h text:style-name="Heading_20_2" text:outline-level="2"><text:bookmark-start text:name="outs-000141"/>outs-000141<text:bookmark-end text:name="outs-000141"/></text:h>
      <text:p text:style-name="Horizontal_20_Line"/>
      <text:p text:style-name="First_20_paragraph">● Figure 5 - Circuit related to TERM PWR for CZ-6BS1</text:p>
      <text:p text:style-name="Text_20_body">+5V</text:p>
      <text:p text:style-name="Text_20_body">F1</text:p>
      <text:p text:style-name="Text_20_body">IA</text:p>
      <text:p text:style-name="Text_20_body">Fuse</text:p>
      <text:p text:style-name="Text_20_body">Other SCSI device</text:p>
      <text:p text:style-name="Text_20_body">+5V</text:p>
      <text:p text:style-name="Text_20_body">▼5 I/O map</text:p>
      <text:p text:style-name="Text_20_body">CZ-6BS1's I/O address map is shown in Figure 6. For more on the SCSI bus details or specific usage methods, please refer to the explanation along with examples in the publication "Inside X68000".</text:p>
      <text:p text:style-name="Text_20_body">●6 Connector Signal Arrangement</text:p>
      <text:p text:style-name="Text_20_body">The SCSI bus connector uses a 50P connector from Amphenol. The signal arrangement of the connectors is as shown in Figure 7.</text:p>
      <text:p text:style-name="Text_20_body">(Page 137)</text:p>
      <text:p text:style-name="Horizontal_20_Line"/>
      <text:p text:style-name="Horizontal_20_Line"/>
      <text:h text:style-name="Heading_20_2" text:outline-level="2"><text:bookmark-start text:name="outs-000142"/>outs-000142<text:bookmark-end text:name="outs-000142"/></text:h>
      <text:h text:style-name="Heading_20_2" text:outline-level="2"><text:bookmark-start text:name="figure-6-io-address-map-of-scsi-board"/>Figure 6: I/O Address Map of SCSI Board<text:bookmark-end text:name="figure-6-io-address-map-of-scsi-board"/></text:h>
      <text:h text:style-name="Heading_20_3" text:outline-level="3"><text:bookmark-start text:name="address--readwrite"/>Address | Read/Write<text:bookmark-end text:name="address--readwrite"/></text:h>
      <text:p text:style-name="Preformatted_20_Text"><text:s text:c="10"/>bit 7 <text:s text:c="1"/>bit 6 <text:s text:c="1"/>bit 5 <text:s text:c="1"/>bit 4 <text:s text:c="1"/>bit 3 <text:s text:c="1"/>bit 2 <text:s text:c="1"/>bit 1 <text:s text:c="1"/>bit 0</text:p>
      <text:h text:style-name="Heading_20_3" text:outline-level="3"><text:bookmark-start text:name="register-name"/>Register Name<text:bookmark-end text:name="register-name"/></text:h>
      <text:p text:style-name="First_20_paragraph">+$1 R | ID ID ID ID ID ID ID ID | BDID (Bus Device ID) W | (1) ID</text:p>
      <text:p text:style-name="Text_20_body">+$3 R/W|</text:p>
      <text:p text:style-name="Preformatted_20_Text"><text:s text:c="10"/>Reset &amp; Control <text:s text:c="20"/>Arbitration</text:p>
      <text:p text:style-name="Preformatted_20_Text"><text:s text:c="20"/>Disable <text:s text:c="9"/>DecMode <text:s text:c="2"/>Enable <text:s text:c="14"/>Parity Enable <text:s text:c="13"/>Select Enable <text:s text:c="2"/>Resellect Enable <text:s text:c="1"/>Interrupt Enable <text:s text:c="3"/>| SCTL (SPC Control)</text:p>
      <text:p text:style-name="First_20_paragraph">+$5 R/W| (2) (3) (4) | SCMD (SPC Command)</text:p>
      <text:p text:style-name="Text_20_body">+$9 R/W| Selected Resellect Disable</text:p>
      <text:p text:style-name="Preformatted_20_Text"><text:s text:c="19"/>Connected <text:s text:c="10"/>Command code <text:s text:c="5"/>Service <text:s text:c="6"/>Timeout <text:s text:c="4"/>SPC Hard Error <text:s text:c="11"/>Reset Error <text:s text:c="6"/></text:p>
      <text:p text:style-name="Preformatted_20_Text"><text:s text:c="43"/>Transfer <text:s text:c="65"/>Required <text:s text:c="5"/></text:p>
      <text:p text:style-name="Preformatted_20_Text"><text:s text:c="7"/>W | (5)</text:p>
      <text:p text:style-name="First_20_paragraph">+$B R | REQ ACK ATN SEL BSY MSG C/D I/O | PSNS (Phase Sense)</text:p>
      <text:p text:style-name="Preformatted_20_Text"><text:s text:c="11"/>Diag <text:s text:c="3"/>Diag| <text:s text:c="11"/>Diag Diag <text:s text:c="6"/>| SDGC <text:s text:c="1"/>(SPC Diag Control)</text:p>
      <text:p text:style-name="Preformatted_20_Text"><text:s text:c="4"/>Diag| <text:s text:c="16"/>Xfer Enable <text:s text:c="12"/>Control </text:p>
      <text:p text:style-name="First_20_paragraph">+$D R | SPC SCSI INT| | | | TC = 0 | SSTS (SPC Status)</text:p>
      <text:p text:style-name="Preformatted_20_Text"><text:s text:c="10"/>Connected. Transfer <text:s text:c="13"/>Reselts <text:s text:c="12"/>Full <text:s text:c="17"/></text:p>
      <text:p text:style-name="Preformatted_20_Text"><text:s text:c="15"/>TARGET <text:s text:c="1"/>Busy <text:s text:c="7"/>InProgress <text:s text:c="21"/>Empty <text:s text:c="9"/></text:p>
      <text:p text:style-name="Preformatted_20_Text"><text:s text:c="10"/>W | <text:s text:c="9"/>(0) <text:s text:c="11"/>Transfer</text:p>
      <text:p text:style-name="Preformatted_20_Text"><text:s text:c="19"/>ITPryError <text:s text:c="15"/></text:p>
      <text:p text:style-name="First_20_paragraph">+$F R | Data Error Xfer Transfer Phase | (SPC Error Status) SCSI| SPC<text:line-break/>|(0) EN</text:p>
      <text:p text:style-name="Text_20_body">+$11 R/W| INIT Enable (0) MSG | PCTL (Phase Control)</text:p>
      <text:p text:style-name="Preformatted_20_Text"><text:s text:c="19"/>(F) EN <text:s text:c="14"/></text:p>
      <text:p text:style-name="Preformatted_20_Text"><text:s text:c="19"/>(0)</text:p>
      <text:p text:style-name="First_20_paragraph">+$13 R (0) | MBC (Modified Byte Counter)</text:p>
      <text:p text:style-name="Text_20_body">+$15 R/W| (6) Temporary Data DREG (Data Register) +$17 (W)Temporary Data TEMP (Temporary Register)</text:p>
      <text:p text:style-name="Text_20_body">+$19 R/W| Transfer Counter (High 33) TCH +$1B R/W| (2) Transfer Counter (Mid 16) TCM +$1D R/W| (5) Transfer Counter (Low 8) TCL</text:p>
      <text:h text:style-name="Heading_20_4" text:outline-level="4"><text:bookmark-start text:name="based-addresses-scsi-interfaces-board"/>Based Addresses: SCSI Interfaces Board:<text:bookmark-end text:name="based-addresses-scsi-interfaces-board"/></text:h>
      <text:p text:style-name="First_20_paragraph">CZ-6BS1.....$EA40000 SCSI Internal Model ..... $E96020</text:p>
      <text:p text:style-name="Text_20_body">Note: There are several notations 1-6 that are brief state like "Connected", "Enable", and "Disable".</text:p>
      <text:p text:style-name="Horizontal_20_Line"/>
      <text:h text:style-name="Heading_20_2" text:outline-level="2"><text:bookmark-start text:name="outs-000143"/>outs-000143<text:bookmark-end text:name="outs-000143"/></text:h>
      <text:p text:style-name="First_20_paragraph">Figure 7 SCSI Connector Pin Assignment</text:p>
      <text:h text:style-name="Heading_20_2" text:outline-level="2"><text:bookmark-start text:name="pin-number--signal-name--pin-number--signal-name--function"/>Pin Number | Signal Name | Pin Number | Signal Name | Function<text:bookmark-end text:name="pin-number--signal-name--pin-number--signal-name--function"/></text:h>
      <text:h text:style-name="Heading_20_2" text:outline-level="2"><text:bookmark-start text:name="id_1--gnd--26--db0--data-bus-bit-0-2--gnd--27--db1--1-3--gnd--28--db2--2-4--gnd--29--db3--3-5--gnd--30--db4--4-6--gnd--31--db5--5-7--gnd--32--db6--6-8--gnd--33--db7--7-9--gnd--34--dbp--data-bus-parity-bit-10--gnd--35--gnd--11--gnd--36--gnd--12--gnd--37--gnd--13--open--38--termpwr--termination-power-14--gnd--39--gnd--15--gnd--40--gnd--16--gnd--41--atn--attention-signal-17--gnd--42--gnd--18--gnd--43--bsy--bus-busy-signal-19--gnd--44--ack--data-transfer-acknowledge-signal-20--gnd--45--rst--reset-signal-21--gnd--46--msg--message-phase-signal-22--gnd--47--sel--select-signal-23--gnd--48--cd--commanddata-signal-24--gnd--49--req--data-transfer-request-signal-25--gnd--50--io--data-direction-signal"/>1 | GND | 26 | DB0 | Data bus bit 0 2 | GND | 27 | DB1 | 1 3 | GND | 28 | DB2 | 2 4 | GND | 29 | DB3 | 3 5 | GND | 30 | DB4 | 4 6 | GND | 31 | DB5 | 5 7 | GND | 32 | DB6 | 6 8 | GND | 33 | DB7 | 7 9 | GND | 34 | DBP | Data bus parity bit 10 | GND | 35 | GND | 11 | GND | 36 | GND | 12 | GND | 37 | GND | 13 | OPEN | 38 | TERMPWR | Termination power 14 | GND | 39 | GND | 15 | GND | 40 | GND | 16 | GND | 41 | ATN | Attention signal 17 | GND | 42 | GND | 18 | GND | 43 | BSY | Bus busy signal 19 | GND | 44 | ACK | Data transfer acknowledge signal 20 | GND | 45 | RST | Reset signal 21 | GND | 46 | MSG | Message phase signal 22 | GND | 47 | SEL | Select signal 23 | GND | 48 | C/D | Command/Data signal 24 | GND | 49 | REQ | Data transfer request signal 25 | GND | 50 | I/O | Data direction signal<text:bookmark-end text:name="id_1--gnd--26--db0--data-bus-bit-0-2--gnd--27--db1--1-3--gnd--28--db2--2-4--gnd--29--db3--3-5--gnd--30--db4--4-6--gnd--31--db5--5-7--gnd--32--db6--6-8--gnd--33--db7--7-9--gnd--34--dbp--data-bus-parity-bit-10--gnd--35--gnd--11--gnd--36--gnd--12--gnd--37--gnd--13--open--38--termpwr--termination-power-14--gnd--39--gnd--15--gnd--40--gnd--16--gnd--41--atn--attention-signal-17--gnd--42--gnd--18--gnd--43--bsy--bus-busy-signal-19--gnd--44--ack--data-transfer-acknowledge-signal-20--gnd--45--rst--reset-signal-21--gnd--46--msg--message-phase-signal-22--gnd--47--sel--select-signal-23--gnd--48--cd--commanddata-signal-24--gnd--49--req--data-transfer-request-signal-25--gnd--50--io--data-direction-signal"/></text:h>
      <text:p text:style-name="First_20_paragraph">Unbalanced (Single-ended) type</text:p>
      <text:p text:style-name="Horizontal_20_Line"/>
      <text:h text:style-name="Heading_20_2" text:outline-level="2"><text:bookmark-start text:name="outs-000144"/>outs-000144<text:bookmark-end text:name="outs-000144"/></text:h>
      <text:p text:style-name="First_20_paragraph"><text:span text:style-name="Strong_20_Emphasis">7 Circuit Diagram</text:span></text:p>
      <text:p text:style-name="Text_20_body">The circuit diagram of CZ-6BS1 is shown in Figure 8.</text:p>
      <text:p text:style-name="Text_20_body">■ Figure ...... .. 8 CZ-6BS1 Circuit Diagram (refer to end of volume)</text:p>
      <text:p text:style-name="Horizontal_20_Line"/>
      <text:h text:style-name="Heading_20_2" text:outline-level="2"><text:bookmark-start text:name="outs-000145"/>outs-000145<text:bookmark-end text:name="outs-000145"/></text:h>
      <text:p text:style-name="First_20_paragraph">● GP-IB Board (CZ-6BG1)</text:p>
      <text:p text:style-name="Text_20_body">GP-IB is an interface generally used to connect measuring instruments and computers. It can be said to be indispensable when performing tasks such as automating measurements in a laboratory.</text:p>
      <text:p text:style-name="Text_20_body">The GP-IB board is an interface board for supporting the IEEE std 488 bus (GP-IB), which is widely used as an interface for measuring instruments, on the X68000 series.</text:p>
      <text:p text:style-name="Text_20_body">● 1 Specifications</text:p>
      <text:p text:style-name="Text_20_body">Main LSI Transmission control LSI: µPD7210 (NEC made)</text:p>
      <text:p text:style-name="Text_20_body">GP-IB Interface Standard: GP-IB (IEEE std. 488-1978) Number of Channels: 1 Transfer Speed: 50 KB/S MAX (program transfer) 400 KB/S MAX (DMA transfer)</text:p>
      <text:p text:style-name="Text_20_body">Support Functions SH 1 (all transmission functions) AH 1 (all reception functions)</text:p>
      <text:p text:style-name="Text_20_body">141</text:p>
      <text:p text:style-name="Horizontal_20_Line"/>
      <text:h text:style-name="Heading_20_2" text:outline-level="2"><text:bookmark-start text:name="outs-000146"/>outs-000146<text:bookmark-end text:name="outs-000146"/></text:h>
      <text:p text:style-name="Horizontal_20_Line"/>
      <text:p text:style-name="First_20_paragraph">T6 (Basic Talker Function) L4 (Basic Listener Function) SR1 (Service Request Function) RL1 (Remote/Local Function) DC1 (Device Clear Function) DT1 (Device Trigger Function) C1 (System Controller Function) C2 (IFC Send Function) C3 (REN Send Function) C4 (SRQ Send Function) C5 (I/F Message Function) Unsupported Function TEO (Extended Talker Function) LE0 (Extended Listener Function) PP0 (Parallel Poll Function) I/O Connector 24 Pin Connector 57 LE-20240-77Q D35G (DDK Company) Power Source Power Voltage: +5V Power Consumption: 465mA (TYP) 430mA (MIN) 850mA (MAX) Operating Temperature Range: 10~35°C Port Address: <draw:frame draw:style-name="fr1" text:anchor-type="as-char"><draw:object xlink:href="Formula-76/" xlink:type="simple" xlink:show="embed" xlink:actuate="onLoad"/></draw:frame>EAFE1F Interrupt: Level 2/Level 4 (Selectable by Jumper Switch) Used DMA Channel: Channel #2</text:p>
      <text:p text:style-name="Text_20_body">•2 Circuit Outline</text:p>
      <text:p text:style-name="Text_20_body">The block diagram of CZ-6BGL is shown in Diagram 1. The GP-IB controller (µPD 7210) is connected to the external bus via a transceiver IC (SN 75160/75161).</text:p>
      <text:p text:style-name="Horizontal_20_Line"/>
      <text:p text:style-name="Horizontal_20_Line"/>
      <text:h text:style-name="Heading_20_2" text:outline-level="2"><text:bookmark-start text:name="outs-000147"/>outs-000147<text:bookmark-end text:name="outs-000147"/></text:h>
      <text:p text:style-name="First_20_paragraph">GP-IB Port</text:p>
      <text:p text:style-name="Text_20_body">● Fig. 1 CZ-6BG1 Block Diagram</text:p>
      <text:p text:style-name="Text_20_body">Expansion Slot</text:p>
      <text:p text:style-name="Text_20_body">X'TAL 16M 1/2 → CLK JP1 (??)</text:p>
      <text:p text:style-name="Text_20_body">IRQ2 IRQ4 IACK2 IACK4 INTERRUPT CONTROL → INT D0～D7</text:p>
      <text:p text:style-name="Text_20_body">245 → D0 - D7</text:p>
      <text:p text:style-name="Text_20_body">IDDIR R/W EXRESET AS LDS R/W CONTROL → CS, RD, WR, RESET</text:p>
      <text:p text:style-name="Text_20_body">EXREQ EXACK DTC IOCLK DMA CONTROL → DREQ, DACK</text:p>
      <text:p text:style-name="Text_20_body">EXOWN A4～A23 ADDRESS DECODE LS88K3</text:p>
      <text:p text:style-name="Text_20_body">A1～A3 244 → RS0, RS1, RS2</text:p>
      <text:p text:style-name="Text_20_body">µPD72101 GPIP-IFC</text:p>
      <text:p text:style-name="Text_20_body">DI01 - DI08 SN75160 TRANSCEIVERS T/R3, T/R1, T/R2</text:p>
      <text:p text:style-name="Text_20_body">REN, IFC, NDAC, NRFD, DAV, EOI, ATN, SRQ SN75161 TRANSCEIVERS</text:p>
      <text:p text:style-name="Text_20_body">IEEE std 488 INTERFACE BUS (GP-IB)</text:p>
      <text:p text:style-name="Text_20_body">Since almost everything related to the GP-IB bus operation is handled by the LSI here, the circuit configuration of the CZ-6BG1 consists only of the control circuit for connecting the µPD7210 to the expansion bus of the X68000, plus the interrupt vector generation circuit.</text:p>
      <text:p text:style-name="Text_20_body">143</text:p>
      <text:p text:style-name="Horizontal_20_Line"/>
      <text:h text:style-name="Heading_20_2" text:outline-level="2"><text:bookmark-start text:name="outs-000148"/>outs-000148<text:bookmark-end text:name="outs-000148"/></text:h>
      <text:p text:style-name="Horizontal_20_Line"/>
      <text:p text:style-name="First_20_paragraph"><text:span text:style-name="Strong_20_Emphasis">3 Major Component Layout</text:span></text:p>
      <text:p text:style-name="Text_20_body">The parts layout of CZ-6BG1 is shown in Figure 2.</text:p>
      <text:p text:style-name="Text_20_body">● Figure 2 - CZ-6BG1 Parts Layout</text:p>
      <text:p text:style-name="Horizontal_20_Line"/>
      <text:p text:style-name="First_20_paragraph">(Note: The number "144" at the bottom of the page appears to be a page number and doesn't need translation.)</text:p>
      <text:p text:style-name="Horizontal_20_Line"/>
      <text:h text:style-name="Heading_20_2" text:outline-level="2"><text:bookmark-start text:name="outs-000149"/>outs-000149<text:bookmark-end text:name="outs-000149"/></text:h>
      <text:p text:style-name="Horizontal_20_Line"/>
      <text:p text:style-name="First_20_paragraph"><text:span text:style-name="Strong_20_Emphasis">4 Settings</text:span></text:p>
      <text:p text:style-name="Text_20_body"><text:span text:style-name="Strong_20_Emphasis">4-1 Splitting</text:span></text:p>
      <text:p text:style-name="Text_20_body">By using jumper switch (JP1), you can select the slicing level to use with CZ-6BG1. If you short two, it will be level 2, and if you short four, it will be level 4 slicing. The factory setting uses level 2.</text:p>
      <text:p text:style-name="Text_20_body"><text:span text:style-name="Strong_20_Emphasis">5 I/O Map</text:span></text:p>
      <text:p text:style-name="Text_20_body">CZ-6BG1's I/O address map is shown in Figure 3. <draw:frame draw:style-name="fr1" text:anchor-type="as-char"><draw:object xlink:href="Formula-78/" xlink:type="simple" xlink:show="embed" xlink:actuate="onLoad"/></draw:frame>EAF0EF refers to the GP-IB controller LSI, and <draw:frame draw:style-name="fr1" text:anchor-type="as-char"><draw:object xlink:href="Formula-80/" xlink:type="simple" xlink:show="embed" xlink:actuate="onLoad"/></draw:frame>EAFE1F refers to the slicing vector number register. To understand how to use the µPD 7210, you need detailed knowledge of the operation of GP-IB buses, and a separate manual will explain the specific usage in detail.</text:p>
      <text:p text:style-name="Text_20_body">The slicing vector number register occupies 16 bytes in address space. In practice, only one 8-bit byte is used. <draw:frame draw:style-name="fr1" text:anchor-type="as-char"><draw:object xlink:href="Formula-82/" xlink:type="simple" xlink:show="embed" xlink:actuate="onLoad"/></draw:frame>EAFE1F is accessed by the vector number, which seems to be a mistake. During software development, you should assume the vector number register is located at $EAFE11.</text:p>
      <text:p text:style-name="Horizontal_20_Line"/>
      <text:p text:style-name="First_20_paragraph">Note: Minor adjustments were made for clarity and context.</text:p>
      <text:p text:style-name="Horizontal_20_Line"/>
      <text:h text:style-name="Heading_20_2" text:outline-level="2"><text:bookmark-start text:name="outs-000150"/>outs-000150<text:bookmark-end text:name="outs-000150"/></text:h>
      <text:p text:style-name="Horizontal_20_Line"/>
      <text:p text:style-name="First_20_paragraph"><text:span text:style-name="Strong_20_Emphasis">Fig. 3 GP-IB Board I/O Address Map</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header-rows>
          <table:table-row>
            <table:table-cell table:style-name="TableHeaderRowCell" office:value-type="string">
              <text:p text:style-name="Table_20_Heading">Device</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EAFE01</text:p>
          </table:table-cell>
          <table:table-cell table:style-name="TableRowCell" office:value-type="string">
            <text:p text:style-name="Table_20_Contents">0R</text:p>
          </table:table-cell>
          <table:table-cell table:style-name="TableRowCell" office:value-type="string">
            <text:p text:style-name="Table_20_Contents">Data In</text:p>
          </table:table-cell>
          <table:table-cell table:style-name="TableRowCell" office:value-type="string">
            <text:p text:style-name="Table_20_Contents">DI7</text:p>
          </table:table-cell>
          <table:table-cell table:style-name="TableRowCell" office:value-type="string">
            <text:p text:style-name="Table_20_Contents">DI6</text:p>
          </table:table-cell>
          <table:table-cell table:style-name="TableRowCell" office:value-type="string">
            <text:p text:style-name="Table_20_Contents">DI5</text:p>
          </table:table-cell>
          <table:table-cell table:style-name="TableRowCell" office:value-type="string">
            <text:p text:style-name="Table_20_Contents">DI4</text:p>
          </table:table-cell>
          <table:table-cell table:style-name="TableRowCell" office:value-type="string">
            <text:p text:style-name="Table_20_Contents">DI3</text:p>
          </table:table-cell>
          <table:table-cell table:style-name="TableRowCell" office:value-type="string">
            <text:p text:style-name="Table_20_Contents">DI2</text:p>
          </table:table-cell>
          <table:table-cell table:style-name="TableRowCell" office:value-type="string">
            <text:p text:style-name="Table_20_Contents">DI1</text:p>
          </table:table-cell>
          <table:table-cell table:style-name="TableRowCell" office:value-type="string">
            <text:p text:style-name="Table_20_Contents">DI0</text:p>
          </table:table-cell>
        </table:table-row>
        <table:table-row>
          <table:table-cell table:style-name="TableRowCell" office:value-type="string">
            <text:p text:style-name="Table_20_Contents">$EAFE03</text:p>
          </table:table-cell>
          <table:table-cell table:style-name="TableRowCell" office:value-type="string">
            <text:p text:style-name="Table_20_Contents">1R</text:p>
          </table:table-cell>
          <table:table-cell table:style-name="TableRowCell" office:value-type="string">
            <text:p text:style-name="Table_20_Contents">Interrupt Status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R</text:p>
          </table:table-cell>
          <table:table-cell table:style-name="TableRowCell" office:value-type="string">
            <text:p text:style-name="Table_20_Contents">Interrupt Status 2</text:p>
          </table:table-cell>
          <table:table-cell table:style-name="TableRowCell" office:value-type="string">
            <text:p text:style-name="Table_20_Contents">INT</text:p>
          </table:table-cell>
          <table:table-cell table:style-name="TableRowCell" office:value-type="string">
            <text:p text:style-name="Table_20_Contents">SRQI</text:p>
          </table:table-cell>
          <table:table-cell table:style-name="TableRowCell" office:value-type="string">
            <text:p text:style-name="Table_20_Contents">LOK</text:p>
          </table:table-cell>
          <table:table-cell table:style-name="TableRowCell" office:value-type="string">
            <text:p text:style-name="Table_20_Contents">REM</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R</text:p>
          </table:table-cell>
          <table:table-cell table:style-name="TableRowCell" office:value-type="string">
            <text:p text:style-name="Table_20_Contents">Serial Poll Status</text:p>
          </table:table-cell>
          <table:table-cell table:style-name="TableRowCell" office:value-type="string">
            <text:p text:style-name="Table_20_Contents">S8</text:p>
          </table:table-cell>
          <table:table-cell table:style-name="TableRowCell" office:value-type="string">
            <text:p text:style-name="Table_20_Contents">PEND</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R</text:p>
          </table:table-cell>
          <table:table-cell table:style-name="TableRowCell" office:value-type="string">
            <text:p text:style-name="Table_20_Contents">Address Status</text:p>
          </table:table-cell>
          <table:table-cell table:style-name="TableRowCell" office:value-type="string">
            <text:p text:style-name="Table_20_Contents">CIC</text:p>
          </table:table-cell>
          <table:table-cell table:style-name="TableRowCell" office:value-type="string">
            <text:p text:style-name="Table_20_Contents">ATN</text:p>
          </table:table-cell>
          <table:table-cell table:style-name="TableRowCell" office:value-type="string">
            <text:p text:style-name="Table_20_Contents">SPMS</text:p>
          </table:table-cell>
          <table:table-cell table:style-name="TableRowCell" office:value-type="string">
            <text:p text:style-name="Table_20_Contents">LPAS</text:p>
          </table:table-cell>
          <table:table-cell table:style-name="TableRowCell" office:value-type="string">
            <text:p text:style-name="Table_20_Contents">TPAS</text:p>
          </table:table-cell>
          <table:table-cell table:style-name="TableRowCell" office:value-type="string">
            <text:p text:style-name="Table_20_Contents">LA</text:p>
          </table:table-cell>
          <table:table-cell table:style-name="TableRowCell" office:value-type="string">
            <text:p text:style-name="Table_20_Contents">TA</text:p>
          </table:table-cell>
          <table:table-cell table:style-name="TableRowCell" office:value-type="string">
            <text:p text:style-name="Table_20_Contents">MIMN</text:p>
          </table:table-cell>
        </table:table-row>
        <table:table-row>
          <table:table-cell table:style-name="TableRowCell" office:value-type="string">
            <text:p text:style-name="Table_20_Contents">$EAFE0B</text:p>
          </table:table-cell>
          <table:table-cell table:style-name="TableRowCell" office:value-type="string">
            <text:p text:style-name="Table_20_Contents">5R</text:p>
          </table:table-cell>
          <table:table-cell table:style-name="TableRowCell" office:value-type="string">
            <text:p text:style-name="Table_20_Contents">Command Pass Through</text:p>
          </table:table-cell>
          <table:table-cell table:style-name="TableRowCell" office:value-type="string">
            <text:p text:style-name="Table_20_Contents">CPT7</text:p>
          </table:table-cell>
          <table:table-cell table:style-name="TableRowCell" office:value-type="string">
            <text:p text:style-name="Table_20_Contents">CPT6</text:p>
          </table:table-cell>
          <table:table-cell table:style-name="TableRowCell" office:value-type="string">
            <text:p text:style-name="Table_20_Contents">CPT5</text:p>
          </table:table-cell>
          <table:table-cell table:style-name="TableRowCell" office:value-type="string">
            <text:p text:style-name="Table_20_Contents">CPT4</text:p>
          </table:table-cell>
          <table:table-cell table:style-name="TableRowCell" office:value-type="string">
            <text:p text:style-name="Table_20_Contents">CPT3</text:p>
          </table:table-cell>
          <table:table-cell table:style-name="TableRowCell" office:value-type="string">
            <text:p text:style-name="Table_20_Contents">CPT2</text:p>
          </table:table-cell>
          <table:table-cell table:style-name="TableRowCell" office:value-type="string">
            <text:p text:style-name="Table_20_Contents">CPT1</text:p>
          </table:table-cell>
          <table:table-cell table:style-name="TableRowCell" office:value-type="string">
            <text:p text:style-name="Table_20_Contents">CPT0</text:p>
          </table:table-cell>
        </table:table-row>
        <table:table-row>
          <table:table-cell table:style-name="TableRowCell" office:value-type="string">
            <text:p text:style-name="Table_20_Contents">$EAFE0D</text:p>
          </table:table-cell>
          <table:table-cell table:style-name="TableRowCell" office:value-type="string">
            <text:p text:style-name="Table_20_Contents">6R</text:p>
          </table:table-cell>
          <table:table-cell table:style-name="TableRowCell" office:value-type="string">
            <text:p text:style-name="Table_20_Contents">Address 0</text:p>
          </table:table-cell>
          <table:table-cell table:style-name="TableRowCell" office:value-type="string">
            <text:p text:style-name="Table_20_Contents">DT0</text:p>
          </table:table-cell>
          <table:table-cell table:style-name="TableRowCell" office:value-type="string">
            <text:p text:style-name="Table_20_Contents">DL0</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cell table:style-name="TableRowCell" office:value-type="string">
    </table:table-cell>
        </table:table-row>
        <table:table-row>
          <table:table-cell table:style-name="TableRowCell" office:value-type="string">
            <text:p text:style-name="Table_20_Contents">$EAFE0F</text:p>
          </table:table-cell>
          <table:table-cell table:style-name="TableRowCell" office:value-type="string">
            <text:p text:style-name="Table_20_Contents">7R</text:p>
          </table:table-cell>
          <table:table-cell table:style-name="TableRowCell" office:value-type="string">
            <text:p text:style-name="Table_20_Contents">Address 1</text:p>
          </table:table-cell>
          <table:table-cell table:style-name="TableRowCell" office:value-type="string">
            <text:p text:style-name="Table_20_Contents">EO1</text:p>
          </table:table-cell>
          <table:table-cell table:style-name="TableRowCell" office:value-type="string">
            <text:p text:style-name="Table_20_Contents">DT1</text:p>
          </table:table-cell>
          <table:table-cell table:style-name="TableRowCell" office:value-type="string">
            <text:p text:style-name="Table_20_Contents">DL1</text:p>
          </table:table-cell>
          <table:table-cell table:style-name="TableRowCell" office:value-type="string">
            <text:p text:style-name="Table_20_Contents">AD5-0</text:p>
          </table:table-cell>
          <table:table-cell table:style-name="TableRowCell" office:value-type="string">
            <text:p text:style-name="Table_20_Contents">AD4-0</text:p>
          </table:table-cell>
          <table:table-cell table:style-name="TableRowCell" office:value-type="string">
            <text:p text:style-name="Table_20_Contents">AD3-0</text:p>
          </table:table-cell>
          <table:table-cell table:style-name="TableRowCell" office:value-type="string">
            <text:p text:style-name="Table_20_Contents">AD2-0</text:p>
          </table:table-cell>
          <table:table-cell table:style-name="TableRowCell" office:value-type="string">
            <text:p text:style-name="Table_20_Contents">AD1-0</text:p>
          </table:table-cell>
        </table:table-row>
        <table:table-row>
          <table:table-cell table:style-name="TableRowCell" office:value-type="string">
            <text:p text:style-name="Table_20_Contents">$EAFE01</text:p>
          </table:table-cell>
          <table:table-cell table:style-name="TableRowCell" office:value-type="string">
            <text:p text:style-name="Table_20_Contents">0W</text:p>
          </table:table-cell>
          <table:table-cell table:style-name="TableRowCell" office:value-type="string">
            <text:p text:style-name="Table_20_Contents">Byte Out</text:p>
          </table:table-cell>
          <table:table-cell table:style-name="TableRowCell" office:value-type="string">
            <text:p text:style-name="Table_20_Contents">BO7</text:p>
          </table:table-cell>
          <table:table-cell table:style-name="TableRowCell" office:value-type="string">
            <text:p text:style-name="Table_20_Contents">BO6</text:p>
          </table:table-cell>
          <table:table-cell table:style-name="TableRowCell" office:value-type="string">
            <text:p text:style-name="Table_20_Contents">BO5</text:p>
          </table:table-cell>
          <table:table-cell table:style-name="TableRowCell" office:value-type="string">
            <text:p text:style-name="Table_20_Contents">BO4</text:p>
          </table:table-cell>
          <table:table-cell table:style-name="TableRowCell" office:value-type="string">
            <text:p text:style-name="Table_20_Contents">BO3</text:p>
          </table:table-cell>
          <table:table-cell table:style-name="TableRowCell" office:value-type="string">
            <text:p text:style-name="Table_20_Contents">BO2</text:p>
          </table:table-cell>
          <table:table-cell table:style-name="TableRowCell" office:value-type="string">
            <text:p text:style-name="Table_20_Contents">BO1</text:p>
          </table:table-cell>
          <table:table-cell table:style-name="TableRowCell" office:value-type="string">
            <text:p text:style-name="Table_20_Contents">BO0</text:p>
          </table:table-cell>
        </table:table-row>
        <table:table-row>
          <table:table-cell table:style-name="TableRowCell" office:value-type="string">
            <text:p text:style-name="Table_20_Contents">$EAFE03</text:p>
          </table:table-cell>
          <table:table-cell table:style-name="TableRowCell" office:value-type="string">
            <text:p text:style-name="Table_20_Contents">1W</text:p>
          </table:table-cell>
          <table:table-cell table:style-name="TableRowCell" office:value-type="string">
            <text:p text:style-name="Table_20_Contents">Interrupt Mask 1</text:p>
          </table:table-cell>
          <table:table-cell table:style-name="TableRowCell" office:value-type="string">
            <text:p text:style-name="Table_20_Contents">CPT</text:p>
          </table:table-cell>
          <table:table-cell table:style-name="TableRowCell" office:value-type="string">
            <text:p text:style-name="Table_20_Contents">APT</text:p>
          </table:table-cell>
          <table:table-cell table:style-name="TableRowCell" office:value-type="string">
            <text:p text:style-name="Table_20_Contents">DET</text:p>
          </table:table-cell>
          <table:table-cell table:style-name="TableRowCell" office:value-type="string">
            <text:p text:style-name="Table_20_Contents">END</text:p>
          </table:table-cell>
          <table:table-cell table:style-name="TableRowCell" office:value-type="string">
            <text:p text:style-name="Table_20_Contents">DEC</text:p>
          </table:table-cell>
          <table:table-cell table:style-name="TableRowCell" office:value-type="string">
            <text:p text:style-name="Table_20_Contents">ERR</text:p>
          </table:table-cell>
          <table:table-cell table:style-name="TableRowCell" office:value-type="string">
            <text:p text:style-name="Table_20_Contents">DO</text:p>
          </table:table-cell>
          <table:table-cell table:style-name="TableRowCell" office:value-type="string">
            <text:p text:style-name="Table_20_Contents">DI</text:p>
          </table:table-cell>
        </table:table-row>
        <table:table-row>
          <table:table-cell table:style-name="TableRowCell" office:value-type="string">
            <text:p text:style-name="Table_20_Contents">$EAFE05</text:p>
          </table:table-cell>
          <table:table-cell table:style-name="TableRowCell" office:value-type="string">
            <text:p text:style-name="Table_20_Contents">2W</text:p>
          </table:table-cell>
          <table:table-cell table:style-name="TableRowCell" office:value-type="string">
            <text:p text:style-name="Table_20_Contents">Interrupt Mask 2</text:p>
          </table:table-cell>
          <table:table-cell table:style-name="TableRowCell" office:value-type="string">
            <text:p text:style-name="Table_20_Contents">'0'</text:p>
          </table:table-cell>
          <table:table-cell table:style-name="TableRowCell" office:value-type="string">
            <text:p text:style-name="Table_20_Contents">SRQI</text:p>
          </table:table-cell>
          <table:table-cell table:style-name="TableRowCell" office:value-type="string">
            <text:p text:style-name="Table_20_Contents">DMAO</text:p>
          </table:table-cell>
          <table:table-cell table:style-name="TableRowCell" office:value-type="string">
            <text:p text:style-name="Table_20_Contents">DMAI</text:p>
          </table:table-cell>
          <table:table-cell table:style-name="TableRowCell" office:value-type="string">
            <text:p text:style-name="Table_20_Contents">CO</text:p>
          </table:table-cell>
          <table:table-cell table:style-name="TableRowCell" office:value-type="string">
            <text:p text:style-name="Table_20_Contents">LOKC</text:p>
          </table:table-cell>
          <table:table-cell table:style-name="TableRowCell" office:value-type="string">
            <text:p text:style-name="Table_20_Contents">REMC</text:p>
          </table:table-cell>
          <table:table-cell table:style-name="TableRowCell" office:value-type="string">
            <text:p text:style-name="Table_20_Contents">AESC</text:p>
          </table:table-cell>
        </table:table-row>
        <table:table-row>
          <table:table-cell table:style-name="TableRowCell" office:value-type="string">
            <text:p text:style-name="Table_20_Contents">$EAFE07</text:p>
          </table:table-cell>
          <table:table-cell table:style-name="TableRowCell" office:value-type="string">
            <text:p text:style-name="Table_20_Contents">3W</text:p>
          </table:table-cell>
          <table:table-cell table:style-name="TableRowCell" office:value-type="string">
            <text:p text:style-name="Table_20_Contents">Serial Poll Mode</text:p>
          </table:table-cell>
          <table:table-cell table:style-name="TableRowCell" office:value-type="string">
            <text:p text:style-name="Table_20_Contents">S8</text:p>
          </table:table-cell>
          <table:table-cell table:style-name="TableRowCell" office:value-type="string">
            <text:p text:style-name="Table_20_Contents">rsv</text:p>
          </table:table-cell>
          <table:table-cell table:style-name="TableRowCell" office:value-type="string">
            <text:p text:style-name="Table_20_Contents">S6</text:p>
          </table:table-cell>
          <table:table-cell table:style-name="TableRowCell" office:value-type="string">
            <text:p text:style-name="Table_20_Contents">S5</text:p>
          </table:table-cell>
          <table:table-cell table:style-name="TableRowCell" office:value-type="string">
            <text:p text:style-name="Table_20_Contents">S4</text:p>
          </table:table-cell>
          <table:table-cell table:style-name="TableRowCell" office:value-type="string">
            <text:p text:style-name="Table_20_Contents">S3</text:p>
          </table:table-cell>
          <table:table-cell table:style-name="TableRowCell" office:value-type="string">
            <text:p text:style-name="Table_20_Contents">S2</text:p>
          </table:table-cell>
          <table:table-cell table:style-name="TableRowCell" office:value-type="string">
            <text:p text:style-name="Table_20_Contents">S1</text:p>
          </table:table-cell>
        </table:table-row>
        <table:table-row>
          <table:table-cell table:style-name="TableRowCell" office:value-type="string">
            <text:p text:style-name="Table_20_Contents">$EAFE09</text:p>
          </table:table-cell>
          <table:table-cell table:style-name="TableRowCell" office:value-type="string">
            <text:p text:style-name="Table_20_Contents">4W</text:p>
          </table:table-cell>
          <table:table-cell table:style-name="TableRowCell" office:value-type="string">
            <text:p text:style-name="Table_20_Contents">Address Mode</text:p>
          </table:table-cell>
          <table:table-cell table:style-name="TableRowCell" office:value-type="string">
            <text:p text:style-name="Table_20_Contents">Ion</text:p>
          </table:table-cell>
          <table:table-cell table:style-name="TableRowCell" office:value-type="string">
            <text:p text:style-name="Table_20_Contents">TRM1</text:p>
          </table:table-cell>
          <table:table-cell table:style-name="TableRowCell" office:value-type="string">
            <text:p text:style-name="Table_20_Contents">TRM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DM1</text:p>
          </table:table-cell>
          <table:table-cell table:style-name="TableRowCell" office:value-type="string">
            <text:p text:style-name="Table_20_Contents">ADM0</text:p>
          </table:table-cell>
          <table:table-cell table:style-name="TableRowCell" office:value-type="string">
    </table:table-cell>
        </table:table-row>
        <table:table-row>
          <table:table-cell table:style-name="TableRowCell" office:value-type="string">
            <text:p text:style-name="Table_20_Contents">$EAFE0B</text:p>
          </table:table-cell>
          <table:table-cell table:style-name="TableRowCell" office:value-type="string">
            <text:p text:style-name="Table_20_Contents">5W</text:p>
          </table:table-cell>
          <table:table-cell table:style-name="TableRowCell" office:value-type="string">
            <text:p text:style-name="Table_20_Contents">Auxiliary Mode</text:p>
          </table:table-cell>
          <table:table-cell table:style-name="TableRowCell" office:value-type="string">
            <text:p text:style-name="Table_20_Contents">CNT2</text:p>
          </table:table-cell>
          <table:table-cell table:style-name="TableRowCell" office:value-type="string">
            <text:p text:style-name="Table_20_Contents">CNT1</text:p>
          </table:table-cell>
          <table:table-cell table:style-name="TableRowCell" office:value-type="string">
            <text:p text:style-name="Table_20_Contents">CNT0</text:p>
          </table:table-cell>
          <table:table-cell table:style-name="TableRowCell" office:value-type="string">
            <text:p text:style-name="Table_20_Contents">COM4</text:p>
          </table:table-cell>
          <table:table-cell table:style-name="TableRowCell" office:value-type="string">
            <text:p text:style-name="Table_20_Contents">COM3</text:p>
          </table:table-cell>
          <table:table-cell table:style-name="TableRowCell" office:value-type="string">
            <text:p text:style-name="Table_20_Contents">COM2</text:p>
          </table:table-cell>
          <table:table-cell table:style-name="TableRowCell" office:value-type="string">
            <text:p text:style-name="Table_20_Contents">COM1</text:p>
          </table:table-cell>
          <table:table-cell table:style-name="TableRowCell" office:value-type="string">
            <text:p text:style-name="Table_20_Contents">COM0</text:p>
          </table:table-cell>
        </table:table-row>
        <table:table-row>
          <table:table-cell table:style-name="TableRowCell" office:value-type="string">
            <text:p text:style-name="Table_20_Contents">$EAFE0D</text:p>
          </table:table-cell>
          <table:table-cell table:style-name="TableRowCell" office:value-type="string">
            <text:p text:style-name="Table_20_Contents">6W</text:p>
          </table:table-cell>
          <table:table-cell table:style-name="TableRowCell" office:value-type="string">
            <text:p text:style-name="Table_20_Contents">Address 0/1</text:p>
          </table:table-cell>
          <table:table-cell table:style-name="TableRowCell" office:value-type="string">
            <text:p text:style-name="Table_20_Contents">ARS</text:p>
          </table:table-cell>
          <table:table-cell table:style-name="TableRowCell" office:value-type="string">
            <text:p text:style-name="Table_20_Contents">DT</text:p>
          </table:table-cell>
          <table:table-cell table:style-name="TableRowCell" office:value-type="string">
            <text:p text:style-name="Table_20_Contents">DL</text:p>
          </table:table-cell>
          <table:table-cell table:style-name="TableRowCell" office:value-type="string">
            <text:p text:style-name="Table_20_Contents">AD5</text:p>
          </table:table-cell>
          <table:table-cell table:style-name="TableRowCell" office:value-type="string">
            <text:p text:style-name="Table_20_Contents">AD4</text:p>
          </table:table-cell>
          <table:table-cell table:style-name="TableRowCell" office:value-type="string">
            <text:p text:style-name="Table_20_Contents">AD3</text:p>
          </table:table-cell>
          <table:table-cell table:style-name="TableRowCell" office:value-type="string">
            <text:p text:style-name="Table_20_Contents">AD2</text:p>
          </table:table-cell>
          <table:table-cell table:style-name="TableRowCell" office:value-type="string">
            <text:p text:style-name="Table_20_Contents">AD1</text:p>
          </table:table-cell>
        </table:table-row>
        <table:table-row>
          <table:table-cell table:style-name="TableRowCell" office:value-type="string">
            <text:p text:style-name="Table_20_Contents">$EAFE0F</text:p>
          </table:table-cell>
          <table:table-cell table:style-name="TableRowCell" office:value-type="string">
            <text:p text:style-name="Table_20_Contents">7W</text:p>
          </table:table-cell>
          <table:table-cell table:style-name="TableRowCell" office:value-type="string">
            <text:p text:style-name="Table_20_Contents">End of string</text:p>
          </table:table-cell>
          <table:table-cell table:style-name="TableRowCell" office:value-type="string">
            <text:p text:style-name="Table_20_Contents">EC7</text:p>
          </table:table-cell>
          <table:table-cell table:style-name="TableRowCell" office:value-type="string">
            <text:p text:style-name="Table_20_Contents">EC6</text:p>
          </table:table-cell>
          <table:table-cell table:style-name="TableRowCell" office:value-type="string">
            <text:p text:style-name="Table_20_Contents">EC5</text:p>
          </table:table-cell>
          <table:table-cell table:style-name="TableRowCell" office:value-type="string">
            <text:p text:style-name="Table_20_Contents">EC4</text:p>
          </table:table-cell>
          <table:table-cell table:style-name="TableRowCell" office:value-type="string">
            <text:p text:style-name="Table_20_Contents">EC3</text:p>
          </table:table-cell>
          <table:table-cell table:style-name="TableRowCell" office:value-type="string">
            <text:p text:style-name="Table_20_Contents">EC2</text:p>
          </table:table-cell>
          <table:table-cell table:style-name="TableRowCell" office:value-type="string">
            <text:p text:style-name="Table_20_Contents">EC1</text:p>
          </table:table-cell>
          <table:table-cell table:style-name="TableRowCell" office:value-type="string">
            <text:p text:style-name="Table_20_Contents">EC0</text:p>
          </table:table-cell>
        </table:table-row>
      </table:table>
      <text:p text:style-name="Preformatted_20_Text"><text:s text:c="3"/>$EAFE11 Special Interrupt Vector Number</text:p>
      <text:p text:style-name="Preformatted_20_Text"><text:s text:c="3"/>~$EAFE1F Interrupt Vector</text:p>
      <text:p text:style-name="First_20_paragraph"><text:span text:style-name="Strong_20_Emphasis">6 Connector Signal Arrangement</text:span></text:p>
      <text:p text:style-name="Text_20_body">Fig. 4 shows the signal arrangement of connectors on the CZ-6BG1. The physical form and signal arrangement of connectors follows the IEEE std. 488-1978.</text:p>
      <text:p text:style-name="Horizontal_20_Line"/>
      <text:p text:style-name="First_20_paragraph">The original formatting of the table has been maintained as closely as possible.</text:p>
      <text:p text:style-name="Horizontal_20_Line"/>
      <text:h text:style-name="Heading_20_2" text:outline-level="2"><text:bookmark-start text:name="outs-000151"/>outs-000151<text:bookmark-end text:name="outs-000151"/></text:h>
      <text:p text:style-name="First_20_paragraph">GP-IB Port</text:p>
      <text:p text:style-name="Text_20_body">Diagram 4: GP-IB Board Connector Signal Assignment</text:p>
      <text:p text:style-name="Text_20_body">[Diagram of a 24-pin connector with labels for each pin]</text:p>
      <text:p text:style-name="Text_20_body">Pin 1 - 13: Various signal labels such as DIO1, ATN, IFC, etc. Pin 14 - 24: Ground and other signal labels such as GND, REN, etc.</text:p>
      <text:p text:style-name="Text_20_body">BUS CONFIGURATION SIGNAL LINES</text:p>
      <text:p text:style-name="Text_20_body">DIO 1 (Data Input/Output 1): Transmit data DIO 2 (Data Input/Output 2): Address DIO 3 (Data Input/Output 3): Command DIO 4 (Data Input/Output 4): Measurement Data DIO 5 (Data Input/Output 5): Program Data DIO 6 (Data Input/Output 6): Display Data DIO 7 (Data Input/Output 7): Status DIO 8 (Data Input/Output 8)</text:p>
      <text:p text:style-name="Text_20_body">TRANSMISSION BUS</text:p>
      <text:p text:style-name="Text_20_body">DAV (Data Valid): Signal indicating the validity of the data on the data bus NRFD (Not Ready For Data): Signal indicating the receiver is not ready NDAC (Not Data Accepted): Signal indicating the data is not accepted</text:p>
      <text:p text:style-name="Text_20_body">ATN (Attention): Signal indicating the data on the bus is an address or command IFC (Interface Clear): Signal to initialize the interface SRQ (Service Request): Signal to request service REN (Remote Enable): Remote/Local designation signal EOI (End or Identify): Signal indicating the end of data or parallel poll execution</text:p>
      <text:p text:style-name="Horizontal_20_Line"/>
      <text:h text:style-name="Heading_20_2" text:outline-level="2"><text:bookmark-start text:name="outs-000152"/>outs-000152<text:bookmark-end text:name="outs-000152"/></text:h>
      <text:p text:style-name="First_20_paragraph">"7 Circuit Diagram The circuit diagram for CZ-6BG1 is shown in Figure 5. ●Figure.....5 Circuit diagram for CZ-6BG1 (No end reference)"</text:p>
      <text:p text:style-name="Horizontal_20_Line"/>
      <text:h text:style-name="Heading_20_2" text:outline-level="2"><text:bookmark-start text:name="outs-000153"/>outs-000153<text:bookmark-end text:name="outs-000153"/></text:h>
      <text:p text:style-name="Horizontal_20_Line"/>
      <text:p text:style-name="First_20_paragraph"><text:span text:style-name="Strong_20_Emphasis">RS-232C Board</text:span> (CZ-6BF1)</text:p>
      <text:p text:style-name="Text_20_body">RS-232C is a commonly used interface for relatively low-speed data transfer, and it is standard equipment even in notebook computers. The RS-232C board is used to add an additional two-channel RS-232C port to the X68000.</text:p>
      <text:p text:style-name="Text_20_body">The RS-232C board adds two channels per board of RS-232C ports to the X68000. The built-in RS-232C interface uses the same 8530 SCC, and it supports various transmission modes. Additionally, channel A supports high-speed transmission via DMA, and channel B allows for the provision of external power (+5V / +12V / -12V). This capability is useful when connecting optical modems, as it allows for the reduction of external power loads.</text:p>
      <text:p text:style-name="Text_20_body"><text:span text:style-name="Strong_20_Emphasis">1 Specifications</text:span></text:p>
      <text:p text:style-name="Text_20_body">Main LSI Transmission Controller LSI: LH8530-SCC</text:p>
      <text:p text:style-name="Text_20_body">Serial Interface Standard Specifications: RS-232C (EIA), JIS-X 5101</text:p>
      <text:p text:style-name="Text_20_body">Number of Channels: 2</text:p>
      <text:p text:style-name="Text_20_body">Communication Method: Asynchronous, Synchronous</text:p>
      <text:p text:style-name="Horizontal_20_Line"/>
      <text:p text:style-name="First_20_paragraph">(Page 149)</text:p>
      <text:p text:style-name="Horizontal_20_Line"/>
      <text:h text:style-name="Heading_20_2" text:outline-level="2"><text:bookmark-start text:name="outs-000154"/>outs-000154<text:bookmark-end text:name="outs-000154"/></text:h>
      <text:p text:style-name="Horizontal_20_Line"/>
      <text:p text:style-name="First_20_paragraph">Baud Rate .......... 75~19200 bps Character Length .. 5/6/7/8 Stop Bit Length .... 1/1.5/2 Parity Bit Length ..... None/Even/Odd I/O Connector ..... 25-pin D-SUB Connector</text:p>
      <text:p text:style-name="Text_20_body">Power Supply Voltage/Current (Excluding external supply) ..... +5V/+12V/-12V Current ..... +5V .......... 370mA ..... +12V ........ 35mA ..... -12V ......... 50mA Operating Temperature Range ..... 10~30°C Port Address ..... <draw:frame draw:style-name="fr1" text:anchor-type="as-char"><draw:object xlink:href="Formula-84/" xlink:type="simple" xlink:show="embed" xlink:actuate="onLoad"/></draw:frame>EAFC09/<draw:frame draw:style-name="fr1" text:anchor-type="as-char"><draw:object xlink:href="Formula-86/" xlink:type="simple" xlink:show="embed" xlink:actuate="onLoad"/></draw:frame>EAFC19 ..... <draw:frame draw:style-name="fr1" text:anchor-type="as-char"><draw:object xlink:href="Formula-88/" xlink:type="simple" xlink:show="embed" xlink:actuate="onLoad"/></draw:frame>EAFC29/<draw:frame draw:style-name="fr1" text:anchor-type="as-char"><draw:object xlink:href="Formula-90/" xlink:type="simple" xlink:show="embed" xlink:actuate="onLoad"/></draw:frame>EAFC39 One of these four types (select using jumper switch) Level 2/Level 4 (select using jumper switch)</text:p>
      <text:list text:style-name="Numbering_20_1" text:start-value="2">
        <text:list-item>
          <text:p text:style-name="List_20_Number_20_Tight">Circuit Overview</text:p>
        </text:list-item>
      </text:list>
      <text:p text:style-name="First_20_paragraph">The block diagram of the CZ-6BF1 is shown in Figure 1. The RS-232C interface used in the X68000 main body has the same LSI (LH8530SCC) as the CZ-6BF1, so it has one SCC. The CZ-6BF1 is designed with two RS-232C connectors since it has two channels.</text:p>
      <text:p text:style-name="Text_20_body">In the CZ-6BF1, SCC's A-channel's DSR signal, B-channel's DTR, CTS, DCD signals can each be switched to A-channel or B-channel clock sources (configured inside the SCC, selectable by ST2) to drive CI signal and CD signal.</text:p>
      <text:p text:style-name="Text_20_body">Switching the clock for each channel, replacing DTR and CTS, and making the DSR signal inactive are possible. In the CZ-6BF1, an independent I/O port can be established for switching the clock of B-channel and the DTR output, and manually observing the CTS and DSR signals from the connected device.</text:p>
      <text:p text:style-name="Text_20_body">By adhering strictly to the RS-232C standard, this unique peripheral device has been implemented with both A-channel and serial transmission.</text:p>
      <text:p text:style-name="Horizontal_20_Line"/>
      <text:p text:style-name="Horizontal_20_Line"/>
      <text:h text:style-name="Heading_20_2" text:outline-level="2"><text:bookmark-start text:name="outs-000155"/>outs-000155<text:bookmark-end text:name="outs-000155"/></text:h>
      <text:p text:style-name="First_20_paragraph">Top text: "It can also be seen as a convenient B channel for connection."</text:p>
      <text:p text:style-name="Text_20_body">Diagram title: "● Figure 1 CZ-6BF1 Block Diagram"</text:p>
      <text:p text:style-name="Text_20_body">Labels in the block diagram:</text:p>
      <text:list text:style-name="List_20_1">
        <text:list-item>
          <text:p text:style-name="List_20_Bullet_20_Tight">"10MHz"</text:p>
        </text:list-item>
        <text:list-item>
          <text:p text:style-name="List_20_Bullet_20_Tight">"1/2 Frequency"</text:p>
        </text:list-item>
        <text:list-item>
          <text:p text:style-name="List_20_Bullet_20_Tight">"CLK"</text:p>
        </text:list-item>
        <text:list-item>
          <text:p text:style-name="List_20_Bullet_20_Tight">"Expanded I/O Slot"</text:p>
        </text:list-item>
        <text:list-item>
          <text:p text:style-name="List_20_Bullet_20_Tight">"Address Decoder"</text:p>
        </text:list-item>
        <text:list-item>
          <text:p text:style-name="List_20_Bullet_20_Tight">"LH8530A SCC"</text:p>
        </text:list-item>
        <text:list-item>
          <text:p text:style-name="List_20_Bullet_20_Tight">"Buffer"</text:p>
        </text:list-item>
        <text:list-item>
          <text:p text:style-name="List_20_Bullet_20_Tight">"A/B"</text:p>
        </text:list-item>
        <text:list-item>
          <text:p text:style-name="List_20_Bullet_20_Tight">"D/C"</text:p>
        </text:list-item>
        <text:list-item>
          <text:p text:style-name="List_20_Bullet_20_Tight">"Controller"</text:p>
        </text:list-item>
        <text:list-item>
          <text:p text:style-name="List_20_Bullet_20_Tight">"RD"</text:p>
        </text:list-item>
        <text:list-item>
          <text:p text:style-name="List_20_Bullet_20_Tight">"WR"</text:p>
        </text:list-item>
        <text:list-item>
          <text:p text:style-name="List_20_Bullet_20_Tight">"CE"</text:p>
        </text:list-item>
        <text:list-item>
          <text:p text:style-name="List_20_Bullet_20_Tight">"Data Bus"</text:p>
        </text:list-item>
        <text:list-item>
          <text:p text:style-name="List_20_Bullet_20_Tight">"D0 - D7"</text:p>
        </text:list-item>
        <text:list-item>
          <text:p text:style-name="List_20_Bullet_20_Tight">"INTACK"</text:p>
        </text:list-item>
        <text:list-item>
          <text:p text:style-name="List_20_Bullet_20_Tight">"INT"</text:p>
        </text:list-item>
        <text:list-item>
          <text:p text:style-name="List_20_Bullet_20_Tight">"REQA"</text:p>
        </text:list-item>
        <text:list-item>
          <text:p text:style-name="List_20_Bullet_20_Tight">"Controller Interrupt"</text:p>
        </text:list-item>
        <text:list-item>
          <text:p text:style-name="List_20_Bullet_20_Tight">"External B Channel Register"</text:p>
        </text:list-item>
        <text:list-item>
          <text:p text:style-name="List_20_Bullet_20_Tight">"Driver"</text:p>
        </text:list-item>
        <text:list-item>
          <text:p text:style-name="List_20_Bullet_20_Tight">"Driver"</text:p>
        </text:list-item>
        <text:list-item>
          <text:p text:style-name="List_20_Bullet_20_Tight">"Receiver"</text:p>
        </text:list-item>
        <text:list-item>
          <text:p text:style-name="List_20_Bullet_20_Tight">"Receiver"</text:p>
        </text:list-item>
        <text:list-item>
          <text:p text:style-name="List_20_Bullet_20_Tight">"RS-232C (A CH)"</text:p>
        </text:list-item>
        <text:list-item>
          <text:p text:style-name="List_20_Bullet_20_Tight">"RS-232C (B CH)"</text:p>
        </text:list-item>
      </text:list>
      <text:p text:style-name="First_20_paragraph">Bottom page number: "151"</text:p>
      <text:p text:style-name="Horizontal_20_Line"/>
      <text:h text:style-name="Heading_20_2" text:outline-level="2"><text:bookmark-start text:name="outs-000156"/>outs-000156<text:bookmark-end text:name="outs-000156"/></text:h>
      <text:p text:style-name="Horizontal_20_Line"/>
      <text:p text:style-name="First_20_paragraph">3 Main Component Placement</text:p>
      <text:p text:style-name="Text_20_body">The component layout of CZ-6BF1 is shown in diagram 2.</text:p>
      <text:p text:style-name="Text_20_body">■ Diagram 2: CZ-6BF1 Component Layout</text:p>
      <text:p text:style-name="Horizontal_20_Line"/>
      <text:p text:style-name="First_20_paragraph">The number at the bottom of the page "152" is likely a page number and does not require translation. The visual diagram below the text appears to represent the placement of components on a circuit board labeled "CZ-6BF1".</text:p>
      <text:p text:style-name="Horizontal_20_Line"/>
      <text:h text:style-name="Heading_20_2" text:outline-level="2"><text:bookmark-start text:name="outs-000157"/>outs-000157<text:bookmark-end text:name="outs-000157"/></text:h>
      <text:p text:style-name="Horizontal_20_Line"/>
      <text:p text:style-name="First_20_paragraph">• 4 Setting</text:p>
      <text:p text:style-name="Text_20_body">4-1 Setting the Board Address</text:p>
      <text:p text:style-name="Text_20_body">By using the switch (SW1) on the board, you can change I/O port addresses (refer to Figure 3).</text:p>
      <text:p text:style-name="Text_20_body">● Figure 3 Dip Switch (SW1)</text:p>
      <text:p text:style-name="Text_20_body">[Diagram of switch]</text:p>
      <text:p text:style-name="Text_20_body">SW1 ON: 0 OFF: 1</text:p>
      <text:p text:style-name="Text_20_body">In the example to the left, the setting is as it is when shipped from the factory.</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SW1</text:p>
            </table:table-cell>
            <table:table-cell table:style-name="TableHeaderRowCell" office:value-type="string">
              <text:p text:style-name="Table_20_Heading">Board Number</text:p>
            </table:table-cell>
            <table:table-cell table:style-name="TableHeaderRowCell" office:value-type="string">
              <text:p text:style-name="Table_20_Heading">I/O Port Address</text:p>
            </table:table-cell>
          </table:table-row>
        </table:table-header-rows>
        <table:table-row>
          <table:table-cell table:style-name="TableRowCell" office:value-type="string">
            <text:p text:style-name="Table_20_Contents">ON ON</text:p>
          </table:table-cell>
          <table:table-cell table:style-name="TableRowCell" office:value-type="string">
            <text:p text:style-name="Table_20_Contents">0 (1st board)</text:p>
          </table:table-cell>
          <table:table-cell table:style-name="TableRowCell" office:value-type="string">
            <text:p text:style-name="Table_20_Contents">$EAFC01 ~ $EAFC09</text:p>
          </table:table-cell>
        </table:table-row>
        <table:table-row>
          <table:table-cell table:style-name="TableRowCell" office:value-type="string">
            <text:p text:style-name="Table_20_Contents">OFF ON</text:p>
          </table:table-cell>
          <table:table-cell table:style-name="TableRowCell" office:value-type="string">
            <text:p text:style-name="Table_20_Contents">1 (2nd board)</text:p>
          </table:table-cell>
          <table:table-cell table:style-name="TableRowCell" office:value-type="string">
            <text:p text:style-name="Table_20_Contents">$EAFC11 ~ $EAFC19</text:p>
          </table:table-cell>
        </table:table-row>
        <table:table-row>
          <table:table-cell table:style-name="TableRowCell" office:value-type="string">
            <text:p text:style-name="Table_20_Contents">ON OFF</text:p>
          </table:table-cell>
          <table:table-cell table:style-name="TableRowCell" office:value-type="string">
            <text:p text:style-name="Table_20_Contents">1 (3rd board)</text:p>
          </table:table-cell>
          <table:table-cell table:style-name="TableRowCell" office:value-type="string">
            <text:p text:style-name="Table_20_Contents">$EAFC21 ~ $EAFC29</text:p>
          </table:table-cell>
        </table:table-row>
        <table:table-row>
          <table:table-cell table:style-name="TableRowCell" office:value-type="string">
            <text:p text:style-name="Table_20_Contents">OFF OFF</text:p>
          </table:table-cell>
          <table:table-cell table:style-name="TableRowCell" office:value-type="string">
            <text:p text:style-name="Table_20_Contents">2 (4th board)</text:p>
          </table:table-cell>
          <table:table-cell table:style-name="TableRowCell" office:value-type="string">
            <text:p text:style-name="Table_20_Contents">$EAFC31 ~ $EAFC39</text:p>
          </table:table-cell>
        </table:table-row>
      </table:table>
      <text:p text:style-name="First_20_paragraph">When both 2-bit switches of SW1 are ON, $EAF01 ~ $EAFC09 is used. If the first is ON and the second is OFF, $EAFC11 ~ $EAFC19 is used. If the first is OFF and the second is ON, $EAFC21 ~ $EAFC29 is used. If both are OFF, $EAFC31 ~ $EAFC39 is used.</text:p>
      <text:p text:style-name="Text_20_body">4-2 Interrupt Assignment</text:p>
      <text:p text:style-name="Text_20_body">By setting the jumper switch (JP1), you can select the interrupt level to use (refer to Figure 4). Shorting pins 1 and 2 will use IRQ 2, and shorting pins 2 and 4 will use IRQ 4.</text:p>
      <text:p text:style-name="Horizontal_20_Line"/>
      <text:p text:style-name="First_20_paragraph">Page 153</text:p>
      <text:p text:style-name="Horizontal_20_Line"/>
      <text:h text:style-name="Heading_20_2" text:outline-level="2"><text:bookmark-start text:name="outs-000158"/>outs-000158<text:bookmark-end text:name="outs-000158"/></text:h>
      <text:p text:style-name="First_20_paragraph">●Fig. 4 Jumper Switch (JP1)</text:p>
      <text:p text:style-name="Text_20_body">[Diagram showing Jumper Switch JP1]</text:p>
      <text:p text:style-name="Text_20_body">JP1 2 - Interrupt level 2 (IRQ2) 4 - Interrupt level 4 (IRQ4)</text:p>
      <text:p text:style-name="Text_20_body">5 I/O Map</text:p>
      <text:p text:style-name="Text_20_body">The I/O address map of the CZ-6BF1 is shown in Figure 5. For details on how to use the LH8530 (SCC), please refer to my book "Inside X68000."</text:p>
      <text:p text:style-name="Text_20_body">●Fig. 5 I/O Address Map of the RS-232C Board</text:p>
      <text:p text:style-name="Text_20_body">[Device, Address, Register, Bits (7-0)]</text:p>
      <text:p text:style-name="Text_20_body">LH8530 Base address + $01 Command register, B port</text:p>
      <text:list text:style-name="List_20_1">
        <text:list-item>
          <text:p text:style-name="List_20_Bullet">$03 Data register, B port</text:p>
        </text:list-item>
        <text:list-item>
          <text:p text:style-name="List_20_Bullet">$05 Command register, A port</text:p>
        </text:list-item>
        <text:list-item>
          <text:p text:style-name="List_20_Bullet">$07 Data register, A port</text:p>
        </text:list-item>
      </text:list>
      <text:p text:style-name="First_20_paragraph">LS374 WRITE + $09 External B-channel write register</text:p>
      <text:p text:style-name="Text_20_body">LS244 READ External B-channel read register</text:p>
      <text:p text:style-name="Text_20_body">Base address: $EAFC00 (board 1) / $EAFC10 (board 2) / $EAFC20 (board 3) / $EAFC30 (board 4)</text:p>
      <text:p text:style-name="Horizontal_20_Line"/>
      <text:h text:style-name="Heading_20_2" text:outline-level="2"><text:bookmark-start text:name="outs-000159"/>outs-000159<text:bookmark-end text:name="outs-000159"/></text:h>
      <text:p text:style-name="Horizontal_20_Line"/>
      <text:p text:style-name="First_20_paragraph">RS-232C Board</text:p>
      <text:p text:style-name="Text_20_body">● External Channel B Write Register</text:p>
      <text:p text:style-name="Preformatted_20_Text"><text:s text:c="1"/>bit 7 6 5 4 3 2 1 bit 0</text:p>
      <text:p text:style-name="Preformatted_20_Text"><text:s text:c="31"/>DTR STB</text:p>
      <text:p text:style-name="Preformatted_20_Text"><text:s text:c="1"/>Clock selection for synchronous communication transmission timing</text:p>
      <text:p text:style-name="Preformatted_20_Text"><text:s text:c="1"/>'1': Use the clock from CPC187</text:p>
      <text:p text:style-name="Preformatted_20_Text"><text:s text:c="1"/>'0': Use the input on ST2 (ST1 = ST2)</text:p>
      <text:p text:style-name="Preformatted_20_Text"><text:s text:c="1"/>Set the state of the DTR signal for Channel B</text:p>
      <text:p text:style-name="Preformatted_20_Text"><text:s text:c="1"/>'1': Set the DTR terminal to OFF</text:p>
      <text:p text:style-name="Preformatted_20_Text"><text:s text:c="1"/>'0': Set the DTR terminal to ON</text:p>
      <text:p text:style-name="First_20_paragraph">● External Channel B Read Register</text:p>
      <text:p text:style-name="Preformatted_20_Text"><text:s text:c="1"/>bit 7 6 5 4 3 2 1 bit 0 <text:s text:c="1"/></text:p>
      <text:p text:style-name="Preformatted_20_Text"><text:s text:c="31"/>DTR STB <text:s text:c="2"/>CTS <text:s text:c="2"/>DSR </text:p>
      <text:p text:style-name="Preformatted_20_Text"><text:s text:c="1"/>Display the state of the DSR signal for Channel B</text:p>
      <text:p text:style-name="Preformatted_20_Text"><text:s text:c="1"/>'1': Display the DSR status as OFF</text:p>
      <text:p text:style-name="Preformatted_20_Text"><text:s text:c="1"/>'0': Display the DSR status as ON</text:p>
      <text:p text:style-name="Preformatted_20_Text"><text:s text:c="1"/>Display the state of the CTS signal for Channel B</text:p>
      <text:p text:style-name="Preformatted_20_Text"><text:s text:c="1"/>'1': Display the CTS status as OFF</text:p>
      <text:p text:style-name="Preformatted_20_Text"><text:s text:c="1"/>'0': Display the CTS status as ON <text:s text:c="1"/></text:p>
      <text:p text:style-name="Preformatted_20_Text"><text:s text:c="1"/>Display the state of the STB bit in the Channel B write register</text:p>
      <text:p text:style-name="Preformatted_20_Text"><text:s text:c="1"/>Display the state of the DTR bit in the Channel B write register</text:p>
      <text:p text:style-name="First_20_paragraph">●6 Connector Signal Arrangement</text:p>
      <text:p text:style-name="Text_20_body">The connector signal arrangement for CZ-6BF1 is shown in Example 6. CZ-6BF1 has a two-channel RS-232C connector. Remember that Channel B does not have CD or CI signals and terminal pins that are not connected can supply potential (+5 V, + 12 V, - 12 V). Please be careful about that.</text:p>
      <text:p text:style-name="Horizontal_20_Line"/>
      <text:p text:style-name="First_20_paragraph">Page 155</text:p>
      <text:p text:style-name="Horizontal_20_Line"/>
      <text:h text:style-name="Heading_20_2" text:outline-level="2"><text:bookmark-start text:name="outs-000160"/>outs-000160<text:bookmark-end text:name="outs-000160"/></text:h>
      <text:p text:style-name="First_20_paragraph">When making cables to connect to other devices, it is recommended to keep the pins with potential power output (pins 9, 10, and 14) open.</text:p>
      <text:p text:style-name="Text_20_body">Figure 6 - Pinout of RS-232C Board Connector</text:p>
      <text:p text:style-name="Text_20_body">(View from the cable connection side)</text:p>
      <text:p text:style-name="Text_20_body">Pin No. Signal Name Function Direction Standards Remarks</text:p>
      <text:p text:style-name="Preformatted_20_Text"><text:s text:c="1"/>1 <text:s text:c="7"/>FG <text:s text:c="11"/>Protective Ground <text:s text:c="21"/>--- <text:s text:c="15"/>JIS <text:s text:c="3"/>EIA <text:s text:c="2"/>CCITT</text:p>
      <text:p text:style-name="Preformatted_20_Text"><text:s text:c="82"/>SG <text:s text:c="4"/>AB <text:s text:c="3"/>102 </text:p>
      <text:p text:style-name="Preformatted_20_Text"><text:s text:c="1"/>2 <text:s text:c="7"/>TXD <text:s text:c="10"/>Transmitted Data <text:s text:c="22"/>DTE/DOE <text:s text:c="11"/>SD <text:s text:c="4"/>BA <text:s text:c="3"/>103 <text:s text:c="9"/>Output</text:p>
      <text:p text:style-name="Preformatted_20_Text"><text:s text:c="1"/>3 <text:s text:c="7"/>RXD <text:s text:c="10"/>Received Data <text:s text:c="25"/>--- <text:s text:c="15"/>RD <text:s text:c="4"/>BB <text:s text:c="3"/>104 <text:s text:c="9"/>Input</text:p>
      <text:p text:style-name="Preformatted_20_Text"><text:s text:c="1"/>4 <text:s text:c="7"/>RTS <text:s text:c="10"/>Request to Send <text:s text:c="23"/>--- <text:s text:c="15"/>RS <text:s text:c="4"/>CA <text:s text:c="3"/>105 <text:s text:c="9"/>Output</text:p>
      <text:p text:style-name="Preformatted_20_Text"><text:s text:c="1"/>5 <text:s text:c="7"/>CTS <text:s text:c="10"/>Clear to Send <text:s text:c="25"/>--- <text:s text:c="15"/>CS <text:s text:c="4"/>CB <text:s text:c="3"/>106 <text:s text:c="9"/>Input</text:p>
      <text:p text:style-name="Preformatted_20_Text"><text:s text:c="1"/>6 <text:s text:c="7"/>DSR <text:s text:c="10"/>Data Set Ready <text:s text:c="24"/>--- <text:s text:c="15"/>DR <text:s text:c="4"/>CC <text:s text:c="3"/>107 <text:s text:c="9"/>Input</text:p>
      <text:p text:style-name="Preformatted_20_Text"><text:s text:c="1"/>7 <text:s text:c="7"/>SG <text:s text:c="11"/>Signal Ground <text:s text:c="25"/>--- <text:s text:c="15"/>SG <text:s text:c="4"/>AB <text:s text:c="3"/>102</text:p>
      <text:p text:style-name="Preformatted_20_Text"><text:s text:c="1"/>8 <text:s text:c="7"/>CD <text:s text:c="11"/>Carrier Detect <text:s text:c="24"/>--- <text:s text:c="15"/>CD <text:s text:c="4"/>CF <text:s text:c="3"/>109 <text:s text:c="9"/>Input</text:p>
      <text:p text:style-name="Preformatted_20_Text"><text:s text:c="1"/>9 <text:s text:c="7"/>+12V <text:s text:c="9"/>DC +12V <text:s text:c="31"/>--- <text:s text:c="15"/>--- <text:s text:c="3"/>--- <text:s text:c="2"/>--- <text:s text:c="9"/>Output *</text:p>
      <text:p text:style-name="First_20_paragraph">10 −12V DC −12V --- --- --- --- Output * 14 +5V DC +5V --- --- --- --- Output * 15 ST2 Transmit Signal Element Timing DCE ST2 DB 114 Input Secondary Transmit Timing 17 RT Received Signal Element Timing DCE RT DD 115 Input</text:p>
      <text:p text:style-name="Preformatted_20_Text"><text:s text:c="26"/>Secondary Receive Timing</text:p>
      <text:p text:style-name="Preformatted_20_Text"><text:s text:c="1"/>20 <text:s text:c="6"/>DTR <text:s text:c="10"/>Data Terminal Ready <text:s text:c="19"/>DTE/DOE <text:s text:c="11"/>ER <text:s text:c="4"/>CD <text:s text:c="3"/>108/2 <text:s text:c="6"/>Output</text:p>
      <text:p text:style-name="Preformatted_20_Text"><text:s text:c="1"/>21 <text:s text:c="6"/>CI <text:s text:c="11"/>Composite Indicator <text:s text:c="19"/>DCE <text:s text:c="15"/>CI <text:s text:c="4"/>CE <text:s text:c="3"/>125 <text:s text:c="9"/>Input</text:p>
      <text:p text:style-name="Preformatted_20_Text"><text:s text:c="1"/>24 <text:s text:c="6"/>ST1 <text:s text:c="10"/>Transmit Signal Element Timing <text:s text:c="8"/>DCE <text:s text:c="15"/>ST1 <text:s text:c="3"/>DA <text:s text:c="3"/>113 <text:s text:c="9"/>Output</text:p>
      <text:p text:style-name="Preformatted_20_Text"><text:s text:c="28"/>Primary Status Timing</text:p>
      <text:p text:style-name="First_20_paragraph">*1 - B channel connection is not used. *2 - B channel connection can be achieved via JP2. A channel connection is not used.</text:p>
      <text:p text:style-name="Horizontal_20_Line"/>
      <text:h text:style-name="Heading_20_2" text:outline-level="2"><text:bookmark-start text:name="outs-000161"/>outs-000161<text:bookmark-end text:name="outs-000161"/></text:h>
      <text:p text:style-name="First_20_paragraph">RS-232C Board</text:p>
      <text:p text:style-name="Text_20_body">•7 Schematic Diagram</text:p>
      <text:p text:style-name="Text_20_body">Please refer to Figure 7 for the schematic of the CZ-6BF1, and to Figure 8 for the equivalent circuit of the PAL on the base.</text:p>
      <text:p text:style-name="Text_20_body">● Figure 7 CZ-6BF1 Schematic Diagram (refer to the reference materials)</text:p>
      <text:p text:style-name="Horizontal_20_Line"/>
      <text:h text:style-name="Heading_20_2" text:outline-level="2"><text:bookmark-start text:name="outs-000162"/>outs-000162<text:bookmark-end text:name="outs-000162"/></text:h>
      <text:p text:style-name="First_20_paragraph">●Fig. 8 Equivalent Circuit of the PAL</text:p>
      <text:p text:style-name="Horizontal_20_Line"/>
      <text:h text:style-name="Heading_20_2" text:outline-level="2"><text:bookmark-start text:name="outs-000163"/>outs-000163<text:bookmark-end text:name="outs-000163"/></text:h>
      <text:p text:style-name="First_20_paragraph"><text:span text:style-name="Strong_20_Emphasis">FAX Board (CZ-6BC1)</text:span></text:p>
      <text:p text:style-name="Text_20_body">Using fax for image transmission allows not only text but also graphics screens to be sent almost without degradation in image quality. The FAX board connects directly to the public line from X68000 and performs fax communication.</text:p>
      <text:p text:style-name="Text_20_body">FAX board (CZ-6BC1) is a modem board that can perform half-duplex data communication at 4800 bps using a telephone line (complying with CCITT V.27 ter and V.21 channel 2). By using the software "FAX Tool" included with the board, you can perform G3-standard fax communication.</text:p>
      <text:p text:style-name="Text_20_body"><text:span text:style-name="Strong_20_Emphasis">1 Specifications</text:span></text:p>
      <text:list text:style-name="List_20_1">
        <text:list-item>
          <text:p text:style-name="List_20_Bullet_20_Tight">Main LSI:</text:p>
        </text:list-item>
      </text:list>
      <text:p text:style-name="Preformatted_20_Text"><text:s text:c="2"/>- Modem LSI: R48MFX</text:p>
      <text:p text:style-name="Preformatted_20_Text"><text:s text:c="2"/>- Status input/control: 82C55</text:p>
      <text:list text:style-name="List_20_1">
        <text:list-item>
          <text:p text:style-name="List_20_Bullet_20_Tight">Options:</text:p>
        </text:list-item>
      </text:list>
      <text:p text:style-name="Preformatted_20_Text"><text:s text:c="2"/>- Communication control LSI: Z8530 (SCC)</text:p>
      <text:p text:style-name="Preformatted_20_Text"><text:s text:c="2"/>- 9600 bps modem LSI: R96MD</text:p>
      <text:p text:style-name="Horizontal_20_Line"/>
      <text:h text:style-name="Heading_20_2" text:outline-level="2"><text:bookmark-start text:name="outs-000164"/>outs-000164<text:bookmark-end text:name="outs-000164"/></text:h>
      <text:p text:style-name="Horizontal_20_Line"/>
      <text:p text:style-name="First_20_paragraph">Lines</text:p>
      <text:p text:style-name="Text_20_body">Applicable Lines: General public telephone lines, PBX internal lines</text:p>
      <text:p text:style-name="Text_20_body">Line Connection Method: Communication Connector (Modular Jack)</text:p>
      <text:p text:style-name="Text_20_body">NCU Part: Type AA (Software Control)</text:p>
      <text:p text:style-name="Text_20_body">Dial Signal Type: DP (10 PPS/20 PPS), PB</text:p>
      <text:p text:style-name="Text_20_body">Modem:</text:p>
      <text:p text:style-name="Text_20_body">Communication Speed: 300/2400/4800 bps</text:p>
      <text:p text:style-name="Text_20_body">Communication Method: V 21 Channel 2, V 27 ter</text:p>
      <text:p text:style-name="Text_20_body">Transmission Signal Level: Selectable from -6 to -15 dBm in 3 dBm steps (at dispatch: -15 dBm)</text:p>
      <text:p text:style-name="Text_20_body">Power Supply:</text:p>
      <text:p text:style-name="Text_20_body">Power Supply Voltage / Consumption Current: +5 V approx. 500 mA</text:p>
      <text:p text:style-name="Preformatted_20_Text"><text:s text:c="49"/>+12 V approx. 10 mA</text:p>
      <text:p text:style-name="Preformatted_20_Text"><text:s text:c="49"/>-12 V approx. 25 mA</text:p>
      <text:p text:style-name="First_20_paragraph">Operating Temperature Range:</text:p>
      <text:p text:style-name="Text_20_body">Port Address:<text:line-break/><draw:frame draw:style-name="fr1" text:anchor-type="as-char"><draw:object xlink:href="Formula-92/" xlink:type="simple" xlink:show="embed" xlink:actuate="onLoad"/></draw:frame>EAF95F</text:p>
      <text:p text:style-name="Preformatted_20_Text"><text:s text:c="2"/>(8255 : $EAF 900~$EAF 907) <text:s text:c="1"/></text:p>
      <text:p text:style-name="Preformatted_20_Text"><text:s text:c="2"/>(Z 8530 : $EAF 908~$EAF 90 B) *Optional <text:s text:c="1"/></text:p>
      <text:p text:style-name="Preformatted_20_Text"><text:s text:c="2"/>(R 48 MFX : $EAF 920~$EAF 93 F) <text:s text:c="1"/></text:p>
      <text:p text:style-name="Preformatted_20_Text"><text:s text:c="2"/>(R 96 MD : $EAF 940~$EAF 95 F) *Optional <text:s text:c="1"/></text:p>
      <text:p text:style-name="First_20_paragraph">Split: Level 2 / Level 4 (Selectable by DIP switch)</text:p>
      <text:p text:style-name="Horizontal_20_Line"/>
      <text:p text:style-name="First_20_paragraph">Circuit Overview</text:p>
      <text:p text:style-name="Text_20_body">The block diagram of CZ-6BC1 is shown in Figure 1. R48MFX is used as the modem IC, and 82C55 (CMOS version of 8255) is used for status checks and relay control for communication switching (same as 8255 for software).</text:p>
      <text:p text:style-name="Text_20_body">To avoid direct DC connection between the telephone line and the X68000, a relay-controlled isolation circuit is used for data lines (incoming calls) and telephone service detection (to determine whether the phone is in use). A photocoupler is used between the telephone service section and the 8255.</text:p>
      <text:p text:style-name="Horizontal_20_Line"/>
      <text:h text:style-name="Heading_20_2" text:outline-level="2"><text:bookmark-start text:name="outs-000165"/>outs-000165<text:bookmark-end text:name="outs-000165"/></text:h>
      <text:p text:style-name="First_20_paragraph">Title: "● Diagram 1: Block Diagram of CZ-6BC1"</text:p>
      <text:p text:style-name="Text_20_body">In the top right corner: "FAX Board"</text:p>
      <text:p text:style-name="Text_20_body">Top row of text:</text:p>
      <text:list text:style-name="List_20_1">
        <text:list-item>
          <text:p text:style-name="List_20_Bullet_20_Tight">From left to right, above the four circles: "Power," "C1," "D1," "GND"</text:p>
        </text:list-item>
      </text:list>
      <text:p text:style-name="First_20_paragraph">Inside the diagram, from top left moving down and then generally to the right:</text:p>
      <text:list text:style-name="List_20_1">
        <text:list-item>
          <text:p text:style-name="List_20_Bullet_20_Tight">"Surge suppressor" (Top left box after the circles)</text:p>
        </text:list-item>
        <text:list-item>
          <text:p text:style-name="List_20_Bullet_20_Tight">"Input signal" (Box at the top center)</text:p>
        </text:list-item>
        <text:list-item>
          <text:p text:style-name="List_20_Bullet_20_Tight">"Relay coil" (Box to the right of the "Input signal" box)</text:p>
        </text:list-item>
      </text:list>
      <text:p text:style-name="First_20_paragraph">Connecting boxes from top to bottom in the left side:</text:p>
      <text:list text:style-name="List_20_1">
        <text:list-item>
          <text:p text:style-name="List_20_Bullet_20_Tight">"R8/M7K CS" (Box below the "Surge suppressor")</text:p>
        </text:list-item>
        <text:list-item>
          <text:p text:style-name="List_20_Bullet_20_Tight">"BZ455 CS" (Box to the right of the "R8/M7K CS" box)</text:p>
        </text:list-item>
        <text:list-item>
          <text:p text:style-name="List_20_Bullet_20_Tight">"Address buffer" (Box below "R8/M7K CS")</text:p>
        </text:list-item>
        <text:list-item>
          <text:p text:style-name="List_20_Bullet_20_Tight">"Decoder" (Box to the right of "Address buffer")</text:p>
        </text:list-item>
        <text:list-item>
          <text:p text:style-name="List_20_Bullet_20_Tight">"Output buffer" (Connected to the right side of "Data bus")</text:p>
        </text:list-item>
        <text:list-item>
          <text:p text:style-name="List_20_Bullet_20_Tight">"Data bus" (Vertical line between "Decoder" and "Output buffer")</text:p>
        </text:list-item>
        <text:list-item>
          <text:p text:style-name="List_20_Bullet_20_Tight">"LSI" (Large box connected to multiple elements in the center-right)</text:p>
        </text:list-item>
        <text:list-item>
          <text:p text:style-name="List_20_Bullet_20_Tight">"Relay driver" (Box near bottom left connected to "F" symbol and LSI)</text:p>
        </text:list-item>
      </text:list>
      <text:p text:style-name="First_20_paragraph">Bottom right corner:</text:p>
      <text:list text:style-name="List_20_1">
        <text:list-item>
          <text:p text:style-name="List_20_Bullet_20_Tight">"DIP-SW" (To the right of "LSI")</text:p>
        </text:list-item>
        <text:list-item>
          <text:p text:style-name="List_20_Bullet_20_Tight">Below "+5V," "-12V," "+24V" (Voltage indicators)</text:p>
        </text:list-item>
      </text:list>
      <text:p text:style-name="First_20_paragraph">Outside of the diagram to the right, vertically written: "+5V," "+12V," "+24V," and "GND".</text:p>
      <text:p text:style-name="Text_20_body">Bottom center:</text:p>
      <text:list text:style-name="List_20_1">
        <text:list-item>
          <text:p text:style-name="List_20_Bullet_20_Tight">"+5V," "+12V"</text:p>
        </text:list-item>
      </text:list>
      <text:p text:style-name="First_20_paragraph">Page number at the bottom right corner: "161"</text:p>
      <text:p text:style-name="Horizontal_20_Line"/>
      <text:h text:style-name="Heading_20_2" text:outline-level="2"><text:bookmark-start text:name="outs-000166"/>outs-000166<text:bookmark-end text:name="outs-000166"/></text:h>
      <text:p text:style-name="Horizontal_20_Line"/>
      <text:p text:style-name="First_20_paragraph">3</text:p>
      <text:h text:style-name="Heading_20_2" text:outline-level="2"><text:bookmark-start text:name="arrangement-of-major-parts-the-arrangement-of-the-parts-of-cz-6bc1-is-shown-in-figure-2-figure-2-arrangement-of-the-parts-of-cz-6bc1"/>Arrangement of Major Parts The arrangement of the parts of CZ-6BC1 is shown in Figure 2. Figure 2: Arrangement of the parts of CZ-6BC1<text:bookmark-end text:name="arrangement-of-major-parts-the-arrangement-of-the-parts-of-cz-6bc1-is-shown-in-figure-2-figure-2-arrangement-of-the-parts-of-cz-6bc1"/></text:h>
      <text:p text:style-name="Horizontal_20_Line"/>
      <text:h text:style-name="Heading_20_2" text:outline-level="2"><text:bookmark-start text:name="outs-000167"/>outs-000167<text:bookmark-end text:name="outs-000167"/></text:h>
      <text:p text:style-name="First_20_paragraph">●4 Setting</text:p>
      <text:p text:style-name="Text_20_body">The CZ-6BC1 has two dip switches. The settings for each are as shown in Figure 3.</text:p>
      <text:p text:style-name="Text_20_body">●Figure--3 CZ-6BC1 Dip Switches</text:p>
      <text:list text:style-name="List_20_1">
        <text:list-item>
          <text:p text:style-name="List_20_Bullet_20_Tight">DIP-SW1</text:p>
        </text:list-item>
      </text:list>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No. 1</text:p>
            </table:table-cell>
            <table:table-cell table:style-name="TableHeaderRowCell" office:value-type="string">
              <text:p text:style-name="Table_20_Heading">No. 2</text:p>
            </table:table-cell>
            <table:table-cell table:style-name="TableHeaderRowCell" office:value-type="string">
              <text:p text:style-name="Table_20_Heading">Transmission Level</text:p>
            </table:table-cell>
          </table:table-row>
        </table:table-header-rows>
        <table:table-row>
          <table:table-cell table:style-name="TableRowCell" office:value-type="string">
            <text:p text:style-name="Table_20_Contents">OFF</text:p>
          </table:table-cell>
          <table:table-cell table:style-name="TableRowCell" office:value-type="string">
            <text:p text:style-name="Table_20_Contents">OFF</text:p>
          </table:table-cell>
          <table:table-cell table:style-name="TableRowCell" office:value-type="string">
            <text:p text:style-name="Table_20_Contents">-6 dBm</text:p>
          </table:table-cell>
        </table:table-row>
        <table:table-row>
          <table:table-cell table:style-name="TableRowCell" office:value-type="string">
            <text:p text:style-name="Table_20_Contents">OFF</text:p>
          </table:table-cell>
          <table:table-cell table:style-name="TableRowCell" office:value-type="string">
            <text:p text:style-name="Table_20_Contents">ON</text:p>
          </table:table-cell>
          <table:table-cell table:style-name="TableRowCell" office:value-type="string">
            <text:p text:style-name="Table_20_Contents">-9 dBm</text:p>
          </table:table-cell>
        </table:table-row>
        <table:table-row>
          <table:table-cell table:style-name="TableRowCell" office:value-type="string">
            <text:p text:style-name="Table_20_Contents">ON</text:p>
          </table:table-cell>
          <table:table-cell table:style-name="TableRowCell" office:value-type="string">
            <text:p text:style-name="Table_20_Contents">OFF</text:p>
          </table:table-cell>
          <table:table-cell table:style-name="TableRowCell" office:value-type="string">
            <text:p text:style-name="Table_20_Contents">-12 dBm</text:p>
          </table:table-cell>
        </table:table-row>
        <table:table-row>
          <table:table-cell table:style-name="TableRowCell" office:value-type="string">
            <text:p text:style-name="Table_20_Contents">ON</text:p>
          </table:table-cell>
          <table:table-cell table:style-name="TableRowCell" office:value-type="string">
            <text:p text:style-name="Table_20_Contents">ON</text:p>
          </table:table-cell>
          <table:table-cell table:style-name="TableRowCell" office:value-type="string">
            <text:p text:style-name="Table_20_Contents">-15 dBm (Default setting upon shipment)</text:p>
          </table:table-cell>
        </table:table-row>
      </table:table>
      <text:list text:style-name="List_20_1">
        <text:list-item>
          <text:p text:style-name="List_20_Bullet_20_Tight">DIP-SW2</text:p>
        </text:list-item>
      </text:list>
      <table:table table:name="Table38" table:style-name="Table38">
        <table:table-column table:style-name="Table38.A"/>
        <table:table-column table:style-name="Table38.B"/>
        <table:table-header-rows>
          <table:table-row>
            <table:table-cell table:style-name="TableHeaderRowCell" office:value-type="string">
              <text:p text:style-name="Table_20_Heading">Shipment Setting</text:p>
            </table:table-cell>
            <table:table-cell table:style-name="TableHeaderRowCell" office:value-type="string">
              <text:p text:style-name="Table_20_Heading">Setting Content</text:p>
            </table:table-cell>
          </table:table-row>
        </table:table-header-rows>
        <table:table-row>
          <table:table-cell table:style-name="TableRowCell" office:value-type="string">
            <text:p text:style-name="Table_20_Contents">No. 1 ON</text:p>
          </table:table-cell>
          <table:table-cell table:style-name="TableRowCell" office:value-type="string">
            <text:p text:style-name="Table_20_Contents">Cable Equalizer Setting</text:p>
          </table:table-cell>
        </table:table-row>
        <table:table-row>
          <table:table-cell table:style-name="TableRowCell" office:value-type="string">
            <text:p text:style-name="Table_20_Contents">No. 2 ON</text:p>
          </table:table-cell>
          <table:table-cell table:style-name="TableRowCell" office:value-type="string">
            <text:p text:style-name="Table_20_Contents">Silent Level Setting</text:p>
          </table:table-cell>
        </table:table-row>
        <table:table-row>
          <table:table-cell table:style-name="TableRowCell" office:value-type="string">
            <text:p text:style-name="Table_20_Contents">No. 3 OFF</text:p>
          </table:table-cell>
          <table:table-cell table:style-name="TableRowCell" office:value-type="string">
            <text:p text:style-name="Table_20_Contents">Normal Level Setting</text:p>
          </table:table-cell>
        </table:table-row>
      </table:table>
      <text:p text:style-name="First_20_paragraph">● 4-1 Setting the Transmission Level</text:p>
      <text:p text:style-name="Text_20_body">With DIP-SW1, you can set the signal level to be transmitted to the line. Line loss (unit: dBm) should be adjusted to ensure that the calculated level does not exceed -15 dBm. This setting should be performed by a qualified technician who has a license for telecommunication work.</text:p>
      <text:p text:style-name="Text_20_body">Please ensure that a qualified technician handles this setting.</text:p>
      <text:p text:style-name="Horizontal_20_Line"/>
      <text:h text:style-name="Heading_20_2" text:outline-level="2"><text:bookmark-start text:name="outs-000168"/>outs-000168<text:bookmark-end text:name="outs-000168"/></text:h>
      <text:p text:style-name="Horizontal_20_Line"/>
      <text:p text:style-name="First_20_paragraph">4.2 Cable Equalizer Settings</text:p>
      <text:p text:style-name="Text_20_body">Using DIP-SW 20-1 and 20-2, the equalizer can be adjusted for correction of the circuit's frequency characteristic features.</text:p>
      <text:p text:style-name="Text_20_body">4.3 Clipping Level Settings</text:p>
      <text:p text:style-name="Text_20_body">The CZ-6BC1 allows you to select the clipping level to be used by the DIP switch on the board. If DIP-SW 20-3 is ON, the clipping level 4 is used, and if DIP-SW 20-4 is ON, level 2 clipping is used alternately. If both are ON, the clipping function will not be used. Setting both to OFF will cause clipping to occur at both levels 2 and 4 at the same time, so please avoid this setting.</text:p>
      <text:p text:style-name="Text_20_body">5 I/O Map</text:p>
      <text:p text:style-name="Text_20_body">The I/O address map of the CZ-6BC1 is shown in Figure 4, and the contents of each bit are shown in Figures 5 to 21.</text:p>
      <text:p text:style-name="Text_20_body">164</text:p>
      <text:p text:style-name="Horizontal_20_Line"/>
      <text:p text:style-name="Horizontal_20_Line"/>
      <text:h text:style-name="Heading_20_2" text:outline-level="2"><text:bookmark-start text:name="outs-000169"/>outs-000169<text:bookmark-end text:name="outs-000169"/></text:h>
      <text:p text:style-name="First_20_paragraph"><text:span text:style-name="Strong_20_Emphasis">Figure 4 - FAX Board I/O Address Map</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Address</text:p>
            </table:table-cell>
            <table:table-cell table:style-name="TableHeaderRowCell" office:value-type="string">
              <text:p text:style-name="Table_20_Heading">Register Number</text:p>
            </table:table-cell>
            <table:table-cell table:style-name="TableHeaderRowCell" office:value-type="string">
              <text:p text:style-name="Table_20_Heading">Bit Assignment</text:p>
            </table:table-cell>
          </table:table-row>
        </table:table-header-rows>
        <table:table-row>
          <table:table-cell table:style-name="TableRowCell" office:value-type="string">
            <text:p text:style-name="Table_20_Contents">$EAF921</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EAF923</text:p>
          </table:table-cell>
          <table:table-cell table:style-name="TableRowCell" office:value-type="string">
            <text:p text:style-name="Table_20_Contents">1</text:p>
          </table:table-cell>
          <table:table-cell table:style-name="TableRowCell" office:value-type="string">
            <text:p text:style-name="Table_20_Contents">DDYL</text:p>
          </table:table-cell>
        </table:table-row>
        <table:table-row>
          <table:table-cell table:style-name="TableRowCell" office:value-type="string">
            <text:p text:style-name="Table_20_Contents">$EAF925</text:p>
          </table:table-cell>
          <table:table-cell table:style-name="TableRowCell" office:value-type="string">
            <text:p text:style-name="Table_20_Contents">2</text:p>
          </table:table-cell>
          <table:table-cell table:style-name="TableRowCell" office:value-type="string">
            <text:p text:style-name="Table_20_Contents">DDYM</text:p>
          </table:table-cell>
        </table:table-row>
        <table:table-row>
          <table:table-cell table:style-name="TableRowCell" office:value-type="string">
            <text:p text:style-name="Table_20_Contents">$EAF927</text:p>
          </table:table-cell>
          <table:table-cell table:style-name="TableRowCell" office:value-type="string">
            <text:p text:style-name="Table_20_Contents">3</text:p>
          </table:table-cell>
          <table:table-cell table:style-name="TableRowCell" office:value-type="string">
            <text:p text:style-name="Table_20_Contents">DDXL</text:p>
          </table:table-cell>
        </table:table-row>
        <table:table-row>
          <table:table-cell table:style-name="TableRowCell" office:value-type="string">
            <text:p text:style-name="Table_20_Contents">$EAF929</text:p>
          </table:table-cell>
          <table:table-cell table:style-name="TableRowCell" office:value-type="string">
            <text:p text:style-name="Table_20_Contents">4</text:p>
          </table:table-cell>
          <table:table-cell table:style-name="TableRowCell" office:value-type="string">
            <text:p text:style-name="Table_20_Contents">DDXM</text:p>
          </table:table-cell>
        </table:table-row>
        <table:table-row>
          <table:table-cell table:style-name="TableRowCell" office:value-type="string">
            <text:p text:style-name="Table_20_Contents">$EAF92B</text:p>
          </table:table-cell>
          <table:table-cell table:style-name="TableRowCell" office:value-type="string">
            <text:p text:style-name="Table_20_Contents">5</text:p>
          </table:table-cell>
          <table:table-cell table:style-name="TableRowCell" office:value-type="string">
            <text:p text:style-name="Table_20_Contents">TXCD</text:p>
          </table:table-cell>
        </table:table-row>
        <table:table-row>
          <table:table-cell table:style-name="TableRowCell" office:value-type="string">
            <text:p text:style-name="Table_20_Contents">$EAF92D</text:p>
          </table:table-cell>
          <table:table-cell table:style-name="TableRowCell" office:value-type="string">
            <text:p text:style-name="Table_20_Contents">6</text:p>
          </table:table-cell>
          <table:table-cell table:style-name="TableRowCell" office:value-type="string">
            <text:p text:style-name="Table_20_Contents">RXCD</text:p>
          </table:table-cell>
        </table:table-row>
        <table:table-row>
          <table:table-cell table:style-name="TableRowCell" office:value-type="string">
            <text:p text:style-name="Table_20_Contents">$EAF92F</text:p>
          </table:table-cell>
          <table:table-cell table:style-name="TableRowCell" office:value-type="string">
            <text:p text:style-name="Table_20_Contents">7</text:p>
          </table:table-cell>
          <table:table-cell table:style-name="TableRowCell" office:value-type="string">
    </table:table-cell>
        </table:table-row>
        <table:table-row>
          <table:table-cell table:style-name="TableRowCell" office:value-type="string">
            <text:p text:style-name="Table_20_Contents">$EAF931</text:p>
          </table:table-cell>
          <table:table-cell table:style-name="TableRowCell" office:value-type="string">
            <text:p text:style-name="Table_20_Contents">8</text:p>
          </table:table-cell>
          <table:table-cell table:style-name="TableRowCell" office:value-type="string">
            <text:p text:style-name="Table_20_Contents">CDET</text:p>
          </table:table-cell>
        </table:table-row>
        <table:table-row>
          <table:table-cell table:style-name="TableRowCell" office:value-type="string">
            <text:p text:style-name="Table_20_Contents">$EAF933</text:p>
          </table:table-cell>
          <table:table-cell table:style-name="TableRowCell" office:value-type="string">
            <text:p text:style-name="Table_20_Contents">9</text:p>
          </table:table-cell>
          <table:table-cell table:style-name="TableRowCell" office:value-type="string">
    </table:table-cell>
        </table:table-row>
        <table:table-row>
          <table:table-cell table:style-name="TableRowCell" office:value-type="string">
            <text:p text:style-name="Table_20_Contents">$EAF935</text:p>
          </table:table-cell>
          <table:table-cell table:style-name="TableRowCell" office:value-type="string">
            <text:p text:style-name="Table_20_Contents">A</text:p>
          </table:table-cell>
          <table:table-cell table:style-name="TableRowCell" office:value-type="string">
            <text:p text:style-name="Table_20_Contents">TDET</text:p>
          </table:table-cell>
        </table:table-row>
        <table:table-row>
          <table:table-cell table:style-name="TableRowCell" office:value-type="string">
            <text:p text:style-name="Table_20_Contents">$EAF937</text:p>
          </table:table-cell>
          <table:table-cell table:style-name="TableRowCell" office:value-type="string">
            <text:p text:style-name="Table_20_Contents">B</text:p>
          </table:table-cell>
          <table:table-cell table:style-name="TableRowCell" office:value-type="string">
            <text:p text:style-name="Table_20_Contents">RX</text:p>
          </table:table-cell>
        </table:table-row>
        <table:table-row>
          <table:table-cell table:style-name="TableRowCell" office:value-type="string">
            <text:p text:style-name="Table_20_Contents">$EAF939</text:p>
          </table:table-cell>
          <table:table-cell table:style-name="TableRowCell" office:value-type="string">
            <text:p text:style-name="Table_20_Contents">C</text:p>
          </table:table-cell>
          <table:table-cell table:style-name="TableRowCell" office:value-type="string">
            <text:p text:style-name="Table_20_Contents">RTSP</text:p>
          </table:table-cell>
        </table:table-row>
        <table:table-row>
          <table:table-cell table:style-name="TableRowCell" office:value-type="string">
            <text:p text:style-name="Table_20_Contents">$EAF93B</text:p>
          </table:table-cell>
          <table:table-cell table:style-name="TableRowCell" office:value-type="string">
            <text:p text:style-name="Table_20_Contents">D</text:p>
          </table:table-cell>
          <table:table-cell table:style-name="TableRowCell" office:value-type="string">
            <text:p text:style-name="Table_20_Contents">CONF</text:p>
          </table:table-cell>
        </table:table-row>
        <table:table-row>
          <table:table-cell table:style-name="TableRowCell" office:value-type="string">
            <text:p text:style-name="Table_20_Contents">$EAF93D</text:p>
          </table:table-cell>
          <table:table-cell table:style-name="TableRowCell" office:value-type="string">
            <text:p text:style-name="Table_20_Contents">E</text:p>
          </table:table-cell>
          <table:table-cell table:style-name="TableRowCell" office:value-type="string">
            <text:p text:style-name="Table_20_Contents">LA</text:p>
          </table:table-cell>
        </table:table-row>
        <table:table-row>
          <table:table-cell table:style-name="TableRowCell" office:value-type="string">
            <text:p text:style-name="Table_20_Contents">$EAF93F</text:p>
          </table:table-cell>
          <table:table-cell table:style-name="TableRowCell" office:value-type="string">
            <text:p text:style-name="Table_20_Contents">F</text:p>
          </table:table-cell>
          <table:table-cell table:style-name="TableRowCell" office:value-type="string">
            <text:p text:style-name="Table_20_Contents">RAMA</text:p>
          </table:table-cell>
        </table:table-row>
      </table:table>
      <text:p text:style-name="First_20_paragraph">Note: The values in the "Bit Assignment" column are cited as they appeared in the image. "Bit" columns are designated from 7 to 0 (left to right).</text:p>
      <text:p text:style-name="Horizontal_20_Line"/>
      <text:h text:style-name="Heading_20_2" text:outline-level="2"><text:bookmark-start text:name="outs-000170"/>outs-000170<text:bookmark-end text:name="outs-000170"/></text:h>
      <text:p text:style-name="Horizontal_20_Line"/>
      <text:p text:style-name="First_20_paragraph"><text:span text:style-name="Strong_20_Emphasis">Register 0</text:span></text:p>
      <text:p text:style-name="Text_20_body">bit 7 6 5 4 3 2 1 bit 0 [DDYL]</text:p>
      <text:p text:style-name="Text_20_body">Diagnostic Data Y Least The least significant 8 bits of the 16-bit data used when reading from or writing to YRAM location, XRAM/YRAM.</text:p>
      <text:p text:style-name="Horizontal_20_Line"/>
      <text:p text:style-name="First_20_paragraph"><text:span text:style-name="Strong_20_Emphasis">Register 1</text:span></text:p>
      <text:p text:style-name="Text_20_body">bit 7 6 5 4 3 2 1 bit 0 [DDYM]</text:p>
      <text:p text:style-name="Text_20_body">Diagnostic Data Y Most The most significant 8 bits of the 16-bit data used when reading from or writing to YRAM location, XRAM/YRAM.</text:p>
      <text:p text:style-name="Horizontal_20_Line"/>
      <text:p text:style-name="First_20_paragraph"><text:span text:style-name="Strong_20_Emphasis">Register 2</text:span></text:p>
      <text:p text:style-name="Text_20_body">bit 7 6 5 4 3 2 1 bit 0 [DDXL]</text:p>
      <text:p text:style-name="Text_20_body">Diagnostic Data X Least The least significant 8 bits of the 16-bit data used when reading from XRAM location.</text:p>
      <text:p text:style-name="Horizontal_20_Line"/>
      <text:p text:style-name="First_20_paragraph"><text:span text:style-name="Strong_20_Emphasis">Register 3</text:span></text:p>
      <text:p text:style-name="Text_20_body">bit 7 6 5 4 3 2 1 bit 0 [DDXM]</text:p>
      <text:p text:style-name="Text_20_body">Diagnostic Data X Most The most significant 8 bits of the 16-bit data used when reading from XRAM location.</text:p>
      <text:p text:style-name="Horizontal_20_Line"/>
      <text:p text:style-name="Horizontal_20_Line"/>
      <text:h text:style-name="Heading_20_2" text:outline-level="2"><text:bookmark-start text:name="outs-000171"/>outs-000171<text:bookmark-end text:name="outs-000171"/></text:h>
      <text:p text:style-name="Horizontal_20_Line"/>
      <text:p text:style-name="First_20_paragraph">FAX Board</text:p>
      <text:p text:style-name="Text_20_body">●■ (Drawing) 9 Register 4 Transmitter Channel Data CDREQ (Channel Data Request Bit) is '1', the data written into this register is sent to the transmitter.</text:p>
      <text:p text:style-name="Text_20_body">●■ (Drawing) 10 Register 5 Receiver Channel Data When the modem receives 8 bits, CDREQ bit is set to '1', and the received data is set in this register.</text:p>
      <text:p text:style-name="Text_20_body">●■ (Drawing) 11 Register 8 Carrier Detector Bandpass energy is detected, indicating it is not a training sequence. '1': Start of data state '0': End of reception signal Period N '1': Receiving sequence has started '0': Receiving scramble has started If this bit is '1' while TDIS (Register 4 bit 4), it is invalid</text:p>
      <text:p text:style-name="Text_20_body">●■ (Drawing) 12 Register A Tone Detected '1': Tone received '0': No tone received</text:p>
      <text:p text:style-name="Horizontal_20_Line"/>
      <text:p text:style-name="First_20_paragraph">Note: The term "●■ (Drawing)" is used to represent the bullet and square symbol combination used in the original text.</text:p>
      <text:p text:style-name="Horizontal_20_Line"/>
      <text:h text:style-name="Heading_20_2" text:outline-level="2"><text:bookmark-start text:name="outs-000172"/>outs-000172<text:bookmark-end text:name="outs-000172"/></text:h>
      <text:p text:style-name="First_20_paragraph">●Fig. 13 Register B ![bit labels 7 to 0]</text:p>
      <text:list text:style-name="List_20_1">
        <text:list-item>
          <text:p text:style-name="List_20_Bullet_20_Tight">RX</text:p>
        </text:list-item>
        <text:list-item>
          <text:p text:style-name="List_20_Bullet_20_Tight">FED</text:p>
        </text:list-item>
        <text:list-item>
          <text:p text:style-name="List_20_Bullet_20_Tight">GHIT</text:p>
        </text:list-item>
      </text:list>
      <text:p text:style-name="First_20_paragraph">Gain Hit</text:p>
      <text:list text:style-name="List_20_1">
        <text:list-item>
          <text:p text:style-name="List_20_Bullet_20_Tight">'1': The received level increased at a rate too sudden for the AGC circuit to correct</text:p>
        </text:list-item>
        <text:list-item>
          <text:p text:style-name="List_20_Bullet_20_Tight">'0': The AGC output has returned to its normal state</text:p>
        </text:list-item>
      </text:list>
      <text:p text:style-name="First_20_paragraph">Fast Energy Detector Indicates the level of the received signal</text:p>
      <text:list text:style-name="List_20_1">
        <text:list-item>
          <text:p text:style-name="List_20_Bullet_20_Tight">'00': No received level</text:p>
        </text:list-item>
        <text:list-item>
          <text:p text:style-name="List_20_Bullet_20_Tight">'01': Invalid</text:p>
        </text:list-item>
        <text:list-item>
          <text:p text:style-name="List_20_Bullet_20_Tight">'10': At or above the turn-off threshold</text:p>
        </text:list-item>
        <text:list-item>
          <text:p text:style-name="List_20_Bullet_20_Tight">'11': At or above the turn-on threshold</text:p>
        </text:list-item>
      </text:list>
      <text:p text:style-name="First_20_paragraph">●Fig. 14 Register C ![bit labels 7 to 0]</text:p>
      <text:list text:style-name="List_20_1">
        <text:list-item>
          <text:p text:style-name="List_20_Bullet_20_Tight">RTSP</text:p>
        </text:list-item>
        <text:list-item>
          <text:p text:style-name="List_20_Bullet_20_Tight">EPT</text:p>
        </text:list-item>
        <text:list-item>
          <text:p text:style-name="List_20_Bullet_20_Tight">TPDM</text:p>
        </text:list-item>
        <text:list-item>
          <text:p text:style-name="List_20_Bullet_20_Tight">TDIS</text:p>
        </text:list-item>
        <text:list-item>
          <text:p text:style-name="List_20_Bullet_20_Tight">EQSV</text:p>
        </text:list-item>
        <text:list-item>
          <text:p text:style-name="List_20_Bullet_20_Tight">EQFZ</text:p>
        </text:list-item>
        <text:list-item>
          <text:p text:style-name="List_20_Bullet_20_Tight">SDIS</text:p>
        </text:list-item>
        <text:list-item>
          <text:p text:style-name="List_20_Bullet_20_Tight">RAMW</text:p>
        </text:list-item>
      </text:list>
      <text:p text:style-name="First_20_paragraph">RAM Write</text:p>
      <text:list text:style-name="List_20_1">
        <text:list-item>
          <text:p text:style-name="List_20_Bullet_20_Tight">'1': Write diagnostic data to the modem IC</text:p>
        </text:list-item>
        <text:list-item>
          <text:p text:style-name="List_20_Bullet_20_Tight">'0': Read diagnostic data from the modem IC</text:p>
        </text:list-item>
      </text:list>
      <text:p text:style-name="First_20_paragraph">Scrambler Disable</text:p>
      <text:list text:style-name="List_20_1">
        <text:list-item>
          <text:p text:style-name="List_20_Bullet_20_Tight">'1': Scrambler / descrambler disabled</text:p>
        </text:list-item>
        <text:list-item>
          <text:p text:style-name="List_20_Bullet_20_Tight">'0': Scrambler / descrambler enabled</text:p>
        </text:list-item>
      </text:list>
      <text:p text:style-name="First_20_paragraph">Equalizer Freeze</text:p>
      <text:list text:style-name="List_20_1">
        <text:list-item>
          <text:p text:style-name="List_20_Bullet_20_Tight">'1': Stop updating the adaptive equalizer taps</text:p>
        </text:list-item>
        <text:list-item>
          <text:p text:style-name="List_20_Bullet_20_Tight">'0': Normal operation</text:p>
        </text:list-item>
      </text:list>
      <text:p text:style-name="First_20_paragraph">Equalizer Save</text:p>
      <text:list text:style-name="List_20_1">
        <text:list-item>
          <text:p text:style-name="List_20_Bullet_20_Tight">'1': Do not zero the adaptive equalizer taps when reconfiguring the modem or during training</text:p>
        </text:list-item>
        <text:list-item>
          <text:p text:style-name="List_20_Bullet_20_Tight">'0': Normal operation</text:p>
        </text:list-item>
      </text:list>
      <text:p text:style-name="First_20_paragraph">Training Disable</text:p>
      <text:list text:style-name="List_20_1">
        <text:list-item>
          <text:p text:style-name="List_20_Bullet_20_Tight">'1': Do not put the modem into the training phase (when RTSP becomes active, a training sequence will occur at the start of transmission)</text:p>
        </text:list-item>
        <text:list-item>
          <text:p text:style-name="List_20_Bullet_20_Tight">'0': Normal operation</text:p>
        </text:list-item>
      </text:list>
      <text:p text:style-name="First_20_paragraph">Transmitter Parallel Data Mode</text:p>
      <text:list text:style-name="List_20_1">
        <text:list-item>
          <text:p text:style-name="List_20_Bullet_20_Tight">'1': Transmit the contents of the TXCDL register</text:p>
        </text:list-item>
        <text:list-item>
          <text:p text:style-name="List_20_Bullet_20_Tight">'0': Transmit serial software data bits</text:p>
        </text:list-item>
      </text:list>
      <text:p text:style-name="First_20_paragraph">Echo Protector Tone</text:p>
      <text:list text:style-name="List_20_1">
        <text:list-item>
          <text:p text:style-name="List_20_Bullet_20_Tight">'1': Before the training sequence, a non-standard asynchronous signal is transmitted for 185 ms, followed by 20 ms with no transmit energy (this bit takes the value '1' when TDIS is '1')</text:p>
        </text:list-item>
        <text:list-item>
          <text:p text:style-name="List_20_Bullet_20_Tight">'0': Normal operation</text:p>
        </text:list-item>
      </text:list>
      <text:p text:style-name="First_20_paragraph">Request Send Parallel</text:p>
      <text:list text:style-name="List_20_1">
        <text:list-item>
          <text:p text:style-name="List_20_Bullet_20_Tight">'1': Start the transmit sequence (transmission continues until RTSP becomes '0' and the turn-off sequence completes)</text:p>
        </text:list-item>
        <text:list-item>
          <text:p text:style-name="List_20_Bullet_20_Tight">'0': Do not start</text:p>
        </text:list-item>
      </text:list>
      <text:p text:style-name="Horizontal_20_Line"/>
      <text:h text:style-name="Heading_20_2" text:outline-level="2"><text:bookmark-start text:name="outs-000173"/>outs-000173<text:bookmark-end text:name="outs-000173"/></text:h>
      <text:p text:style-name="First_20_paragraph">FAX Board</text:p>
      <text:h text:style-name="Heading_20_2" text:outline-level="2"><text:bookmark-start text:name="fig-15-register-d-bit-7--6--5--4--3--2--1--bit-0"/>●Fig. 15 Register D bit 7 | 6 | 5 | 4 | 3 | 2 | 1 | bit 0<text:bookmark-end text:name="fig-15-register-d-bit-7--6--5--4--3--2--1--bit-0"/></text:h>
      <text:p text:style-name="Preformatted_20_Text"><text:s text:c="6"/>CONF</text:p>
      <text:p text:style-name="First_20_paragraph">Configuration Configures the modem $00: V.21 (300bps) $04: V.27, 2400 long training $05: V.27, 2400 short training $06: V.27, 4800 long training (default) $07: V.27, 4800 short training $08: unused Others: unused *1: In response to the RTS or RTSP signal, the modem directly transmits either a single tone or a dual-frequency tone. The tone frequency is controlled by RAM locations written by the host. While a tone is being transmitted, the tone configuration enables detection of a single-frequency tone via the TDET bit. The frequency of the tone detector can be changed by the host by modifying several RAM locations.</text:p>
      <text:h text:style-name="Heading_20_2" text:outline-level="2"><text:bookmark-start text:name="fig-16-register-e-bit-7--6--5--4--3--2--1--bit-0"/>●Fig. 16 Register E bit 7 | 6 | 5 | 4 | 3 | 2 | 1 | bit 0<text:bookmark-end text:name="fig-16-register-e-bit-7--6--5--4--3--2--1--bit-0"/></text:h>
      <text:p text:style-name="First_20_paragraph">IA CDIE CDREQ SETUP DDIE DDREQ Diagnostic Data Request '1': The modem accessed the DDYL register '0': The host CPU accessed the DDYL register</text:p>
      <text:p text:style-name="Text_20_body">Diagnostic Data Interrupt Enable '1': Generate an interrupt when DDREQ = "1" '0': Do not generate an interrupt</text:p>
      <text:p text:style-name="Text_20_body">Setup Set to "1" when reconfiguring the modem (when changing the CONF register)</text:p>
      <text:p text:style-name="Text_20_body">Channel Data Request '1': After the modem writes received channel data to RXCDL, or after RXCD is read out, the host processor must return this bit to "0" once servicing is complete</text:p>
      <text:p text:style-name="Text_20_body">Channel Data Interrupt Enable '1': Generate an interrupt when CDREQ = "1" '0': Do not generate an interrupt</text:p>
      <text:p text:style-name="Text_20_body">Interrupt Active '1': Interrupt request pending '0': Normal operation</text:p>
      <text:p text:style-name="Horizontal_20_Line"/>
      <text:h text:style-name="Heading_20_2" text:outline-level="2"><text:bookmark-start text:name="outs-000174"/>outs-000174<text:bookmark-end text:name="outs-000174"/></text:h>
      <text:p text:style-name="Horizontal_20_Line"/>
      <text:p text:style-name="First_20_paragraph">Figure 17 Register F</text:p>
      <text:h text:style-name="Heading_20_2" text:outline-level="2"><text:bookmark-start text:name="bit-7-bit-0"/>bit 7 bit 0<text:bookmark-end text:name="bit-7-bit-0"/></text:h>
      <text:p text:style-name="First_20_paragraph">| RAMA |</text:p>
      <text:p text:style-name="Text_20_body">RAM Access Written by the host when reading or writing diagnostic data.</text:p>
      <text:p text:style-name="Horizontal_20_Line"/>
      <text:p text:style-name="First_20_paragraph">Figure 18 8255 Port A</text:p>
      <text:h text:style-name="Heading_20_2" text:outline-level="2"><text:bookmark-start text:name="bit-7-bit-0-1"/>bit 7 bit 0<text:bookmark-end text:name="bit-7-bit-0-1"/></text:h>
      <text:p text:style-name="First_20_paragraph">| SW1-2 | SW1-1 |</text:p>
      <text:p text:style-name="Text_20_body">SW1-1 Input '1': OFF '0': ON</text:p>
      <text:p text:style-name="Text_20_body">SW1-2 Input '1': OFF '0': ON</text:p>
      <text:p text:style-name="Horizontal_20_Line"/>
      <text:p text:style-name="First_20_paragraph">Figure 19 8255 Port B</text:p>
      <text:h text:style-name="Heading_20_2" text:outline-level="2"><text:bookmark-start text:name="bit-7-bit-0-2"/>bit 7 bit 0<text:bookmark-end text:name="bit-7-bit-0-2"/></text:h>
      <text:p text:style-name="First_20_paragraph">| 8530 | INT | SW2-4 | SW2-3 | DCD | CTS | HSET | RING |</text:p>
      <text:p text:style-name="Text_20_body">RING Output '1': Active '0': Idle</text:p>
      <text:p text:style-name="Text_20_body">Handset Hook Switch '1': Handset off-hook '0': Handset on-hook</text:p>
      <text:p text:style-name="Text_20_body">CTS Signal Status '1': Using Data '0': Not Using Data</text:p>
      <text:p text:style-name="Text_20_body">DCD Signal Status SW2-3 Input '1': OFF (IRQ4 Interrupt Request Signal) '0': ON ( )</text:p>
      <text:p text:style-name="Text_20_body">SW2-4 Input '1': OFF (IRQ2 Interrupt Request Signal) '0': ON ( )</text:p>
      <text:p text:style-name="Text_20_body">8530 Interrupt Request Status '1': Active '0': Request In Progress</text:p>
      <text:p text:style-name="Horizontal_20_Line"/>
      <text:p text:style-name="First_20_paragraph">Page 170</text:p>
      <text:p text:style-name="Horizontal_20_Line"/>
      <text:h text:style-name="Heading_20_2" text:outline-level="2"><text:bookmark-start text:name="outs-000175"/>outs-000175<text:bookmark-end text:name="outs-000175"/></text:h>
      <text:p text:style-name="Horizontal_20_Line"/>
      <text:p text:style-name="First_20_paragraph"><text:span text:style-name="Strong_20_Emphasis">Figure 20: 8255 Port C</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TS</text:p>
          </table:table-cell>
          <table:table-cell table:style-name="TableRowCell" office:value-type="string">
            <text:p text:style-name="Table_20_Contents">RIN EN</text:p>
          </table:table-cell>
          <table:table-cell table:style-name="TableRowCell" office:value-type="string">
            <text:p text:style-name="Table_20_Contents">RLDV 2</text:p>
          </table:table-cell>
          <table:table-cell table:style-name="TableRowCell" office:value-type="string">
            <text:p text:style-name="Table_20_Contents">RLDV 1</text:p>
          </table:table-cell>
          <table:table-cell table:style-name="TableRowCell" office:value-type="string">
    </table:table-cell>
        </table:table-row>
      </table:table>
      <text:list text:style-name="List_20_1">
        <text:list-item>
          <text:p text:style-name="List_20_Bullet_20_Tight">Relay 1 Control</text:p>
        </text:list-item>
      </text:list>
      <text:p text:style-name="Preformatted_20_Text"><text:s text:c="2"/>- '1': Turn Relay 1 OFF</text:p>
      <text:p text:style-name="Preformatted_20_Text"><text:s text:c="2"/>- '0': Turn Relay 1 ON</text:p>
      <text:list text:style-name="List_20_1">
        <text:list-item>
          <text:p text:style-name="List_20_Bullet_20_Tight">Relay 2 Control</text:p>
        </text:list-item>
      </text:list>
      <text:p text:style-name="Preformatted_20_Text"><text:s text:c="2"/>- '1': Turn Relay 2 OFF</text:p>
      <text:p text:style-name="Preformatted_20_Text"><text:s text:c="2"/>- '0': Turn Relay 2 ON</text:p>
      <text:list text:style-name="List_20_1">
        <text:list-item>
          <text:p text:style-name="List_20_Bullet_20_Tight">RING Interrupt Control</text:p>
        </text:list-item>
      </text:list>
      <text:p text:style-name="Preformatted_20_Text"><text:s text:c="2"/>- '1': Prohibit Incoming Signal Generation</text:p>
      <text:p text:style-name="Preformatted_20_Text"><text:s text:c="2"/>- '0': Permit</text:p>
      <text:list text:style-name="List_20_1">
        <text:list-item>
          <text:p text:style-name="List_20_Bullet_20_Tight">RTS Signal Status</text:p>
        </text:list-item>
      </text:list>
      <text:p text:style-name="Horizontal_20_Line"/>
      <text:p text:style-name="First_20_paragraph"><text:span text:style-name="Strong_20_Emphasis">Figure 21: 8255 Control Word Register</text:span></text:p>
      <text:p text:style-name="Text_20_body">(1) Bit Set/Reset</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header-rows>
          <table:table-row>
            <table:table-cell table:style-name="TableHeaderRowCell" office:value-type="string">
              <text:p text:style-name="Table_20_Heading">bit 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BITSEL</text:p>
          </table:table-cell>
          <table:table-cell table:style-name="TableRowCell" office:value-type="string">
            <text:p text:style-name="Table_20_Contents">DA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ist_20_1">
        <text:list-item>
          <text:p text:style-name="List_20_Bullet_20_Tight">Data to be Set at the Corresponding Bit of Port C Selected by BITSEL</text:p>
        </text:list-item>
      </text:list>
      <text:p text:style-name="Preformatted_20_Text"><text:s text:c="2"/>- '1': Set the Corresponding Bit to High Level</text:p>
      <text:p text:style-name="Preformatted_20_Text"><text:s text:c="2"/>- '0': Set the Corresponding Bit to Low Level</text:p>
      <text:list text:style-name="List_20_1">
        <text:list-item>
          <text:p text:style-name="List_20_Bullet_20_Tight">Bit Position of Port C to Set Data</text:p>
        </text:list-item>
      </text:list>
      <text:p text:style-name="Preformatted_20_Text"><text:s text:c="2"/>- 000: bit 0</text:p>
      <text:p text:style-name="Preformatted_20_Text"><text:s text:c="2"/>- 001: bit 1</text:p>
      <text:p text:style-name="Preformatted_20_Text"><text:s text:c="2"/>- 010: bit 2</text:p>
      <text:p text:style-name="Preformatted_20_Text"><text:s text:c="2"/>- 011: bit 3</text:p>
      <text:p text:style-name="Preformatted_20_Text"><text:s text:c="2"/>- 100: bit 4</text:p>
      <text:p text:style-name="Preformatted_20_Text"><text:s text:c="2"/>- 101: bit 5</text:p>
      <text:p text:style-name="Preformatted_20_Text"><text:s text:c="2"/>- 110: bit 6</text:p>
      <text:p text:style-name="Preformatted_20_Text"><text:s text:c="2"/>- 111: bit 7</text:p>
      <text:p text:style-name="Horizontal_20_Line"/>
      <text:p text:style-name="First_20_paragraph">Page 171</text:p>
      <text:p text:style-name="Horizontal_20_Line"/>
      <text:h text:style-name="Heading_20_2" text:outline-level="2"><text:bookmark-start text:name="outs-000176"/>outs-000176<text:bookmark-end text:name="outs-000176"/></text:h>
      <text:p text:style-name="First_20_paragraph">[Diagram]... 21 8255 Control Word Register (continued)</text:p>
      <text:p text:style-name="Text_20_body">(2) Operation Mode Selection</text:p>
      <text:p text:style-name="Horizontal_20_Line"/>
      <text:p text:style-name="First_20_paragraph">Bit</text:p>
      <text:p text:style-name="Text_20_body">7 6 5 4 3 2 1 0 '0' GROUP A MODE PORT A PORT C Group PORT B PORT C</text:p>
      <text:p text:style-name="Preformatted_20_Text"><text:s text:c="27"/>IN/OUT <text:s text:c="2"/>(High) <text:s text:c="4"/>B MODE <text:s text:c="3"/>IN/OUT <text:s text:c="3"/>(Low)</text:p>
      <text:p text:style-name="Preformatted_20_Text"><text:s text:c="44"/>IN/OUT <text:s text:c="21"/>IN/OUT</text:p>
      <text:p text:style-name="Horizontal_20_Line"/>
      <text:p text:style-name="First_20_paragraph">'1': The lower bit of Port C is input '0': The lower bit of Port C is output</text:p>
      <text:p text:style-name="Text_20_body">'1': Port B is input '0': Port B is output</text:p>
      <text:p text:style-name="Text_20_body">Group B (Ports A and the upper bit of Port C) operation mode selection '1': Mode 1 '0': Mode 0</text:p>
      <text:p text:style-name="Text_20_body">'1': The upper bit of Port C is input '0': Output</text:p>
      <text:p text:style-name="Text_20_body">'1': Port A is input '0': Output</text:p>
      <text:p text:style-name="Text_20_body">Group A (Port A and the upper bit of Port C) operation mode selection '11': Mode 2 '10': Mode 1 '01': Mode 1 '00': Mode 0</text:p>
      <text:p text:style-name="Horizontal_20_Line"/>
      <text:p text:style-name="First_20_paragraph">•6 Circuit Diagram</text:p>
      <text:p text:style-name="Text_20_body">The circuit diagram of CZ-6BC1 is shown in figure 22, and the equivalent circuits of PAL 1 and PAL 2 are shown in figures 23 and 24, respectively.</text:p>
      <text:p text:style-name="Text_20_body">[Diagram]... 22 Circuit diagram of CZ-6BC1 (No figure at the end of the volume)</text:p>
      <text:p text:style-name="Text_20_body">172</text:p>
      <text:p text:style-name="Horizontal_20_Line"/>
      <text:h text:style-name="Heading_20_2" text:outline-level="2"><text:bookmark-start text:name="outs-000177"/>outs-000177<text:bookmark-end text:name="outs-000177"/></text:h>
      <text:p text:style-name="First_20_paragraph">FAX Board</text:p>
      <text:p text:style-name="Text_20_body">●Figure 23 Equivalent circuit of PAL 1</text:p>
      <text:p text:style-name="Text_20_body">EAF9XX 19</text:p>
      <text:p text:style-name="Text_20_body">Vcc: 20P GND: 10P</text:p>
      <text:p text:style-name="Text_20_body">1 A8 2 A9 3 A10 4 A11</text:p>
      <text:p text:style-name="Text_20_body">5 A12 6 A13 7 A14 8 A15</text:p>
      <text:p text:style-name="Text_20_body">9 A16 11 A17 12 A18 14 A19</text:p>
      <text:p text:style-name="Text_20_body">15 A20 16 A21 17 A22 18 A23</text:p>
      <text:p text:style-name="Text_20_body">173</text:p>
      <text:p text:style-name="Horizontal_20_Line"/>
      <text:h text:style-name="Heading_20_2" text:outline-level="2"><text:bookmark-start text:name="outs-000178"/>outs-000178<text:bookmark-end text:name="outs-000178"/></text:h>
      <text:p text:style-name="First_20_paragraph">"Figure 24 PAL 2 equivalent circuit"</text:p>
      <text:p text:style-name="Text_20_body">Other text in the image seems to be component and signal names like "WR", "RD", "A2", "VCC", "GND", etc., which are typical in schematic diagrams and often remain the same across languages in technical contexts.</text:p>
      <text:p text:style-name="Horizontal_20_Line"/>
      <text:h text:style-name="Heading_20_2" text:outline-level="2"><text:bookmark-start text:name="outs-000179"/>outs-000179<text:bookmark-end text:name="outs-000179"/></text:h>
      <text:p text:style-name="First_20_paragraph">Universal I/O Board (CZ-6BU1)</text:p>
      <text:p text:style-name="Text_20_body">Not only can it be connected to things like LEDs and switches, but the Universal I/O Board, with its input and output capabilities, can also improve functionality by focusing on the mutual communication capabilities of parallel boards.</text:p>
      <text:p text:style-name="Text_20_body">The Universal I/O Board is a board that performs digital input and output of 16 bits each. In addition to data input, it has 8 handshake lines and 1 exclusive interrupt input line, allowing it to be used as an interface for various computer systems.</text:p>
      <text:p text:style-name="Text_20_body">The 4 input/output buffers for data signals are socketed, making it possible to handle changes to input/output boards and signal processing/current fluctuations flexibly.</text:p>
      <text:list text:style-name="Numbering_20_1">
        <text:list-item>
          <text:p text:style-name="List_20_Number_20_Tight">Specifications Data Signal Input/Output Logic (When Output) TTL Logic (Can also be changed to positive logic by replacing a buffer IC.) Number of Input Data Bits 16 bits Can input in units of 8 bits / 16 bits Capable of triggering latch/interrupts with an input strobe Number of Output Data Bits 16 bits</text:p>
        </text:list-item>
      </text:list>
      <text:p text:style-name="First_20_paragraph">(Page 175)</text:p>
      <text:p text:style-name="Horizontal_20_Line"/>
      <text:h text:style-name="Heading_20_2" text:outline-level="2"><text:bookmark-start text:name="outs-000180"/>outs-000180<text:bookmark-end text:name="outs-000180"/></text:h>
      <text:p text:style-name="Horizontal_20_Line"/>
      <text:h text:style-name="Heading_20_3" text:outline-level="3"><text:bookmark-start text:name="external-interface"/>External Interface<text:bookmark-end text:name="external-interface"/></text:h>
      <text:list text:style-name="List_20_1">
        <text:list-item>
          <text:p text:style-name="List_20_Bullet_20_Tight"><text:span text:style-name="Strong_20_Emphasis">Input</text:span>: 8-bit/16-bit units</text:p>
        </text:list-item>
        <text:list-item>
          <text:p text:style-name="List_20_Bullet_20_Tight"><text:span text:style-name="Strong_20_Emphasis">Output latch</text:span>: With output latch</text:p>
        </text:list-item>
        <text:list-item>
          <text:p text:style-name="List_20_Bullet_20_Tight"><text:span text:style-name="Strong_20_Emphasis">TTL Level</text:span>: TTL level</text:p>
        </text:list-item>
        <text:list-item>
          <text:p text:style-name="List_20_Bullet_20_Tight"><text:span text:style-name="Strong_20_Emphasis">All output signals</text:span>: With pull-up and pull-down resistors</text:p>
        </text:list-item>
      </text:list>
      <text:h text:style-name="Heading_20_3" text:outline-level="3"><text:bookmark-start text:name="handshake-signal"/>Handshake Signal<text:bookmark-end text:name="handshake-signal"/></text:h>
      <text:list text:style-name="List_20_1">
        <text:list-item>
          <text:p text:style-name="List_20_Bullet_20_Tight"><text:span text:style-name="Strong_20_Emphasis">Input strobe</text:span>: 2 points (1 point for every 8 bits of data)</text:p>
        </text:list-item>
        <text:list-item>
          <text:p text:style-name="List_20_Bullet_20_Tight"><text:span text:style-name="Strong_20_Emphasis">Output strobe</text:span>: 2 points</text:p>
        </text:list-item>
        <text:list-item>
          <text:p text:style-name="List_20_Bullet_20_Tight"><text:span text:style-name="Strong_20_Emphasis">Ready B signal</text:span>: 2 points</text:p>
        </text:list-item>
        <text:list-item>
          <text:p text:style-name="List_20_Bullet_20_Tight"><text:span text:style-name="Strong_20_Emphasis">Write B signal</text:span>: 2 points</text:p>
        </text:list-item>
        <text:list-item>
          <text:p text:style-name="List_20_Bullet_20_Tight"><text:span text:style-name="Strong_20_Emphasis">Interrupt input</text:span>: 1 point</text:p>
        </text:list-item>
      </text:list>
      <text:h text:style-name="Heading_20_3" text:outline-level="3"><text:bookmark-start text:name="io-connector"/>I/O Connector<text:bookmark-end text:name="io-connector"/></text:h>
      <text:p text:style-name="First_20_paragraph">50 PX2 flat cable connector (OMRON XG4A-5039-A)</text:p>
      <text:h text:style-name="Heading_20_3" text:outline-level="3"><text:bookmark-start text:name="power-supply"/>Power Supply<text:bookmark-end text:name="power-supply"/></text:h>
      <text:list text:style-name="List_20_1">
        <text:list-item>
          <text:p text:style-name="List_20_Bullet_20_Tight"><text:span text:style-name="Strong_20_Emphasis">Voltage</text:span>: +5 V</text:p>
        </text:list-item>
        <text:list-item>
          <text:p text:style-name="List_20_Bullet_20_Tight"><text:span text:style-name="Strong_20_Emphasis">Current consumption</text:span>: 480 mA (MAX)</text:p>
        </text:list-item>
      </text:list>
      <text:h text:style-name="Heading_20_3" text:outline-level="3"><text:bookmark-start text:name="port-address"/>Port Address<text:bookmark-end text:name="port-address"/></text:h>
      <text:p text:style-name="First_20_paragraph">$EAFD 00 - $EAFDFF, 4 bytes within this range (The lower 2 bits of the port address are always '00')</text:p>
      <text:p text:style-name="Text_20_body">Selectable by jumper switch for Level 2/Level 4.</text:p>
      <text:p text:style-name="Horizontal_20_Line"/>
      <text:h text:style-name="Heading_20_3" text:outline-level="3"><text:bookmark-start text:name="id_2-circuit-overview"/>2 Circuit Overview<text:bookmark-end text:name="id_2-circuit-overview"/></text:h>
      <text:p text:style-name="First_20_paragraph">The block diagram of the CZ-6BUI is shown in Figure 1. The CZ-6BUI is not equipped with general-purpose TTL components like the 8255 or other I/O LSIs, but is composed using universal TTL.</text:p>
      <text:p text:style-name="Text_20_body">In addition to 16-bit input and output, the CZ-6BUI has 2 sets (4 lines) of output handshake signals for external transmission and 2 sets (4 lines) of input handshake signals from the outside to the CZ-6BUI. Additionally, there is one pin dedicated to interrupt input. Each 16-bit input/output board can be used divided into 8 bits each, and there are 2 sets of corresponding handshake signals.</text:p>
      <text:p text:style-name="Text_20_body">(Page 176)</text:p>
      <text:p text:style-name="Horizontal_20_Line"/>
      <text:p text:style-name="Horizontal_20_Line"/>
      <text:h text:style-name="Heading_20_2" text:outline-level="2"><text:bookmark-start text:name="outs-000181"/>outs-000181<text:bookmark-end text:name="outs-000181"/></text:h>
      <text:p text:style-name="First_20_paragraph">Universal I/O Board</text:p>
      <text:p text:style-name="Text_20_body">●Figure 1 Block diagram of CZ-6BU1</text:p>
      <text:p text:style-name="Text_20_body">Left inputs: DB0 DB15</text:p>
      <text:p text:style-name="Text_20_body">A2 A23 AS</text:p>
      <text:p text:style-name="Text_20_body">LDS UDS A1 R/W EXRESET IACK2,4</text:p>
      <text:p text:style-name="Text_20_body">DTACK</text:p>
      <text:p text:style-name="Text_20_body">IRQ2,4</text:p>
      <text:p text:style-name="Text_20_body">Center blocks: Address Decoder</text:p>
      <text:p text:style-name="Text_20_body">Input/Output Control Circuit</text:p>
      <text:p text:style-name="Text_20_body">Port N+1 Output Data Register → Output Buffer → OUT10 OUT17</text:p>
      <text:p text:style-name="Text_20_body">Port N Output Data Register → Output Buffer → OUT00 OUT07</text:p>
      <text:p text:style-name="Text_20_body">Port N Input Data Register → Input Buffer ← IN10 IN17</text:p>
      <text:p text:style-name="Text_20_body">Port N Input Data Register → Input Buffer ← IN00 IN07</text:p>
      <text:p text:style-name="Text_20_body">Port N+3 Status Register → Data Output Strobe → OUTSTB1</text:p>
      <text:p text:style-name="Preformatted_20_Text"><text:s text:c="49"/>OUTSTB2</text:p>
      <text:p text:style-name="Preformatted_20_Text"/>
      <text:p text:style-name="Preformatted_20_Text"><text:s text:c="23"/>→ <text:s text:c="2"/>Data Input Strobe <text:s text:c="1"/>→ WTBUSY1</text:p>
      <text:p text:style-name="Preformatted_20_Text"><text:s text:c="48"/>WTBUSY0</text:p>
      <text:p text:style-name="Preformatted_20_Text"><text:s text:c="48"/>INSTBT</text:p>
      <text:p text:style-name="Preformatted_20_Text"><text:s text:c="48"/>INSTBO</text:p>
      <text:p text:style-name="Preformatted_20_Text"><text:s text:c="48"/>RDBUSY1</text:p>
      <text:p text:style-name="Preformatted_20_Text"><text:s text:c="48"/>RDBUSY0</text:p>
      <text:p text:style-name="First_20_paragraph">Port N+1 Interrupt Vector Register</text:p>
      <text:p text:style-name="Text_20_body">Port N+2 Interrupt Vector Register</text:p>
      <text:p text:style-name="Text_20_body">Interrupt Request → INT</text:p>
      <text:p text:style-name="Text_20_body">177</text:p>
      <text:p text:style-name="Horizontal_20_Line"/>
      <text:h text:style-name="Heading_20_2" text:outline-level="2"><text:bookmark-start text:name="outs-000182"/>outs-000182<text:bookmark-end text:name="outs-000182"/></text:h>
      <text:p text:style-name="Horizontal_20_Line"/>
      <text:p text:style-name="First_20_paragraph">Among output handshake signals, OUTSTB is a strobe signal that indicates that the X68000 has output data onto the data line to external devices. The external device responds with WTIBUSY in response. WTIBUSY will only be active when the terminal device is ready to receive data, and turns inactive once the intake is complete. The OUTSTB pulse is allocated from any one of the 16 bits of the input-output ports, so it can be chosen without restriction during access.</text:p>
      <text:p text:style-name="Text_20_body">Among input handshake signals, INSTB is a strobe signal indicating from an external device to the X68000 that data is being set on the data line. When detecting this, it becomes active and changes (temporarily referred to as edge detection) to CC, and RDBUSY signal transitions to VIP when the X68000 reads complete data. As a strobe signal indicating that data has been queued by the input port, an automatic violation when inputted indicates an automatic violation (active posture) to the X68000.</text:p>
      <text:p text:style-name="Text_20_body">The RDBUSY signal is seen as a declaration from the external device that data for the X68000 to read is prepared. When edge detection occurs upon wave declaration, the data keeps flowing on the handshake data by controlling the memory data dynamics and powered terminals.</text:p>
      <text:p text:style-name="Text_20_body">•3 Major Parts Arrangement</text:p>
      <text:p text:style-name="Text_20_body">The arrangement of the parts of the CZ-6BU1 is shown in Figure 2.</text:p>
      <text:p text:style-name="Text_20_body">178</text:p>
      <text:p text:style-name="Horizontal_20_Line"/>
      <text:p text:style-name="Horizontal_20_Line"/>
      <text:h text:style-name="Heading_20_2" text:outline-level="2"><text:bookmark-start text:name="outs-000183"/>outs-000183<text:bookmark-end text:name="outs-000183"/></text:h>
      <text:p text:style-name="First_20_paragraph">Universal I/O Board</text:p>
      <text:p text:style-name="Text_20_body">●Figure 2 Component layout of CZ-6BU1</text:p>
      <text:p text:style-name="Text_20_body">[Photograph of the CZ-6BU1 board]</text:p>
      <text:p text:style-name="Text_20_body">●4 Settings</text:p>
      <text:p text:style-name="Text_20_body">●4.1 Setting the port address</text:p>
      <text:p text:style-name="Text_20_body">The port address of the CZ-6BU1 can be set using the DIP switch (SW1). Switches 1 to 6 of SW1 each correspond to A2–A7 (bits 2–7 of the address), and they set where, in the range from the base address $EAFD00 to $EAFDFC, the board is placed. When a switch is ON, the corresponding address bit is '0', and when OFF, the bit is '1'. For example, if SW1's 1, 2, and 3 are OFF and 4, 5, and 6 are ON, the lower digits of the base address F</text:p>
      <text:p text:style-name="Text_20_body">179</text:p>
      <text:p text:style-name="Horizontal_20_Line"/>
      <text:h text:style-name="Heading_20_2" text:outline-level="2"><text:bookmark-start text:name="outs-000184"/>outs-000184<text:bookmark-end text:name="outs-000184"/></text:h>
      <text:p text:style-name="Horizontal_20_Line"/>
      <text:p text:style-name="First_20_paragraph"><text:span text:style-name="Strong_20_Emphasis">4.2 Setting Conditions for Output Strobe Signal (OUTSB1/2) Generation</text:span></text:p>
      <text:p text:style-name="Text_20_body">Each of the 16-bit prepared output ports can access its output port from which one of the 8-bit ports and determine which signal, OUTSB1 or OUTSB2, will be generated at either JP1 or JP2.</text:p>
      <text:p text:style-name="Text_20_body">Among the four jumpers, short one, and determine the lower bit of the output port (based on the base address + 1 offset), short two and determine the higher bit of the output port (written in pairs with the same base address), 3 or 4 for determining whether the lower or higher bit of the output port will be read and generate the OUTSB signal.</text:p>
      <text:p text:style-name="Text_20_body">Ensure that JP1 is shorted on the worksite, and JP2 or one of the shorts is in place. Pay attention to the detailed precautions such that OUTSB signals are generated when two or more conditions are met.</text:p>
      <text:p text:style-name="Horizontal_20_Line"/>
      <text:p text:style-name="First_20_paragraph"><text:span text:style-name="Strong_20_Emphasis">4.3 Data Latch Selection</text:span></text:p>
      <text:p text:style-name="Text_20_body">The CZ-6BU has an INSTB1 rise edge to latch the "lower side" data and an INSTB2 rise edge can latch "upper side" data (hold), and you can choose whether or not to use this function at JP3.</text:p>
      <text:p text:style-name="Text_20_body">Short one side of JP3, if you short INSTB1 on the rising edge when INSTB2 rising edge latches the data, and shorting the second one, then INSTB2 rising edge latches the data accordingly, and if you open it, the data status of the data line when the data port was read will be read as it is.</text:p>
      <text:p text:style-name="Text_20_body">When you use the latch function, once the data is latched, and you read out the new data from the data line, even if the rising edge of INSTB is reached, the data is not updated, so please be careful.</text:p>
      <text:p text:style-name="Horizontal_20_Line"/>
      <text:p text:style-name="First_20_paragraph">Page 180</text:p>
      <text:p text:style-name="Horizontal_20_Line"/>
      <text:h text:style-name="Heading_20_2" text:outline-level="2"><text:bookmark-start text:name="outs-000185"/>outs-000185<text:bookmark-end text:name="outs-000185"/></text:h>
      <text:p text:style-name="Horizontal_20_Line"/>
      <text:p text:style-name="First_20_paragraph"><text:span text:style-name="Strong_20_Emphasis">4 Setting the Interrupt Level</text:span></text:p>
      <text:p text:style-name="Text_20_body">The CZ-6BU1 can generate an interrupt on the rising edge of a dedicated interrupt input or INSTB signal. JP4 lets you select whether to use interrupt level 2 or level 4. When using level 2, set JP4 to 1 and 3. When using level 4, set JP4 to 2 and 4.</text:p>
      <text:p text:style-name="Horizontal_20_Line"/>
      <text:p text:style-name="First_20_paragraph"><text:span text:style-name="Strong_20_Emphasis">5 I/O Map</text:span></text:p>
      <text:p text:style-name="Text_20_body">The I/O map of the CZ-6BU1 is shown in Figure 4-8, with each contents explained. The base address + 0 and + 1 are for data input ports, the base address + 2 is for the interrupt mask, and the base address + 3 is used for setting the interrupt vector and reading the status of the handshake signals (WTBUSY and INSTB).</text:p>
      <text:p text:style-name="Horizontal_20_Line"/>
      <text:p text:style-name="First_20_paragraph"><text:span text:style-name="Strong_20_Emphasis">●Figure 4-3: I/O Address Map of Universal I/O Board</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header-rows>
          <table:table-row>
            <table:table-cell table:style-name="TableHeaderRowCell" office:value-type="string">
              <text:p text:style-name="Table_20_Heading">Access</text:p>
            </table:table-cell>
            <table:table-cell table:style-name="TableHeaderRowCell" office:value-type="string">
              <text:p text:style-name="Table_20_Heading">Address</text:p>
            </table:table-cell>
            <table:table-cell table:style-name="TableHeaderRowCell" office:value-type="string">
              <text:p text:style-name="Table_20_Heading">Register</text:p>
            </table:table-cell>
            <table:table-cell table:style-name="TableHeaderRowCell" office:value-type="string">
              <text:p text:style-name="Table_20_Heading">7</text:p>
            </table:table-cell>
            <table:table-cell table:style-name="TableHeaderRowCell" office:value-type="string">
              <text:p text:style-name="Table_20_Heading">6</text:p>
            </table:table-cell>
            <table:table-cell table:style-name="TableHeaderRowCell" office:value-type="string">
              <text:p text:style-name="Table_20_Heading">5</text:p>
            </table:table-cell>
            <table:table-cell table:style-name="TableHeaderRowCell" office:value-type="string">
              <text:p text:style-name="Table_20_Heading">4</text:p>
            </table:table-cell>
            <table:table-cell table:style-name="TableHeaderRowCell" office:value-type="string">
              <text:p text:style-name="Table_20_Heading">3</text:p>
            </table:table-cell>
            <table:table-cell table:style-name="TableHeaderRowCell" office:value-type="string">
              <text:p text:style-name="Table_20_Heading">2</text:p>
            </table:table-cell>
            <table:table-cell table:style-name="TableHeaderRowCell" office:value-type="string">
              <text:p text:style-name="Table_20_Heading">1</text:p>
            </table:table-cell>
            <table:table-cell table:style-name="TableHeaderRowCell" office:value-type="string">
              <text:p text:style-name="Table_20_Heading">0</text:p>
            </table:table-cell>
          </table:table-row>
        </table:table-header-rows>
        <table:table-row>
          <table:table-cell table:style-name="TableRowCell" office:value-type="string">
            <text:p text:style-name="Table_20_Contents">Read</text:p>
          </table:table-cell>
          <table:table-cell table:style-name="TableRowCell" office:value-type="string">
            <text:p text:style-name="Table_20_Contents">Base Address + $00</text:p>
          </table:table-cell>
          <table:table-cell table:style-name="TableRowCell" office:value-type="string">
            <text:p text:style-name="Table_20_Contents">Upper Data Input</text:p>
          </table:table-cell>
          <table:table-cell table:style-name="TableRowCell" office:value-type="string">
    </table:table-cell>
          <table:table-cell table:style-name="TableRowCell" office:value-type="string">
            <text:p text:style-name="Table_20_Contents">Input Data (Hig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1</text:p>
          </table:table-cell>
          <table:table-cell table:style-name="TableRowCell" office:value-type="string">
            <text:p text:style-name="Table_20_Contents">Lower Data Input</text:p>
          </table:table-cell>
          <table:table-cell table:style-name="TableRowCell" office:value-type="string">
    </table:table-cell>
          <table:table-cell table:style-name="TableRowCell" office:value-type="string">
            <text:p text:style-name="Table_20_Contents">Input Data (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2</text:p>
          </table:table-cell>
          <table:table-cell table:style-name="TableRowCell" office:value-type="string">
            <text:p text:style-name="Table_20_Contents">Not Use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 $03</text:p>
          </table:table-cell>
          <table:table-cell table:style-name="TableRowCell" office:value-type="string">
            <text:p text:style-name="Table_20_Contents">Strobe Data Input</text:p>
          </table:table-cell>
          <table:table-cell table:style-name="TableRowCell" office:value-type="string">
            <text:p text:style-name="Table_20_Contents">F3</text:p>
          </table:table-cell>
          <table:table-cell table:style-name="TableRowCell" office:value-type="string">
            <text:p text:style-name="Table_20_Contents">F2</text:p>
          </table:table-cell>
          <table:table-cell table:style-name="TableRowCell" office:value-type="string">
            <text:p text:style-name="Table_20_Contents">F1</text:p>
          </table:table-cell>
          <table:table-cell table:style-name="TableRowCell" office:value-type="string">
            <text:p text:style-name="Table_20_Contents">F0</text:p>
          </table:table-cell>
          <table:table-cell table:style-name="TableRowCell" office:value-type="string">
            <text:p text:style-name="Table_20_Contents">Strobe Data Inpu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Write | Base Address + $00 | Upper Data Output | | Output Data (High) | | | + $01 | Lower Data Output | | Output Data (Low) | | | + $02 | Interrupt Mask | M2 | M1 | M0 | Interrupt Mask | | | + $03 | Interrupt Vector | | Interrupt Vector |</text:p>
      <text:p text:style-name="Horizontal_20_Line"/>
      <text:list text:style-name="List_20_1">
        <text:list-item>
          <text:p text:style-name="List_20_Bullet_20_Tight">Base Address: Among SEAFDX0 to SEAFDX8, values where the lower 2 bits are "00" are base addresses (SEAFDX0, SEAFDX4, SEAFDX8, SEAFDXC)</text:p>
        </text:list-item>
      </text:list>
      <text:p text:style-name="Horizontal_20_Line"/>
      <text:p text:style-name="Horizontal_20_Line"/>
      <text:h text:style-name="Heading_20_2" text:outline-level="2"><text:bookmark-start text:name="outs-000186"/>outs-000186<text:bookmark-end text:name="outs-000186"/></text:h>
      <text:p text:style-name="First_20_paragraph">●Figure 4 Upper data input / Lower data input (base address +0 / +1)</text:p>
      <text:p text:style-name="Text_20_body">bit 7 6 5 4 3 2 1 bit 0</text:p>
      <text:p text:style-name="Text_20_body">Indicates the state of the input data signal '1': Input signal is 'L' level (when the buffer is LS240) '0': Input signal is 'H' level ( ″ )</text:p>
      <text:p text:style-name="Text_20_body">●Figure 5 Status input (base address +3)</text:p>
      <text:p text:style-name="Text_20_body">bit 7 6 5 4 3 2 1 bit 0 F3 F2 F1 F0</text:p>
      <text:p text:style-name="Text_20_body">F3: Upper data output timing '1': Data was written to the upper data output port '0': Detected the rising edge of the WTBUSY1 signal</text:p>
      <text:p text:style-name="Text_20_body">F2: Lower data output timing '1': Data was written to the lower data output port '0': Detected the rising edge of the WTBUSY0 signal</text:p>
      <text:p text:style-name="Text_20_body">F1: Upper data input timing '1': Detected the rising edge of the INSTB1 signal '0': Read from the upper data input port</text:p>
      <text:p text:style-name="Text_20_body">F0: Lower data input timing '1': Detected the rising edge of the INSTB0 signal '0': Read from the lower data input port</text:p>
      <text:p text:style-name="Text_20_body">●Figure 6 Upper data output / Lower data output (base address +0 / +1)</text:p>
      <text:p text:style-name="Text_20_body">bit 7 6 5 4 3 2 1 bit 0</text:p>
      <text:p text:style-name="Text_20_body">Sets the state of the output data signal '1': Output signal is 'L' level (when the buffer is LS240) '0': Output signal is 'H' level</text:p>
      <text:p text:style-name="Text_20_body">182</text:p>
      <text:p text:style-name="Horizontal_20_Line"/>
      <text:h text:style-name="Heading_20_2" text:outline-level="2"><text:bookmark-start text:name="outs-000187"/>outs-000187<text:bookmark-end text:name="outs-000187"/></text:h>
      <text:p text:style-name="Horizontal_20_Line"/>
      <text:p text:style-name="First_20_paragraph">Universal I/O Board</text:p>
      <text:p text:style-name="Text_20_body">● Figure ..... 7 Interrupt Mask Register (+2)</text:p>
      <text:p text:style-name="Text_20_body">| bit 7 | 6 | 5 | 4 | 3 | 2 | 1 | 0 | |------------------------------------| | M2 | M1 | M0 |</text:p>
      <text:p text:style-name="Text_20_body">Control for interrupt generation due to rising edge of INSTB1 '1': Allows interrupt generation '0': Prohibits</text:p>
      <text:p text:style-name="Text_20_body">Control for interrupt generation due to rising edge of INSTB0 '1': Allows interrupt generation '0': Prohibits</text:p>
      <text:p text:style-name="Text_20_body">Control for interrupt generation due to rising edge of INT signal '1': Allows interrupt generation '0': Prohibits</text:p>
      <text:p text:style-name="Text_20_body">● Figure ..... 8 Interrupt Vector Setting (Base Address +3)</text:p>
      <text:p text:style-name="Text_20_body">| bit 7 | 6 | 5 | 4 | 3 | 2 | 1 | 0 | |------------------------------------| | Interrupt Vector |</text:p>
      <text:p text:style-name="Text_20_body">Sets the interrupt vector number</text:p>
      <text:p text:style-name="Text_20_body">● 6 Connector Signal Layout</text:p>
      <text:p text:style-name="Text_20_body">The connector signal layout of CZ-6BUI is shown in Figure 9.</text:p>
      <text:p text:style-name="Horizontal_20_Line"/>
      <text:p text:style-name="First_20_paragraph">Page 183</text:p>
      <text:p text:style-name="Horizontal_20_Line"/>
      <text:h text:style-name="Heading_20_2" text:outline-level="2"><text:bookmark-start text:name="outs-000188"/>outs-000188<text:bookmark-end text:name="outs-000188"/></text:h>
      <text:p text:style-name="Horizontal_20_Line"/>
      <text:p text:style-name="First_20_paragraph">●Diagram......9 Universal I/O Board Connector Signal Arrangement</text:p>
      <text:p text:style-name="Text_20_body">CN1 1 OUT10 2 GND 3 OUT11 4 GND 5 OUT12 6 GND 7 OUT13 8 GND 9 OUT14 10 GND 11 OUT15 12 GND 13 OUT16 14 GND 15 OUT17 16 GND 17 OUT00 18 GND 19 OUT01 20 GND 21 OUT02 22 GND 23 OUT03 24 GND 25 OUT04 26 GND 27 OUT05 28 GND 29 OUT06 30 GND 31 OUT07 32 GND 33 OUTSTB1 34 GND 35 OUTSTB0 36 GND 37 WTBUSY1 38 GND 39 WTBUSY0 40 GND</text:p>
      <text:p text:style-name="Preformatted_20_Text">41 <text:s text:c="11"/>42 <text:s text:c="2"/>GND</text:p>
      <text:p text:style-name="Preformatted_20_Text">43 <text:s text:c="11"/>44 <text:s text:c="2"/>GND</text:p>
      <text:p text:style-name="Preformatted_20_Text">45 <text:s text:c="11"/>46 <text:s text:c="2"/>GND</text:p>
      <text:p text:style-name="Preformatted_20_Text">47 <text:s text:c="11"/>48 <text:s text:c="2"/>GND</text:p>
      <text:p text:style-name="Preformatted_20_Text">49 <text:s text:c="11"/>50 <text:s text:c="2"/>GND</text:p>
      <text:p text:style-name="First_20_paragraph">CM2 1 IN10 2 GND 3 IN11 4 GND 5 IN12 6 GND 7 IN13 8 GND 9 IN14 10 GND 11 IN15 12 GND 13 IN16 14 GND 15 IN17 16 GND 17 IN00 18 GND 19 IN01 20 GND 21 IN02 22 GND 23 IN03 24 GND 25 IN04 26 GND 27 IN05 28 GND 29 IN06 30 GND 31 IN07 32 GND 33 INSTB1 34 GND 35 INSTB0 36 GND 37 RDBUSY1 38 GND 39 RDBUSY0 40 GND 41 INT 42 GND</text:p>
      <text:p text:style-name="Preformatted_20_Text">43 <text:s text:c="10"/>44 <text:s text:c="2"/>GND</text:p>
      <text:p text:style-name="Preformatted_20_Text">45 <text:s text:c="10"/>46 <text:s text:c="2"/>GND</text:p>
      <text:p text:style-name="Preformatted_20_Text">47 <text:s text:c="10"/>48 <text:s text:c="2"/>GND</text:p>
      <text:p text:style-name="Preformatted_20_Text">49 <text:s text:c="10"/>50 <text:s text:c="2"/>GND</text:p>
      <text:p text:style-name="First_20_paragraph">●7 Circuit Diagram</text:p>
      <text:p text:style-name="Text_20_body">The circuit diagram of CZ-6BU1 is shown in Diagram 10.</text:p>
      <text:p text:style-name="Text_20_body">●Diagram......10 CZ-6BU1 Circuit Diagram (Reference)</text:p>
      <text:p text:style-name="Horizontal_20_Line"/>
      <text:p text:style-name="First_20_paragraph">Page Number: 184</text:p>
      <text:p text:style-name="Horizontal_20_Line"/>
      <text:h text:style-name="Heading_20_2" text:outline-level="2"><text:bookmark-start text:name="outs-000189"/>outs-000189<text:bookmark-end text:name="outs-000189"/></text:h>
      <text:p text:style-name="First_20_paragraph">Build-It-Yourself Peripherals Section</text:p>
      <text:p text:style-name="Horizontal_20_Line"/>
      <text:h text:style-name="Heading_20_2" text:outline-level="2"><text:bookmark-start text:name="outs-000190"/>outs-000190<text:bookmark-end text:name="outs-000190"/></text:h>
      <text:p text:style-name="First_20_paragraph"><text:span text:style-name="Emphasis">(Blank page in the original.)</text:span></text:p>
      <text:p text:style-name="Horizontal_20_Line"/>
      <text:h text:style-name="Heading_20_2" text:outline-level="2"><text:bookmark-start text:name="outs-000191"/>outs-000191<text:bookmark-end text:name="outs-000191"/></text:h>
      <text:p text:style-name="First_20_paragraph">Title: <text:span text:style-name="Strong_20_Emphasis">Examples of Self-Made Peripheral Devices</text:span></text:p>
      <text:p text:style-name="Text_20_body">Connecting self-made peripheral devices to a computer and making it work exactly the way you want, or enabling something that wasn’t possible before, is enjoyable. In this segment, we will introduce some somewhat unusual peripheral devices utilizing the I/O port of the X68000.</text:p>
      <text:p text:style-name="Text_20_body">Investigating how to connect self-made peripheral devices to a computer and adding functionalities that were not available previously has great appeal. Unlike commercial products, you can modify them to fill the gaps, focus only on simple functions, or build them exactly to your preferences. These aspects are exciting. However, if making them is too challenging, you might get frustrated and give up halfway through the process.</text:p>
      <text:p text:style-name="Text_20_body">Among the peripheral devices that I’ve actually built, this segment will introduce relatively simple ones that even beginners can make. The examples largely utilize interfaces seen in joysticks or joystick connectors, so I think they can also be used by referencing how to utilize these ports. Here are the self-made peripheral devices that will be introduced:</text:p>
      <text:list text:style-name="List_20_1">
        <text:list-item>
          <text:p text:style-name="List_20_Bullet_20_Tight">Disorderly Flasher</text:p>
        </text:list-item>
        <text:list-item>
          <text:p text:style-name="List_20_Bullet_20_Tight">Radio Control Stick</text:p>
        </text:list-item>
        <text:list-item>
          <text:p text:style-name="List_20_Bullet_20_Tight">Red-Blue Functional Selector Switch</text:p>
        </text:list-item>
        <text:list-item>
          <text:p text:style-name="List_20_Bullet_20_Tight">CRT Switch</text:p>
        </text:list-item>
      </text:list>
      <text:p text:style-name="First_20_paragraph">The second example, the Radio Control Stick, is slightly more complex compared to the other three, so it might be better to try this one after getting used to making the other simpler devices.</text:p>
      <text:p text:style-name="Text_20_body">Page 187</text:p>
      <text:p text:style-name="Horizontal_20_Line"/>
      <text:h text:style-name="Heading_20_2" text:outline-level="2"><text:bookmark-start text:name="outs-000192"/>outs-000192<text:bookmark-end text:name="outs-000192"/></text:h>
      <text:p text:style-name="First_20_paragraph"><text:span text:style-name="Emphasis">(Blank page in the original.)</text:span></text:p>
      <text:p text:style-name="Horizontal_20_Line"/>
      <text:h text:style-name="Heading_20_2" text:outline-level="2"><text:bookmark-start text:name="outs-000193"/>outs-000193<text:bookmark-end text:name="outs-000193"/></text:h>
      <text:p text:style-name="First_20_paragraph">Title: Random Number Generator</text:p>
      <text:p text:style-name="Text_20_body">Main Text: A physical random number, which cannot be discussed purely by probability, is indispensable for simulations of physical behaviors created using physical phenomena. Here, we will try to create a small-scale physical random number generation device ourselves.</text:p>
      <text:p text:style-name="Text_20_body">Additional Text: A physical random number is a number obtained by using physical phenomena such as dice or thermal noise. In contrast, numbers generally used on personal computers and created by calculations are referred to as pseudo-random numbers. Various methods of generating pseudo-random numbers have been devised, but they basically calculate the remainder when divided by some number of sums or products and assign it to the next random number. It keeps calculating sums and remainders, for instance, the remainder when A is divided by B, the next remainder when A+X is divided by C, and so on. By repeating a, b, and c in their selection methods, somewhat disorderly random numbers are obtained.</text:p>
      <text:p text:style-name="Text_20_body">Since pseudo-random numbers are produced by calculations, they are naturally reproducible. If the initial conditions are the same, the same sequence of numbers will be produced every time. This is convenient for some applications but cannot be used for problems that require genuine randomness. A reasonably large computer can prepare hardware to generate physical random numbers, but personal computers generally do not take such measures. I couldn't find anything in my home library about the generation of physical random numbers, at least not to the extent that I can tell.</text:p>
      <text:p text:style-name="Text_20_body">(Page number at the bottom) 189</text:p>
      <text:p text:style-name="Horizontal_20_Line"/>
      <text:h text:style-name="Heading_20_2" text:outline-level="2"><text:bookmark-start text:name="outs-000194"/>outs-000194<text:bookmark-end text:name="outs-000194"/></text:h>
      <text:h text:style-name="Heading_20_3" text:outline-level="3"><text:bookmark-start text:name="id_1-experiment-on-random-number-generation"/>1 Experiment on Random Number Generation<text:bookmark-end text:name="id_1-experiment-on-random-number-generation"/></text:h>
      <text:p text:style-name="First_20_paragraph">What to use to generate random numbers becomes the initial problem. A well-known device that generates relatively large noise is the zener diode. It was known that large computation machines use noise generated by zener diodes, but when we tried to find them, we couldn’t easily find them. So, we explored a less complex method. We found that applying reverse bias to transistors would generate noise. The simplicity in generating noise makes reaching the aforementioned electrical level with less step-up—a very convenient and appealing feature. Although there seem to be some problems with practical application, here we will use this signal to create a random number generator.</text:p>
      <text:h text:style-name="Heading_20_3" text:outline-level="3"><text:bookmark-start text:name="id_2-circuit-design"/>2 Circuit Design<text:bookmark-end text:name="id_2-circuit-design"/></text:h>
      <text:p text:style-name="First_20_paragraph">It may be a bit difficult to understand at first, but let’s go through a simple explanation by breaking things down into steps. This section includes brief explanations and notes on the circuit.</text:p>
      <text:h text:style-name="Heading_20_4" text:outline-level="4"><text:bookmark-start text:name="id_2-1-about-power-supply"/>2-1 About Power Supply<text:bookmark-end text:name="id_2-1-about-power-supply"/></text:h>
      <text:p text:style-name="First_20_paragraph">We decided to use a printed interface so that the random number generator can be connected to various PCs. The transistor’s reverse bias is around 10V, so we decided to use two 9V batteries (006P) in series. Nickel-cadmium batteries and lithium batteries maintain stable voltages until they are almost fully drained, so we confirmed that it operates stably from around 20V down to 12V.</text:p>
      <text:p text:style-name="Horizontal_20_Line"/>
      <text:h text:style-name="Heading_20_2" text:outline-level="2"><text:bookmark-start text:name="outs-000195"/>outs-000195<text:bookmark-end text:name="outs-000195"/></text:h>
      <text:p text:style-name="Horizontal_20_Line"/>
      <text:p text:style-name="First_20_paragraph"><text:span text:style-name="Strong_20_Emphasis">Figure ●1 : Circuit Diagram</text:span></text:p>
      <text:p text:style-name="Text_20_body"><text:span text:style-name="Strong_20_Emphasis">Note:</text:span></text:p>
      <text:list text:style-name="Pandoc_5f_Numbering_5f_1">
        <text:list-item>
          <text:p text:style-name="List_20_Number_20_Tight">Pins 9, 11, and 13 of the 74HC14 should be connected to GND or the five-line power supply.</text:p>
        </text:list-item>
        <text:list-item>
          <text:p text:style-name="List_20_Number_20_Tight">For 74HC74, pin 4 and pin 4020 GND should be connected to GNDB.</text:p>
        </text:list-item>
      </text:list>
      <text:p text:style-name="First_20_paragraph"><text:span text:style-name="Strong_20_Emphasis">2.2 Noise Source Part</text:span></text:p>
      <text:p text:style-name="Text_20_body">The part connected to a unique orientation including transistors at the end of the circuit is the noise generator. By short-circuiting the transistor collector and base to GND (0 V) and attaching resistance to the emitter, current should only flow in one direction. With a resistor of 470 KΩ or a larger value attached, an unexpected phenomenon occurred where the noise level dropped as the voltage increased. Observing the behavior, the noise frequency changed greatly when the transistor voltage was doubled, and the flowing current resulted in different noise emission. As the noise generation increases from the transistor output by trial, the output noise gradually decreased, and finally, it became a small waveform. To use noise as a sound source, a certain amount of current must flow, without which the noise would significantly reduce.</text:p>
      <text:p text:style-name="Horizontal_20_Line"/>
      <text:p text:style-name="Horizontal_20_Line"/>
      <text:h text:style-name="Heading_20_2" text:outline-level="2"><text:bookmark-start text:name="outs-000196"/>outs-000196<text:bookmark-end text:name="outs-000196"/></text:h>
      <text:p text:style-name="Quotations">2-3 Signal Amplification Section</text:p>
      <text:p text:style-name="First_20_paragraph">The generated noise is amplified by a six-stage transistor. The 0.1 µF capacitor in between cuts off the DC current and allows only the AC noise to pass through each stage of the transistor. The bias is set as a fixed bias for simplicity, and the collector current is designed to be around 1mA. The transistor used is the one I picked up in Akihabara, 2SC693E, and the maximum E voltage is not specified, but for reference, we assume it is 12V. Assuming the HFE of the transistor is 80 and the collector current is 1mA, the base current is calculated to be 1/80mA. The base voltage is about 0.6V fixed, so the remaining voltage for the resistor is 12-0.6=11.4V.</text:p>
      <text:p text:style-name="Text_20_body">Following Ohm's law: R = E/I = 11.4/(1/80) = 912 (kΩ)</text:p>
      <text:p text:style-name="Text_20_body">From here, it was understood that the resistance value is around 1MΩ (1000 kΩ). Furthermore, assuming the maximum collector voltage is 20V (assuming around 20V as the limit response), the HFE increases (160) at this time. The base current in this case is: I = E/R = (20-0.6)/1000 = 0.0194 (mA)</text:p>
      <text:p text:style-name="Text_20_body">Since the HFE at this collector current is 160, the collector current becomes: 0.0194 mA × 160 = 3.10 mA.</text:p>
      <text:p text:style-name="Text_20_body">With this operation in mind, there is some consideration to be given on how much load resistor should be. If designed per the specification of the textbook IC-VCE schematic diagram, it should be okay, but there is no need to think as far as to the worst-case design in this kind of simple circuit. Adjust it to fit the simple design. Assuming the collector voltage is 5-6V, with a supply voltage of 12V and an HFE of 160, the collector current at this stage would be: (20-0.6)/1000 × 160 = 1.8 (mA)</text:p>
      <text:p text:style-name="Text_20_body">The resistor should be: R = E/I = 6/1.8 = 3.3 (kΩ)</text:p>
      <text:p text:style-name="Text_20_body">If the HFE is small and the collector current is around 1mA, the voltage across this resistor is about 3.3V, so the input noise level may be large enough to cause the amplifying signal to clip, but there is no particular problem for audio applications.</text:p>
      <text:p text:style-name="Horizontal_20_Line"/>
      <text:h text:style-name="Heading_20_2" text:outline-level="2"><text:bookmark-start text:name="outs-000197"/>outs-000197<text:bookmark-end text:name="outs-000197"/></text:h>
      <text:p text:style-name="Horizontal_20_Line"/>
      <text:p text:style-name="First_20_paragraph">◉What kind of amplifier do you use to amplify your content without worrying about it?</text:p>
      <text:p text:style-name="Text_20_body">2·4 Waveform Shaping Section</text:p>
      <text:p text:style-name="Text_20_body">The noise that has become larger in the amplification stage is eventually routed to the op-amp through a capacitor and shaped into a clean signal before being sent for digital processing. When you use an op-amp like this one, it functions as a comparator (voltage detector). If the voltage at the input terminal (+) is higher than the voltage at the input terminal (-), the output becomes almost equal to the power supply voltage (+), and if the voltage at the input terminal (-) is higher, the output becomes almost equal to the zero-side power supply voltage (let’s use the word "ground"). Thus, which voltage at the input terminal (+) or (-) is higher will result in the output value becoming discernible as a binary value (digital signal). This time, I divided one of the inputs using a 220 KΩ resistor so that the threshold of the comparator’s decision could be separated by 1:1, and added the noise into the other with a transistor-driver. Usually, the only input noise is around the noise level of the power source so the output often changes near the boundary. Therefore, the noise on both ends is eliminated, and the output just changes state when it reaches the threshold.</text:p>
      <text:p text:style-name="Text_20_body">For the op-amp, I used an LM318. This is a precision amplifier commonly used for very high-frequency analog circuits like active filters, oscillators, etc. made by various companies like National Semiconductor, Texas Instruments, AMD, etc. The LM318 has an internal frequency compensation at 15 MHz and a slew rate (the speed at which the output voltage changes) of 50 V/µs. It is suitable for creating a quick response and highly accurate comparator as in this case.</text:p>
      <text:p text:style-name="Text_20_body">2·5 Examination of Signal Level Conversion Method</text:p>
      <text:p text:style-name="Text_20_body">The output from the op-amp is a binary signal, so it is suitable for digital circuits; however, the signal level can be quite different from the digital IC levels. We cannot simply directly connect it to a low-voltage digital IC that operates in the 5V range. Usually, the voltage from an op-amp is roughly around 2 times higher than the power supply voltage of most digital ICs. Considering a threshold value (offset) of 3V, if it is 0V, it is 0, and if it is 3V, it is 1, resulting in a 9V output from a 12V power supply.</text:p>
      <text:p text:style-name="Text_20_body">To connect to a computer, we must convert the digital IC voltage to this logic level. From the voltage value, it is switched in a range so that if the voltage is around 12V, it becomes practically binary H-level; and for higher voltages, a clamping method using a Schottky diode can be applied to streamline the signal level. If the output is 3V, use a C-MOS IC.</text:p>
      <text:p text:style-name="Horizontal_20_Line"/>
      <text:p text:style-name="Horizontal_20_Line"/>
      <text:h text:style-name="Heading_20_2" text:outline-level="2"><text:bookmark-start text:name="outs-000198"/>outs-000198<text:bookmark-end text:name="outs-000198"/></text:h>
      <text:p text:style-name="First_20_paragraph">I've considered various options, but in the end, by dropping the L-level all the way down to 0V, I decided to use an appropriate resistor division ratio to recognize the voltage as an L-level for the digital IC. Naturally, I need to calculate the division ratio accurately, or I may end up having all levels, including L-level and H-level, overlap, which would be a concern.</text:p>
      <text:p text:style-name="Text_20_body">2.6 Level Conversion Circuit</text:p>
      <text:p text:style-name="Text_20_body">I added a 4.7V zener and a capacitor to the output of the operational amplifier. The output of the op-amp was 20V, so let's calculate the current consumption of the zener. First, the current flowing through the 4.7K resistor is:</text:p>
      <text:p text:style-name="Text_20_body">(20 - 4.7) / 4.7 ≈ 3.26 (mA)</text:p>
      <text:p text:style-name="Text_20_body">So the current flowing through the 3.3K resistor is 4.7 / 3.3 ≈ 1.42 (mA), and the remaining 3.26 - 1.42 ≈ 1.84 mA is the current flowing through the zener. Therefore, the zener's power consumption is 1.84 × 4.7 ≈ 8.65 (mW). This is small compared to other 200 mW zeners, but over a long period of time, the added 4.7K resistance contributes to a 47 pF capacitor increase.</text:p>
      <text:p text:style-name="Text_20_body">For suppressed oscillation, textbooks suggest the simpler, perfect division method. However, the real world often differs significantly. This zener thing may be placed near some improper capacitance correction thinking, thus leading to no resistance increase bleeding off the current even if it hampers normal use.</text:p>
      <text:p text:style-name="Text_20_body">The remaining undischarged energy will also raise and lower the voltage cycles, which ultimately we want to avoid. These oscillations should ideally be attenuated. At this point, if the capacitor caused the small oscillation, we will need to replace it, which I generally regard as 47pF, added for practical reasons.</text:p>
      <text:p text:style-name="Text_20_body">If the capacity is too small, the waveform disturbance will remain; if it's too large, a temporary increase and decrease will be seen after restoration. This will cause intermittent phenomenon (as annotated in manufacturers’ datasheets), and we must carefully select the capacitor.</text:p>
      <text:p text:style-name="Text_20_body">A trial and error method often ends up successful through computations and practical results. I actually settled around 27pF initially, but later increased it to 100pF for compensation.</text:p>
      <text:p text:style-name="Text_20_body">To avoid overcompensating, I set 47pF in the final circuit. Consider simplification (plus or minus a couple pico-farads if necessary).</text:p>
      <text:p text:style-name="Text_20_body">Page 194</text:p>
      <text:p text:style-name="Horizontal_20_Line"/>
      <text:h text:style-name="Heading_20_2" text:outline-level="2"><text:bookmark-start text:name="outs-000199"/>outs-000199<text:bookmark-end text:name="outs-000199"/></text:h>
      <text:p text:style-name="Horizontal_20_Line"/>
      <text:p text:style-name="First_20_paragraph">If there is a tracing zero, it is best to use it so that the number of pages increases. Let's look at the waveform while adjusting.</text:p>
      <text:p text:style-name="Text_20_body">[Section] 7 Data Acquisition</text:p>
      <text:p text:style-name="Text_20_body">In this way, noise generated by the transistor was converted up to the digital IC level. However, read as is, it becomes a probability wave where the occurrence of 0s and 1s depends on the noise. Therefore, to discriminate between 0 and 1 at a probability ratio of about 1 to 1, we have put out this output through an HC14 with Schmitt characteristics so that the number of clock pulses becomes small.</text:p>
      <text:p text:style-name="Text_20_body">The output of this flip-flop naturally changes if its state changes. When reading into the PC as is, there is a very high probability that the data read during this period is invalid. To ensure stable data input, the output is first input into the latch. In other words, the data from the narrow pulse generated on the PC side is latched, then slowly read so that it can be read reliably. The latched data is output at the next clock pulse.</text:p>
      <text:p text:style-name="Text_20_body">The noise cancellation is performed. The signal to be latched is fetched into HC14, which is output from the power supply voltage input terminals. The latching signals are fetched with the HC14, which is output at the power supply voltage input terminals around the input terminals for the 1-bit latch. The reason for using the HC14 is to prevent unstable operations due to human body electrification when the IC on the input side is disconnected. Since the IC is powered by 5V, the inputs are grounded to prevent unintended latching due to human static electricity. To ensure that the voltage level of the PC input is not too low, we've included LEDs for 74HC4020.</text:p>
      <text:p text:style-name="Text_20_body">Section in case an LED is working is functioning without significant errors. Therefore, we've included it so it can be checked visually that the reading from the PC is being performed or whether a random number is being generated.</text:p>
      <text:p text:style-name="Text_20_body">[Section] 8 User Interface</text:p>
      <text:p text:style-name="Text_20_body">For the connection interface, use the printer port. For 1-bit reception, this allows it to utilize the PC's own output slot. This time, the data interfaced through the connector next to the input pin port is 1-bit. To use the "latch" output, the signal output port is 1-bit.</text:p>
      <text:p text:style-name="Text_20_body">In addition to employing joystick and printer ports, the printer port is used here for most connections. It is connected and can be seen using the printer port. The port uses the RANDOM DATA signal as BUSY and the signal for the latch.</text:p>
      <text:p text:style-name="Horizontal_20_Line"/>
      <text:p text:style-name="Horizontal_20_Line"/>
      <text:h text:style-name="Heading_20_2" text:outline-level="2"><text:bookmark-start text:name="outs-000200"/>outs-000200<text:bookmark-end text:name="outs-000200"/></text:h>
      <text:p text:style-name="Horizontal_20_Line"/>
      <text:p text:style-name="First_20_paragraph"><text:span text:style-name="Strong_20_Emphasis">3. Points to Note During Production</text:span></text:p>
      <text:p text:style-name="Text_20_body">This is not a circuit that demands extreme precision, so there are no particularly critical points that need close attention. However, let's touch upon some details that might be slightly finicky.</text:p>
      <text:p text:style-name="Text_20_body"><text:span text:style-name="Strong_20_Emphasis">3-1 Creation of the Baseboard</text:span></text:p>
      <text:p text:style-name="Text_20_body">The baseboard will be created while cutting out patterns with a cutter. When using a cutter to separate patterns, cut along the grooves in a suitable width; if you go too deeply, it will become difficult to separate cleanly. When you cut, aim to make the first incision in an H-like or V-like shape. If you have a blade for lettering, it is a good idea to use a V-shaped one.</text:p>
      <text:p text:style-name="Text_20_body">When cutting the baseboard in two, make a light cut parallel to the grain at first. If you make a 2.54 mm pitch hole in the baseboard in advance, it will form an easily breakable mesh-like pattern, so do not apply excessive force or it will break easily. Applying a groove with a cutter is enough to develop easily breakable states, but there's no need to make deep grooves.</text:p>
      <text:p text:style-name="Text_20_body">The cutter used can be the general type used for model-making. When cutting, be careful to apply gentle force. If buying a new one, use one that has a lockable blade to fix it.</text:p>
      <text:p text:style-name="Text_20_body"><text:span text:style-name="Strong_20_Emphasis">3-2 Component Placement</text:span></text:p>
      <text:p text:style-name="Text_20_body">For those who find it difficult to determine the placement of components, refer to the photographs. The analog part is likely placed similarly to the circuit diagram. By doing so, you can easily compare and check when examining the subsequent circuitry, making troubleshooting easier.</text:p>
      <text:p text:style-name="Horizontal_20_Line"/>
      <text:h text:style-name="Heading_20_2" text:outline-level="2"><text:bookmark-start text:name="outs-000201"/>outs-000201<text:bookmark-end text:name="outs-000201"/></text:h>
      <text:p text:style-name="First_20_paragraph">● Photo ......1 Component Placement</text:p>
      <text:h text:style-name="Heading_20_3" text:outline-level="3"><text:bookmark-start text:name="id_33-power-supply-handling"/>3.3 Power Supply Handling<text:bookmark-end text:name="id_33-power-supply-handling"/></text:h>
      <text:p text:style-name="First_20_paragraph">Place a 0.1 µF capacitor between the power pin and ground of each digital IC. This is to suppress noise on the power line; note that it is not shown in the circuit diagram, so take care not to forget it.</text:p>
      <text:h text:style-name="Heading_20_3" text:outline-level="3"><text:bookmark-start text:name="id_34-checking"/>3.4 Checking<text:bookmark-end text:name="id_34-checking"/></text:h>
      <text:p text:style-name="First_20_paragraph">Once assembly is finished, do not power it up right away. First, use a tester (multimeter) to measure the current draw. With the ICs not yet inserted in their sockets, measure the supply. If the current is 100 mA or more, something is probably wrong, so check again. Next, measure the supply voltage. The voltage between the GND and Vcc terminals of the digital ICs (74HC series) should be 5 V. If it is greatly different, check around the 3-terminal regulator.</text:p>
      <text:p text:style-name="Text_20_body">If everything is OK, turn the power off once and then insert the ICs. The legs of new ICs are spread wide, so straighten them beforehand against a flat surface. Rather than forcing them in, gently bend the legs at their base so they go in; you may carefully use tweezers for this.</text:p>
      <text:p text:style-name="Text_20_body">Apply power again and try it. If it is working correctly, the LED connected to the 74HC4020 should keep blinking on and off.</text:p>
      <text:p text:style-name="Text_20_body">197</text:p>
      <text:p text:style-name="Horizontal_20_Line"/>
      <text:h text:style-name="Heading_20_2" text:outline-level="2"><text:bookmark-start text:name="outs-000202"/>outs-000202<text:bookmark-end text:name="outs-000202"/></text:h>
      <text:p text:style-name="Horizontal_20_Line"/>
      <text:p text:style-name="First_20_paragraph">• 4 Adjustment</text:p>
      <text:p text:style-name="Text_20_body">As I have mentioned before, there are very few places to make adjustments, but if you have a tester, measure the collector voltage of the amplifier's transistor. When measuring, make sure to turn the pattern switch off. Adjust the resistance so that the collector voltage is about 3.3V for both transistors. It should fluctuate at around 1-2 mA, so setting it to about 3-7V should be sufficient. If that doesn't seem right, measure the 1MΩ resistor connected to the base. If there's an oscilloscope handy, it would be beneficial to observe the waveform. If you have a stereo-Zener diode, you can perform the same adjustment as with the op-amp HC 14 input resistance and a 47 pF capacitor in parallel.</text:p>
      <text:p text:style-name="Text_20_body">Now, more than anything else, measure the oscillation frequency, which affects the degree of disorder. Using a signal generator, measure the oscillation frequency of the HC 4020's 3rd pin (the pin connected to the LED) and its second harmonic frequency. (Multiplied by 16384 times). The value should be observed as a standard. An average oscillation frequency shorter than that of a random noise will make the data scrambled at a higher frequency. Random noise typically tends to oscillate at between 500kHz to 1MHz. Reduce the length of the sampling to get a random value. If possible, sample in packets at 100 ms, preferably within the range of 100–200 ms. Whenever a 1-bit signal is added, add 200 µs (0.2 ms) to the transmitting interval. If it's too difficult to reduce the interval in one go, experiment while adjusting the read-in intervals.</text:p>
      <text:p text:style-name="Text_20_body">• 5 Reading Software</text:p>
      <text:p text:style-name="Text_20_body">Finally, connect it to the X68000 main unit. Repeat operations such as adding the "STB" signal as the LSI returns the signal back. If the connected LED to 74HC74 responds randomly, you are ready to proceed to the next step of reading the BUSY signal after sending the STB pulse.</text:p>
      <text:p text:style-name="Horizontal_20_Line"/>
      <text:p text:style-name="Horizontal_20_Line"/>
      <text:h text:style-name="Heading_20_2" text:outline-level="2"><text:bookmark-start text:name="outs-000203"/>outs-000203<text:bookmark-end text:name="outs-000203"/></text:h>
      <text:p text:style-name="Horizontal_20_Line"/>
      <text:p text:style-name="First_20_paragraph">.6 In Conclusion</text:p>
      <text:p text:style-name="Text_20_body">As mentioned earlier when discussing the quality of the random numbers, you can use this comfortably as long as you pay attention to certain aspects. We were able to successfully use the analogy using a printed circuit board in practical applications, although data was obtained from individual hits. The number of occurrences was quite low, and although the generation of random numbers is still somewhat slow, it serves the purpose well enough. For now, I think we've achieved the initial goal of being able to use the physical random number generator on a personal computer.</text:p>
      <text:p text:style-name="Text_20_body">.7 Addendum</text:p>
      <text:p text:style-name="Text_20_body">The transistor used here, 2SC693, could be replaced with something more readily available. Upon investigation, it was found that it could be substituted with 2SC1815-Y (Table 1). The Y rank has an hFE of around 100, so the resistance value remains adequate. There’s no need to change the circuit diagram; simply replacing the transistor with 1815-Y should suffice. The base unit on my end has already been substituted.</text:p>
      <text:p text:style-name="Horizontal_20_Line"/>
      <text:h text:style-name="Heading_20_2" text:outline-level="2"><text:bookmark-start text:name="outs-000204"/>outs-000204<text:bookmark-end text:name="outs-000204"/></text:h>
      <text:p text:style-name="Horizontal_20_Line"/>
      <text:p text:style-name="First_20_paragraph">● Table 1: Parts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escription</text:p>
            </table:table-cell>
            <table:table-cell table:style-name="TableHeaderRowCell" office:value-type="string">
              <text:p text:style-name="Table_20_Heading">Model No.</text:p>
            </table:table-cell>
            <table:table-cell table:style-name="TableHeaderRowCell" office:value-type="string">
              <text:p text:style-name="Table_20_Heading">Quantity</text:p>
            </table:table-cell>
            <table:table-cell table:style-name="TableHeaderRowCell" office:value-type="string">
              <text:p text:style-name="Table_20_Heading">Unit Price</text:p>
            </table:table-cell>
          </table:table-row>
        </table:table-header-rows>
        <table:table-row>
          <table:table-cell table:style-name="TableRowCell" office:value-type="string">
            <text:p text:style-name="Table_20_Contents">Transistor</text:p>
          </table:table-cell>
          <table:table-cell table:style-name="TableRowCell" office:value-type="string">
            <text:p text:style-name="Table_20_Contents">2SC963E (or 2SC963F)</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Light Emitting Diode</text:p>
          </table:table-cell>
          <table:table-cell table:style-name="TableRowCell" office:value-type="string">
            <text:p text:style-name="Table_20_Contents">TLR102 etc.</text:p>
          </table:table-cell>
          <table:table-cell table:style-name="TableRowCell" office:value-type="string">
            <text:p text:style-name="Table_20_Contents">2</text:p>
          </table:table-cell>
          <table:table-cell table:style-name="TableRowCell" office:value-type="string">
            <text:p text:style-name="Table_20_Contents">30</text:p>
          </table:table-cell>
        </table:table-row>
        <table:table-row>
          <table:table-cell table:style-name="TableRowCell" office:value-type="string">
            <text:p text:style-name="Table_20_Contents">3-Terminal Regulator</text:p>
          </table:table-cell>
          <table:table-cell table:style-name="TableRowCell" office:value-type="string">
            <text:p text:style-name="Table_20_Contents">78L05</text:p>
          </table:table-cell>
          <table:table-cell table:style-name="TableRowCell" office:value-type="string">
            <text:p text:style-name="Table_20_Contents">1</text:p>
          </table:table-cell>
          <table:table-cell table:style-name="TableRowCell" office:value-type="string">
            <text:p text:style-name="Table_20_Contents">80</text:p>
          </table:table-cell>
        </table:table-row>
        <table:table-row>
          <table:table-cell table:style-name="TableRowCell" office:value-type="string">
            <text:p text:style-name="Table_20_Contents">Operational Amplifier</text:p>
          </table:table-cell>
          <table:table-cell table:style-name="TableRowCell" office:value-type="string">
            <text:p text:style-name="Table_20_Contents">LM318</text:p>
          </table:table-cell>
          <table:table-cell table:style-name="TableRowCell" office:value-type="string">
            <text:p text:style-name="Table_20_Contents">1</text:p>
          </table:table-cell>
          <table:table-cell table:style-name="TableRowCell" office:value-type="string">
            <text:p text:style-name="Table_20_Contents">320</text:p>
          </table:table-cell>
        </table:table-row>
        <table:table-row>
          <table:table-cell table:style-name="TableRowCell" office:value-type="string">
            <text:p text:style-name="Table_20_Contents">Digital IC</text:p>
          </table:table-cell>
          <table:table-cell table:style-name="TableRowCell" office:value-type="string">
            <text:p text:style-name="Table_20_Contents">74HC14</text:p>
          </table:table-cell>
          <table:table-cell table:style-name="TableRowCell" office:value-type="string">
            <text:p text:style-name="Table_20_Contents">1</text:p>
          </table:table-cell>
          <table:table-cell table:style-name="TableRowCell" office:value-type="string">
            <text:p text:style-name="Table_20_Contents">50</text:p>
          </table:table-cell>
        </table:table-row>
        <table:table-row>
          <table:table-cell table:style-name="TableRowCell" office:value-type="string">
    </table:table-cell>
          <table:table-cell table:style-name="TableRowCell" office:value-type="string">
            <text:p text:style-name="Table_20_Contents">74HC4020</text:p>
          </table:table-cell>
          <table:table-cell table:style-name="TableRowCell" office:value-type="string">
            <text:p text:style-name="Table_20_Contents">1</text:p>
          </table:table-cell>
          <table:table-cell table:style-name="TableRowCell" office:value-type="string">
            <text:p text:style-name="Table_20_Contents">220</text:p>
          </table:table-cell>
        </table:table-row>
        <table:table-row>
          <table:table-cell table:style-name="TableRowCell" office:value-type="string">
    </table:table-cell>
          <table:table-cell table:style-name="TableRowCell" office:value-type="string">
            <text:p text:style-name="Table_20_Contents">74HC74</text:p>
          </table:table-cell>
          <table:table-cell table:style-name="TableRowCell" office:value-type="string">
            <text:p text:style-name="Table_20_Contents">1</text:p>
          </table:table-cell>
          <table:table-cell table:style-name="TableRowCell" office:value-type="string">
            <text:p text:style-name="Table_20_Contents">100</text:p>
          </table:table-cell>
        </table:table-row>
        <table:table-row>
          <table:table-cell table:style-name="TableRowCell" office:value-type="string">
            <text:p text:style-name="Table_20_Contents">Zener Diode</text:p>
          </table:table-cell>
          <table:table-cell table:style-name="TableRowCell" office:value-type="string">
            <text:p text:style-name="Table_20_Contents">RD-4.7A</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Electrolytic Capacitor</text:p>
          </table:table-cell>
          <table:table-cell table:style-name="TableRowCell" office:value-type="string">
            <text:p text:style-name="Table_20_Contents">10µF/50V</text:p>
          </table:table-cell>
          <table:table-cell table:style-name="TableRowCell" office:value-type="string">
            <text:p text:style-name="Table_20_Contents">1</text:p>
          </table:table-cell>
          <table:table-cell table:style-name="TableRowCell" office:value-type="string">
            <text:p text:style-name="Table_20_Contents">25</text:p>
          </table:table-cell>
        </table:table-row>
        <table:table-row>
          <table:table-cell table:style-name="TableRowCell" office:value-type="string">
            <text:p text:style-name="Table_20_Contents">Ceramic Capacitor</text:p>
          </table:table-cell>
          <table:table-cell table:style-name="TableRowCell" office:value-type="string">
            <text:p text:style-name="Table_20_Contents">0.1µF</text:p>
          </table:table-cell>
          <table:table-cell table:style-name="TableRowCell" office:value-type="string">
            <text:p text:style-name="Table_20_Contents">8</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47pF</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Resistor</text:p>
          </table:table-cell>
          <table:table-cell table:style-name="TableRowCell" office:value-type="string">
            <text:p text:style-name="Table_20_Contents">1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3.3k</text:p>
          </table:table-cell>
          <table:table-cell table:style-name="TableRowCell" office:value-type="string">
            <text:p text:style-name="Table_20_Contents">4</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22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470k</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able:table-cell>
          <table:table-cell table:style-name="TableRowCell" office:value-type="string">
            <text:p text:style-name="Table_20_Contents">1M</text:p>
          </table:table-cell>
          <table:table-cell table:style-name="TableRowCell" office:value-type="string">
            <text:p text:style-name="Table_20_Contents">1</text:p>
          </table:table-cell>
          <table:table-cell table:style-name="TableRowCell" office:value-type="string">
            <text:p text:style-name="Table_20_Contents">5</text:p>
          </table:table-cell>
        </table:table-row>
        <table:table-row>
          <table:table-cell table:style-name="TableRowCell" office:value-type="string">
            <text:p text:style-name="Table_20_Contents">Connector</text:p>
          </table:table-cell>
          <table:table-cell table:style-name="TableRowCell" office:value-type="string">
            <text:p text:style-name="Table_20_Contents">Amphenol 36 Pin</text:p>
          </table:table-cell>
          <table:table-cell table:style-name="TableRowCell" office:value-type="string">
            <text:p text:style-name="Table_20_Contents">1</text:p>
          </table:table-cell>
          <table:table-cell table:style-name="TableRowCell" office:value-type="string">
            <text:p text:style-name="Table_20_Contents">800</text:p>
          </table:table-cell>
        </table:table-row>
        <table:table-row>
          <table:table-cell table:style-name="TableRowCell" office:value-type="string">
            <text:p text:style-name="Table_20_Contents">Battery Snap</text:p>
          </table:table-cell>
          <table:table-cell table:style-name="TableRowCell" office:value-type="string">
            <text:p text:style-name="Table_20_Contents">For power supply</text:p>
          </table:table-cell>
          <table:table-cell table:style-name="TableRowCell" office:value-type="string">
            <text:p text:style-name="Table_20_Contents">1 set</text:p>
          </table:table-cell>
          <table:table-cell table:style-name="TableRowCell" office:value-type="string">
            <text:p text:style-name="Table_20_Contents">40</text:p>
          </table:table-cell>
        </table:table-row>
        <table:table-row>
          <table:table-cell table:style-name="TableRowCell" office:value-type="string">
            <text:p text:style-name="Table_20_Contents">Dry Battery</text:p>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able:table-cell>
          <table:table-cell table:style-name="TableRowCell" office:value-type="string">
            <text:p text:style-name="Table_20_Contents">006P</text:p>
          </table:table-cell>
          <table:table-cell table:style-name="TableRowCell" office:value-type="string">
            <text:p text:style-name="Table_20_Contents">2</text:p>
          </table:table-cell>
          <table:table-cell table:style-name="TableRowCell" office:value-type="string">
            <text:p text:style-name="Table_20_Contents">100</text:p>
          </table:table-cell>
        </table:table-row>
        <table:table-row>
          <table:table-cell table:style-name="TableRowCell" office:value-type="string">
            <text:p text:style-name="Table_20_Contents">Printing Circuit Board</text:p>
          </table:table-cell>
          <table:table-cell table:style-name="TableRowCell" office:value-type="string">
            <text:p text:style-name="Table_20_Contents">ICB-504EG (Sunhayato)</text:p>
          </table:table-cell>
          <table:table-cell table:style-name="TableRowCell" office:value-type="string">
            <text:p text:style-name="Table_20_Contents">1</text:p>
          </table:table-cell>
          <table:table-cell table:style-name="TableRowCell" office:value-type="string">
            <text:p text:style-name="Table_20_Contents">300</text:p>
          </table:table-cell>
        </table:table-row>
        <table:table-row>
          <table:table-cell table:style-name="TableRowCell" office:value-type="string">
            <text:p text:style-name="Table_20_Contents">IC Socket</text:p>
          </table:table-cell>
          <table:table-cell table:style-name="TableRowCell" office:value-type="string">
            <text:p text:style-name="Table_20_Contents">14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16 Pin</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able:table-cell>
          <table:table-cell table:style-name="TableRowCell" office:value-type="string">
            <text:p text:style-name="Table_20_Contents">20 Pin</text:p>
          </table:table-cell>
          <table:table-cell table:style-name="TableRowCell" office:value-type="string">
            <text:p text:style-name="Table_20_Contents">1</text:p>
          </table:table-cell>
          <table:table-cell table:style-name="TableRowCell" office:value-type="string">
            <text:p text:style-name="Table_20_Contents">20</text:p>
          </table:table-cell>
        </table:table-row>
      </table:table>
      <text:p text:style-name="First_20_paragraph">Total: 2660 Yen</text:p>
      <text:p text:style-name="Horizontal_20_Line"/>
      <text:p text:style-name="First_20_paragraph">● List 1: Sample Program</text:p>
      <text:p text:style-name="Text_20_body">1000 REM Program for Random Number Generator Check 1010 REM Transfer from MZ-2500 Ou-Hu-BASIC 1020 REM bpeek, bpoke functions are necessary. Please use those obtained from computer clubs, etc.</text:p>
      <text:p text:style-name="Horizontal_20_Line"/>
      <text:p text:style-name="First_20_paragraph">Page 200</text:p>
      <text:p text:style-name="Horizontal_20_Line"/>
      <text:h text:style-name="Heading_20_2" text:outline-level="2"><text:bookmark-start text:name="outs-000205"/>outs-000205<text:bookmark-end text:name="outs-000205"/></text:h>
      <text:p text:style-name="First_20_paragraph">1030 int a,b,i,l,r,x,y,pi,zi: float f 1040 screen 2,0,1,1 1050 cls 1060 print "0: Display random pattern 1: Drunken walk 2: Circumference ratio"::input a 1070 if a=0 then goto 1330 1080 if a=1 then goto 1140 1090 if a=2 then goto 1420 1100 beep:goto 1060 1110 /* 1120 /* Drunken walk: It should always go in the same direction 1130 /* 1140 l=0:r=0 1150 cls 1160 for i=1 to 100 1170 x=39 1180 gosub 1580 1190 locate x,0:print "-" 1200 if a=0 then x=x-1 else x=x+1 1210 if x=0 then l=l+1: locate 0,10:print "Left ="::l;:goto 1250 1220 if x=78 then r=r+1:locate 0,11:print "Right ="::r;:goto 1250 1230 locate x,0:print "#" 1240 goto 1180 1250 next 1260 locate 0,15:print "END" 1270 beep 1280 end 1290 /* 1300 /* Display random graph 1310 /* 1320 /* 1330 screen 2,0,1,1 1340 for y=0 to 199 1350 for x=0 to 639 1360 gosub 1580 1370 if a=1 then pset(x,y,15) 1380 next 1390 next 1400 beep 1410 end 1420 cls</text:p>
      <text:p text:style-name="Horizontal_20_Line"/>
      <text:h text:style-name="Heading_20_2" text:outline-level="2"><text:bookmark-start text:name="outs-000206"/>outs-000206<text:bookmark-end text:name="outs-000206"/></text:h>
      <text:p text:style-name="First_20_paragraph">1430 /* 1440 * By random numbers hit the target, calculate the ratio of the circumference from the probability that falls within 1/4 circle 1450 /* 1460 pi = 0 1470 for i = 1 to 10000 1480 gosub 1670: x = b 1490 gosub 1670: y = b 1500 if x<text:span text:style-name="Emphasis">x+y</text:span>y &lt;= 65025 then pi = pi+1 1510 locate 0,0: print using "#.####";pi<text:span text:style-name="Emphasis">4/i 1520 next 1530 beep 1540 end 1550 /</text:span> 1560 * Generate a random number from the data and return it to variable a 1570 /* 1580 f = rnd() : if f &lt; 0.5 then goto 1580 1590 * if f &lt; 0.5 then a = 0 else a = 1 1600 * return 1610 bpoke(&amp;HE8C003,0) : bpoke(&amp;HE8C003,1) 1620 a = (bpeek(&amp;HE9C001)/32) and 1 1630 return 1640 /* 1650 * Create an 8-bit random number. Value is returned to b 1660 /* 1670 b = 0 1680 for zi = 1 to 8 1690 gosub 1580 1700 b = b*2+a 1710 next 1720 return</text:p>
      <text:p text:style-name="Text_20_body">The original Japanese comments have been translated while the code itself remains unchanged.</text:p>
      <text:p text:style-name="Horizontal_20_Line"/>
      <text:h text:style-name="Heading_20_2" text:outline-level="2"><text:bookmark-start text:name="outs-000207"/>outs-000207<text:bookmark-end text:name="outs-000207"/></text:h>
      <text:p text:style-name="First_20_paragraph">● RC Stick</text:p>
      <text:p text:style-name="Text_20_body">Having a far longer history as an analog stick than the Cyber Stick, the radio-control (RC) transmitter's stick is the basis here: I built an interface circuit that makes an RC transmitter masquerade as a Cyber Stick. The ease of handling of the stick really makes you feel that history behind it.</text:p>
      <text:p text:style-name="Text_20_body">The appearance of the Cyber Stick, the first full-fledged analog joystick, can be said to have revolutionized the world of games. Because it can be connected as long as you have a standard joystick port, it is now sold with the idea that an analog joystick can be used for games on machines other than the X68000 as well.</text:p>
      <text:p text:style-name="Text_20_body">Another feature of the Cyber Stick is that, without applying any special tricks to the existing joystick port, it adopts a method of reading 4 channels of analog information and 14 bits of digital (switch) information (the specification says the digital switches are 10 bits, but in practice 14 bits are sent). What can currently be controlled with the Cyber Stick on the market is 4 analog channels and 10 digital bits, so there is still plenty of room for it to be enhanced.</text:p>
      <text:p text:style-name="Text_20_body">Making use of this data-transmission scheme, I decided to connect to the X68000 an RC transmitter's stick, which could be called the analog stick of the model-hobby world. Of course, while it is connected, the RC transmitter is not modified. The idea is to receive the radio waves emitted by the transmitter, and to send the stick-tilt data obtained from them in the same way as the Cyber Stick. I named it the RC Stick. As for how it is used, since the transmitter has 2 channels, throttle operation is not possible, but I made all of the switches that the Cyber Stick has usable, and added a foot switch as well.</text:p>
      <text:p text:style-name="Text_20_body">203</text:p>
      <text:p text:style-name="Horizontal_20_Line"/>
      <text:h text:style-name="Heading_20_2" text:outline-level="2"><text:bookmark-start text:name="outs-000208"/>outs-000208<text:bookmark-end text:name="outs-000208"/></text:h>
      <text:h text:style-name="Heading_20_3" text:outline-level="3"><text:bookmark-start text:name="id_1-selecting-the-propo"/>1. Selecting the Propo<text:bookmark-end text:name="id_1-selecting-the-propo"/></text:h>
      <text:p text:style-name="First_20_paragraph">First of all, you probably don't know what kind of information gets conveyed just by tilting a stick on a propo. In places like model planes, the focus is more on how to build and maintain the model rather than the details of the propo, so it's not very helpful.</text:p>
      <text:p text:style-name="Text_20_body">Even so, let's address how to actually get and use a propo to understand its capabilities. The propo in question here is FP-T2 NBL, a dual-channel radio control transmitter for general model use, designated as 27 MHz AM. Before purchasing, make sure to verify that it is indeed 27 MHz AM. The majority of radio waves used for toy models are in the CB or ham radio frequency bands. Recently, however, 40 MHz bands have also been commonly used.</text:p>
      <text:p text:style-name="Text_20_body">For reference, the one I bought cost about 8,000 yen.</text:p>
      <text:p text:style-name="Text_20_body">Neither the receiver nor the servo are used, but if you have the same type of propo available, you might be able to use it.</text:p>
      <text:h text:style-name="Heading_20_3" text:outline-level="3"><text:bookmark-start text:name="id_2-how-does-the-propo-work"/>2. How Does the Propo Work?<text:bookmark-end text:name="id_2-how-does-the-propo-work"/></text:h>
      <text:p text:style-name="First_20_paragraph">The FP-T2 NBL that I purchased, as far as the box indicates, operates on 27 MHz AM. In AM, signals vary their strength to convey information, also known as amplitude modulation.</text:p>
      <text:p text:style-name="Text_20_body">Normal household radios also transmit sound in this manner. On the other hand, FM conveys information by varying its frequency rather than its amplitude, which is why the sound volume remains constant while the frequency shifts according to the audio signal, like FM radio or TV audio.</text:p>
      <text:p text:style-name="Text_20_body">There is also the option of sending data by shifting signals instead of amplitude. Using a simple loop antenna made of wire, you can easily monitor the radiation pattern by bringing it close to the propo's antenna. To be straightforward, amplitude modulation means it sends ON/OFF signals on 27 MHz.</text:p>
      <text:p text:style-name="Horizontal_20_Line"/>
      <text:h text:style-name="Heading_20_2" text:outline-level="2"><text:bookmark-start text:name="outs-000209"/>outs-000209<text:bookmark-end text:name="outs-000209"/></text:h>
      <text:p text:style-name="First_20_paragraph">Figure 1: Propo (FP-T2 NBL) Transmission Waveform</text:p>
      <text:p text:style-name="Text_20_body">In this waveform, you can see how data is transmitted by moving the stick. The method of sending data is relatively simple (Fig. 1).</text:p>
      <text:p text:style-name="Text_20_body">For the Propo, the electric wave is basically transmitting at a constant strength, and a fixed period of 3.</text:p>
      <text:p text:style-name="Text_20_body">The interval where the wave disappears is the time when the stick's tilt is detected. When the right stick (left-right direction) is moved, the point where it disappears from the start to the second point changes. The interval between the second and third points corresponds to the stick's tilt in the up-down direction.</text:p>
      <text:p text:style-name="Text_20_body">At the radio receiver's end, it takes this pulse width, reads it, and each channel's servo motor adjusts its rotation direction based on the comparison of the pulse width it receives and the standard width stored in itself. By using this, you can control functions such as accelerating or slowing down movements corresponding to the stick's tilt.</text:p>
      <text:p text:style-name="Text_20_body">In summary, when using a Propo with a radio-controlled device, the flow of information is as follows:</text:p>
      <text:list text:style-name="Numbering_20_1">
        <text:list-item>
          <text:p text:style-name="List_20_Number_20_Tight">Change in stick's tilt</text:p>
        </text:list-item>
        <text:list-item>
          <text:p text:style-name="List_20_Number_20_Tight">Change in the interval where it disappears</text:p>
        </text:list-item>
        <text:list-item>
          <text:p text:style-name="List_20_Number_20_Tight">Change in the width of the pulse generated (electronic wave)</text:p>
        </text:list-item>
        <text:list-item>
          <text:p text:style-name="List_20_Number_20_Tight">Change in the received signal by the receiver</text:p>
        </text:list-item>
        <text:list-item>
          <text:p text:style-name="List_20_Number_20_Tight">Change in the pulse width given to the servo motor</text:p>
        </text:list-item>
        <text:list-item>
          <text:p text:style-name="List_20_Number_20_Tight">Servo motor rotation</text:p>
        </text:list-item>
      </text:list>
      <text:p text:style-name="First_20_paragraph">By organizing it like this, one can grasp that, in radio control with this Propo, you are given a pulse width to the servo motor, and this is then conveyed to match the specifications of the Cyberstick with the X68000.</text:p>
      <text:p text:style-name="Text_20_body">(Page 205)</text:p>
      <text:p text:style-name="Horizontal_20_Line"/>
      <text:h text:style-name="Heading_20_2" text:outline-level="2"><text:bookmark-start text:name="outs-000210"/>outs-000210<text:bookmark-end text:name="outs-000210"/></text:h>
      <text:p text:style-name="Horizontal_20_Line"/>
      <text:p text:style-name="First_20_paragraph">Text at the top: (This appears to be a partial sentence and might not make complete sense on its own.)</text:p>
      <text:p text:style-name="Horizontal_20_Line"/>
      <text:p text:style-name="First_20_paragraph">●1 Waveform Measurement</text:p>
      <text:p text:style-name="Text_20_body">Next, let's take a closer look at the transmission signal of the propeller. First, the period at which data is being sent is approximately 20 ms. It sends roughly 50 times per second. The time it takes to switch to the next pulse is 0.2 ms. If you release your hand from the stick and the stick is in the center, the interval between the two higher/lower positions (pulse width) should be approximately 1.3 ms.</text:p>
      <text:p text:style-name="Text_20_body">Pulse width: When the stick is at the far left (or top), it stays close to approximately 0.8 ms. Conversely, when the stick is at the far right (or bottom), it remains close to approximately 1.7 ms.</text:p>
      <text:p text:style-name="Text_20_body">Because the width changes, next we will examine how the data changes in relation to the X68000 system.</text:p>
      <text:p text:style-name="Text_20_body">When using the X68000 system, the stick's position on the left (or top) is 00 H, and on the right (or bottom) is FFH.</text:p>
      <text:p text:style-name="Text_20_body">For single pulse width counting, 00H is the narrow side and FFH is the wide side.</text:p>
      <text:p text:style-name="Text_20_body">The joystick was designed to be in line with analog TV properties, but even in the X68000 system's VRAM XY coordinate system, it recognizes when the stick is at the center and accepts a signal of about 1.3 ms, which includes 0.8 ms and 1.7 ms as average values. Therefore, it accepts the center position correctly even if it's not precise.</text:p>
      <text:p text:style-name="Horizontal_20_Line"/>
      <text:p text:style-name="First_20_paragraph">●3 Radio Control Joystick Circuit Design</text:p>
      <text:p text:style-name="Text_20_body">Now that we understand the behavior of the propeller, let's start designing circuits gradually. The design is likely to be somewhat complicated, so we will describe the circuit blocks sequentially.</text:p>
      <text:p text:style-name="Horizontal_20_Line"/>
      <text:p text:style-name="First_20_paragraph">●3 *1 Propeller Receiving Circuit Design</text:p>
      <text:p text:style-name="Text_20_body">First, it is necessary to convert the signals received from the propeller into a digital signal that the IC can handle.</text:p>
      <text:p text:style-name="Horizontal_20_Line"/>
      <text:p text:style-name="First_20_paragraph">Page number at the bottom: 206</text:p>
      <text:p text:style-name="Horizontal_20_Line"/>
      <text:h text:style-name="Heading_20_2" text:outline-level="2"><text:bookmark-start text:name="outs-000211"/>outs-000211<text:bookmark-end text:name="outs-000211"/></text:h>
      <text:p text:style-name="First_20_paragraph">Radio Control Stick</text:p>
      <text:p text:style-name="Text_20_body">There is a receiver attached to the purchased Propo, but it was not much fun to have a black box in my own handmade work, so I decided to make it myself.</text:p>
      <text:p text:style-name="Text_20_body">Figure 2 shows the receiver circuit. The output of this circuit is a rectangular waveform corresponding to the signal simply received. When the Propo is sending a signal, it will be 1; otherwise, it will be 0. The signal is first selected by the circuit in T1. The filter data is shown in the circuit diagram, but if you can get it, it may be better to use an FCZ Research Institute ham band coil (for 28 MHz).</text:p>
      <text:h text:style-name="Heading_20_1" text:outline-level="1"><text:bookmark-start text:name="figure-2-propo-receiver-circuit-diagram"/>Figure 2: Propo receiver circuit diagram<text:bookmark-end text:name="figure-2-propo-receiver-circuit-diagram"/></text:h>
      <text:p text:style-name="First_20_paragraph">T1, T2, T3: 10 K bobbin (1-3) 8 times ⓪-2 4 times 3-6 same (2-4 (5-6 same))</text:p>
      <text:p text:style-name="Text_20_body">RxD 0V</text:p>
      <text:p text:style-name="Text_20_body">(page number) 207</text:p>
      <text:p text:style-name="Horizontal_20_Line"/>
      <text:h text:style-name="Heading_20_2" text:outline-level="2"><text:bookmark-start text:name="outs-000212"/>outs-000212<text:bookmark-end text:name="outs-000212"/></text:h>
      <text:p text:style-name="First_20_paragraph">The selected signal is amplified by the first-stage 2SK241 and the second-stage 2SC945. The amplified signal is detected by a 1N60, and this is used to switch a second-stage 2SC1815. In the state where there is no signal from the transmitter, the transistor is turned OFF, so the output is at the High level. When a signal comes in, the transistor turns ON and the output becomes Low.</text:p>
      <text:p text:style-name="Text_20_body">It might be better to add AGC to stabilize the detected output. But since this is not used while flying around like an RC model, the output level is not expected to vary that much, so here I kept it simple by just detecting.</text:p>
      <text:h text:style-name="Heading_20_3" text:outline-level="3"><text:bookmark-start text:name="id_32-design-of-the-received-waveform-processing-circuit"/>3.2 Design of the Received-Waveform Processing Circuit<text:bookmark-end text:name="id_32-design-of-the-received-waveform-processing-circuit"/></text:h>
      <text:p text:style-name="First_20_paragraph">The job of this section is to take the transmitter's output waveform coming from the receiver and produce a pulse signal for demodulating the pulse-width modulation. The signal sent from the transmitter and output from the receiver is a continuous waveform. To digitize this waveform, it must be sliced into segments. From where, and how much, should it be sliced — by getting an approximate count of how many waves (more precisely, falling edges) there are, you measure the difference between the maximum and minimum counts. Figure 3 shows the idea for this section.</text:p>
      <text:p text:style-name="Text_20_body">Once a slice is detected, the counter is started at its minimum value. When the next slice is detected, the counter value at that moment is latched. A little later the counter is reset, and it is prepared for the next channel's counting.</text:p>
      <text:p text:style-name="Text_20_body">● Figure ......3 Concept of converting the received waveform into data</text:p>
      <text:p text:style-name="Text_20_body">Transmitter output Receiver output (RxD) Channel control Channel 1 Channel 2 Counter start Counter clear Channel 1 data latch Counter reset Channel 2 data latch Cancel when below the minimum count Counter start Reset here because the pulse from the receiver side has disappeared</text:p>
      <text:p text:style-name="Text_20_body">208</text:p>
      <text:p text:style-name="Horizontal_20_Line"/>
      <text:h text:style-name="Heading_20_2" text:outline-level="2"><text:bookmark-start text:name="outs-000213"/>outs-000213<text:bookmark-end text:name="outs-000213"/></text:h>
      <text:p text:style-name="Horizontal_20_Line"/>
      <text:p text:style-name="First_20_paragraph">La Composa Mystique</text:p>
      <text:p text:style-name="Text_20_body">If this continues, the counter for the cut-off at some point will be mistaken, and the left and right will be reversed, causing confusion. Since this would make the count required, I decided to use a counter where the cut-off is naturally set to a certain period.</text:p>
      <text:p text:style-name="Text_20_body">As you can see in Figure 1, after sending the 7 tone signals and performing data transmission once, there is a long time before the next data is sent. Using this, if you reset it with a fixed time panel, you won't get lost in the middle, and you will be able to receive the next data correctly.</text:p>
      <text:p text:style-name="Text_20_body">Finally, the circuit diagram became as shown in Figure 4. Please refer to the timing example shown in Figure 5 and 6 for reference. In this circuit, signal RxD received on the communication path is used as the clear signal (CCLR1) of the counter and the latch signal of the counter value (CL01-CL31).</text:p>
      <text:p text:style-name="Text_20_body">The ICs used this time are dual-channel type, so we only use two of CL01 and CL11. CH21 and CH31 are expected to enter CH21 and CH31 (TANBL etc.) later in the future.</text:p>
      <text:p text:style-name="Text_20_body">■ ............. Reception signal processing circuit</text:p>
      <text:p text:style-name="Horizontal_20_Line"/>
      <text:p text:style-name="Horizontal_20_Line"/>
      <text:h text:style-name="Heading_20_2" text:outline-level="2"><text:bookmark-start text:name="outs-000214"/>outs-000214<text:bookmark-end text:name="outs-000214"/></text:h>
      <text:p text:style-name="Horizontal_20_Line"/>
      <text:p text:style-name="First_20_paragraph">● Figure 5 Operation of the Received Waveform Processing Circuit (1)</text:p>
      <text:p text:style-name="Text_20_body">(Swing to the left) (Swing up and down) 5.6ms RxD<text:line-break/>B<text:line-break/>D<text:line-break/>CTL 01<text:line-break/>CTL 11<text:line-break/>CCLR 1 0.9 ms (Detection width: 5 ms)</text:p>
      <text:p text:style-name="Text_20_body">● Figure 6 Operation of the Received Waveform Processing Circuit (2)</text:p>
      <text:p text:style-name="Text_20_body">280 kHz<text:line-break/>RxD<text:line-break/>A<text:line-break/>B<text:line-break/>C<text:line-break/>D<text:line-break/>CCLR 1<text:line-break/>CL 01</text:p>
      <text:p text:style-name="Text_20_body">First, the HC14 at the bottom left is an oscillation circuit that determines the overall operation timing of the collision stick by generating a fixed-period clock. The period is adjusted using the pulse width of the probe signals. The width of the pulse sent from the probe is around 0.8ms at its shortest and about 1.7ms at its longest.</text:p>
      <text:p text:style-name="Text_20_body">Other pulse widths are 1.7 - 0.8 = 0.9 ms. This corresponds to a clock of 0.9 / 256 = 0.00352 ms period, which results in approximately 280 kHz. Using the HC14, arbitrary oscillation periods can be realized, as shown in the diagram.</text:p>
      <text:p text:style-name="Horizontal_20_Line"/>
      <text:p text:style-name="Horizontal_20_Line"/>
      <text:h text:style-name="Heading_20_2" text:outline-level="2"><text:bookmark-start text:name="outs-000215"/>outs-000215<text:bookmark-end text:name="outs-000215"/></text:h>
      <text:p text:style-name="Horizontal_20_Line"/>
      <text:p text:style-name="First_20_paragraph">The number will be 1/CR. Here, assuming the capacitor is 0.001 µF, the resistance will be R=1/(280 KΩ × 0.001 µF), which is approximately 3.6 KΩ. The frequency of the pulse changes depending on the duty cycle, so we decided to use a resistance of 10 KΩ that allows us to adjust the clock frequency accordingly.</text:p>
      <text:p text:style-name="Text_20_body">After rectifying the waveform from the receiving circuit with an HC14, synchronize it internally with an HC74. The HC 123 on the right side constantly checks through the probe to see if it is active, and if so, it will reset within approximately 5 ms. While the pulse is coming, it moves the counter and generates a value-latch signal. The HC123 below this makes a quick signal with a width of one pulse of HC00, and then makes it into a 1-clock wide pulse with another HC74.</text:p>
      <text:p text:style-name="Text_20_body">The HC123 below is a circuit that cancels after resetting and the value is latched. This is adjusted so that the pulse generator is always oscillating. The amount of output from HC00 is CR after it falls and the other is reset. The output of HC123 goes low when CCLR1 goes high, and the counter is reset and remains. The next HC00 output signal is a count that shows the rise of the next pulse latch of the counter. The counter waits for the fall of the next HC164 counting pulse that was previously sent to the HC74.</text:p>
      <text:p text:style-name="Text_20_body">The HC00 and HC614 seems to be continuous (it’s probably fine to go directly down from here). The HC74 is reversed, when HC74 ends with 1, HC123 resets and the period when the output becomes zero is synchronized, and the timing becomes easier. Even though the clock and reset timing are the same, it is because the HC00 division is multiple and is easy to understand.</text:p>
      <text:p text:style-name="Text_20_body">3.3 Design of Counter Circuit (1)</text:p>
      <text:p text:style-name="Text_20_body">Next, we will count the waveform from the original rectifier circuit and latch the data, making a circuit. Figure 7 on the next page arranges it.</text:p>
      <text:p text:style-name="Text_20_body">HC4040 is a 12-stage counter, it is a common counter for the 74LS series. The degrees of freedom are many stages. In this case, we use only the lower 8 bits. The HC4040 is below the HC30 when the counter is FFH, only the rising edge proceeds. The counter is a clock-type falling edge, which advances when going from FFH to FEH, and in the case of FFH, the clock is low level. Therefore, when it becomes FFH...</text:p>
      <text:p text:style-name="Horizontal_20_Line"/>
      <text:p text:style-name="First_20_paragraph">This translation covers the entire visible portion of the Japanese text from the image you provided.</text:p>
      <text:p text:style-name="Horizontal_20_Line"/>
      <text:h text:style-name="Heading_20_2" text:outline-level="2"><text:bookmark-start text:name="outs-000216"/>outs-000216<text:bookmark-end text:name="outs-000216"/></text:h>
      <text:p text:style-name="First_20_paragraph">●Figure 7 Circuit around the counter</text:p>
      <text:p text:style-name="Horizontal_20_Line"/>
      <text:h text:style-name="Heading_20_2" text:outline-level="2"><text:bookmark-start text:name="outs-000217"/>outs-000217<text:bookmark-end text:name="outs-000217"/></text:h>
      <text:p text:style-name="Horizontal_20_Line"/>
      <text:p text:style-name="First_20_paragraph">HC4040's clock input can be forcibly fixed at 0. This way, the counter will stop counting, resulting in FFH for the counter. When an interrupt signal is received, the counter value becomes 00H, the HC30 output becomes 1 again, and it restarts counting.</text:p>
      <text:p text:style-name="Text_20_body">3.4 Designing the Host Interface Circuit</text:p>
      <text:p text:style-name="Text_20_body">Let's discuss the stages of this part, that is, the interface part with the host, specifically the X68000. Fig. 10 shows the outline of this part.</text:p>
      <text:p text:style-name="Text_20_body">This program begins operations by receiving the REQ signal from the host and latching the value of the counter at the timing akin to that of Cyber Stick. It seems that the Cyber Stick uses an exclusive IC for this process. Given the considerable time it takes to create a program, we decided to use a general-purpose logic chip to simplify the process.</text:p>
      <text:p text:style-name="Text_20_body">Cyber Stick allows two choices of transmission speeds, but in slow mode, the CPU load is lower. However, in practice, the communication is conducted at the most rapid rate that the computer's file transfer DMA transmission can handle. If you used the X68000's slow mode, file transfer speed would be limited to the speed on the host's side. For example, if you only use one-third of the 280 kHz clock in the host machine, the timing for data transfer processing would be equivalent to one-third.</text:p>
      <text:p text:style-name="Text_20_body">Figures 9 and 10 are the conceptual diagrams for processing. Figure 9 shows the outline of data transmission processing, Figure 10 is a detailed timing diagram, and Figure 11 indicates the data format for transmission. REQ0, XACK0, and XHL0 relate to the counter circuits from DAT01 to DAT31.</text:p>
      <text:p text:style-name="Text_20_body">For the actual timing of the operations, we use the 280 kHz clock produced by the digital signal processor's counter. The Cyber Stick operates by recognizing data from the host and synchronizing the host interface circuit timing accordingly. You might think this is redundant, but in reality, the actual timing difference on the host's side isn't a problem. In fact, the process will complete so long as it falls before the maximum cycle count.</text:p>
      <text:p text:style-name="Text_20_body">To provide accurate timings, Cyber Stick's drive pulse timing is crucial. Refer to the sample data values in Figure 9, assuming the clock as 280 kHz. Consider these values for better comprehension.</text:p>
      <text:p text:style-name="Text_20_body">Let's examine the operations of the host interface circuit. The circuit design is somewhat complex, but understanding its workings is advantageous.</text:p>
      <text:p text:style-name="Horizontal_20_Line"/>
      <text:p text:style-name="Horizontal_20_Line"/>
      <text:h text:style-name="Heading_20_2" text:outline-level="2"><text:bookmark-start text:name="outs-000218"/>outs-000218<text:bookmark-end text:name="outs-000218"/></text:h>
      <text:p text:style-name="First_20_paragraph"><text:span text:style-name="Strong_20_Emphasis">"Figure 8 Host Interface Circuit Diagram"</text:span></text:p>
      <text:p text:style-name="Horizontal_20_Line"/>
      <text:h text:style-name="Heading_20_2" text:outline-level="2"><text:bookmark-start text:name="outs-000219"/>outs-000219<text:bookmark-end text:name="outs-000219"/></text:h>
      <text:p text:style-name="Horizontal_20_Line"/>
      <text:p text:style-name="First_20_paragraph">Diagram ••• 9 Host Interface Timing Diagram (1)</text:p>
      <text:p text:style-name="Text_20_body">( ) Indicates the value when the Cyber Stick is in use (in rapid mode) Figures indicate when the clock is at 280kHz</text:p>
      <text:p text:style-name="Text_20_body">Diagram ••• 10 Host Interface Timing Diagram (2)</text:p>
      <text:p text:style-name="Text_20_body">Initially, the device at the end, referred to as REQ 0, is a transmission start request from the X68000. When this becomes 0, the timing starts. Suddenly, it starts timing with the HC 123 one-shot.</text:p>
      <text:p text:style-name="Text_20_body">In the beginning, this one-shot was not included, but when checking the timing of the Cyber Stick, it was found that when REQ 0 was set to 0, the data transmission started with a delay of 1.5 ms. Therefore, it was included to adjust the timing.</text:p>
      <text:p text:style-name="Text_20_body">215</text:p>
      <text:p text:style-name="Horizontal_20_Line"/>
      <text:h text:style-name="Heading_20_2" text:outline-level="2"><text:bookmark-start text:name="outs-000220"/>outs-000220<text:bookmark-end text:name="outs-000220"/></text:h>
      <text:p text:style-name="Horizontal_20_Line"/>
      <text:p text:style-name="First_20_paragraph"><text:span text:style-name="Strong_20_Emphasis">Fig. 11 Cyber Stick Data Format</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HeaderRowCell" office:value-type="string">
      </table:table-cell>
            <table:table-cell table:style-name="TableHeaderRowCell" office:value-type="string">
              <text:p text:style-name="Table_20_Heading">XHL</text:p>
            </table:table-cell>
            <table:table-cell table:style-name="TableHeaderRowCell" office:value-type="string">
              <text:p text:style-name="Table_20_Heading">DAT31</text:p>
            </table:table-cell>
            <table:table-cell table:style-name="TableHeaderRowCell" office:value-type="string">
              <text:p text:style-name="Table_20_Heading">DAT21</text:p>
            </table:table-cell>
            <table:table-cell table:style-name="TableHeaderRowCell" office:value-type="string">
              <text:p text:style-name="Table_20_Heading">DAT11</text:p>
            </table:table-cell>
            <table:table-cell table:style-name="TableHeaderRowCell" office:value-type="string">
              <text:p text:style-name="Table_20_Heading">DAT01</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A + A'</text:p>
          </table:table-cell>
          <table:table-cell table:style-name="TableRowCell" office:value-type="string">
            <text:p text:style-name="Table_20_Contents">B + B'</text:p>
          </table:table-cell>
          <table:table-cell table:style-name="TableRowCell" office:value-type="string">
            <text:p text:style-name="Table_20_Contents">C</text:p>
          </table:table-cell>
          <table:table-cell table:style-name="TableRowCell" office:value-type="string">
            <text:p text:style-name="Table_20_Contents">D</text:p>
          </table:table-cell>
        </table:table-row>
        <table:table-row>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E1</text:p>
          </table:table-cell>
          <table:table-cell table:style-name="TableRowCell" office:value-type="string">
            <text:p text:style-name="Table_20_Contents">E2</text:p>
          </table:table-cell>
          <table:table-cell table:style-name="TableRowCell" office:value-type="string">
            <text:p text:style-name="Table_20_Contents">F</text:p>
          </table:table-cell>
          <table:table-cell table:style-name="TableRowCell" office:value-type="string">
            <text:p text:style-name="Table_20_Contents">G</text:p>
          </table:table-cell>
        </table:table-row>
        <table:table-row>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Channel #1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Channel #2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0</text:p>
          </table:table-cell>
          <table:table-cell table:style-name="TableRowCell" office:value-type="string">
            <text:p text:style-name="Table_20_Contents">Channel #3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Channel #4 Upp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0</text:p>
          </table:table-cell>
          <table:table-cell table:style-name="TableRowCell" office:value-type="string">
            <text:p text:style-name="Table_20_Contents">Channel #1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Channel #2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0</text:p>
          </table:table-cell>
          <table:table-cell table:style-name="TableRowCell" office:value-type="string">
            <text:p text:style-name="Table_20_Contents">Channel #3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Channel #4 Lower</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0</text:p>
          </table:table-cell>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able:table-cell>
          <table:table-cell table:style-name="TableRowCell" office:value-type="string">
            <text:p text:style-name="Table_20_Contents">(4 bits of remaining dat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The switch is pressed and will be 0 when released it will be 1. • A + A' (B + B') will be one of A(B) or A'(B'). • The Cyber Stick includes START, G1 and SELECT buttons. • Adapter data is sent 8 bits at a time per channel and sent to 4 channels.</text:p>
      <text:p text:style-name="Horizontal_20_Line"/>
      <text:p text:style-name="First_20_paragraph">HC74 produces a signal indicating the middle of the data transmission. When REQ comes, HC123 is delayed and set. When all data transmissions are finished, it is reset. Two data transmissions are made for the timing marked by the arrow in the figure. In the Cyber Stick, data is transmitted twice as a pair. Although the ACK for these two data repeats is also formed in pairs, HC165 is used to generate SZ80 (X68000 response signal). ACK response is counted by HC161 and used to indicate whether it's an odd number or an even number and to show which group of individuals. Once these 12 data transmissions conclude, Y6 is set, completing the initial setup of the HC74. When that is set, the transmission ends.</text:p>
      <text:p text:style-name="Text_20_body">Page 216</text:p>
      <text:p text:style-name="Horizontal_20_Line"/>
      <text:h text:style-name="Heading_20_2" text:outline-level="2"><text:bookmark-start text:name="outs-000221"/>outs-000221<text:bookmark-end text:name="outs-000221"/></text:h>
      <text:p text:style-name="Horizontal_20_Line"/>
      <text:h text:style-name="Heading_20_3" text:outline-level="3"><text:bookmark-start text:name="id_3-5-counter-circuit-design-2"/>3-5 Counter Circuit Design (2)<text:bookmark-end text:name="id_3-5-counter-circuit-design-2"/></text:h>
      <text:p text:style-name="First_20_paragraph">Now, let's look at the right half of the counter circuit diagram (Diagram 7) that we left off in the previous section. Data regarding the inclination of the stick, which is returned from the left-side latch (HC374), is being read. If the data is not read by the latch at the moment when the REQ signal is returned, there is a risk that the data will change while being transferred to the host, which would be dangerous.</text:p>
      <text:p text:style-name="Text_20_body">What cross-sectional processing does, is send all the data in such a way that the host (data of the 4-bit channel to be sent to the top nibble) does not change the data series sent from the host to the upper nibble while transmitting. This circuit routes the latch-in signal input in sequence to the upper nibble in series, so you can see switch data in parallel.</text:p>
      <text:p text:style-name="Text_20_body">All that is required in the end is to latch the data, as the LS374 latch can be used with a signal similar to SL50, and it captures switch data from SL50 as well. This is known as the “interleaved data” on the 12th day of the transmission protocol by Perry himself, but as you can see it does the same on the input side, so it can also carry the data correctly to the host with proper switching.</text:p>
      <text:p text:style-name="Text_20_body">In this line block, measures are taken to prevent latching hazards using LS series bus drivers. Making and solving this problem will ensure a smooth setup.</text:p>
      <text:p text:style-name="Horizontal_20_Line"/>
      <text:h text:style-name="Heading_20_3" text:outline-level="3"><text:bookmark-start text:name="id_4-radio-control-stick-manufacturing"/>4 Radio Control Stick Manufacturing<text:bookmark-end text:name="id_4-radio-control-stick-manufacturing"/></text:h>
      <text:p text:style-name="First_20_paragraph">There aren’t any specific essential parts, but I think it would be better to have a switch. If you press a button and it changes to ON, a switch like that might come in handy.</text:p>
      <text:p text:style-name="Text_20_body">When I lined up at the RC parts section in the autumn Akihabara Hobby &amp; Rescue Center entrance to get joy sticks, I saw that the one I got had both sides pressed out and neatly, it seemed quite professional, so I tried to finish the switch properly at the end.</text:p>
      <text:p text:style-name="Text_20_body">I used a foot switch that operates well for athletic shoes. It’s not the type of foot switch you typically get in music stores for electronic instruments, but I think it can also be used similarly. Please choose the case or power supplies to suit your preferences, including external switch terminals.</text:p>
      <text:p text:style-name="Text_20_body">Two would be sufficient for game-use switches and antenna stands etc.</text:p>
      <text:p text:style-name="Text_20_body">Since the output terminal attachment is delicate, please handle it carefully. This component particularly handles high frequencies, so try to make the grounding (0 V) pattern as wide as possible. Use a 504 EC grounding braid for this part.</text:p>
      <text:p text:style-name="Horizontal_20_Line"/>
      <text:p text:style-name="First_20_paragraph">Page 217</text:p>
      <text:p text:style-name="Horizontal_20_Line"/>
      <text:h text:style-name="Heading_20_2" text:outline-level="2"><text:bookmark-start text:name="outs-000222"/>outs-000222<text:bookmark-end text:name="outs-000222"/></text:h>
      <text:p text:style-name="Horizontal_20_Line"/>
      <text:p text:style-name="First_20_paragraph">Cut out the necessary pattern with a cutter and try to use all the remaining parts as ground. For component placement, consider the flow of signals and make decisions accordingly.</text:p>
      <text:p text:style-name="Text_20_body">In the digital section, place one IC between the 5V and GND (0V) lines, and place a ceramic capacitor of approximately 0.1 µF around each two or three ICs. For 74HC series ICs, spikes in the power supply during switching are significant compared to TTL, and noise from this can be significant, so attach capacitors around them.</text:p>
      <text:p text:style-name="Text_20_body">For empty IC sockets, make sure that the input is not left floating and is either connected to 5V or 0V. Some of my designs leave the unused inputs of the full-wave rectifier block floating; this is because I expect to connect the stray capacitance of each block when making each image creation/adjustment. Future boards can employ this method if there are only one or two unused bits on a single board.</text:p>
      <text:p text:style-name="Text_20_body">5 Adjustment</text:p>
      <text:p text:style-name="Text_20_body">After that, first check the power lines with a tester. Check for shorts, excessive current flow, and so on. The driving voltage is 5V. If cutting the digits, connect to the joystick input terminal of the X68000. (Excessive current may flow if cut off and an automatic power output from the X68000 power supply could be interrupted by detecting it).</text:p>
      <text:p text:style-name="Text_20_body">First, let's use the built-in coil of the anti-vibration block. A plastic core driver can often be replaced when plastic cracks. Otherwise, it could turn into a dangerous condition if it cracks.</text:p>
      <text:p text:style-name="Text_20_body">Connect a wire about 10cm to the antenna terminal. Measure with a tester (around the condenser on the IN60 card side) and adjust the core until peak force is reached. Try to find the position where the tester peaks in two places around the coil inside the case. Once the core is properly located theoretically, connect it again using traditional methods until confirmation. After adjustment, turn off the PRO switch and make sure there is no problem with full reception antenna structure.</text:p>
      <text:p text:style-name="Text_20_body">Page 218</text:p>
      <text:p text:style-name="Horizontal_20_Line"/>
      <text:h text:style-name="Heading_20_2" text:outline-level="2"><text:bookmark-start text:name="outs-000223"/>outs-000223<text:bookmark-end text:name="outs-000223"/></text:h>
      <text:p text:style-name="First_20_paragraph">R/C Stick</text:p>
      <text:p text:style-name="Text_20_body">First, shift the core slightly off the highest point so that it does not oscillate. Since it is doubling the frequency at the same frequency as the radio waves being received, it is in fact somewhat prone to oscillation.</text:p>
      <text:p text:style-name="Text_20_body">Next, proceed to adjusting the digital section. Enter the external function written in assembler in Listing 1 and the BASIC program in Listing 2. For the trimmer potentiometers on the board, set them roughly to the center for now. When you start the program, the read data is displayed. If the message "host interface" appears, check around the host interface circuit. Once some kind of input data is displayed, first check whether the switch inputs are being read. If the switch you press is read correctly, you can consider that the host interface is at least working correctly.</text:p>
      <text:p text:style-name="Text_20_body">Once the area around the host interface is working well, next move on to adjusting around the counter.</text:p>
      <text:p text:style-name="Text_20_body">Toggle the switches on the proportional controller (propo) and confirm that the data changes. Set the stick's trim levers to the center. The data should be roughly graphable.</text:p>
      <text:p text:style-name="Text_20_body">Tilt the stick to its minimum value. Adjust the trimmer potentiometer of the minimum-count control so that the count advances. Next, take your hand off the stick to put it in the center position, and adjust the trimmer potentiometer of the oscillator so that the switch value comes to approximately $80. Tilt the stick to the side where the value becomes maximum, and confirm that the read value becomes $FF. If it does not, lower the oscillation resistance, and this time adjust the trimmer potentiometer of the minimum-count control so that the center value becomes $80. With that the adjustment is essentially complete, so confirm that it oscillates properly. Per-channel offsets can be adjusted with the propo's trim levers, so you don't need to be too nervous about it. Set the stick's trim levers to the center.</text:p>
      <text:p text:style-name="Text_20_body">If you have a synchroscope, adjustment will become much easier. While watching the waveform when the stick is at its minimum value, adjust the trimmer potentiometer of the minimum-count control resistance, then adjust the oscillation frequency so that the center comes to around $80, and you are essentially done.</text:p>
      <text:p text:style-name="Text_20_body">●6 Usability</text:p>
      <text:p text:style-name="Text_20_body">I tried out the finished R/C stick with After Burner to see how practical it really is. Since there is no lever corresponding to the throttle, it ends up being at full throttle all the time, which is a bit of a problem, but the operability itself is quite good. As expected, when it comes to the feel of an analog stick, the radio-control propo, with its long history, has the edge. The length of the stick, the stiffness of the spring, the position of the stick</text:p>
      <text:p text:style-name="Text_20_body">219</text:p>
      <text:p text:style-name="Horizontal_20_Line"/>
      <text:h text:style-name="Heading_20_2" text:outline-level="2"><text:bookmark-start text:name="outs-000224"/>outs-000224<text:bookmark-end text:name="outs-000224"/></text:h>
      <text:p text:style-name="Horizontal_20_Line"/>
      <text:p text:style-name="First_20_paragraph">Placement, etc. is relatively good.</text:p>
      <text:p text:style-name="Text_20_body">●7 Conclusion The initial goal of using the interface of the Cyber Stick to connect to the Robo was achieved. We found several functions recognized by the Cyber Stick, such as the phantom analog channel and 12-bit data including analog data on the interface. If you utilize the host interface this time, it can be said that it is an expansion of unlimited possibilities, such as connecting with A/D converter.</text:p>
      <text:p text:style-name="Text_20_body">If you use all the analog channels as switches, you can read as many as 48 switches. Normally, you would use 8 for standard joysticks. It might also be interesting to use two joysticks for a 16 simultaneous input array battle game.</text:p>
      <text:p text:style-name="Text_20_body">●LIST 1 ...... Remote Control Stick Check Program 1000 /<text:span text:style-name="Emphasis">-----------------------------------------</text:span>/ 1010 /<text:span text:style-name="Emphasis">- Remote Control Stick Check Program -</text:span>/ 1020 /<text:span text:style-name="Emphasis">-----------------------------------------</text:span>/ 1030 /<text:span text:style-name="Emphasis">- 1990-02-11 written by M. Kuwano -</text:span>/ 1040 /<text:span text:style-name="Emphasis">-----------------------------------------</text:span>/ 1050 /<text:span text:style-name="Emphasis">- No rights reserved. -</text:span>/ 1060 /<text:span text:style-name="Emphasis">-----------------------------------------</text:span>/ 1070 /<text:span text:style-name="Emphasis">-----------------------------------------</text:span>/ 1080 char c(5) 1090 int stat, px, py, pz, pt 1100 px=0; py=0 1110 pr_info() 1120 astset() 1130 repeat 1140 stat = astick(c) 1150 disp_val(stat) 220</text:p>
      <text:p text:style-name="Horizontal_20_Line"/>
      <text:p text:style-name="First_20_paragraph">This completes the translation.</text:p>
      <text:p text:style-name="Horizontal_20_Line"/>
      <text:h text:style-name="Heading_20_2" text:outline-level="2"><text:bookmark-start text:name="outs-000225"/>outs-000225<text:bookmark-end text:name="outs-000225"/></text:h>
      <text:p text:style-name="First_20_paragraph">R/C Stick</text:p>
      <text:p text:style-name="Text_20_body">1160 disp_pos() 1170 until inkey$(0)=" "
1180 <text:s text:c="2"/>astrst()
1190 <text:s text:c="2"/>end
1200 <text:s text:c="2"/>func disp_val(stat:int)
1210 <text:s text:c="2"/>int i
1220 <text:s text:c="2"/>locate 0.9
1230 <text:s text:c="2"/>if stat&lt;&gt;0 then color 2: print"ERROR" else color 3:print"READY"
1240 <text:s text:c="2"/>locate 0,8
1250 <text:s text:c="2"/>for i=0 to 3
1260 <text:s text:c="6"/>print right$("0"+hex$(c(i)),2);" "; 1270 next 1280 i=&amp;H80 1290 repeat 1300 pr_onoff(c(4) and i) 1310 i=i/2 1320 until i=0 1330 i=&amp;H80 1340 repeat 1350 pr_onoff(c(5) and i) 1360 i=i/2 1370 until i=0 1380 endfunc 1390 func pr_onoff(s:int) 1400 if s=0 then print"ON "; else print"OFF "; 1410 endfunc 1420 func pr_info() 1430 screen 2.0.1.1 1440 console ..0 1450 color 3 1460 locate 0.5:print"To finish, press the space bar" 1470 color 1 1480 locate 0.7 1490 print"#1 #2 #3 #4 A+A' B+B' C D E1 E2 F G ? ? ? ? A B A' B'" 1500 box(349,239,349+257,239+257,15) 1510 box(49,239,49+257,239+257,15) 1520 endfunc 1530 func disp_pos() 1540 line(350,240+py,350+255,240+py,0)</text:p>
      <text:p text:style-name="Text_20_body">221</text:p>
      <text:p text:style-name="Horizontal_20_Line"/>
      <text:h text:style-name="Heading_20_2" text:outline-level="2"><text:bookmark-start text:name="outs-000226"/>outs-000226<text:bookmark-end text:name="outs-000226"/></text:h>
      <text:p text:style-name="First_20_paragraph">1550 line(350,240+c(0),350+255,240+c(0),15) 1560 py=c(0) 1570 line(350+px,240,350+px,240+255,0) 1580 line(350+c(1),240,350+c(1),240+255,15) 1590 px=c(1) 1600 line(50,240+pz,50+255,240+pz,0) 1610 line(50,240+c(2),50+255,240+c(2),15) 1620 pz=c(2) 1630 line(50+pt,240,50+pt,240+255,0) 1640 line(50+c(3),240,50+c(3),240+255,15) 1650 pt=c(3) 1660 endfunc</text:p>
      <text:p text:style-name="Text_20_body">● List ... 2 Analog Joystick Reading Routine</text:p>
      <text:list text:style-name="List_20_1">
        <text:list-item>
          <text:p text:style-name="List_20_Bullet_20_Tight">-------------------------------------------------------------------------------------------------- *</text:p>
        </text:list-item>
        <text:list-item>
          <text:p text:style-name="Preformatted_20_Text"><text:s text:c="13"/>Analog Joystick (Slider Stick) Reading Function <text:s text:c="33"/>*</text:p>
        </text:list-item>
        <text:list-item>
          <text:p text:style-name="List_20_Bullet_20_Tight">-------------------------------------------------------------------------------------------------- *</text:p>
        </text:list-item>
        <text:list-item>
          <text:p text:style-name="Preformatted_20_Text"><text:s text:c="13"/>1989-06-17 <text:s text:c="1"/>M. Kuwano, No rights reserved <text:s text:c="39"/>*</text:p>
        </text:list-item>
        <text:list-item>
          <text:p text:style-name="Preformatted_20_Text"><text:s text:c="13"/>1990-02-11 <text:s text:c="1"/>Changed to single &amp; double rotation handling <text:s text:c="24"/>*</text:p>
        </text:list-item>
        <text:list-item>
          <text:p text:style-name="List_20_Bullet_20_Tight">-------------------------------------------------------------------------------------------------- *</text:p>
        </text:list-item>
        <text:list-item>
          <text:p text:style-name="Preformatted_20_Text"><text:s text:c="13"/>Calling example: <text:s text:c="63"/>*</text:p>
        </text:list-item>
        <text:list-item>
          <text:p text:style-name="Preformatted_20_Text"><text:s text:c="17"/>char c(5) <text:s text:c="66"/>*</text:p>
        </text:list-item>
        <text:list-item>
          <text:p text:style-name="Preformatted_20_Text"><text:s text:c="17"/>astick(c) <text:s text:c="66"/>*</text:p>
        </text:list-item>
        <text:list-item>
          <text:p text:style-name="List_20_Bullet_20_Tight">-------------------------------------------------------------------------------------------------- *</text:p>
        </text:list-item>
        <text:list-item>
          <text:p text:style-name="Preformatted_20_Text"><text:s text:c="13"/>Input data: <text:s text:c="68"/>*</text:p>
        </text:list-item>
        <text:list-item>
          <text:p text:style-name="Preformatted_20_Text"><text:s text:c="23"/>c(0) ... Right stick left-right <text:s text:c="38"/>*</text:p>
        </text:list-item>
        <text:list-item>
          <text:p text:style-name="Preformatted_20_Text"><text:s text:c="23"/>c(1) ... Right stick forward-back <text:s text:c="36"/>*</text:p>
        </text:list-item>
        <text:list-item>
          <text:p text:style-name="Preformatted_20_Text"><text:s text:c="23"/>c(2) ... Left stick forward-back (throttle) <text:s text:c="26"/>*</text:p>
        </text:list-item>
        <text:list-item>
          <text:p text:style-name="Preformatted_20_Text"><text:s text:c="23"/>c(3) ... Reserved stick (future use?) <text:s text:c="32"/>*</text:p>
        </text:list-item>
        <text:list-item>
          <text:p text:style-name="Preformatted_20_Text"><text:s text:c="23"/>c(4) ... Trigger button <text:s text:c="46"/>*</text:p>
        </text:list-item>
        <text:list-item>
          <text:p text:style-name="Preformatted_20_Text"><text:s text:c="23"/>c(5) ... Trigger button <text:s text:c="46"/>*</text:p>
        </text:list-item>
        <text:list-item>
          <text:p text:style-name="List_20_Bullet_20_Tight">-------------------------------------------------------------------------------------------------- *</text:p>
        </text:list-item>
        <text:list-item>
          <text:p text:style-name="Preformatted_20_Text"><text:s text:c="13"/>Please ensure the array size is at least 6 bytes. <text:s text:c="30"/>*</text:p>
        </text:list-item>
        <text:list-item>
          <text:p text:style-name="Preformatted_20_Text"><text:s text:c="13"/>Size checks are not done, so be sure to write until the end. <text:s text:c="19"/>*</text:p>
        </text:list-item>
        <text:list-item>
          <text:p text:style-name="List_20_Bullet_20_Tight">-------------------------------------------------------------------------------------------------- *</text:p>
        </text:list-item>
        <text:list-item>
          <text:p text:style-name="Preformatted_20_Text"><text:s text:c="13"/>Always an interpreter/compiler shared routine <text:s text:c="34"/>*</text:p>
        </text:list-item>
        <text:list-item>
          <text:p text:style-name="List_20_Bullet_20_Tight">-------------------------------------------------------------------------------------------------- *</text:p>
        </text:list-item>
      </text:list>
      <text:p text:style-name="Horizontal_20_Line"/>
      <text:h text:style-name="Heading_20_2" text:outline-level="2"><text:bookmark-start text:name="outs-000227"/>outs-000227<text:bookmark-end text:name="outs-000227"/></text:h>
      <text:p text:style-name="First_20_paragraph">R/C Stick</text:p>
      <text:p text:style-name="Text_20_body">*------------------------------------------------------------------</text:p>
      <text:p text:style-name="Preformatted_20_Text"><text:s text:c="16"/>.include <text:s text:c="6"/>doscall.mac</text:p>
      <text:p text:style-name="Preformatted_20_Text"><text:s text:c="16"/>.include <text:s text:c="6"/>fdef.h</text:p>
      <text:p text:style-name="Preformatted_20_Text"><text:s text:c="16"/>.globl <text:s text:c="8"/>_astick</text:p>
      <text:p text:style-name="Preformatted_20_Text"><text:s text:c="16"/>.globl <text:s text:c="8"/>_astset</text:p>
      <text:p text:style-name="Preformatted_20_Text"><text:s text:c="16"/>.globl <text:s text:c="8"/>_astrst</text:p>
      <text:p text:style-name="Preformatted_20_Text"/>
      <text:p text:style-name="Preformatted_20_Text">IOCS <text:s text:c="10"/>equ <text:s text:c="6"/>$0f</text:p>
      <text:p text:style-name="Preformatted_20_Text"/>
      <text:p text:style-name="Preformatted_20_Text">PPI_PORT_A <text:s text:c="4"/>equ <text:s text:c="6"/>$e9a001</text:p>
      <text:p text:style-name="Preformatted_20_Text">PPI_PORT_B <text:s text:c="4"/>equ <text:s text:c="6"/>$e9a003</text:p>
      <text:p text:style-name="Preformatted_20_Text">PPI_PORT_C <text:s text:c="4"/>equ <text:s text:c="6"/>$e9a005</text:p>
      <text:p text:style-name="Preformatted_20_Text">PPI_CWR <text:s text:c="7"/>equ <text:s text:c="6"/>$e9a007</text:p>
      <text:p text:style-name="Preformatted_20_Text"/>
      <text:p text:style-name="Preformatted_20_Text">RQ_ASSERT <text:s text:c="5"/>equ <text:s text:c="6"/>$8</text:p>
      <text:p text:style-name="Preformatted_20_Text">RQ_NEGATE <text:s text:c="5"/>equ <text:s text:c="6"/>$9</text:p>
      <text:p text:style-name="Preformatted_20_Text"/>
      <text:p text:style-name="Preformatted_20_Text">TIME_LIMIT1 <text:s text:c="3"/>equ <text:s text:c="6"/>1000</text:p>
      <text:p text:style-name="Preformatted_20_Text">TIME_LIMIT2 <text:s text:c="3"/>equ <text:s text:c="6"/>100</text:p>
      <text:p text:style-name="Preformatted_20_Text"><text:s text:c="16"/>.text</text:p>
      <text:p text:style-name="Preformatted_20_Text"><text:s text:c="16"/>.even</text:p>
      <text:list text:style-name="List_20_1">
        <text:list-item>
  </text:list-item>
        <text:list-item>
          <text:p text:style-name="List_20_Bullet">Information Table</text:p>
        </text:list-item>
        <text:list-item>
  </text:list-item>
        <text:list-item>
  </text:list-item>
      </text:list>
      <text:p text:style-name="Preformatted_20_Text"><text:s text:c="24"/>.dc.l <text:s text:c="2"/>AS_INIT</text:p>
      <text:p text:style-name="Preformatted_20_Text"><text:s text:c="24"/>.dc.l <text:s text:c="2"/>AS_RUN</text:p>
      <text:p text:style-name="Preformatted_20_Text"><text:s text:c="24"/>.dc.l <text:s text:c="2"/>AS_END</text:p>
      <text:p text:style-name="Preformatted_20_Text"><text:s text:c="24"/>.dc.l <text:s text:c="2"/>AS_SYS</text:p>
      <text:p text:style-name="Preformatted_20_Text"><text:s text:c="24"/>.dc.l <text:s text:c="2"/>AS_BRK</text:p>
      <text:p text:style-name="Preformatted_20_Text"><text:s text:c="24"/>.dc.l <text:s text:c="2"/>AS_CTRL_D</text:p>
      <text:p text:style-name="Preformatted_20_Text"><text:s text:c="24"/>.dc.l <text:s text:c="2"/>AS_RES1</text:p>
      <text:p text:style-name="Preformatted_20_Text"><text:s text:c="24"/>.dc.l <text:s text:c="2"/>AS_RES2</text:p>
      <text:p text:style-name="Preformatted_20_Text"><text:s text:c="24"/>.dc.l <text:s text:c="2"/>PTR_TOKEN</text:p>
      <text:p text:style-name="Preformatted_20_Text"><text:s text:c="24"/>.dc.l <text:s text:c="2"/>PTR_PARAM</text:p>
      <text:p text:style-name="Preformatted_20_Text"><text:s text:c="24"/>.dc.l <text:s text:c="2"/>PTR_EXEC</text:p>
      <text:p text:style-name="Preformatted_20_Text"><text:s text:c="24"/>.dc.l <text:s text:c="2"/>0,0,0,0</text:p>
      <text:p text:style-name="Preformatted_20_Text"/>
      <text:p text:style-name="Preformatted_20_Text">AS_RES1:</text:p>
      <text:p text:style-name="Preformatted_20_Text">AS_RES2:</text:p>
      <text:p text:style-name="First_20_paragraph">223</text:p>
      <text:p text:style-name="Horizontal_20_Line"/>
      <text:h text:style-name="Heading_20_2" text:outline-level="2"><text:bookmark-start text:name="outs-000228"/>outs-000228<text:bookmark-end text:name="outs-000228"/></text:h>
      <text:p text:style-name="Preformatted_20_Text">AS_END:</text:p>
      <text:p text:style-name="Preformatted_20_Text">AS_BRK:</text:p>
      <text:p text:style-name="Preformatted_20_Text">AS_CTRL_D:</text:p>
      <text:p text:style-name="Preformatted_20_Text">AS_INIT:</text:p>
      <text:p text:style-name="Preformatted_20_Text">AS_RUN:</text:p>
      <text:p text:style-name="Preformatted_20_Text">AS_SYS:</text:p>
      <text:p text:style-name="Preformatted_20_Text"><text:s text:c="16"/>rts</text:p>
      <text:list text:style-name="List_20_1">
        <text:list-item>
  </text:list-item>
        <text:list-item>
          <text:p text:style-name="List_20_Bullet">Token Table</text:p>
        </text:list-item>
        <text:list-item>
  </text:list-item>
      </text:list>
      <text:p text:style-name="Preformatted_20_Text">PTR_TOKEN:</text:p>
      <text:p text:style-name="Preformatted_20_Text"><text:s text:c="16"/>.dc.b <text:s text:c="3"/>'astick'.0</text:p>
      <text:p text:style-name="Preformatted_20_Text"><text:s text:c="16"/>.dc.b <text:s text:c="3"/>'astset'.0</text:p>
      <text:p text:style-name="Preformatted_20_Text"><text:s text:c="16"/>.dc.b <text:s text:c="3"/>'astrst'.0</text:p>
      <text:p text:style-name="Preformatted_20_Text"><text:s text:c="16"/>.dc.b <text:s text:c="3"/>0</text:p>
      <text:p text:style-name="Preformatted_20_Text"/>
      <text:p text:style-name="Preformatted_20_Text"><text:s text:c="16"/>.even</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16"/>.dc.l <text:s text:c="3"/>ASTICK_PAR</text:p>
      <text:p text:style-name="Preformatted_20_Text"><text:s text:c="16"/>.dc.l <text:s text:c="3"/>ASTSET_PAR</text:p>
      <text:p text:style-name="Preformatted_20_Text"><text:s text:c="16"/>.dc.l <text:s text:c="3"/>ASTRST_PAR</text:p>
      <text:list text:style-name="List_20_1">
        <text:list-item>
  </text:list-item>
        <text:list-item>
          <text:p text:style-name="List_20_Bullet">Parameter ID Table</text:p>
        </text:list-item>
        <text:list-item>
  </text:list-item>
      </text:list>
      <text:p text:style-name="Preformatted_20_Text">ASTICK_PAR:</text:p>
      <text:p text:style-name="Preformatted_20_Text"><text:s text:c="16"/>.dc.w <text:s text:c="3"/>aryl_c</text:p>
      <text:p text:style-name="Preformatted_20_Text"><text:s text:c="16"/>.dc.w <text:s text:c="3"/>int_ret</text:p>
      <text:p text:style-name="Preformatted_20_Text"/>
      <text:p text:style-name="Preformatted_20_Text">ASTSET_PAR:</text:p>
      <text:p text:style-name="Preformatted_20_Text"><text:s text:c="16"/>.dc.w <text:s text:c="3"/>void_ret</text:p>
      <text:p text:style-name="Preformatted_20_Text"/>
      <text:p text:style-name="Preformatted_20_Text">ASTRST_PAR:</text:p>
      <text:p text:style-name="Preformatted_20_Text"><text:s text:c="16"/>.dc.w <text:s text:c="3"/>void_ret</text:p>
      <text:list text:style-name="List_20_1">
        <text:list-item>
  </text:list-item>
        <text:list-item>
          <text:p text:style-name="List_20_Bullet">Function Address Table</text:p>
        </text:list-item>
        <text:list-item>
  </text:list-item>
      </text:list>
      <text:p text:style-name="Horizontal_20_Line"/>
      <text:h text:style-name="Heading_20_2" text:outline-level="2"><text:bookmark-start text:name="outs-000229"/>outs-000229<text:bookmark-end text:name="outs-000229"/></text:h>
      <text:p text:style-name="First_20_paragraph">Radio Control Stick</text:p>
      <text:p text:style-name="Preformatted_20_Text">PTR_EXEC:</text:p>
      <text:p text:style-name="Preformatted_20_Text"><text:s text:c="16"/>.dc.l <text:s text:c="10"/>astick</text:p>
      <text:p text:style-name="Preformatted_20_Text"><text:s text:c="16"/>.dc.l <text:s text:c="10"/>_astset</text:p>
      <text:p text:style-name="Preformatted_20_Text"><text:s text:c="16"/>.dc.l <text:s text:c="10"/>_astrst</text:p>
      <text:list text:style-name="List_20_1">
        <text:list-item>
  </text:list-item>
        <text:list-item>
          <text:p text:style-name="Preformatted_20_Text"><text:s text:c="2"/>Stack buffer</text:p>
        </text:list-item>
        <text:list-item>
  </text:list-item>
      </text:list>
      <text:p text:style-name="Preformatted_20_Text">SPBUF:</text:p>
      <text:p text:style-name="Preformatted_20_Text"><text:s text:c="16"/>.ds.l <text:s text:c="10"/>1</text:p>
      <text:p text:style-name="Preformatted_20_Text"><text:s text:c="16"/>.even</text:p>
      <text:list text:style-name="List_20_1">
        <text:list-item>
  </text:list-item>
        <text:list-item>
          <text:p text:style-name="Preformatted_20_Text"><text:s text:c="2"/>Read analog joystick (for interpreter)</text:p>
        </text:list-item>
        <text:list-item>
  </text:list-item>
      </text:list>
      <text:p text:style-name="Preformatted_20_Text">astick:</text:p>
      <text:p text:style-name="Preformatted_20_Text"><text:s text:c="16"/>movea.l <text:s text:c="8"/>12(sp),a1</text:p>
      <text:p text:style-name="Preformatted_20_Text"><text:s text:c="16"/>lea <text:s text:c="12"/>10(a1),a1</text:p>
      <text:p text:style-name="Preformatted_20_Text"><text:s text:c="16"/>move.l <text:s text:c="9"/>a1,-(sp)</text:p>
      <text:p text:style-name="Preformatted_20_Text"><text:s text:c="16"/>bsr <text:s text:c="12"/>_astick</text:p>
      <text:p text:style-name="Preformatted_20_Text"><text:s text:c="16"/>addq.l <text:s text:c="9"/>#4,sp</text:p>
      <text:p text:style-name="Preformatted_20_Text"><text:s text:c="16"/>moveq.l <text:s text:c="8"/>#0,d0</text:p>
      <text:p text:style-name="Preformatted_20_Text"><text:s text:c="16"/>rts</text:p>
      <text:list text:style-name="List_20_1">
        <text:list-item>
  </text:list-item>
        <text:list-item>
          <text:p text:style-name="Preformatted_20_Text"><text:s text:c="2"/>For analog joystick, set PC4 to 1</text:p>
        </text:list-item>
        <text:list-item>
  </text:list-item>
      </text:list>
      <text:p text:style-name="Preformatted_20_Text">_astset:</text:p>
      <text:p text:style-name="Preformatted_20_Text"><text:s text:c="16"/>clr.l <text:s text:c="10"/>-(sp) <text:s text:c="18"/>* <text:s text:c="6"/>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a.l <text:s text:c="8"/>#PPI_CWR,a0 <text:s text:c="12"/>* <text:s text:c="6"/>*ppi_cwr = RQ_NEGATE;</text:p>
      <text:p text:style-name="Preformatted_20_Text"><text:s text:c="16"/>move.b <text:s text:c="9"/>#RQ_NEGATE,(a0)</text:p>
      <text:p text:style-name="Preformatted_20_Text"><text:s text:c="16"/>move.l <text:s text:c="9"/>SPBUF,d0 <text:s text:c="15"/>* <text:s text:c="6"/>_SUPER(SPBUF);</text:p>
      <text:p text:style-name="Preformatted_20_Text"><text:s text:c="16"/>bmi <text:s text:c="12"/>astset_already_super</text:p>
      <text:p text:style-name="Preformatted_20_Text"><text:s text:c="16"/>move.l <text:s text:c="9"/>d1,-(sp)</text:p>
      <text:p text:style-name="Preformatted_20_Text"/>
      <text:p text:style-name="Preformatted_20_Text"><text:s text:c="76"/>225</text:p>
      <text:p text:style-name="Horizontal_20_Line"/>
      <text:h text:style-name="Heading_20_2" text:outline-level="2"><text:bookmark-start text:name="outs-000230"/>outs-000230<text:bookmark-end text:name="outs-000230"/></text:h>
      <text:list text:style-name="List_20_1">
        <text:list-item>
  </text:list-item>
        <text:list-item>
          <text:p text:style-name="List_20_Bullet">After the program ends, if PC 4 is not returned to 0,</text:p>
        </text:list-item>
        <text:list-item>
          <text:p text:style-name="List_20_Bullet">some digital-mode software might cease to work.</text:p>
        </text:list-item>
        <text:list-item>
  </text:list-item>
        <text:list-item>
  </text:list-item>
        <text:list-item>
          <text:p text:style-name="List_20_Bullet">Analog joystick reading (for compilation time)</text:p>
        </text:list-item>
        <text:list-item>
  </text:list-item>
      </text:list>
      <text:p text:style-name="Horizontal_20_Line"/>
      <text:h text:style-name="Heading_20_2" text:outline-level="2"><text:bookmark-start text:name="outs-000231"/>outs-000231<text:bookmark-end text:name="outs-000231"/></text:h>
      <text:p text:style-name="First_20_paragraph">Radio Control Stick</text:p>
      <text:p text:style-name="Preformatted_20_Text"><text:s text:c="16"/>move.l <text:s text:c="9"/>d0,6(a0)</text:p>
      <text:p text:style-name="Preformatted_20_Text"><text:s text:c="16"/>move.l <text:s text:c="9"/>4(sp),d0</text:p>
      <text:p text:style-name="Preformatted_20_Text"><text:s text:c="16"/>move.l <text:s text:c="9"/>d0,-(sp)</text:p>
      <text:p text:style-name="Preformatted_20_Text"><text:s text:c="16"/>bsr <text:s text:c="12"/>aj_compile</text:p>
      <text:p text:style-name="Preformatted_20_Text"><text:s text:c="16"/>addq.l <text:s text:c="9"/>#4,sp</text:p>
      <text:p text:style-name="Preformatted_20_Text"><text:s text:c="16"/>lea <text:s text:c="12"/>AS_RETVAL,a0</text:p>
      <text:p text:style-name="Preformatted_20_Text"><text:s text:c="16"/>move.l <text:s text:c="9"/>6(a0),d0</text:p>
      <text:p text:style-name="Preformatted_20_Text"><text:s text:c="16"/>rts</text:p>
      <text:list text:style-name="List_20_1">
        <text:list-item>
  </text:list-item>
        <text:list-item>
          <text:p text:style-name="Preformatted_20_Text"><text:s text:c="2"/>Analog joystick data acquisition</text:p>
        </text:list-item>
        <text:list-item>
  </text:list-item>
        <text:list-item>
          <text:p text:style-name="Preformatted_20_Text"><text:s text:c="2"/>a0 Buffer_pointer</text:p>
        </text:list-item>
        <text:list-item>
          <text:p text:style-name="Preformatted_20_Text"><text:s text:c="2"/>a1 PPI_PORT_A</text:p>
        </text:list-item>
        <text:list-item>
          <text:p text:style-name="Preformatted_20_Text"><text:s text:c="2"/>a2 PPI_CWR</text:p>
        </text:list-item>
        <text:list-item>
          <text:p text:style-name="Preformatted_20_Text"><text:s text:c="2"/>d0 data</text:p>
        </text:list-item>
        <text:list-item>
  </text:list-item>
        <text:list-item>
          <text:p text:style-name="Preformatted_20_Text"><text:s text:c="2"/>d1 data</text:p>
        </text:list-item>
        <text:list-item>
          <text:p text:style-name="Preformatted_20_Text"><text:s text:c="2"/>d2 Loop counter</text:p>
        </text:list-item>
        <text:list-item>
          <text:p text:style-name="Preformatted_20_Text"><text:s text:c="2"/>d3 Timeout counter</text:p>
        </text:list-item>
        <text:list-item>
  </text:list-item>
      </text:list>
      <text:p text:style-name="First_20_paragraph">get_astick: * get_astick() {</text:p>
      <text:p text:style-name="Preformatted_20_Text"><text:s text:c="16"/>clr.l <text:s text:c="10"/>-(sp) <text:s text:c="18"/>* <text:s text:c="10"/>SPBUF = _SUPER(0);</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text:s text:c="16"/>move.w <text:s text:c="9"/>sr,-(sp) <text:s text:c="15"/>* <text:s text:c="10"/>PUSH(SR);</text:p>
      <text:p text:style-name="Preformatted_20_Text"><text:s text:c="16"/>ori.w <text:s text:c="10"/>#$0700,sr <text:s text:c="14"/>* <text:s text:c="10"/>disable_trap();</text:p>
      <text:p text:style-name="Preformatted_20_Text"><text:s text:c="16"/>lea <text:s text:c="12"/>AS_TMP_BUF,a0 <text:s text:c="10"/>* <text:s text:c="10"/>buffer_pointer = AS_TMP_BUF;</text:p>
      <text:p text:style-name="Preformatted_20_Text"><text:s text:c="16"/>movea.l <text:s text:c="8"/>#PPI_PORT_A,a1 <text:s text:c="9"/>* <text:s text:c="10"/>ppi_port_a = PPI_PORT_A;</text:p>
      <text:p text:style-name="Preformatted_20_Text"><text:s text:c="16"/>movea.l <text:s text:c="8"/>#PPI_CWR,a2 <text:s text:c="12"/>* <text:s text:c="10"/>ppi_cwr = PPI_CWR;</text:p>
      <text:p text:style-name="Preformatted_20_Text"><text:s text:c="16"/>move.w <text:s text:c="9"/>#5,d2 <text:s text:c="18"/>* <text:s text:c="10"/>loop_counter = 5;</text:p>
      <text:p text:style-name="Preformatted_20_Text"><text:s text:c="16"/>moveq.l <text:s text:c="8"/>#0,d0 <text:s text:c="18"/>* <text:s text:c="10"/>joydata = 0;</text:p>
      <text:p text:style-name="Preformatted_20_Text"><text:s text:c="16"/>move.w <text:s text:c="9"/>#TIME_LIMIT1,d3 <text:s text:c="8"/>* <text:s text:c="10"/>timer = TIME_LIMIT1;</text:p>
      <text:p text:style-name="Preformatted_20_Text"/>
      <text:p text:style-name="Preformatted_20_Text"><text:s text:c="76"/>227</text:p>
      <text:p text:style-name="Horizontal_20_Line"/>
      <text:h text:style-name="Heading_20_2" text:outline-level="2"><text:bookmark-start text:name="outs-000232"/>outs-000232<text:bookmark-end text:name="outs-000232"/></text:h>
      <text:p text:style-name="First_20_paragraph">LIMIT1</text:p>
      <text:p text:style-name="Preformatted_20_Text"><text:s text:c="8"/>_astick_0: <text:s text:c="37"/>* <text:s text:c="10"/>do {</text:p>
      <text:p text:style-name="Preformatted_20_Text"><text:s text:c="16"/>move.b <text:s text:c="9"/>#RQ_ASSERT,(a2) <text:s text:c="7"/>* <text:s text:c="14"/>*ppi_cwr = RQ_ASSERT;</text:p>
      <text:p text:style-name="Preformatted_20_Text"><text:s text:c="8"/>_astick_1:</text:p>
      <text:p text:style-name="Preformatted_20_Text"><text:s text:c="16"/>move.b <text:s text:c="9"/>(a1),d0 <text:s text:c="15"/>* <text:s text:c="14"/>while ((data = *ppi_port_a &amp; 0x60) != 0) &amp;&amp; timer--)</text:p>
      <text:p text:style-name="Preformatted_20_Text"><text:s text:c="16"/>move.b <text:s text:c="9"/>d0,d1 <text:s text:c="17"/>* <text:s text:c="18"/>;</text:p>
      <text:p text:style-name="Preformatted_20_Text"><text:s text:c="16"/>andi.b <text:s text:c="9"/>#$60,d0</text:p>
      <text:p text:style-name="Preformatted_20_Text"><text:s text:c="16"/>dbeq <text:s text:c="11"/>d3,_astick_1</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move.b <text:s text:c="9"/>#RQ_NEGATE,(a2) <text:s text:c="7"/>* <text:s text:c="14"/>*ppi_cwr = RQ_NEGATE;</text:p>
      <text:p text:style-name="Preformatted_20_Text"><text:s text:c="8"/>_astick_11:</text:p>
      <text:p text:style-name="Preformatted_20_Text"><text:s text:c="16"/>btst <text:s text:c="11"/>#5,(a1) <text:s text:c="15"/>* <text:s text:c="14"/>while(!(*ppi_port_a &amp; 0x20) &amp;&amp; timer--)</text:p>
      <text:p text:style-name="Preformatted_20_Text"><text:s text:c="16"/>dbne <text:s text:c="11"/>d3,_astick_11 <text:s text:c="9"/>* <text:s text:c="18"/>;</text:p>
      <text:p text:style-name="Preformatted_20_Text"><text:s text:c="16"/>beq <text:s text:c="12"/>_astick_timeout <text:s text:c="7"/>* <text:s text:c="14"/>if (!timer) goto _astick_timeout;</text:p>
      <text:p text:style-name="Preformatted_20_Text"><text:s text:c="8"/>_astick_12: <text:s text:c="36"/>* <text:s text:c="14"/>while((data = *ppi_port_a &amp; 0x40) &amp;&amp; timer--)</text:p>
      <text:p text:style-name="Preformatted_20_Text"><text:s text:c="16"/>move.b <text:s text:c="9"/>(a1),d1 <text:s text:c="15"/>* <text:s text:c="18"/>;</text:p>
      <text:p text:style-name="Preformatted_20_Text"><text:s text:c="16"/>btst <text:s text:c="11"/>#6,d1</text:p>
      <text:p text:style-name="Preformatted_20_Text"><text:s text:c="16"/>dbeq <text:s text:c="11"/>d3,_astick_12</text:p>
      <text:p text:style-name="Preformatted_20_Text"><text:s text:c="16"/>bne <text:s text:c="12"/>_astick_timeout <text:s text:c="7"/>* <text:s text:c="14"/>if (!timer) goto _astick_timeout;</text:p>
      <text:p text:style-name="Preformatted_20_Text"><text:s text:c="16"/>move.b <text:s text:c="9"/>d1,(a0)+ <text:s text:c="14"/>* <text:s text:c="14"/>*buffer_pointer++ = data;</text:p>
      <text:p text:style-name="Preformatted_20_Text"><text:s text:c="16"/>dbra <text:s text:c="11"/>d2,_astick_0 <text:s text:c="10"/>* <text:s text:c="10"/>} while (loop_counter--);</text:p>
      <text:p text:style-name="Preformatted_20_Text"/>
      <text:p text:style-name="Preformatted_20_Text"><text:s text:c="16"/>moveq.l <text:s text:c="8"/>#0,d3 <text:s text:c="17"/>* <text:s text:c="10"/>retstat = 0;</text:p>
      <text:p text:style-name="Preformatted_20_Text"><text:s text:c="8"/>_astick_exit:</text:p>
      <text:p text:style-name="Preformatted_20_Text"><text:s text:c="16"/>move.w <text:s text:c="9"/>(sp)+,sr <text:s text:c="14"/>* <text:s text:c="10"/>sr = POP(); /* restore interrupt flag */</text:p>
      <text:p text:style-name="First_20_paragraph">228</text:p>
      <text:p text:style-name="Horizontal_20_Line"/>
      <text:h text:style-name="Heading_20_2" text:outline-level="2"><text:bookmark-start text:name="outs-000233"/>outs-000233<text:bookmark-end text:name="outs-000233"/></text:h>
      <text:p text:style-name="First_20_paragraph">Radio Control Stick</text:p>
      <text:p text:style-name="Preformatted_20_Text"><text:s text:c="16"/>move.b <text:s text:c="9"/>#RQ_NEGATE,(a2) <text:s text:c="7"/>* <text:s text:c="10"/>*ppi_cwr = RQ_NEGATE;</text:p>
      <text:p text:style-name="Preformatted_20_Text"><text:s text:c="16"/>move.l <text:s text:c="9"/>SPBUF,d1 <text:s text:c="14"/>* <text:s text:c="10"/>_SUPER(SPBUF);</text:p>
      <text:p text:style-name="Preformatted_20_Text"><text:s text:c="16"/>bmi <text:s text:c="12"/>_astick_already_super</text:p>
      <text:p text:style-name="Preformatted_20_Text"><text:s text:c="16"/>move.l <text:s text:c="9"/>d1,-(sp)</text:p>
      <text:p text:style-name="Preformatted_20_Text"><text:s text:c="16"/>dc.l <text:s text:c="11"/>_SUPER</text:p>
      <text:p text:style-name="Preformatted_20_Text"><text:s text:c="16"/>addq.l <text:s text:c="9"/>#4,sp</text:p>
      <text:p text:style-name="Preformatted_20_Text"><text:s text:c="8"/>_astick_already_super:</text:p>
      <text:p text:style-name="Preformatted_20_Text"><text:s text:c="16"/>move.l <text:s text:c="9"/>d3,d0</text:p>
      <text:p text:style-name="Preformatted_20_Text"><text:s text:c="16"/>rts <text:s text:c="36"/>* <text:s text:c="6"/>}</text:p>
      <text:p text:style-name="Preformatted_20_Text"/>
      <text:p text:style-name="Preformatted_20_Text"><text:s text:c="8"/>_astick_timeout:</text:p>
      <text:p text:style-name="Preformatted_20_Text"><text:s text:c="16"/>moveq.l <text:s text:c="8"/>#1,d3 <text:s text:c="17"/>* <text:s text:c="10"/>data = 1;</text:p>
      <text:p text:style-name="Preformatted_20_Text"><text:s text:c="16"/>bra <text:s text:c="12"/>_astick_exit</text:p>
      <text:list text:style-name="List_20_1">
        <text:list-item>
  </text:list-item>
        <text:list-item>
          <text:p text:style-name="Preformatted_20_Text"><text:s text:c="2"/>Analog joystick data editing</text:p>
        </text:list-item>
        <text:list-item>
  </text:list-item>
      </text:list>
      <text:p text:style-name="First_20_paragraph">aj_compile: * aj_compile(pack_data) {</text:p>
      <text:p text:style-name="Preformatted_20_Text"><text:s text:c="16"/>movea.l <text:s text:c="8"/>4(sp),a0</text:p>
      <text:p text:style-name="Preformatted_20_Text"><text:s text:c="16"/>lea.l <text:s text:c="10"/>AS_TMP_BUF,a1</text:p>
      <text:p text:style-name="Preformatted_20_Text"><text:s text:c="16"/>move.b <text:s text:c="9"/>2(a1),d1 <text:s text:c="14"/>* <text:s text:c="10"/>pack_data[0] = joy_raw_data[6] | (joy_raw_data[2] &lt;&lt; 4);</text:p>
      <text:p text:style-name="Preformatted_20_Text"><text:s text:c="16"/>andi.b <text:s text:c="9"/>#$f,d1</text:p>
      <text:p text:style-name="Preformatted_20_Text"><text:s text:c="16"/>lsl <text:s text:c="12"/>#4,d1</text:p>
      <text:p text:style-name="Preformatted_20_Text"><text:s text:c="16"/>move.b <text:s text:c="9"/>6(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text:s text:c="16"/>move.b <text:s text:c="9"/>3(a1),d1 <text:s text:c="14"/>* <text:s text:c="10"/>pack_data[1] = joy_raw_data[7] | (joy_raw_data[3] &lt;&lt; 4);</text:p>
      <text:p text:style-name="Preformatted_20_Text"><text:s text:c="16"/>andi.b <text:s text:c="9"/>#$f,d1</text:p>
      <text:p text:style-name="Preformatted_20_Text"><text:s text:c="16"/>lsl <text:s text:c="12"/>#4,d1</text:p>
      <text:p text:style-name="Preformatted_20_Text"><text:s text:c="16"/>move.b <text:s text:c="9"/>7(a1),d2</text:p>
      <text:p text:style-name="Preformatted_20_Text"><text:s text:c="16"/>andi.b <text:s text:c="9"/>#$f,d2</text:p>
      <text:p text:style-name="Preformatted_20_Text"><text:s text:c="16"/>or.b <text:s text:c="11"/>d2,d1</text:p>
      <text:p text:style-name="Preformatted_20_Text"><text:s text:c="16"/>move.b <text:s text:c="9"/>d1,(a0)+</text:p>
      <text:p text:style-name="Preformatted_20_Text"/>
      <text:p text:style-name="Preformatted_20_Text"><text:s text:c="76"/>229</text:p>
      <text:p text:style-name="Horizontal_20_Line"/>
      <text:h text:style-name="Heading_20_2" text:outline-level="2"><text:bookmark-start text:name="outs-000234"/>outs-000234<text:bookmark-end text:name="outs-000234"/></text:h>
      <text:p text:style-name="Preformatted_20_Text"><text:s text:c="12"/>move.b <text:s text:c="7"/>4(al).dl <text:s text:c="12"/>* <text:s text:c="4"/>pack_data[2] = joy_ra</text:p>
      <text:p text:style-name="First_20_paragraph">w_data[8] | (joy_raw_data[4] &lt;&lt; 4):</text:p>
      <text:p text:style-name="Preformatted_20_Text"><text:s text:c="16"/>andi.b <text:s text:c="6"/>#$f.dl</text:p>
      <text:p text:style-name="Preformatted_20_Text"><text:s text:c="16"/>lsl <text:s text:c="9"/>#4.dl</text:p>
      <text:p text:style-name="Preformatted_20_Text"><text:s text:c="16"/>move.b <text:s text:c="6"/>8(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5(al).dl <text:s text:c="12"/>* <text:s text:c="4"/>pack_data[3] = joy_ra</text:p>
      <text:p text:style-name="First_20_paragraph">w_data[9] | (joy_raw_data[5] &lt;&lt; 4):</text:p>
      <text:p text:style-name="Preformatted_20_Text"><text:s text:c="16"/>andi.b <text:s text:c="6"/>#$f.dl</text:p>
      <text:p text:style-name="Preformatted_20_Text"><text:s text:c="16"/>lsl <text:s text:c="9"/>#4.dl</text:p>
      <text:p text:style-name="Preformatted_20_Text"><text:s text:c="16"/>move.b <text:s text:c="6"/>9(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0(al).dl <text:s text:c="12"/>* <text:s text:c="4"/>pack_data[4] = joy_ra</text:p>
      <text:p text:style-name="First_20_paragraph">w_data[1] | (joy_raw_data[0] &lt;&lt; 4):</text:p>
      <text:p text:style-name="Preformatted_20_Text"><text:s text:c="16"/>andi.b <text:s text:c="6"/>#$f.dl</text:p>
      <text:p text:style-name="Preformatted_20_Text"><text:s text:c="16"/>lsl <text:s text:c="9"/>#4.dl</text:p>
      <text:p text:style-name="Preformatted_20_Text"><text:s text:c="16"/>move.b <text:s text:c="6"/>1(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move.b <text:s text:c="7"/>11(al).dl <text:s text:c="10"/>* <text:s text:c="4"/>pack_data[5] = joy_ra</text:p>
      <text:p text:style-name="First_20_paragraph">w_data[10] | (joy_raw_data[11] &lt;&lt; 4):</text:p>
      <text:p text:style-name="Preformatted_20_Text"><text:s text:c="16"/>andi.b <text:s text:c="6"/>#$f.dl</text:p>
      <text:p text:style-name="Preformatted_20_Text"><text:s text:c="16"/>lsl <text:s text:c="9"/>#4.dl</text:p>
      <text:p text:style-name="Preformatted_20_Text"><text:s text:c="16"/>move.b <text:s text:c="6"/>10(al).d2</text:p>
      <text:p text:style-name="Preformatted_20_Text"><text:s text:c="16"/>andi.b <text:s text:c="6"/>#$f.d2</text:p>
      <text:p text:style-name="Preformatted_20_Text"><text:s text:c="16"/>or.b <text:s text:c="8"/>d2.dl</text:p>
      <text:p text:style-name="Preformatted_20_Text"><text:s text:c="16"/>move.b <text:s text:c="6"/>d1.(a0)+</text:p>
      <text:p text:style-name="Preformatted_20_Text"/>
      <text:p text:style-name="Preformatted_20_Text"><text:s text:c="16"/>rts <text:s text:c="28"/>* <text:s text:c="1"/>}</text:p>
      <text:p text:style-name="Preformatted_20_Text"><text:s text:c="17"/>.even</text:p>
      <text:p text:style-name="Horizontal_20_Line"/>
      <text:h text:style-name="Heading_20_2" text:outline-level="2"><text:bookmark-start text:name="outs-000235"/>outs-000235<text:bookmark-end text:name="outs-000235"/></text:h>
      <text:p text:style-name="First_20_paragraph">RC Stick</text:p>
      <text:p text:style-name="Preformatted_20_Text">AS_TMP_BUF:</text:p>
      <text:p text:style-name="Preformatted_20_Text"><text:s text:c="16"/>.ds.b <text:s text:c="10"/>12</text:p>
      <text:p text:style-name="Preformatted_20_Text">AS_ACK_BUF:</text:p>
      <text:p text:style-name="Preformatted_20_Text"><text:s text:c="16"/>.ds.b <text:s text:c="10"/>5</text:p>
      <text:p text:style-name="Preformatted_20_Text"><text:s text:c="16"/>.even</text:p>
      <text:p text:style-name="Preformatted_20_Text">AS_RETVAL:</text:p>
      <text:p text:style-name="Preformatted_20_Text"><text:s text:c="16"/>.dc.w <text:s text:c="10"/>0</text:p>
      <text:p text:style-name="Preformatted_20_Text"><text:s text:c="16"/>.dc.l <text:s text:c="10"/>0</text:p>
      <text:p text:style-name="Preformatted_20_Text"><text:s text:c="16"/>.dc.l <text:s text:c="10"/>0</text:p>
      <text:p text:style-name="Preformatted_20_Text"><text:s text:c="16"/>.end</text:p>
      <text:p text:style-name="Preformatted_20_Text"/>
      <text:p text:style-name="Preformatted_20_Text"><text:s text:c="78"/>231</text:p>
      <text:p text:style-name="Horizontal_20_Line"/>
      <text:h text:style-name="Heading_20_2" text:outline-level="2"><text:bookmark-start text:name="outs-000236"/>outs-000236<text:bookmark-end text:name="outs-000236"/></text:h>
      <text:p text:style-name="First_20_paragraph">COLUMN</text:p>
      <text:p text:style-name="Text_20_body">Data Transmission of Cyber Stick</text:p>
      <text:p text:style-name="Text_20_body">Let’s touch on how to transmit data from the Cyber Stick. The only thing output from the host side is the REQ signal. The Cyber Stick sends this along with the other six axes data to the host. Data transmission is done while checking the handshake, but the REQ is received by the Cyber Stick and further transmission is indicated [unclear].</text:p>
      <text:p text:style-name="Text_20_body">LHL 0 indicates whether data is from the nth controller or not. Since XACK is set to indicate whether data is from DAT 0-DAT 31 axis, the host reads the data sequentially.</text:p>
      <text:p text:style-name="Text_20_body">The [transmission] format is as follows: the Cyber Stick's specification has axes A+A', B+B' being read as single entities A and B, but they are read separately in controller software. F, G reference the specification in detail, where Cyber Stick has START and SELECT switches.</text:p>
      <text:p text:style-name="Text_20_body">The axis data is read 12 times; this was the fault in the implementation. In our program, one controller sends axis data 12 times, which is sufficient for smooth operation, without causing trouble with the Adaptor Partner. Synchronizing checks were done to remedy the timing of the Cyber Stick – thorough verification followed. Reading the list of drivers confirmed that using the 12 reads and error processing was also effective. Thus, adapting to work with the Adaptor Partner should be crucial.</text:p>
      <text:p text:style-name="Text_20_body">Finally, a change in the route allowed smooth motion. (Since having fewer transmissions is easier), it now works efficiently. Though, what occurs during 12th transmissions remains somewhat uncertain. For the drivers list, it only shows as read and essentially unused. Future expansions may be anticipated.</text:p>
      <text:p text:style-name="Horizontal_20_Line"/>
      <text:h text:style-name="Heading_20_2" text:outline-level="2"><text:bookmark-start text:name="outs-000237"/>outs-000237<text:bookmark-end text:name="outs-000237"/></text:h>
      <text:p text:style-name="First_20_paragraph">Universal Remote Control</text:p>
      <text:p text:style-name="Text_20_body">We tried to realize on the X68000 a universal remote control that can record and play back the waveforms of the infrared remote controls built into all kinds of devices. By linking several devices together, or combining it with the main unit's timer function, all sorts of applications can be imagined.</text:p>
      <text:p text:style-name="Text_20_body">As infrared remote controls have come to be used in all kinds of equipment, before you know it your room is full of remote controls. Recently, with the increase of AV gear that comes with infrared remotes, even the very person who assembled the system can no longer tell which remote control to use for what. To improve this situation even a little, products have been released that can record the remote-control waveforms of various manufacturers so as to be able to transmit them. Couldn't we do something similar with the X68000? If the X68000 could record the waveforms and then combine and output them, it seems we could do something quite interesting.</text:p>
      <text:list text:style-name="Numbering_20_1">
        <text:list-item>
          <text:p text:style-name="List_20_Number_20_Tight">Experimenting with the Infrared Remote Control</text:p>
        </text:list-item>
      </text:list>
      <text:p text:style-name="First_20_paragraph">First, we have to understand by what method an infrared remote control exchanges data. We decided to build a simple light receiver using a phototransistor and investigate the output waveform of a remote control. For the phototransistor we used Toshiba's TPS601A. It has a convex lens on the top of the device, giving it strong directivity, so external influences are reduced. (Continued)</text:p>
      <text:p text:style-name="Text_20_body">233</text:p>
      <text:p text:style-name="Horizontal_20_Line"/>
      <text:h text:style-name="Heading_20_2" text:outline-level="2"><text:bookmark-start text:name="outs-000238"/>outs-000238<text:bookmark-end text:name="outs-000238"/></text:h>
      <text:p text:style-name="Horizontal_20_Line"/>
      <text:p text:style-name="First_20_paragraph">The schematic diagram of the fabricated photodetector is shown in Figure 1. The phototransistor symbol indicates the base of the transistor gets illuminated by light; such as the shape in the figure, when light hits it, current flows through the collector and emitter.</text:p>
      <text:p text:style-name="Text_20_body">■ Figure —— 1: Schematic diagram of the fabricated photodetector.</text:p>
      <text:p text:style-name="Text_20_body">The method of determining the resistance value connected to the collector of the phototransistor requires some attention. If the resistance is made too large, the potential can be roughly pulled down to 0V, increasing sensitivity, but conversely, if the resistance is too small, the sensitivity will be adversely affected, and if too large, dark current (current flowing without light) will flow significantly. To counteract this, the device may become insensitive. If the resistance value is reduced, the photo-transistor won’t pull down the power supply voltage, but if the maximum collector dissipation is exceeded, the phototransistor may be damaged. Therefore, it is cautious to set the resistance to a smaller value.</text:p>
      <text:p text:style-name="Text_20_body">The datasheet shows that the maximum collector dissipation of the TPS601A is 150 mW. For instance, if the power supply voltage is 5V, you’ll need to make sure that more than 30 mA (150 mW / 5V) doesn’t flow. The current limit is calculated simply by not applying a load to the phototransistor when it is not illuminated. The maximum collector current (IC) is 50 mA, considering safety margins. From VCE (sat) = 0.5 V, if the supply voltage is 5V, then (5-0.5)/50 = 0.09 (KΩ), which is about 90 Ω. Calculating back from the allowable current boundary (the calculation basis is IC = 50mA, considering common emitter saturation voltage). The collector-emitter voltage (VCE (sat)) is roughly 0.5 V. Therefore, if the power supply is 5V, with (5-0.5)/50 = 0.09 (KΩ), 90 Ω is about the boundary value. We should calculate the resistance value for the laboratory to examine, it's not difficult.</text:p>
      <text:p text:style-name="Text_20_body">0.1 Measurement</text:p>
      <text:p text:style-name="Text_20_body">First of all, let's try examining the waves of the remote control with the CZ-600DE remote controller.</text:p>
      <text:p text:style-name="Horizontal_20_Line"/>
      <text:p text:style-name="Horizontal_20_Line"/>
      <text:h text:style-name="Heading_20_2" text:outline-level="2"><text:bookmark-start text:name="outs-000239"/>outs-000239<text:bookmark-end text:name="outs-000239"/></text:h>
      <text:p text:style-name="Horizontal_20_Line"/>
      <text:p text:style-name="First_20_paragraph">While observing the output with an oscilloscope, press the switch on the remote control and adjust the distance. At that time, for the RS-232C, I was assuming that the waveform would toggle the infrared ON/OFF at a periodic interval of 1/0, but the actual waveform was quite different. Upon closer inspection, it seemed to be modulated at a frequency of around 33 kHz.</text:p>
      <text:p text:style-name="Text_20_body">Certainly, this kind of modulation is stronger against external noise. Even when I tested a completely different manufacturer's video remote control, it was modulated at approximately 33 kHz, and its ON/OFF toggling was also similar. When I checked cheap versions selling at certain shops, they also said 38 kHz. So, it seems modulation within this frequency range is a common approach to avoid noise.</text:p>
      <text:p text:style-name="Text_20_body">Since the base frequency should not be too close, to avoid seeing pulse noise, I decided to change the IR light frequency from 330 to a more appropriate 38 kHz, as verified by remote control.</text:p>
      <text:p text:style-name="Text_20_body">0.2 Experiments on the Emission Side</text:p>
      <text:p text:style-name="Text_20_body">To use the signal received as it is for testing, like a dedicated remote control, I decided to create a repeater remote control. Figure 2 shows the configuration of the repeater built for testing. The infrared photodiode uses a TLN105A. Since the maximum current rating of TLN105A is 100 mA, with margin considered, we decided to use around 30 mA. The forward voltage (VF) characteristic of this photodiode is around 1.26 V, and checking the transistor's VBE characteristic, the resistance value is derived as:</text:p>
      <text:p text:style-name="Text_20_body">(1.26 V - 0.75 V) / 30 mA ≈ 0.017 (kΩ), which rounds to about 100 Ω. The transistor's maximum collector current is 150 mA, and its collector loss is 400 mA, significantly higher and should be verified until confirmed with actual calculations.</text:p>
      <text:p text:style-name="Text_20_body">Figure 2 Repeater Configuration</text:p>
      <text:p text:style-name="Text_20_body">(Labeling in the diagram)</text:p>
      <text:h text:style-name="Heading_20_2" text:outline-level="2"><text:bookmark-start text:name="ir-repeater"/>IR Repeater<text:bookmark-end text:name="ir-repeater"/></text:h>
      <text:p text:style-name="Horizontal_20_Line"/>
      <text:h text:style-name="Heading_20_2" text:outline-level="2"><text:bookmark-start text:name="outs-000240"/>outs-000240<text:bookmark-end text:name="outs-000240"/></text:h>
      <text:p text:style-name="First_20_paragraph">When the repeater's infrared light emitting diode is pointed at the display and the phototransistor at the remote control, turn on the power switch on the remote's upper left. There will be a loud "chappi vean" sound as the power turns on. The channel switching will also respond. If the repeater's power is turned off, it will definitely stop working since the repeater does not connect directly.</text:p>
      <text:list text:style-name="Numbering_20_1" text:start-value="3">
        <text:list-item>
          <text:p text:style-name="List_20_Number_20_Tight">Interface with the Main Body</text:p>
        </text:list-item>
      </text:list>
      <text:p text:style-name="First_20_paragraph">Since it acts as a repeater, the X68000 should be placed between the receiver and the light emitting diode. We decided to use the joystick connector to connect to the main body. The connector is slightly larger, but generally uses a standard 9-pin D-SUB connector. We created a pin assignment for the eight output pins of the joystick port: pins 1, 2, 3, and 4 are dedicated to input, pins 6 and 7 are dedicated to output, and pin 8 is dedicated to input/output. The fifth pin is +5V, and the ninth pin is GND. Considering that the data output from the first pin appears to the CPU as data read from RAM, we decided to use the eighth pin for data output and input.</text:p>
      <text:list text:style-name="Numbering_20_1" text:start-value="4">
        <text:list-item>
          <text:p text:style-name="List_20_Number_20_Tight">Connection with X68000</text:p>
        </text:list-item>
      </text:list>
      <text:p text:style-name="First_20_paragraph">33 kHz is a relatively fast speed, so we need to be cautious about data retrieval. To retrieve data reliably at 33 kHz, the data must be retrieved at least twice as fast, at 66 kHz. In other words, data needs to be retrieved at intervals of 1/66 kHz = 0.015 ms. Retrieval cannot start within 15 µs. For MOVE commands between memory and memory at 10 MHz on the X68000, it takes about 22 cycles, which translates to 2.2 µs (22 × 0.1 µs). This means it is not possible to start retrieval within 15 µs, but it cannot be helped. While it cannot be guaranteed, the goal is to enter data consistently within 15 µs. Since the LED indicator initially lights up, the output will cease once the 8255 initialization is complete.</text:p>
      <text:p text:style-name="Text_20_body">At any rate, we decided to test using the joystick port with hardware, software, and scope. The resulting circuit is shown in Fig.3. The 8-bit output signal is connected to the X68000 joystick quick interface with 10 KΩ and 5 V. After the 8255 reset, outputs will also stop, due to factors such as timing or high impedance. Poor contact with the LED on this ground is because the output will become high after the initial 8255 initialization.</text:p>
      <text:p text:style-name="Text_20_body">Note that some specific technical terms and details may need additional context understanding to work accurately.</text:p>
      <text:p text:style-name="Horizontal_20_Line"/>
      <text:h text:style-name="Heading_20_2" text:outline-level="2"><text:bookmark-start text:name="outs-000241"/>outs-000241<text:bookmark-end text:name="outs-000241"/></text:h>
      <text:p text:style-name="Horizontal_20_Line"/>
      <text:p text:style-name="First_20_paragraph">Fig. 3 Infrared Remote Control Interface (Experimental Version)</text:p>
      <text:p text:style-name="Horizontal_20_Line"/>
      <text:p text:style-name="First_20_paragraph">I have tried this for now. By creating an external function, setting an array, and then reading it, I initialize it to output continuously. I've read the switch shape of the distant remote control and once I've read it, I will continuously output it. In this way, turning the CZ-600 remote control to the right will prevent it from moving properly. Conversely, turning it to the left will turn it off. This works as if it's moving reliably.</text:p>
      <text:p text:style-name="Text_20_body">5-5 Extend Distance</text:p>
      <text:p text:style-name="Text_20_body">It started moving, but I did not know how far it would go, so I experimented. The result wasn't bad, but it was around a limit of 1m. Normally, an infrared remote control will work fine from 5m or so, but in this case, due to the bad sensitivity of the infrared receiving module, it stops at about 1m. To increase LED's current to maintain output, it is necessary to investigate step-up. However, an LED current beyond the maximum current rating shouldn't be used for long periods. Looking at the datasheet again, the "Pulse Forward Voltage (IFP)” can be used up to 1A. In this case, this value...</text:p>
      <text:p text:style-name="Horizontal_20_Line"/>
      <text:p text:style-name="Horizontal_20_Line"/>
      <text:h text:style-name="Heading_20_2" text:outline-level="2"><text:bookmark-start text:name="outs-000242"/>outs-000242<text:bookmark-end text:name="outs-000242"/></text:h>
      <text:p text:style-name="Horizontal_20_Line"/>
      <text:p text:style-name="First_20_paragraph">Attention: The pulse width is 100 µs, and the repeat frequency is 100 Hz. To clarify, this means that if a pulse is sent at 100 µs, it will pulse 100 times in 1 second. In the case of remote control signals, which send data at a frequency of around 33 kHz, a switch is made every 1 µs. Since it takes time to send data after receiving it, the stipulated time is 100 µs for the next data transmission.</text:p>
      <text:p text:style-name="Text_20_body">#2 Circuit Design</text:p>
      <text:p text:style-name="Text_20_body">Ultimately, in the circuit diagram of Figure 4, the inverter in Figure 4 was changed from 74HCT240 to 74HC14. This change was necessary to create the CR timing circuit with C-MOS Schmitt Gate. The received signal is shaped into a clean pulse by a resistor, capacitor, and diode, with the final pulse sent to an infrared LED. The 4.7 Ω resistor connected to this is negligible. Let's explain about this briefly.</text:p>
      <text:h text:style-name="Heading_20_2" text:outline-level="2"><text:bookmark-start text:name="id_2-1-continuous-lighting-prevention-circuit"/>2-1 Continuous Lighting Prevention Circuit<text:bookmark-end text:name="id_2-1-continuous-lighting-prevention-circuit"/></text:h>
      <text:p text:style-name="First_20_paragraph">Suspicious resistors, capacitors, and diodes are connected to prevent continuous lighting for up to 100 µs. The basic configuration of the attachment circuit is the same as Figure 3. When input is received, the 74HC14 output is 100 KΩ, passing through the capacitor of 1000pF to prevent rapid charging. If the voltage at this capacitor exceeds the threshold voltage of the 74HC14, the output of the 74HC14 will be inverted to 0, turning off the transistors and dissipating the charge in the infrared diode. This process takes nearly CR seconds, about 100Ω x 10^-9 x 100 x 10^-6 = 100µs.</text:p>
      <text:p text:style-name="Text_20_body">If the input continues for more than 100 µs, the output will not return until the input stops for 100 µs. At that time, the capacitor will discharge rapidly through the diode (1S1588). When it stops, the capacitor voltage will be reset via the diode.</text:p>
      <text:p text:style-name="Horizontal_20_Line"/>
      <text:p text:style-name="First_20_paragraph">The page number in the lower-left corner indicates that this is page 238 of a document.</text:p>
      <text:p text:style-name="Horizontal_20_Line"/>
      <text:h text:style-name="Heading_20_2" text:outline-level="2"><text:bookmark-start text:name="outs-000243"/>outs-000243<text:bookmark-end text:name="outs-000243"/></text:h>
      <text:p text:style-name="First_20_paragraph">Universal Remote Control</text:p>
      <text:p text:style-name="Text_20_body">● Figure 4 Infrared Remote Control Interface (Final Version)</text:p>
      <text:p text:style-name="Text_20_body">[Circuit diagram] TPS601A, HC14, LED (red), TC74HC..., TALS..., 0.1µF, 1kΩ, 330Ω, 10µF 16V, TLN105A, 2SA1015, LS00, 2SA940, 1S1588, 100kΩ, 100Ω, 1µF, 1000pF, 10kΩ Signals: 1, 9, 8</text:p>
      <text:p text:style-name="Text_20_body">[Pinout / part outline labels] 2SA1015 9-pin D-SUB 2SA940 1S1588 TPS601A TLN105A (1 — 5 / 6 — 9) ▷│ ← marking K = cathode marked E C B [connector] B C E (band side) E C B A K (K is the short lead)</text:p>
      <text:p text:style-name="Text_20_body">2.2 Light-Emitting Diode Drive Circuit</text:p>
      <text:p text:style-name="Text_20_body">The TLN105A is driven by connecting the transistors in a Darlington configuration. This is because, in order to pass a large current through the light-emitting diode, a single 2SA1015 was no longer sufficient. The TLN105A (continued)</text:p>
      <text:p text:style-name="Text_20_body">239</text:p>
      <text:p text:style-name="Horizontal_20_Line"/>
      <text:h text:style-name="Heading_20_2" text:outline-level="2"><text:bookmark-start text:name="outs-000244"/>outs-000244<text:bookmark-end text:name="outs-000244"/></text:h>
      <text:p text:style-name="Horizontal_20_Line"/>
      <text:list text:style-name="Numbering_20_1" text:start-value="3">
        <text:list-item>
          <text:p text:style-name="List_20_Number_20_Tight">Retest</text:p>
        </text:list-item>
      </text:list>
      <text:p text:style-name="First_20_paragraph">I decided to retest this circuit. I tried to match the data read with the outputs. Although the TLN105A has a direction it faces, the TV suddenly responded. I reluctantly had to bring out my X68000, but I couldn't measure the distance. It felt like the main unit was getting warm when I continued to press the remote.</text:p>
      <text:list text:style-name="Numbering_20_1" text:start-value="3">
        <text:list-item>
          <text:p text:style-name="List_20_Number_20_Tight">Points to Note in Production</text:p>
        </text:list-item>
      </text:list>
      <text:p text:style-name="First_20_paragraph">Let's complete it as a production circuit. After all, it's almost a 100 kHz digital signal, so there is almost no one to argue its practicality. I use IC sockets for handmade ones, IC sockets, transistors, infrared LEDs, and infrared phototransistors. It costs less and is more reliable to buy than to attach ICs directly, so it won't break even if made cheaply. If you pay attention to heat, some people may still want to do it on a breadboard, but as long as you don't want to kill the IC with heat. Let's try it (I tried it myself with a deliberate intention, but it didn't break).</text:p>
      <text:p text:style-name="Text_20_body">3.1 LED</text:p>
      <text:p text:style-name="Text_20_body">Since LEDs are used only for monitoring, you can attach your favorite ones. I use red and green.</text:p>
      <text:p text:style-name="Horizontal_20_Line"/>
      <text:h text:style-name="Heading_20_2" text:outline-level="2"><text:bookmark-start text:name="outs-000245"/>outs-000245<text:bookmark-end text:name="outs-000245"/></text:h>
      <text:p text:style-name="First_20_paragraph">Universal Remote Control</text:p>
      <text:p text:style-name="Text_20_body">...However, since we have to flow a current at about the same brightness so that it lights up, a little more current must be passed to the LED side. Since the IOL of the HC14 is only 4 mA, both the red and green LEDs were set to 1 kΩ. The output of the LS00 is to spare, so it is fine to use that side and reduce the current-limiting resistors further.</text:p>
      <text:p text:style-name="Text_20_body">3.2 Case</text:p>
      <text:p text:style-name="Text_20_body">For the case we used a small scroll case. We found it at the Akizuki electronics shop in Akihabara for 90 yen each. When you open this case to fix it to the board, the screws pop out from the back, so it is hard to handle when you do it. So we glued the nuts to the case with instant adhesive in advance, and that work was a relief.</text:p>
      <text:p text:style-name="Text_20_body">You also cannot avoid opening holes to pass the connection cables that go to the X68000 main unit. To make clean holes, you have to open them slowly with a hand drill, but the cable fixing comes loose, so we thought of straightening a clip, heating it red-hot over the gas burner, and opening the holes by repeatedly melting through. It seems some people make holes with a kiri or a small screwdriver, but that turns it into hot work. The melted scroll material sticks to the tool, so it is better not to do it that way.</text:p>
      <text:p text:style-name="Text_20_body">4 Sample Program</text:p>
      <text:p text:style-name="Text_20_body">It looked like rather enjoyable hardware to build, so we also made some software. As for the data read/write portion, it is written so as to be fairly indifferent to timing, like calculations done with some leeway. So even when assembled, it links as a module relative to X-BASIC, and there is also no need to specify the assembler option (covered in another chapter).</text:p>
      <text:p text:style-name="Text_20_body">The part that processes the read data is all written in X-BASIC, so it also works as is under the interpreter. However, displaying the waveform compression takes a fair amount of time, so use the compiled version whenever you can.</text:p>
      <text:p text:style-name="Text_20_body">241</text:p>
      <text:p text:style-name="Horizontal_20_Line"/>
      <text:h text:style-name="Heading_20_2" text:outline-level="2"><text:bookmark-start text:name="outs-000246"/>outs-000246<text:bookmark-end text:name="outs-000246"/></text:h>
      <text:p text:style-name="First_20_paragraph">Universal Remote Control</text:p>
      <text:p text:style-name="Text_20_body">This program has two buffers: a display buffer used for displaying the waveform, and a copy buffer used for copying data and for file input/output. As for remote-control reading, the read waveform goes straight into the display buffer, so you can check on the spot whether the read succeeded; all other input/output is performed with respect to the copy buffer.</text:p>
      <text:p text:style-name="Text_20_body">Now then, let's run the program.</text:p>
      <text:p text:style-name="Text_20_body">4.1 Select Mode</text:p>
      <text:p text:style-name="Text_20_body">When you run it, first 8 × 8 = 64 rectangles appear. Let's call this screen the Select Mode screen. The bottommost square corresponds to a file. If data is registered there, the square exists as a filled (recorded) square, and the file's handle name is registered (ch1 and up).</text:p>
      <text:p text:style-name="Text_20_body">When you move the mouse to the edit (pencil) icon at the right of the screen and press the left button, the edit-mode lid opens. Pressing the left button here, or pressing the right button, takes you into Edit Mode.</text:p>
      <text:p text:style-name="Text_20_body">4.2 Edit Mode</text:p>
      <text:p text:style-name="Text_20_body">When you enter Edit Mode this way, the contents of the display buffer are shown at the waveform display area on the left of the screen. The waveform that was placed in the display buffer by reading is displayed here. At first glance it looks like a 30-channel logic analyzer screen, but the actual data is attached to channel 1. The contents of the display buffer can be enlarged/reduced to any magnification at any position. As a result, the display buffer has 32768 clocks' worth of capacity.</text:p>
      <text:p text:style-name="Text_20_body">The icon group at the top of the screen, from the left: remote waveform read (eye), remote waveform output (arrow), waveform playback (square wave), file writing (file), file reading (book), and return to Select Mode (door at the right). You move the mouse cursor over one and press a button to execute it. However, buttons that cannot be enabled are in an unpressable state, and even right-clicking does nothing.</text:p>
      <text:p text:style-name="Text_20_body">The small ones to the right of the waveform are the scroll and enlarge/reduce display icons. The numbers below them show the enlargement/reduction factor of the waveform display, indicating the magnification of the X-axis with plus/minus. If you click while watching the numbers change, you can easily understand the relationship between the numeric change and the change in the waveform display, I think.</text:p>
      <text:p text:style-name="Text_20_body">242</text:p>
      <text:p text:style-name="Horizontal_20_Line"/>
      <text:h text:style-name="Heading_20_2" text:outline-level="2"><text:bookmark-start text:name="outs-000247"/>outs-000247<text:bookmark-end text:name="outs-000247"/></text:h>
      <text:p text:style-name="First_20_paragraph">Universal Remote Control</text:p>
      <text:p text:style-name="Text_20_body">Now, when you press the left mouse button at the waveform display, the selected waveform is underlined and a cursor appears (we'll call it the O cursor). If you move the mouse as is, another cursor (the X cursor) follows the mouse and moves around. Then you press the right button. The mode switches — NULL, SET, RESET, COPY, PASTE, JUMP — are displayed at the very bottom of the screen.</text:p>
      <text:p text:style-name="Text_20_body">NULL does nothing. SET makes the interval from the O cursor to the X cursor the LED-on state (the state corresponding to the waveform offset width). RESET makes the interval between the two cursors the LED-off state (likewise the state that goes to the lower side). COPY transfers the data of that interval to the copy buffer. PASTE (which has unfortunately been displayed as "PAST" on the screen) copies the contents of the copy buffer to the data buffer starting from the O cursor position. JUMP moves the O cursor position so that it comes to the lower-right corner of the screen.</text:p>
      <text:p text:style-name="Text_20_body">4.3 Trying It Out</text:p>
      <text:p text:style-name="Text_20_body">As for how to use it: first, to read data, shape the waveform displayed on the screen with SET and RESET, capture it with COPY if necessary, try outputting it with the output icon, and if the target device works well, the flow is to dump the buffer contents to a file. So let's start with reading a signal from the remote control. The plan is to load data into the intelligent remote control we've described elsewhere.</text:p>
      <text:p text:style-name="Text_20_body">First, enter a channel code and click the read icon; the open part of the icon closes. This is the read-standby state. Hold the remote control you built facing the ready-made remote control and have it read the signal. The LED of the photodetector section blinks, so it seems a signal has come in, and the read waveform is displayed on the screen (Photo 1).</text:p>
      <text:p text:style-name="Text_20_body">Next, take this waveform in with copy &amp; paste. Using the method described earlier, set the range with the O cursor and the X cursor and execute COPY. To COPY the entire read waveform data, enlarge the waveform using the enlarge/reduce icon. Here, if you try outputting the waveform using the output icon, you can confirm whether the target device operates.</text:p>
      <text:p text:style-name="Text_20_body">For example, suppose you read a channel-code signal from a TV remote control: first point the remote control you built at the TV and click the output icon. If the channel display then appears on the TV screen, it is working properly (if it doesn't seem to function, redo the waveform reading). Once you've confirmed that the correct waveform is in the buffer, next you write it back (Photo 2). When you click the write-back icon, after the file it asks for the handle name.</text:p>
      <text:p text:style-name="Text_20_body">243</text:p>
      <text:p text:style-name="Horizontal_20_Line"/>
      <text:h text:style-name="Heading_20_2" text:outline-level="2"><text:bookmark-start text:name="outs-000248"/>outs-000248<text:bookmark-end text:name="outs-000248"/></text:h>
      <text:p text:style-name="Horizontal_20_Line"/>
      <text:p text:style-name="First_20_paragraph">● Photo …… 1 Edit Mode</text:p>
      <text:p text:style-name="Horizontal_20_Line"/>
      <text:p text:style-name="First_20_paragraph">● Photo …… 2 The waveform read into the copy buffer is displayed</text:p>
      <text:p text:style-name="Horizontal_20_Line"/>
      <text:p text:style-name="First_20_paragraph">This handle name will be the text data displayed in the rectangle that appears in Select Mode. Let's include the function name of the waveform data (such as the channel number). The file name is fixed, and the rectangle displayed at the top left in Select Mode is rmdat.000. It progresses in the following order: rmdat.001, rmdat.002, and finally to rmdat.063 on the far right. As mentioned earlier, a total of 64 files can be registered. Once the writing is complete, the length of the rectangle in Select Mode</text:p>
      <text:p text:style-name="Horizontal_20_Line"/>
      <text:p text:style-name="First_20_paragraph">(Page number at the bottom: 244)</text:p>
      <text:p text:style-name="Horizontal_20_Line"/>
      <text:h text:style-name="Heading_20_2" text:outline-level="2"><text:bookmark-start text:name="outs-000249"/>outs-000249<text:bookmark-end text:name="outs-000249"/></text:h>
      <text:p text:style-name="First_20_paragraph">● Photo ...... 3 Select Mode</text:p>
      <text:p text:style-name="Text_20_body">Make sure that the frame is in place and the handle name is clearly visible (Photo 3a). In this way, select the data registered in the select mode (click on the frame surrounding the handle in white). When you click, the data will be read from the disk and the remote control will be activated. At this time, the data also enters the COPY buffer. If you modify it in select mode, you can save it without any special preparation. In the select mode, you do not need to enter edit mode as it is. SET, RESET, COPY, or data-related information will not suddenly change the configuration of individual waveforms. This is a desirable state, indicating that other lines of display data are unaffected. The reason this phrase is written is that when the waveform is selected and called up in select mode, if any relative or icon is clicked, when all waveforms are rewritten and modified, it is standard practice to rewrite them all every time a change is made. Therefore, a reference of past data is included. When you finish creating in select mode, press the button on the right of the icon in the lower right of the door, and the door will open. Just press this button as it is, and you will return to the previous screen in select mode. I thought about allowing tabs to click in sequence, but I realized it was trivial to have tabs fluctuating to the right, so I left it as it was. To exit the program, press the door to the right of the right side of the select mode screen. The sequence from left to right is the same as before.</text:p>
      <text:p text:style-name="Horizontal_20_Line"/>
      <text:h text:style-name="Heading_20_2" text:outline-level="2"><text:bookmark-start text:name="outs-000250"/>outs-000250<text:bookmark-end text:name="outs-000250"/></text:h>
      <text:h text:style-name="Heading_20_3" text:outline-level="3"><text:bookmark-start text:name="id_5-conclusion"/>●5 Conclusion<text:bookmark-end text:name="id_5-conclusion"/></text:h>
      <text:p text:style-name="First_20_paragraph">Making a wireless remote control turned out to be quite enjoyable. With a remote-control-equipped device, you can control almost anything from the X68000. It might also be interesting to use it to control an original device you've built yourself. By capturing the waveforms of AV equipment beforehand and synchronizing the various devices, you could create something that truly deserves to be called an intelligent remote control.</text:p>
      <text:h text:style-name="Heading_20_3" text:outline-level="3"><text:bookmark-start text:name="list1-infrared-controller-sample-program"/>●List......1 Infrared Controller Sample Program<text:bookmark-end text:name="list1-infrared-controller-sample-program"/></text:h>
      <text:p text:style-name="First_20_paragraph">/<text:span text:style-name="T1">/ /</text:span><text:span text:style-name="T1"> </text:span><text:span text:style-name="T1">/ /</text:span><text:span text:style-name="T1"> Infrared Controller Sample Program </text:span><text:span text:style-name="T1">/ /</text:span><text:span text:style-name="T1"> </text:span><text:span text:style-name="T1">/ /</text:span><text:span text:style-name="T1"> 1989-02-24 Programmed by M.kuwano </text:span><text:span text:style-name="T1">/ /</text:span><text:span text:style-name="T1"> 03-05 Remove Slight Bugs </text:span><text:span text:style-name="T1">/ /</text:span><text:span text:style-name="T1"> </text:span><text:span text:style-name="T1">/ /</text:span>/</text:p>
      <text:p text:style-name="Text_20_body">char c(32768), buf(32768), filebuf(4096) char mv(25644), zm(256) int start(30), zsq(30), redraw_flag(30) int exist_flag(64) int s, fp, mode, bufsize, fbufsize, fsize, exitflag dim str modes(5) = {"NULL", "SET", "RESET", "COPY", "PAST", "JUMP"} dim bitmsk(7) = { 1, 2, 4, 8, &amp;H10, &amp;H20, &amp;H40, &amp;H80} str fname, hname screen 2.0, 1.1 console 0, 32, 0</text:p>
      <text:p text:style-name="Preformatted_20_Text">bufsize = 0</text:p>
      <text:p text:style-name="Preformatted_20_Text">fname = "": hname = ""</text:p>
      <text:p text:style-name="First_20_paragraph">clear_buf(): clear_copybuf() gen_icon() mouse(0): mouse(1): mouse(4) repeat exitflag = selector()</text:p>
      <text:p text:style-name="Horizontal_20_Line"/>
      <text:h text:style-name="Heading_20_2" text:outline-level="2"><text:bookmark-start text:name="outs-000251"/>outs-000251<text:bookmark-end text:name="outs-000251"/></text:h>
      <text:p text:style-name="First_20_paragraph">The Japanese text on the image translates to "Universal Remote Control" in English.</text:p>
      <text:p text:style-name="Horizontal_20_Line"/>
      <text:h text:style-name="Heading_20_2" text:outline-level="2"><text:bookmark-start text:name="outs-000252"/>outs-000252<text:bookmark-end text:name="outs-000252"/></text:h>
      <text:p text:style-name="First_20_paragraph">The image contains a block of code written in what appears to be BASIC-like programming language. The code comments and instructions, however, are in English. Here’s the provided code:</text:p>
      <text:p text:style-name="Text_20_body">pdat = c(pp) pset(10, base+5*(pdat and 1), 15) for i=1 to 511</text:p>
      <text:p text:style-name="Preformatted_20_Text"><text:s text:c="2"/>pp = pp+1</text:p>
      <text:p text:style-name="Preformatted_20_Text"><text:s text:c="2"/>if pp &gt;= 32768 then break</text:p>
      <text:p text:style-name="Preformatted_20_Text"><text:s text:c="2"/>if pdat &lt;&gt; c(pp) then {</text:p>
      <text:p text:style-name="Preformatted_20_Text"><text:s text:c="4"/>line(i+10, base, i+10, base+5, 15)</text:p>
      <text:p text:style-name="Preformatted_20_Text"><text:s text:c="2"/>} else {</text:p>
      <text:p text:style-name="Preformatted_20_Text"><text:s text:c="4"/>pset(i+10, base+5*(c(pp) and 1), 15)</text:p>
      <text:p text:style-name="Preformatted_20_Text"><text:s text:c="2"/>}</text:p>
      <text:p text:style-name="Preformatted_20_Text"><text:s text:c="2"/>pdat = c(pp)</text:p>
      <text:p text:style-name="First_20_paragraph">next endfunc func drak_wave_sg2(num:int)</text:p>
      <text:p text:style-name="Preformatted_20_Text"><text:s text:c="2"/>int pdat, p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Preformatted_20_Text"><text:s text:c="2"/>px = 0</text:p>
      <text:p text:style-name="Preformatted_20_Text"><text:s text:c="2"/>zoom = -zosq(num)</text:p>
      <text:p text:style-name="Preformatted_20_Text"><text:s text:c="2"/>brk = 0</text:p>
      <text:p text:style-name="Preformatted_20_Text"><text:s text:c="2"/>while brk=0 and px&lt;=511</text:p>
      <text:p text:style-name="Preformatted_20_Text"><text:s text:c="4"/>np = pp + zoom: if np &gt;= 32768 then np = 32768: zoom = np - pp: brk = 1</text:p>
      <text:p text:style-name="Preformatted_20_Text"><text:s text:c="4"/>switch chk_edge(pdat, pp, zoom)</text:p>
      <text:p text:style-name="Preformatted_20_Text"><text:s text:c="6"/>case 1: pset(px+10, base, 15):break</text:p>
      <text:p text:style-name="Preformatted_20_Text"><text:s text:c="6"/>case 2: pset(px+10, base+5, 15):break</text:p>
      <text:p text:style-name="Preformatted_20_Text"><text:s text:c="6"/>case 3: line(px+10, base, px+10, base+5, 15):break</text:p>
      <text:p text:style-name="Preformatted_20_Text"><text:s text:c="4"/>endswitch</text:p>
      <text:p text:style-name="Preformatted_20_Text"><text:s text:c="4"/>pp = np</text:p>
      <text:p text:style-name="Preformatted_20_Text"><text:s text:c="4"/>pdat = c(pp-1)</text:p>
      <text:p text:style-name="Preformatted_20_Text"><text:s text:c="4"/>px = px+1</text:p>
      <text:p text:style-name="Preformatted_20_Text"><text:s text:c="2"/>endwhile</text:p>
      <text:p text:style-name="First_20_paragraph">endfunc<text:line-break/>func draw_wave_zoom(num:int)</text:p>
      <text:p text:style-name="Preformatted_20_Text"><text:s text:c="2"/>int pdat, ndat, px, nx, pp, np, base, zoom, brk</text:p>
      <text:p text:style-name="Preformatted_20_Text"/>
      <text:p text:style-name="Preformatted_20_Text"><text:s text:c="2"/>base = num*16+16</text:p>
      <text:p text:style-name="Preformatted_20_Text"><text:s text:c="2"/>pp = start(num)</text:p>
      <text:p text:style-name="Preformatted_20_Text"><text:s text:c="2"/>if pp &gt;= 32768 then return(0)</text:p>
      <text:p text:style-name="Preformatted_20_Text"><text:s text:c="2"/>pdat = c(pp)</text:p>
      <text:p text:style-name="First_20_paragraph">Thus, no Japanese text is present that requires translation. The content is already in English, specifically referring to programming instructions and logic.</text:p>
      <text:p text:style-name="Horizontal_20_Line"/>
      <text:h text:style-name="Heading_20_2" text:outline-level="2"><text:bookmark-start text:name="outs-000253"/>outs-000253<text:bookmark-end text:name="outs-000253"/></text:h>
      <text:p text:style-name="First_20_paragraph">Universal Remote Control</text:p>
      <text:p text:style-name="Preformatted_20_Text"><text:s text:c="4"/>px = 0</text:p>
      <text:p text:style-name="Preformatted_20_Text"><text:s text:c="4"/>zoom = zosq(num)</text:p>
      <text:p text:style-name="Preformatted_20_Text"><text:s text:c="4"/>brk = 0</text:p>
      <text:p text:style-name="Preformatted_20_Text"><text:s text:c="4"/>while brk=0</text:p>
      <text:p text:style-name="Preformatted_20_Text"><text:s text:c="8"/>np = pp+1:if np &gt;= 32768 then break</text:p>
      <text:p text:style-name="Preformatted_20_Text"><text:s text:c="8"/>ndat = c(np)</text:p>
      <text:p text:style-name="Preformatted_20_Text"><text:s text:c="8"/>nx <text:s text:c="1"/>= px+zoom:if nx &gt;= 511 then nx = 511:brk = 1</text:p>
      <text:p text:style-name="Preformatted_20_Text"><text:s text:c="8"/>line(px+10,base+5*(pdat and 1),nx+10,base+5*(pdat and 1),15)</text:p>
      <text:p text:style-name="Preformatted_20_Text"><text:s text:c="8"/>if brk then break</text:p>
      <text:p text:style-name="Preformatted_20_Text"><text:s text:c="8"/>if pdat &lt;&gt; ndat then line(nx+10,base,nx+10,base+5,15)</text:p>
      <text:p text:style-name="Preformatted_20_Text"><text:s text:c="8"/>pp = np</text:p>
      <text:p text:style-name="Preformatted_20_Text"><text:s text:c="8"/>pdat = ndat</text:p>
      <text:p text:style-name="Preformatted_20_Text"><text:s text:c="8"/>px = nx</text:p>
      <text:p text:style-name="Preformatted_20_Text"><text:s text:c="4"/>endwhile</text:p>
      <text:p text:style-name="First_20_paragraph">endfunc func chk_edge(pastdat;int,pp;int,zoom;int)</text:p>
      <text:p text:style-name="Preformatted_20_Text"><text:s text:c="4"/>int i</text:p>
      <text:p text:style-name="Preformatted_20_Text"><text:s text:c="4"/>if (pastdat and 1) = 0 then pastdat = 1 else pastdat = 2</text:p>
      <text:p text:style-name="Preformatted_20_Text"><text:s text:c="4"/>for i=1 to zoom</text:p>
      <text:p text:style-name="Preformatted_20_Text"><text:s text:c="8"/>if (c(pp) and 1) = 0 then pastdat = pastdat or 1 else pastdat = pastdat or 2</text:p>
      <text:p text:style-name="Preformatted_20_Text"><text:s text:c="8"/>if pastdat = 3 then break</text:p>
      <text:p text:style-name="Preformatted_20_Text"><text:s text:c="8"/>pp = pp+1</text:p>
      <text:p text:style-name="Preformatted_20_Text"><text:s text:c="4"/>next</text:p>
      <text:p text:style-name="Preformatted_20_Text"><text:s text:c="4"/>return(pastdat)</text:p>
      <text:p text:style-name="First_20_paragraph">endfunc func gen_icon()</text:p>
      <text:p text:style-name="Preformatted_20_Text"><text:s text:c="4"/>int x,y</text:p>
      <text:p text:style-name="Preformatted_20_Text"><text:s text:c="4"/>x=16:y=16</text:p>
      <text:p text:style-name="Preformatted_20_Text"><text:s text:c="4"/>box(x,y,x+31,y+13,15)</text:p>
      <text:p text:style-name="Preformatted_20_Text"><text:s text:c="4"/>line(x+2,y+6,x+7,y+2,15)</text:p>
      <text:p text:style-name="Preformatted_20_Text"><text:s text:c="4"/>line(x+2,y+7,x+7,y+11,15)</text:p>
      <text:p text:style-name="Preformatted_20_Text"><text:s text:c="4"/>line(x+7,y+2,x+7,y+5,15)</text:p>
      <text:p text:style-name="Preformatted_20_Text"><text:s text:c="4"/>line(x+7,y+11,x+7,y+8,15)</text:p>
      <text:p text:style-name="Preformatted_20_Text"><text:s text:c="4"/>line(x+7,y+5,x+24,y+5,15)</text:p>
      <text:p text:style-name="Preformatted_20_Text"><text:s text:c="4"/>line(x+7,y+8,x+24,y+8,15)</text:p>
      <text:p text:style-name="Preformatted_20_Text"><text:s text:c="4"/>line(x+24,y+5,x+24,y+2,15)</text:p>
      <text:p text:style-name="Preformatted_20_Text"><text:s text:c="4"/>line(x+24,y+8,x+24,y+11,15)</text:p>
      <text:p text:style-name="Preformatted_20_Text"><text:s text:c="4"/>line(x+7,y+2,x+29,y+6,15)</text:p>
      <text:p text:style-name="Preformatted_20_Text"><text:s text:c="4"/>line(x+24,y+11,x+29,y+7,15)</text:p>
      <text:p text:style-name="Preformatted_20_Text"/>
      <text:p text:style-name="Preformatted_20_Text"><text:s text:c="78"/>249</text:p>
      <text:p text:style-name="Horizontal_20_Line"/>
      <text:h text:style-name="Heading_20_2" text:outline-level="2"><text:bookmark-start text:name="outs-000254"/>outs-000254<text:bookmark-end text:name="outs-000254"/></text:h>
      <text:p text:style-name="First_20_paragraph">get(x, y, x + 31, y + 15, mv) wipe() box(x, y + 31, y + 13.15) box(x + 5, y + 5, x + 9, y + 9, 15) box(x + 20, y + 3, x + 27, y + 10.15) get(x, y, x + 31, y + 15, zm) wipe() endfunc func draw_icon(n: int) put(530, nk16 + 16, 530 + 31, nk16 + 16 + 15, mv) put(570, nk16 + 16, 570 + 31, nk16 + 16 + 15, zm) disp_number(n, 15) endfunc func edit_wave() int x, y, bl, br, mscmd, num, stp, exitflag, bcount</text:p>
      <text:p text:style-name="Preformatted_20_Text">exitflag = 0</text:p>
      <text:p text:style-name="Preformatted_20_Text">bcount = 1000</text:p>
      <text:p text:style-name="First_20_paragraph">repeat msstat(x, y, bl, br): mspos(x, y) if bl &gt; 0 then ! if bcount &gt; 0 then bcount = bcount - 1 if bcount &gt; 0 and bcount &lt; 999 then continue</text:p>
      <text:p text:style-name="Preformatted_20_Text">mscmd = edw_ms_chk(x, y)</text:p>
      <text:p text:style-name="Preformatted_20_Text">num = mscmd / 256</text:p>
      <text:p text:style-name="Preformatted_20_Text">mscmd = mscmd and 255</text:p>
      <text:p text:style-name="First_20_paragraph">switch mscmd case 1: edw_movl(num) break case 2: edw_movr(num) break case 3: edw_sqz(num) break case 4: edw_zoom(num) break case &amp;H10: edw_cursor(num) break case &amp;H20: edw_read() break case &amp;H21: edw_write() break</text:p>
      <text:p text:style-name="Horizontal_20_Line"/>
      <text:h text:style-name="Heading_20_2" text:outline-level="2"><text:bookmark-start text:name="outs-000255"/>outs-000255<text:bookmark-end text:name="outs-000255"/></text:h>
      <text:p text:style-name="First_20_paragraph">Universal Remote Control</text:p>
      <text:p text:style-name="Preformatted_20_Text"><text:s text:c="16"/>case &amp;H22: edw_redraw()</text:p>
      <text:p text:style-name="Preformatted_20_Text"><text:s text:c="28"/>break</text:p>
      <text:p text:style-name="Preformatted_20_Text"/>
      <text:p text:style-name="Preformatted_20_Text"><text:s text:c="16"/>case &amp;H23: edw_fwrite()</text:p>
      <text:p text:style-name="Preformatted_20_Text"><text:s text:c="28"/>break</text:p>
      <text:p text:style-name="Preformatted_20_Text"/>
      <text:p text:style-name="Preformatted_20_Text"><text:s text:c="16"/>case &amp;H24: edw_fread()</text:p>
      <text:p text:style-name="Preformatted_20_Text"><text:s text:c="28"/>break</text:p>
      <text:p text:style-name="Preformatted_20_Text"/>
      <text:p text:style-name="Preformatted_20_Text"><text:s text:c="16"/>case &amp;H25: exitflag = edw_exit()</text:p>
      <text:p text:style-name="Preformatted_20_Text"><text:s text:c="28"/>break</text:p>
      <text:p text:style-name="Preformatted_20_Text"/>
      <text:p text:style-name="Preformatted_20_Text"><text:s text:c="16"/>default: <text:s text:c="3"/>break</text:p>
      <text:p text:style-name="Preformatted_20_Text"><text:s text:c="12"/>endswitch</text:p>
      <text:p text:style-name="Preformatted_20_Text"><text:s text:c="8"/>} else bcount = 1000</text:p>
      <text:p text:style-name="Preformatted_20_Text"><text:s text:c="4"/>until exitflag = 1</text:p>
      <text:p text:style-name="First_20_paragraph">endfunc func edw_ms_chk(x;int,y;int)</text:p>
      <text:p text:style-name="Preformatted_20_Text"><text:s text:c="4"/>int retdat</text:p>
      <text:p text:style-name="Preformatted_20_Text"><text:s text:c="4"/>retdat = 0</text:p>
      <text:p text:style-name="Preformatted_20_Text"><text:s text:c="4"/>if x &lt; 16*31 and y &gt;= 16 then {</text:p>
      <text:p text:style-name="Preformatted_20_Text"><text:s text:c="8"/>if x &gt;= 530 and x &lt; 602 then {</text:p>
      <text:p text:style-name="Preformatted_20_Text"><text:s text:c="12"/>if x&gt;=530 and x&lt;546 then retdat=1</text:p>
      <text:p text:style-name="Preformatted_20_Text"><text:s text:c="12"/>if x&gt;=546 and x&lt;562 then retdat=2</text:p>
      <text:p text:style-name="Preformatted_20_Text"><text:s text:c="12"/>if x&gt;=570 and x&lt;586 then retdat=3</text:p>
      <text:p text:style-name="Preformatted_20_Text"><text:s text:c="12"/>if x&gt;=586 and x&lt;602 then retdat=4</text:p>
      <text:p text:style-name="Preformatted_20_Text"><text:s text:c="12"/>retdat = retdat+(y/16-1)*256</text:p>
      <text:p text:style-name="Preformatted_20_Text"><text:s text:c="12"/>return(retdat)</text:p>
      <text:p text:style-name="Preformatted_20_Text"><text:s text:c="8"/>}</text:p>
      <text:p text:style-name="Preformatted_20_Text"><text:s text:c="8"/>if x &lt; 530 then {</text:p>
      <text:p text:style-name="Preformatted_20_Text"><text:s text:c="12"/>retdat = (y/16-1)*256+&amp;H10</text:p>
      <text:p text:style-name="Preformatted_20_Text"><text:s text:c="12"/>return(retdat)</text:p>
      <text:p text:style-name="Preformatted_20_Text"><text:s text:c="8"/>}</text:p>
      <text:p text:style-name="Preformatted_20_Text"><text:s text:c="4"/>}</text:p>
      <text:p text:style-name="Preformatted_20_Text"><text:s text:c="4"/>if x &gt;= 720 and x &lt; 760 then {</text:p>
      <text:p text:style-name="Preformatted_20_Text"><text:s text:c="8"/>if y &gt;= 16 and y &lt; 55 then retdat = &amp;H20</text:p>
      <text:p text:style-name="Preformatted_20_Text"><text:s text:c="8"/>if y &gt;= 66 and y &lt; 105 then retdat = &amp;H21</text:p>
      <text:p text:style-name="Preformatted_20_Text"><text:s text:c="8"/>if y &gt;= 116 and y &lt; 155 then retdat = &amp;H22</text:p>
      <text:p text:style-name="Preformatted_20_Text"><text:s text:c="8"/>if y &gt;= 176 and y &lt; 215 then retdat = &amp;H23</text:p>
      <text:p text:style-name="Preformatted_20_Text"><text:s text:c="8"/>if y &gt;= 226 and y &lt; 266 then retdat = &amp;H24</text:p>
      <text:p text:style-name="Preformatted_20_Text"><text:s text:c="8"/>if y &gt;= 460 and y &lt; 500 then retdat = &amp;H25</text:p>
      <text:p text:style-name="Preformatted_20_Text"><text:s text:c="4"/>}</text:p>
      <text:p text:style-name="Preformatted_20_Text"><text:s text:c="4"/>return(retdat)</text:p>
      <text:p text:style-name="First_20_paragraph">endfunc</text:p>
      <text:p text:style-name="Preformatted_20_Text"><text:s text:c="74"/>251</text:p>
      <text:p text:style-name="Horizontal_20_Line"/>
      <text:h text:style-name="Heading_20_2" text:outline-level="2"><text:bookmark-start text:name="outs-000256"/>outs-000256<text:bookmark-end text:name="outs-000256"/></text:h>
      <text:p text:style-name="First_20_paragraph">252 func edw_movl(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stp+start(num)</text:p>
      <text:p text:style-name="Preformatted_20_Text"><text:s text:c="2"/>if stp &gt;= 32768 then stp = 32768</text:p>
      <text:p text:style-name="Preformatted_20_Text"><text:s text:c="2"/>start(num) = stp</text:p>
      <text:p text:style-name="Preformatted_20_Text"><text:s text:c="2"/>draw_wave(num)</text:p>
      <text:p text:style-name="First_20_paragraph">endfunc func edw_movr(num:int)</text:p>
      <text:p text:style-name="Preformatted_20_Text"><text:s text:c="2"/>int stp</text:p>
      <text:p text:style-name="Preformatted_20_Text"><text:s text:c="2"/>stp = zosq(num)</text:p>
      <text:p text:style-name="Preformatted_20_Text"><text:s text:c="2"/>if stp &gt; 0 then stp = 10/stp else stp = -stp×10</text:p>
      <text:p text:style-name="Preformatted_20_Text"><text:s text:c="2"/>if stp = 0 then stp = 1</text:p>
      <text:p text:style-name="Preformatted_20_Text"><text:s text:c="2"/>stp = start(num) - stp</text:p>
      <text:p text:style-name="Preformatted_20_Text"><text:s text:c="2"/>if stp &lt;= 0 then stp = 0</text:p>
      <text:p text:style-name="Preformatted_20_Text"><text:s text:c="2"/>start(num) = stp</text:p>
      <text:p text:style-name="Preformatted_20_Text"><text:s text:c="2"/>draw_wave(num)</text:p>
      <text:p text:style-name="First_20_paragraph">endfunc func edw_sqz(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zoom(num:int)</text:p>
      <text:p text:style-name="Preformatted_20_Text"><text:s text:c="2"/>stp = zosq(num):if stp = 0 or stp = -1 then stp = 1</text:p>
      <text:p text:style-name="Preformatted_20_Text"><text:s text:c="2"/>if stp &lt; 0 then stp = stp/2 else stp = stp×2</text:p>
      <text:p text:style-name="Preformatted_20_Text"><text:s text:c="2"/>if stp &lt; -999 or stp &gt; 999 then stp = zosq(num)</text:p>
      <text:p text:style-name="Preformatted_20_Text"><text:s text:c="2"/>zosq(num) = stp</text:p>
      <text:p text:style-name="Preformatted_20_Text"><text:s text:c="2"/>draw_wave(num)</text:p>
      <text:p text:style-name="First_20_paragraph">endfunc func edw_cursor(num:int)</text:p>
      <text:p text:style-name="Preformatted_20_Text"><text:s text:c="2"/>int px.ox.x.y.pbr.br.bl.mode</text:p>
      <text:p text:style-name="Preformatted_20_Text"><text:s text:c="2"/>pbr = 0</text:p>
      <text:p text:style-name="Preformatted_20_Text"><text:s text:c="2"/>mode = 0</text:p>
      <text:p text:style-name="Preformatted_20_Text"><text:s text:c="2"/>if redraw_flag(num) = 1 then draw_wave(num)</text:p>
      <text:p text:style-name="Preformatted_20_Text"><text:s text:c="2"/>mspos(px,y)</text:p>
      <text:p text:style-name="First_20_paragraph">There is no Japanese text to translate in the image.</text:p>
      <text:p text:style-name="Horizontal_20_Line"/>
      <text:h text:style-name="Heading_20_2" text:outline-level="2"><text:bookmark-start text:name="outs-000257"/>outs-000257<text:bookmark-end text:name="outs-000257"/></text:h>
      <text:p text:style-name="First_20_paragraph">Universal Remote Control</text:p>
      <text:p text:style-name="Preformatted_20_Text"><text:s text:c="4"/>px = set_cursor(num,px)</text:p>
      <text:p text:style-name="Preformatted_20_Text"><text:s text:c="4"/>ox = px</text:p>
      <text:p text:style-name="Preformatted_20_Text"><text:s text:c="4"/>line(10,num*16+16+6,521,num*16+16+6,9)</text:p>
      <text:p text:style-name="Preformatted_20_Text"><text:s text:c="4"/>line(ox,0,ox,495,15,&amp;HAA)</text:p>
      <text:p text:style-name="Preformatted_20_Text"><text:s text:c="4"/>line(px,0,px,495,15,&amp;H55)</text:p>
      <text:p text:style-name="Preformatted_20_Text"><text:s text:c="4"/>disp_width(csrtopos(num,px,ox))</text:p>
      <text:p text:style-name="Preformatted_20_Text"><text:s text:c="4"/>disp_base(csrtopos(num,px,ox))</text:p>
      <text:p text:style-name="Preformatted_20_Text"><text:s text:c="4"/>disp_mode(mode)</text:p>
      <text:p text:style-name="Preformatted_20_Text"><text:s text:c="4"/>bl = -1</text:p>
      <text:p text:style-name="Preformatted_20_Text"><text:s text:c="4"/>while bl = -1</text:p>
      <text:p text:style-name="Preformatted_20_Text"><text:s text:c="8"/>msstat(x,y,bl,br)</text:p>
      <text:p text:style-name="Preformatted_20_Text"><text:s text:c="8"/>if x &lt;&gt; 0 then {</text:p>
      <text:p text:style-name="Preformatted_20_Text"><text:s text:c="12"/>mspos(x,y)</text:p>
      <text:p text:style-name="Preformatted_20_Text"><text:s text:c="12"/>x = set_cursor(num,x)</text:p>
      <text:p text:style-name="Preformatted_20_Text"><text:s text:c="12"/>line(x,0,x,495,15,&amp;H55)</text:p>
      <text:p text:style-name="Preformatted_20_Text"><text:s text:c="12"/>px = x</text:p>
      <text:p text:style-name="Preformatted_20_Text"><text:s text:c="12"/>disp_width(csrtopos(num,x,ox))</text:p>
      <text:p text:style-name="Preformatted_20_Text"><text:s text:c="8"/>}</text:p>
      <text:p text:style-name="Preformatted_20_Text"><text:s text:c="8"/>if br &lt;&gt; 0 then {</text:p>
      <text:p text:style-name="Preformatted_20_Text"><text:s text:c="12"/>if pbr = 0 then {</text:p>
      <text:p text:style-name="Preformatted_20_Text"><text:s text:c="16"/>mode = (mode + 1) mod 6</text:p>
      <text:p text:style-name="Preformatted_20_Text"><text:s text:c="16"/>disp_mode(mode)</text:p>
      <text:p text:style-name="Preformatted_20_Text"><text:s text:c="12"/>}</text:p>
      <text:p text:style-name="Preformatted_20_Text"><text:s text:c="12"/>pbr = -1</text:p>
      <text:p text:style-name="Preformatted_20_Text"><text:s text:c="8"/>} else pbr = 0</text:p>
      <text:p text:style-name="Preformatted_20_Text"><text:s text:c="4"/>endwhile</text:p>
      <text:p text:style-name="Preformatted_20_Text"><text:s text:c="4"/>mouse(2)</text:p>
      <text:p text:style-name="Preformatted_20_Text"><text:s text:c="4"/>switch mode</text:p>
      <text:p text:style-name="Preformatted_20_Text"><text:s text:c="8"/>case <text:s text:c="3"/>1: edw_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2: edw_reset_data(num,px,ox)</text:p>
      <text:p text:style-name="Preformatted_20_Text"><text:s text:c="20"/>set_redraw_flag()</text:p>
      <text:p text:style-name="Preformatted_20_Text"><text:s text:c="20"/>draw_wave(num)</text:p>
      <text:p text:style-name="Preformatted_20_Text"><text:s text:c="20"/>break</text:p>
      <text:p text:style-name="Preformatted_20_Text"/>
      <text:p text:style-name="Preformatted_20_Text"><text:s text:c="8"/>case <text:s text:c="3"/>3: edw_copy_data(num,px,ox)</text:p>
      <text:p text:style-name="Preformatted_20_Text"><text:s text:c="20"/>draw_wave(num)</text:p>
      <text:p text:style-name="Preformatted_20_Text"><text:s text:c="20"/>break</text:p>
      <text:p text:style-name="Preformatted_20_Text"/>
      <text:p text:style-name="Preformatted_20_Text"><text:s text:c="78"/>253</text:p>
      <text:p text:style-name="Horizontal_20_Line"/>
      <text:h text:style-name="Heading_20_2" text:outline-level="2"><text:bookmark-start text:name="outs-000258"/>outs-000258<text:bookmark-end text:name="outs-000258"/></text:h>
      <text:p text:style-name="First_20_paragraph">The text appears to be code, primarily written in English, intermixed with some segments in Japanese. As a result, translating the code itself into a different language might not be necessary. Nonetheless, should you be focusing on converting any Japanese comments or identifiers present within the code, it’s crucial to identify those specific sections.</text:p>
      <text:p text:style-name="Text_20_body">In this case, there seems to be no Japanese text present in the provided image. Thus, no translation is needed. All content is in English and is shown below as seen in the image:</text:p>
      <text:p text:style-name="Text_20_body">case 4: edw_past_data(num,ox)</text:p>
      <text:p text:style-name="Preformatted_20_Text"><text:s text:c="5"/>set_redraw_flag()</text:p>
      <text:p text:style-name="Preformatted_20_Text"><text:s text:c="5"/>draw_wave(num)</text:p>
      <text:p text:style-name="Preformatted_20_Text"><text:s text:c="5"/>break</text:p>
      <text:p text:style-name="First_20_paragraph">case 5: edw_jump(num,ox)</text:p>
      <text:p text:style-name="Preformatted_20_Text"><text:s text:c="5"/>draw_wave(num)</text:p>
      <text:p text:style-name="Preformatted_20_Text"><text:s text:c="5"/>break</text:p>
      <text:p text:style-name="First_20_paragraph">default: break endswitch line(px.0,px.495,0,&amp;HFF) line(ox.0,ox.495,0.&amp;HFF) line(10.num<text:span text:style-name="Emphasis">16</text:span>16+6,521.num<text:span text:style-name="Emphasis">16</text:span>16+6.0) locate 0,31:print space$(90); mouse(1) endfunc func set_cursor(num;int.x;int)</text:p>
      <text:p text:style-name="Preformatted_20_Text"><text:s text:c="5"/>int posdat</text:p>
      <text:p text:style-name="Preformatted_20_Text"><text:s text:c="5"/>posdat = csrtobpos(num,x)</text:p>
      <text:p text:style-name="Preformatted_20_Text"><text:s text:c="5"/>if posdat &gt; 32768 then (</text:p>
      <text:p text:style-name="Preformatted_20_Text"><text:s text:c="10"/>x = postocsr(num.32768)</text:p>
      <text:p text:style-name="Preformatted_20_Text"><text:s text:c="5"/>} else x = postocsr(num.posdat)</text:p>
      <text:p text:style-name="Preformatted_20_Text"><text:s text:c="5"/>return(x)</text:p>
      <text:p text:style-name="First_20_paragraph">endfunc func edw_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Preformatted_20_Text"><text:s text:c="10"/>c(i)=8</text:p>
      <text:p text:style-name="Preformatted_20_Text"><text:s text:c="5"/>next</text:p>
      <text:p text:style-name="First_20_paragraph">endfunc func edw_reset_data(num;int,x;int,ox;int)</text:p>
      <text:p text:style-name="Preformatted_20_Text"><text:s text:c="5"/>int i,st,ed</text:p>
      <text:p text:style-name="Preformatted_20_Text"><text:s text:c="5"/>st = csrtobpos(num,ox)</text:p>
      <text:p text:style-name="Preformatted_20_Text"><text:s text:c="5"/>ed = csrtobpos(num,x)</text:p>
      <text:p text:style-name="Preformatted_20_Text"><text:s text:c="5"/>if ed &lt; st then i=st:st=ed:ed=i</text:p>
      <text:p text:style-name="Preformatted_20_Text"><text:s text:c="5"/>ed = ed-1</text:p>
      <text:p text:style-name="Preformatted_20_Text"><text:s text:c="5"/>for i=st to ed</text:p>
      <text:p text:style-name="First_20_paragraph">No Japanese text appears in this code snippet, so no linguistic translation is necessary. However, if any Japanese text is present in other parts of the document, please provide that section, and I can assist you with the translation.</text:p>
      <text:p text:style-name="Horizontal_20_Line"/>
      <text:h text:style-name="Heading_20_2" text:outline-level="2"><text:bookmark-start text:name="outs-000259"/>outs-000259<text:bookmark-end text:name="outs-000259"/></text:h>
      <text:p text:style-name="First_20_paragraph">Universal Remote Control</text:p>
      <text:p text:style-name="Preformatted_20_Text"><text:s text:c="8"/>c(i)=9</text:p>
      <text:p text:style-name="Preformatted_20_Text"><text:s text:c="4"/>next</text:p>
      <text:p text:style-name="First_20_paragraph">endfunc func edw_copy_data(num;int,x;int,ox;int)</text:p>
      <text:p text:style-name="Preformatted_20_Text"><text:s text:c="4"/>int i,j,st,zoom</text:p>
      <text:p text:style-name="Preformatted_20_Text"><text:s text:c="4"/>st = csrtobpos(num,ox)</text:p>
      <text:p text:style-name="Preformatted_20_Text"><text:s text:c="4"/>ed = csrtobpos(num,x)</text:p>
      <text:p text:style-name="Preformatted_20_Text"><text:s text:c="4"/>if ed &lt; st then i=st:st=ed:ed=i</text:p>
      <text:p text:style-name="Preformatted_20_Text"><text:s text:c="4"/>ed = ed-1</text:p>
      <text:p text:style-name="Preformatted_20_Text"><text:s text:c="4"/>j=0</text:p>
      <text:p text:style-name="Preformatted_20_Text"><text:s text:c="4"/>for i=st to ed</text:p>
      <text:p text:style-name="Preformatted_20_Text"><text:s text:c="8"/>buf(j)=c(i)</text:p>
      <text:p text:style-name="Preformatted_20_Text"><text:s text:c="8"/>j=j+1</text:p>
      <text:p text:style-name="Preformatted_20_Text"><text:s text:c="4"/>next</text:p>
      <text:p text:style-name="Preformatted_20_Text"><text:s text:c="4"/>bufsize = j</text:p>
      <text:p text:style-name="Preformatted_20_Text"><text:s text:c="4"/>disp_fname()</text:p>
      <text:p text:style-name="First_20_paragraph">endfunc func edw_past_data(num;int,ox;int)</text:p>
      <text:p text:style-name="Preformatted_20_Text"><text:s text:c="4"/>int i,j,st,zoom</text:p>
      <text:p text:style-name="Preformatted_20_Text"><text:s text:c="4"/>st = csrtobpos(num,ox)</text:p>
      <text:p text:style-name="Preformatted_20_Text"><text:s text:c="4"/>i = st</text:p>
      <text:p text:style-name="Preformatted_20_Text"><text:s text:c="4"/>for j=0 to bufsize-1</text:p>
      <text:p text:style-name="Preformatted_20_Text"><text:s text:c="8"/>if i &gt;= 32768 then break</text:p>
      <text:p text:style-name="Preformatted_20_Text"><text:s text:c="8"/>c(i)=buf(j)</text:p>
      <text:p text:style-name="Preformatted_20_Text"><text:s text:c="8"/>i=i+1</text:p>
      <text:p text:style-name="Preformatted_20_Text"><text:s text:c="4"/>next</text:p>
      <text:p text:style-name="First_20_paragraph">endfunc func edw_jump(num;int,ox;int)</text:p>
      <text:p text:style-name="Preformatted_20_Text"><text:s text:c="4"/>int st</text:p>
      <text:p text:style-name="Preformatted_20_Text"><text:s text:c="4"/>st = csrtobpos(num,ox)</text:p>
      <text:p text:style-name="Preformatted_20_Text"><text:s text:c="4"/>if st &gt;= 32768 then st = 32768</text:p>
      <text:p text:style-name="Preformatted_20_Text"><text:s text:c="4"/>start(num)=st</text:p>
      <text:p text:style-name="First_20_paragraph">endfunc func edw_read()</text:p>
      <text:p text:style-name="Preformatted_20_Text"><text:s text:c="4"/>int i</text:p>
      <text:p text:style-name="Preformatted_20_Text"><text:s text:c="4"/>mouse(2)</text:p>
      <text:p text:style-name="Preformatted_20_Text"><text:s text:c="4"/>draw_open_eye()</text:p>
      <text:p text:style-name="Preformatted_20_Text"><text:s text:c="4"/>rmread(32768,c)</text:p>
      <text:p text:style-name="Preformatted_20_Text"><text:s text:c="4"/>draw_close_eye()</text:p>
      <text:p text:style-name="Preformatted_20_Text"><text:s text:c="4"/>edw_redraw()</text:p>
      <text:p text:style-name="Preformatted_20_Text"/>
      <text:p text:style-name="Preformatted_20_Text"><text:s text:c="78"/>255</text:p>
      <text:p text:style-name="Horizontal_20_Line"/>
      <text:h text:style-name="Heading_20_2" text:outline-level="2"><text:bookmark-start text:name="outs-000260"/>outs-000260<text:bookmark-end text:name="outs-000260"/></text:h>
      <text:p text:style-name="First_20_paragraph">mouse(1) endfunc</text:p>
      <text:p text:style-name="Text_20_body">func edw_write()</text:p>
      <text:p text:style-name="Preformatted_20_Text"><text:s text:c="2"/>int x,y,br,bl,i,j,col</text:p>
      <text:p text:style-name="Preformatted_20_Text"><text:s text:c="2"/>i = 1:col = 15</text:p>
      <text:p text:style-name="Preformatted_20_Text"><text:s text:c="2"/>if bufsize = 0 then return(0)</text:p>
      <text:p text:style-name="Preformatted_20_Text"><text:s text:c="2"/>repeat</text:p>
      <text:p text:style-name="Preformatted_20_Text"><text:s text:c="4"/>i = i - 1</text:p>
      <text:p text:style-name="Preformatted_20_Text"><text:s text:c="4"/>if i &lt;= 0 then {</text:p>
      <text:p text:style-name="Preformatted_20_Text"><text:s text:c="6"/>i = 1000/bufsize+1</text:p>
      <text:p text:style-name="Preformatted_20_Text"><text:s text:c="6"/>draw_light(col)</text:p>
      <text:p text:style-name="Preformatted_20_Text"><text:s text:c="6"/>if col = 0 then col = 15 else col = 0</text:p>
      <text:p text:style-name="Preformatted_20_Text"><text:s text:c="4"/>}</text:p>
      <text:p text:style-name="Preformatted_20_Text"><text:s text:c="2"/>rmwrite(bufsize.buf)</text:p>
      <text:p text:style-name="Preformatted_20_Text"><text:s text:c="2"/>for j=0 to 3000:next</text:p>
      <text:p text:style-name="Preformatted_20_Text"><text:s text:c="2"/>msstat(x,y,bl,br)</text:p>
      <text:p text:style-name="Preformatted_20_Text"><text:s text:c="2"/>until bl = 0</text:p>
      <text:p text:style-name="Preformatted_20_Text"><text:s text:c="2"/>draw_light(0)</text:p>
      <text:p text:style-name="First_20_paragraph">endfunc</text:p>
      <text:p text:style-name="Text_20_body">func csrtopbos(num; int, x:int) return(csrtopos(num,x,10)+start(num)) endfunc</text:p>
      <text:p text:style-name="Text_20_body">func csrtopos(num:int,px:int,ox;int)</text:p>
      <text:p text:style-name="Preformatted_20_Text"><text:s text:c="2"/>int zoom</text:p>
      <text:p text:style-name="Preformatted_20_Text"><text:s text:c="2"/>zoom = zosq(num)</text:p>
      <text:p text:style-name="Preformatted_20_Text"><text:s text:c="2"/>if zoom = 0 then return(px-ox)</text:p>
      <text:p text:style-name="Preformatted_20_Text"><text:s text:c="2"/>if zoom &lt; 0 then return((ox-px)*zoom)</text:p>
      <text:p text:style-name="Preformatted_20_Text"><text:s text:c="2"/>return((px-ox)/zoom)</text:p>
      <text:p text:style-name="First_20_paragraph">endfunc</text:p>
      <text:p text:style-name="Text_20_body">func postocsr(num:int,px:int)</text:p>
      <text:p text:style-name="Preformatted_20_Text"><text:s text:c="2"/>int cpos,zoom,st</text:p>
      <text:p text:style-name="Preformatted_20_Text"><text:s text:c="2"/>cpos = start(num)</text:p>
      <text:p text:style-name="Preformatted_20_Text"><text:s text:c="2"/>zoom = zosq(num):if zoom = 0 then zoom = 1</text:p>
      <text:p text:style-name="Preformatted_20_Text"><text:s text:c="2"/>st = start(num)</text:p>
      <text:p text:style-name="Preformatted_20_Text"><text:s text:c="2"/>if zoom &lt; 0 then cpos = (st-px)/zoom+10 else cpos = (px-st)*zoom+10</text:p>
      <text:p text:style-name="Preformatted_20_Text"><text:s text:c="2"/>if cpos &lt; 10 then cpos = 10</text:p>
      <text:p text:style-name="Preformatted_20_Text"><text:s text:c="2"/>if cpos &gt; 521 then cpos = 521</text:p>
      <text:p text:style-name="Preformatted_20_Text"><text:s text:c="2"/>return(cpos)</text:p>
      <text:p text:style-name="First_20_paragraph">endfunc</text:p>
      <text:p text:style-name="Text_20_body">func disp_mode(mode;int) locate 40,31: print modes(mode mod 6): endfunc</text:p>
      <text:p text:style-name="Horizontal_20_Line"/>
      <text:h text:style-name="Heading_20_2" text:outline-level="2"><text:bookmark-start text:name="outs-000261"/>outs-000261<text:bookmark-end text:name="outs-000261"/></text:h>
      <text:p text:style-name="First_20_paragraph">Universal Remote Control</text:p>
      <text:p text:style-name="Text_20_body">endfunc func disp_base(b:int) locate 20,31:print using "Base = #####":b; endfunc func disp_width(w:int)</text:p>
      <text:p text:style-name="Preformatted_20_Text"><text:s text:c="4"/>if w &lt; 0 then w = -w</text:p>
      <text:p text:style-name="Preformatted_20_Text"><text:s text:c="4"/>locate 0,31:print using "Width = #####":w;</text:p>
      <text:p text:style-name="First_20_paragraph">endfunc func clear_buf()</text:p>
      <text:p text:style-name="Preformatted_20_Text"><text:s text:c="4"/>int i</text:p>
      <text:p text:style-name="Preformatted_20_Text"><text:s text:c="4"/>for i=0 to 32767</text:p>
      <text:p text:style-name="Preformatted_20_Text"><text:s text:c="8"/>c(i)=9</text:p>
      <text:p text:style-name="Preformatted_20_Text"><text:s text:c="4"/>next</text:p>
      <text:p text:style-name="First_20_paragraph">endfunc func clear_copybuf()</text:p>
      <text:p text:style-name="Preformatted_20_Text"><text:s text:c="4"/>int i</text:p>
      <text:p text:style-name="Preformatted_20_Text"><text:s text:c="4"/>for i=0 to 32767</text:p>
      <text:p text:style-name="Preformatted_20_Text"><text:s text:c="8"/>buf(i)=9</text:p>
      <text:p text:style-name="Preformatted_20_Text"><text:s text:c="4"/>next</text:p>
      <text:p text:style-name="First_20_paragraph">endfunc func edw_fwrite()</text:p>
      <text:p text:style-name="Preformatted_20_Text"><text:s text:c="4"/>int i,fp,sz,x,y,br,bl</text:p>
      <text:p text:style-name="Preformatted_20_Text"><text:s text:c="4"/>str s</text:p>
      <text:p text:style-name="Preformatted_20_Text"><text:s text:c="4"/>if bufsize = 0 then return(0)</text:p>
      <text:p text:style-name="Preformatted_20_Text"><text:s text:c="4"/>console 31,1.0</text:p>
      <text:p text:style-name="Preformatted_20_Text"><text:s text:c="4"/>input"What would you like to name the file? ":s</text:p>
      <text:p text:style-name="Preformatted_20_Text"><text:s text:c="4"/>if s = "" then s = fname</text:p>
      <text:p text:style-name="Preformatted_20_Text"><text:s text:c="4"/>if s &lt;&gt; "." then {</text:p>
      <text:p text:style-name="Preformatted_20_Text"><text:s text:c="8"/>error off</text:p>
      <text:p text:style-name="Preformatted_20_Text"><text:s text:c="8"/>fp = fopen(s,"c")</text:p>
      <text:p text:style-name="Preformatted_20_Text"><text:s text:c="8"/>if fp &lt;&gt; -1 then {</text:p>
      <text:p text:style-name="Preformatted_20_Text"><text:s text:c="12"/>input"What would you like for the handle name? ":s</text:p>
      <text:p text:style-name="Preformatted_20_Text"><text:s text:c="12"/>if s = "" then s = hname</text:p>
      <text:p text:style-name="Preformatted_20_Text"><text:s text:c="12"/>s = s+chr$($HD)+chr$($HA)</text:p>
      <text:p text:style-name="Preformatted_20_Text"><text:s text:c="12"/>mouse(2)</text:p>
      <text:p text:style-name="Preformatted_20_Text"><text:s text:c="12"/>locate 0,31:print"Compressing. ";</text:p>
      <text:p text:style-name="Preformatted_20_Text"><text:s text:c="12"/>bufsize = compress()</text:p>
      <text:p text:style-name="Preformatted_20_Text"><text:s text:c="12"/>locate 0,31:print"Writing. ";</text:p>
      <text:p text:style-name="Preformatted_20_Text"><text:s text:c="12"/>fwrites(s,fp)</text:p>
      <text:p text:style-name="Preformatted_20_Text"><text:s text:c="12"/>fputc(bufsize/256,fp)</text:p>
      <text:p text:style-name="Preformatted_20_Text"/>
      <text:p text:style-name="Preformatted_20_Text"><text:s text:c="78"/>257</text:p>
      <text:p text:style-name="Horizontal_20_Line"/>
      <text:h text:style-name="Heading_20_2" text:outline-level="2"><text:bookmark-start text:name="outs-000262"/>outs-000262<text:bookmark-end text:name="outs-000262"/></text:h>
      <text:p text:style-name="First_20_paragraph">fputc(bufsize mod 256, fp) sz = fwrite(filebuf, fbufsize, fp) fclose(fp) mouse(1) locate 0, 31 if sz &lt; fbufsize then { print "Cannot write ..." : beep } else print "Writing is finished." } else {</text:p>
      <text:p text:style-name="Preformatted_20_Text"><text:s text:c="4"/>locate 0, 31</text:p>
      <text:p text:style-name="Preformatted_20_Text"><text:s text:c="4"/>print "I feel that the file name is strange ..."</text:p>
      <text:p text:style-name="Preformatted_20_Text"><text:s text:c="4"/>beep</text:p>
      <text:p text:style-name="First_20_paragraph">} error on repeat msstat(x, y, bl, br) until x&lt;0 or y&lt;0 } else beep locate 0, 31 : print space$(80) console 0, 32, 0 endfunc</text:p>
      <text:p text:style-name="Text_20_body">func edw_fread()</text:p>
      <text:p text:style-name="Preformatted_20_Text"><text:s text:c="4"/>int i, fp, x, y, br, bl</text:p>
      <text:p text:style-name="Preformatted_20_Text"><text:s text:c="4"/>str s</text:p>
      <text:p text:style-name="Preformatted_20_Text"><text:s text:c="4"/>console 31.1, 0</text:p>
      <text:p text:style-name="Preformatted_20_Text"><text:s text:c="4"/>input "What shall we read?"; s</text:p>
      <text:p text:style-name="Preformatted_20_Text"><text:s text:c="4"/>if s = "" then s = fname</text:p>
      <text:p text:style-name="Preformatted_20_Text"><text:s text:c="4"/>console 0, 32, 0</text:p>
      <text:p text:style-name="Preformatted_20_Text"><text:s text:c="4"/>if s &lt;&gt; "" then {</text:p>
      <text:p text:style-name="Preformatted_20_Text"><text:s text:c="8"/>error off</text:p>
      <text:p text:style-name="Preformatted_20_Text"><text:s text:c="8"/>fp = fopen(s, "r")</text:p>
      <text:p text:style-name="Preformatted_20_Text"><text:s text:c="8"/>if fp &lt;&gt; -1 then {</text:p>
      <text:p text:style-name="Preformatted_20_Text"><text:s text:c="12"/>mouse(2)</text:p>
      <text:p text:style-name="Preformatted_20_Text"><text:s text:c="12"/>clear_copybuf()</text:p>
      <text:p text:style-name="Preformatted_20_Text"><text:s text:c="12"/>locate 0, 31 : print "Reading..."</text:p>
      <text:p text:style-name="Preformatted_20_Text"><text:s text:c="12"/>fread$(hname, fp)</text:p>
      <text:p text:style-name="Preformatted_20_Text"><text:s text:c="12"/>bufsize = fgetc(fp) * 256</text:p>
      <text:p text:style-name="Preformatted_20_Text"><text:s text:c="12"/>bufsize = bufsize + fgetc(fp)</text:p>
      <text:p text:style-name="Preformatted_20_Text"><text:s text:c="12"/>fbufsize = fread(filebuf, 4096, fp)</text:p>
      <text:p text:style-name="Preformatted_20_Text"><text:s text:c="12"/>fclose(fp)</text:p>
      <text:p text:style-name="Preformatted_20_Text"><text:s text:c="8"/>}</text:p>
      <text:p text:style-name="Preformatted_20_Text"><text:s text:c="4"/>}</text:p>
      <text:p text:style-name="First_20_paragraph">}</text:p>
      <text:p text:style-name="Horizontal_20_Line"/>
      <text:h text:style-name="Heading_20_2" text:outline-level="2"><text:bookmark-start text:name="outs-000263"/>outs-000263<text:bookmark-end text:name="outs-000263"/></text:h>
      <text:p text:style-name="First_20_paragraph">mouse(1) locate 0,31 print "Data size: " + bufsize + "."; fname = s disp_fname() printf " ... Data expanding ... "; swell() } else { locate 0,31 print "It seems there is no file ..."; beep</text:p>
      <text:p text:style-name="Text_20_body">error on repeat msstat(x,y,b1,br) until x&lt;&gt;0 or y&lt;&gt;0 } locate 0,31:print space<draw:frame draw:style-name="fr1" text:anchor-type="as-char"><draw:object xlink:href="Formula-94/" xlink:type="simple" xlink:show="embed" xlink:actuate="onLoad"/></draw:frame>(55); locate 40,0 print using "BUFFER : #### : " + size + fname + hname; endfunc func set_redraw_flag() int i for i=0 to 29 redraw_flag(i) = 1 disp_number(i,7) next endfunc</text:p>
      <text:p text:style-name="Text_20_body">This appears to be a snippet of code with comments in Japanese.</text:p>
      <text:p text:style-name="Horizontal_20_Line"/>
      <text:h text:style-name="Heading_20_2" text:outline-level="2"><text:bookmark-start text:name="outs-000264"/>outs-000264<text:bookmark-end text:name="outs-000264"/></text:h>
      <text:p text:style-name="First_20_paragraph">func disp_number(num:int,col:int) symbol(0,num×16+12,chr$(&amp;H30+(num mod 10)).1,1,1,col,0) endfunc func edw_exit()</text:p>
      <text:p text:style-name="Preformatted_20_Text"><text:s text:c="4"/>int x,y,br,bl,retdat</text:p>
      <text:p text:style-name="Preformatted_20_Text"><text:s text:c="4"/>draw_open_door()</text:p>
      <text:p text:style-name="Preformatted_20_Text"><text:s text:c="4"/>retdat = 0</text:p>
      <text:p text:style-name="Preformatted_20_Text"><text:s text:c="4"/>repeat</text:p>
      <text:p text:style-name="Preformatted_20_Text"><text:s text:c="8"/>msstat(x,y,bl,br)</text:p>
      <text:p text:style-name="Preformatted_20_Text"><text:s text:c="8"/>if bl&lt;&gt;0 and br&lt;&gt;0 then retdat = 1:break</text:p>
      <text:p text:style-name="Preformatted_20_Text"><text:s text:c="8"/>until bl = 0</text:p>
      <text:p text:style-name="Preformatted_20_Text"><text:s text:c="4"/>if retdat = 0 then draw_close_door()</text:p>
      <text:p text:style-name="Preformatted_20_Text"><text:s text:c="4"/>return(retdat)</text:p>
      <text:p text:style-name="First_20_paragraph">endfunc func compress()</text:p>
      <text:p text:style-name="Preformatted_20_Text"><text:s text:c="4"/>int i,bit,bufp</text:p>
      <text:p text:style-name="Preformatted_20_Text"><text:s text:c="4"/>bufp = 0</text:p>
      <text:p text:style-name="Preformatted_20_Text"><text:s text:c="4"/>bit = 0</text:p>
      <text:p text:style-name="Preformatted_20_Text"><text:s text:c="4"/>filebuf() = 0</text:p>
      <text:p text:style-name="Preformatted_20_Text"><text:s text:c="4"/>for i = 0 to bufsize-1</text:p>
      <text:p text:style-name="Preformatted_20_Text"><text:s text:c="8"/>if buf(i) and 1 then filebuf(bufp) = filebuf(bufp) or bitmsk(bit)</text:p>
      <text:p text:style-name="Preformatted_20_Text"><text:s text:c="8"/>bit = bit + 1:if bit &gt; 7 then bufp = bufp + 1:filebuf(bufp)=0:bit = 0</text:p>
      <text:p text:style-name="Preformatted_20_Text"><text:s text:c="4"/>next</text:p>
      <text:p text:style-name="Preformatted_20_Text"><text:s text:c="4"/>return(bufp+1)</text:p>
      <text:p text:style-name="First_20_paragraph">endfunc func swell()</text:p>
      <text:p text:style-name="Preformatted_20_Text"><text:s text:c="4"/>int i,bit,bufp</text:p>
      <text:p text:style-name="Preformatted_20_Text"><text:s text:c="4"/>bufp = 0</text:p>
      <text:p text:style-name="Preformatted_20_Text"><text:s text:c="4"/>bit = 0</text:p>
      <text:p text:style-name="Preformatted_20_Text"><text:s text:c="4"/>for i=0 to bufsize-1</text:p>
      <text:p text:style-name="Preformatted_20_Text"><text:s text:c="8"/>if filebuf(bufp) and bitmsk(bit) then buf(i) = 9 else buf(i) = 8</text:p>
      <text:p text:style-name="Preformatted_20_Text"><text:s text:c="8"/>bit = bit + 1:if bit &gt; 7 then bufp = bufp + 1:bit = 0</text:p>
      <text:p text:style-name="Preformatted_20_Text"><text:s text:c="4"/>next</text:p>
      <text:p text:style-name="First_20_paragraph">endfunc func draw_ctrl_icon()</text:p>
      <text:p text:style-name="Preformatted_20_Text"><text:s text:c="4"/>box(720,16,760,56.15)</text:p>
      <text:p text:style-name="Preformatted_20_Text"><text:s text:c="4"/>box(720,66,760,106.15)</text:p>
      <text:p text:style-name="Preformatted_20_Text"><text:s text:c="4"/>box(720,116,760,156.15)</text:p>
      <text:p text:style-name="Preformatted_20_Text"><text:s text:c="4"/>box(720,176,760,216.15)</text:p>
      <text:p text:style-name="First_20_paragraph">endfunc</text:p>
      <text:p text:style-name="Horizontal_20_Line"/>
      <text:h text:style-name="Heading_20_2" text:outline-level="2"><text:bookmark-start text:name="outs-000265"/>outs-000265<text:bookmark-end text:name="outs-000265"/></text:h>
      <text:p text:style-name="First_20_paragraph">Universal Remote Control</text:p>
      <text:p text:style-name="Preformatted_20_Text"><text:s text:c="8"/>box(720,226,760,266,15)</text:p>
      <text:p text:style-name="Preformatted_20_Text"><text:s text:c="8"/>box(720,460,760,500,15)</text:p>
      <text:p text:style-name="Preformatted_20_Text"><text:s text:c="8"/>draw_midget_lamp()</text:p>
      <text:p text:style-name="Preformatted_20_Text"><text:s text:c="8"/>draw_light(0)</text:p>
      <text:p text:style-name="Preformatted_20_Text"><text:s text:c="8"/>draw_close_eye()</text:p>
      <text:p text:style-name="Preformatted_20_Text"><text:s text:c="8"/>draw_redraw_wave()</text:p>
      <text:p text:style-name="Preformatted_20_Text"><text:s text:c="8"/>draw_file()</text:p>
      <text:p text:style-name="Preformatted_20_Text"><text:s text:c="8"/>draw_book()</text:p>
      <text:p text:style-name="Preformatted_20_Text"><text:s text:c="8"/>draw_close_door()</text:p>
      <text:p text:style-name="First_20_paragraph">endfunc func draw_open_eye()</text:p>
      <text:p text:style-name="Preformatted_20_Text"><text:s text:c="8"/>fill(721,17,759,55,0)</text:p>
      <text:p text:style-name="Preformatted_20_Text"><text:s text:c="8"/>circle(740,16,25,15,227,313)</text:p>
      <text:p text:style-name="Preformatted_20_Text"><text:s text:c="8"/>circle(740,55,25,15,45,135)</text:p>
      <text:p text:style-name="Preformatted_20_Text"><text:s text:c="8"/>circle(740,36,5,15)</text:p>
      <text:p text:style-name="Preformatted_20_Text"><text:s text:c="8"/>paint(740,36,3)</text:p>
      <text:p text:style-name="First_20_paragraph">endfunc func draw_close_eye()</text:p>
      <text:p text:style-name="Preformatted_20_Text"><text:s text:c="8"/>fill(721,17,759,55,0)</text:p>
      <text:p text:style-name="Preformatted_20_Text"><text:s text:c="8"/>circle(740,16,28,15,230,310)</text:p>
      <text:p text:style-name="Preformatted_20_Text"><text:s text:c="8"/>circle(740,0,41,15,242,298)</text:p>
      <text:p text:style-name="First_20_paragraph">endfunc func draw_light(col:int)</text:p>
      <text:p text:style-name="Preformatted_20_Text"><text:s text:c="8"/>line(740,71,740,69,col)</text:p>
      <text:p text:style-name="Preformatted_20_Text"><text:s text:c="8"/>line(725,86,723,86,col)</text:p>
      <text:p text:style-name="Preformatted_20_Text"><text:s text:c="8"/>line(755,86,757,86,col)</text:p>
      <text:p text:style-name="Preformatted_20_Text"><text:s text:c="8"/>line(731,77,728,74,col)</text:p>
      <text:p text:style-name="Preformatted_20_Text"><text:s text:c="8"/>line(749,77,752,74,col)</text:p>
      <text:p text:style-name="Preformatted_20_Text"><text:s text:c="8"/>line(731,95,729,97,col)</text:p>
      <text:p text:style-name="Preformatted_20_Text"><text:s text:c="8"/>line(749,95,751,97,col)</text:p>
      <text:p text:style-name="Preformatted_20_Text"><text:s text:c="8"/>if col = 0 then paint(740,86,0) else paint(740,86,7)</text:p>
      <text:p text:style-name="First_20_paragraph">endfunc func draw_midget_lamp()</text:p>
      <text:p text:style-name="Preformatted_20_Text"><text:s text:c="8"/>circle(740,86,12,15)</text:p>
      <text:p text:style-name="Preformatted_20_Text"><text:s text:c="8"/>line(740,90,735,95,15)</text:p>
      <text:p text:style-name="Preformatted_20_Text"><text:s text:c="8"/>line(740,90,745,95,15)</text:p>
      <text:p text:style-name="Preformatted_20_Text"><text:s text:c="8"/>line(735,95,735,102,15)</text:p>
      <text:p text:style-name="Preformatted_20_Text"><text:s text:c="8"/>line(745,95,745,102,15)</text:p>
      <text:p text:style-name="First_20_paragraph">endfunc func draw_redraw_wave()</text:p>
      <text:p text:style-name="Preformatted_20_Text"><text:s text:c="74"/>261</text:p>
      <text:p text:style-name="Horizontal_20_Line"/>
      <text:h text:style-name="Heading_20_2" text:outline-level="2"><text:bookmark-start text:name="outs-000266"/>outs-000266<text:bookmark-end text:name="outs-000266"/></text:h>
      <text:p text:style-name="First_20_paragraph">line(725,146,735,146,15) line(735,146,735,136,15) line(735,136,745,136,15) line(745,136,745,146,15) line(745,146,755,146,15) endfunc func draw_file() box(725,187,749,211,15) line(728,187,728,184,15) line(728,184,752,184,15) line(752,184,752,208,15) line(752,208,749,208,15) line(731,184,731,181,15) line(731,181,755,181,15) line(755,181,755,205,15) line(755,205,752,205,15) endfunc func draw_book() circle(738,266,13,15,57,123) circle(747,266,13,15,57,123) circle(733,250,13,15,57,123) circle(747,250,13,15,57,123) line(726,255,726,239,15) line(754,255,754,239,15) line(740,255,740,239,15) endfunc func draw_close_door() fill(721,461,759,499,0) box(730,465,750,495,15) line(740,465,740,495,15) circle(736,480,1,15) circle(744,480,1,15) endfunc func draw_open_door() fill(721,461,759,499,0) line(730,465,750,465,15) line(730,465,730,495,15) line(750,465,750,495,15) line(738,495,742,495,15) endfunc</text:p>
      <text:p text:style-name="Text_20_body">There is no Japanese text to translate.</text:p>
      <text:p text:style-name="Horizontal_20_Line"/>
      <text:h text:style-name="Heading_20_2" text:outline-level="2"><text:bookmark-start text:name="outs-000267"/>outs-000267<text:bookmark-end text:name="outs-000267"/></text:h>
      <text:p text:style-name="First_20_paragraph">line(730.465,738.468,15) line(738.470,738.498,15) line(730.495,738.498,15) line(750.465,742.468,15) line(750.495,742.498,15) line(742.468,742.498,15) circle(735.482.1.15) circle(745.482.1.15)</text:p>
      <text:p text:style-name="Text_20_body">endfunc</text:p>
      <text:p text:style-name="Text_20_body">/* /***************** Selector ****************<text:span text:style-name="Emphasis">/ /</text:span></text:p>
      <text:p text:style-name="Preformatted_20_Text"><text:s text:c="1"/>* draw_open_door, daw_close_door are shared.</text:p>
      <text:p text:style-name="Preformatted_20_Text"><text:s text:c="1"/>* Make sure not to forget to free them after use.</text:p>
      <text:p text:style-name="Preformatted_20_Text"><text:s text:c="1"/>*/</text:p>
      <text:p text:style-name="First_20_paragraph">func selector()</text:p>
      <text:p text:style-name="Preformatted_20_Text"><text:s text:c="2"/>int x,y,br,bl,px,py,fp,retdat</text:p>
      <text:p text:style-name="Preformatted_20_Text"><text:s text:c="2"/>screen 2.0.1.1</text:p>
      <text:p text:style-name="Preformatted_20_Text"><text:s text:c="2"/>console 0.32.0</text:p>
      <text:p text:style-name="Preformatted_20_Text"><text:s text:c="2"/>draw_sel_block()</text:p>
      <text:p text:style-name="Preformatted_20_Text"><text:s text:c="2"/>retdat = 0</text:p>
      <text:p text:style-name="Preformatted_20_Text"><text:s text:c="2"/>repeat</text:p>
      <text:p text:style-name="Preformatted_20_Text"><text:s text:c="4"/>msstat(x,y,bl,br)</text:p>
      <text:p text:style-name="Preformatted_20_Text"><text:s text:c="4"/>if bl&gt;0 then {</text:p>
      <text:p text:style-name="Preformatted_20_Text"><text:s text:c="6"/>mspos(x,y)</text:p>
      <text:p text:style-name="Preformatted_20_Text"><text:s text:c="6"/>if x&gt;30 and x&lt;658 and y&gt;30 and y&lt;410 then {</text:p>
      <text:p text:style-name="Preformatted_20_Text"><text:s text:c="8"/>px = (x-30)/80: py = (y-38)/48</text:p>
      <text:p text:style-name="Preformatted_20_Text"><text:s text:c="8"/>if x-(px*80+30)&lt;68 and y-(py*48+38)&lt;36 and exist_flag(px*8+py*8) then {</text:p>
      <text:p text:style-name="Preformatted_20_Text"><text:s text:c="10"/>paint(px*80+32,py*48+40,5)</text:p>
      <text:p text:style-name="Preformatted_20_Text"><text:s text:c="10"/>sel_output(py*8+px)</text:p>
      <text:p text:style-name="Preformatted_20_Text"><text:s text:c="10"/>paint(px*80+32,py*48+40,0)</text:p>
      <text:p text:style-name="Preformatted_20_Text"><text:s text:c="10"/>continue</text:p>
      <text:p text:style-name="Preformatted_20_Text"><text:s text:c="8"/>}</text:p>
      <text:p text:style-name="Preformatted_20_Text"><text:s text:c="6"/>}</text:p>
      <text:p text:style-name="Preformatted_20_Text"><text:s text:c="4"/>}</text:p>
      <text:p text:style-name="Preformatted_20_Text"/>
      <text:p text:style-name="Preformatted_20_Text"><text:s text:c="4"/>if x &gt;= 720 and x &lt; 760 then {</text:p>
      <text:p text:style-name="Preformatted_20_Text"><text:s text:c="6"/>if y &gt;= 226 and y &lt; 266 then {</text:p>
      <text:p text:style-name="Preformatted_20_Text"><text:s text:c="8"/>draw_open_white()</text:p>
      <text:p text:style-name="Preformatted_20_Text"><text:s text:c="8"/>repeat</text:p>
      <text:p text:style-name="Preformatted_20_Text"><text:s text:c="10"/>msstat(x,y,bl,br)</text:p>
      <text:p text:style-name="Preformatted_20_Text"><text:s text:c="6"/>}</text:p>
      <text:p text:style-name="Preformatted_20_Text"><text:s text:c="4"/>}</text:p>
      <text:p text:style-name="Horizontal_20_Line"/>
      <text:h text:style-name="Heading_20_2" text:outline-level="2"><text:bookmark-start text:name="outs-000268"/>outs-000268<text:bookmark-end text:name="outs-000268"/></text:h>
      <text:p text:style-name="First_20_paragraph">until (bl = 0) or (bl&lt;0 and br&lt;0) if bl&lt;&gt;0 and br&lt;&gt;0 then break draw_close_white() continue } if y &gt;= 460 and y &lt; 500 then { draw_open_door() repeat msstat(x,y,bl,br) until (bl = 0) or (bl&lt;0 and br&lt;0) if bl&lt;&gt;0 and br&lt;&gt;0 then retdat = 1:break draw_close_door() continue } } until 0 return(retdat) endfunc func sel_output(num:int) int i,fp,x,y,bl,br</text:p>
      <text:p text:style-name="Preformatted_20_Text">fname = "rmdat."+right$("00"+str$(num),3)</text:p>
      <text:p text:style-name="Preformatted_20_Text">fp = fopen(fname,"r")</text:p>
      <text:p text:style-name="First_20_paragraph">if fp=-1 then return(0) freads(hname.fp)</text:p>
      <text:p text:style-name="Preformatted_20_Text">bufsize = fgetc(fp)*256</text:p>
      <text:p text:style-name="Preformatted_20_Text">bufsize = bufsize + fgetc(fp)</text:p>
      <text:p text:style-name="Preformatted_20_Text">fbufsize = fread(filebuf.4096.fp)</text:p>
      <text:p text:style-name="First_20_paragraph">fclose(fp) swell() repeat</text:p>
      <text:p text:style-name="Preformatted_20_Text"><text:s text:c="1"/>rmwrite(bufsize,buf)</text:p>
      <text:p text:style-name="Preformatted_20_Text"><text:s text:c="1"/>for i=0 to 3000:next</text:p>
      <text:p text:style-name="Preformatted_20_Text"><text:s text:c="2"/>msstat(x,y,bl,br)</text:p>
      <text:p text:style-name="First_20_paragraph">until bl=0 endfunc func draw_sel_block() draw_selector() box(720.226,760.266.15) box(720,460,760,500,15)</text:p>
      <text:p text:style-name="Horizontal_20_Line"/>
      <text:h text:style-name="Heading_20_2" text:outline-level="2"><text:bookmark-start text:name="outs-000269"/>outs-000269<text:bookmark-end text:name="outs-000269"/></text:h>
      <text:p text:style-name="First_20_paragraph">Universal Remote Control</text:p>
      <text:p text:style-name="Preformatted_20_Text"><text:s text:c="8"/>draw_close_white()</text:p>
      <text:p text:style-name="Preformatted_20_Text"><text:s text:c="8"/>draw_close_door()</text:p>
      <text:p text:style-name="First_20_paragraph">endfunc func draw_selector()</text:p>
      <text:p text:style-name="Preformatted_20_Text"><text:s text:c="4"/>int i,x,y,fp,col</text:p>
      <text:p text:style-name="Preformatted_20_Text"><text:s text:c="4"/>str s</text:p>
      <text:p text:style-name="Preformatted_20_Text"><text:s text:c="4"/>error off</text:p>
      <text:p text:style-name="Preformatted_20_Text"><text:s text:c="4"/>i=0</text:p>
      <text:p text:style-name="Preformatted_20_Text"><text:s text:c="4"/>for y=0 to 7</text:p>
      <text:p text:style-name="Preformatted_20_Text"><text:s text:c="8"/>for x=0 to 7</text:p>
      <text:p text:style-name="Preformatted_20_Text"><text:s text:c="12"/>s = "rmdat."+right$("00"+str$(i),3)</text:p>
      <text:p text:style-name="Preformatted_20_Text"><text:s text:c="12"/>fp = fopen(s,"r")</text:p>
      <text:p text:style-name="Preformatted_20_Text"><text:s text:c="12"/>if fp&lt;&gt;-1 then {</text:p>
      <text:p text:style-name="Preformatted_20_Text"><text:s text:c="16"/>exist_flag(i):col=15</text:p>
      <text:p text:style-name="Preformatted_20_Text"><text:s text:c="16"/>freads(s,fp):locate x*10+4,y*3+3:print left$(s,8)</text:p>
      <text:p text:style-name="Preformatted_20_Text"><text:s text:c="16"/>fclose(fp)</text:p>
      <text:p text:style-name="Preformatted_20_Text"><text:s text:c="12"/>} else exist_flag(i)=0:col=9</text:p>
      <text:p text:style-name="Preformatted_20_Text"><text:s text:c="12"/>draw_selbox(x,y,col)</text:p>
      <text:p text:style-name="Preformatted_20_Text"><text:s text:c="12"/>i=i+1</text:p>
      <text:p text:style-name="Preformatted_20_Text"><text:s text:c="8"/>next</text:p>
      <text:p text:style-name="Preformatted_20_Text"><text:s text:c="4"/>next</text:p>
      <text:p text:style-name="Preformatted_20_Text"><text:s text:c="4"/>error on</text:p>
      <text:p text:style-name="First_20_paragraph">endfunc func draw_selbox(x:int,y:int,col:int) box(x<text:span text:style-name="Emphasis">80+30,y</text:span>48+38,x<text:span text:style-name="Emphasis">80+30+68,y</text:span>48+38+36,col) endfunc func draw_close_white()</text:p>
      <text:p text:style-name="Preformatted_20_Text"><text:s text:c="4"/>fill(721,227,759,265,0)</text:p>
      <text:p text:style-name="Preformatted_20_Text"><text:s text:c="4"/>box(730,247,750,262,15)</text:p>
      <text:p text:style-name="Preformatted_20_Text"><text:s text:c="4"/>box(735,230,745,247,15)</text:p>
      <text:p text:style-name="Preformatted_20_Text"><text:s text:c="4"/>box(732,249,747,257,15)</text:p>
      <text:p text:style-name="Preformatted_20_Text"><text:s text:c="4"/>line(737,237,737,247,15)</text:p>
      <text:p text:style-name="Preformatted_20_Text"><text:s text:c="4"/>line(739,237,739,247,15)</text:p>
      <text:p text:style-name="Preformatted_20_Text"><text:s text:c="4"/>line(741,237,741,247,15)</text:p>
      <text:p text:style-name="First_20_paragraph">endfunc func draw_open_white()</text:p>
      <text:p text:style-name="Preformatted_20_Text"><text:s text:c="4"/>fill(721,227,759,265,0)</text:p>
      <text:p text:style-name="Preformatted_20_Text"><text:s text:c="4"/>box(730,247,750,262,15)</text:p>
      <text:p text:style-name="Preformatted_20_Text"><text:s text:c="4"/>box(735,230,745,240,15)</text:p>
      <text:p text:style-name="Preformatted_20_Text"><text:s text:c="4"/>box(732,249,747,257,15)</text:p>
      <text:p text:style-name="Preformatted_20_Text"/>
      <text:p text:style-name="Preformatted_20_Text"><text:s text:c="78"/>265</text:p>
      <text:p text:style-name="Horizontal_20_Line"/>
      <text:h text:style-name="Heading_20_2" text:outline-level="2"><text:bookmark-start text:name="outs-000270"/>outs-000270<text:bookmark-end text:name="outs-000270"/></text:h>
      <text:p text:style-name="First_20_paragraph">line(737,230,737,240,15)</text:p>
      <text:p text:style-name="Preformatted_20_Text"><text:s text:c="4"/>line(739,230,739,240,15)</text:p>
      <text:p text:style-name="Preformatted_20_Text"><text:s text:c="4"/>line(741,230,741,240,15)</text:p>
      <text:p text:style-name="Preformatted_20_Text"><text:s text:c="4"/>box(736,244,744,247,15)</text:p>
      <text:p text:style-name="Preformatted_20_Text"><text:s text:c="4"/>fill(738,240,742,244,15)</text:p>
      <text:p text:style-name="First_20_paragraph">endfunc</text:p>
      <text:p text:style-name="Text_20_body">● List ……2 remocon.fnc</text:p>
      <text:p text:style-name="Preformatted_20_Text">0000 <text:s text:c="1"/>48 55 00 00 00 00 00 00 00 <text:s text:c="1"/>: 9D</text:p>
      <text:p text:style-name="Preformatted_20_Text">0008 <text:s text:c="1"/>00 00 00 00 00 00 01 3C <text:s text:c="4"/>: 3D</text:p>
      <text:p text:style-name="Preformatted_20_Text">0010 <text:s text:c="1"/>00 00 00 00 00 00 00 00 <text:s text:c="4"/>: 00</text:p>
      <text:p text:style-name="Preformatted_20_Text">0018 <text:s text:c="1"/>00 00 00 26 00 00 00 1E <text:s text:c="4"/>: 44</text:p>
      <text:p text:style-name="Preformatted_20_Text">0020 <text:s text:c="1"/>00 00 00 00 00 00 00 00 <text:s text:c="4"/>: 00</text:p>
      <text:p text:style-name="Preformatted_20_Text">0028 <text:s text:c="1"/>00 00 00 00 00 00 00 00 <text:s text:c="4"/>: 00</text:p>
      <text:p text:style-name="Preformatted_20_Text">0030 <text:s text:c="1"/>00 00 00 00 00 00 00 00 <text:s text:c="4"/>: 00</text:p>
      <text:p text:style-name="Preformatted_20_Text">0038 <text:s text:c="1"/>00 00 00 00 00 00 00 00 <text:s text:c="4"/>: 00</text:p>
      <text:p text:style-name="Preformatted_20_Text">0040 <text:s text:c="1"/>00 00 00 40 00 00 00 40 <text:s text:c="4"/>: 80</text:p>
      <text:p text:style-name="Preformatted_20_Text">0048 <text:s text:c="1"/>00 00 00 40 00 00 00 40 <text:s text:c="4"/>: 80</text:p>
      <text:p text:style-name="Preformatted_20_Text">0050 <text:s text:c="1"/>00 00 00 40 00 00 00 40 <text:s text:c="4"/>: 80</text:p>
      <text:p text:style-name="Preformatted_20_Text">0058 <text:s text:c="1"/>00 00 00 40 00 00 00 40 <text:s text:c="4"/>: 80</text:p>
      <text:p text:style-name="Preformatted_20_Text">0060 <text:s text:c="1"/>00 00 00 42 00 00 00 52 <text:s text:c="4"/>: 94</text:p>
      <text:p text:style-name="Preformatted_20_Text">0068 <text:s text:c="1"/>00 00 00 66 00 00 00 00 <text:s text:c="4"/>: 66</text:p>
      <text:p text:style-name="Preformatted_20_Text">0070 <text:s text:c="1"/>00 00 00 00 00 00 00 00 <text:s text:c="4"/>: 00</text:p>
      <text:p text:style-name="Preformatted_20_Text">0078 <text:s text:c="1"/>00 00 00 00 00 00 00 00 <text:s text:c="4"/>: 00</text:p>
      <text:p text:style-name="Horizontal_20_Line"/>
      <text:p text:style-name="First_20_paragraph">SUM: 48 55 00 CE 00 00 01 AC 1F60</text:p>
      <text:p text:style-name="Preformatted_20_Text">0080 <text:s text:c="1"/>4E 75 72 6D 72 65 61 64 <text:s text:c="4"/>: 3E</text:p>
      <text:p text:style-name="Preformatted_20_Text">0088 <text:s text:c="1"/>00 72 6D 77 72 69 74 65 <text:s text:c="4"/>: D0</text:p>
      <text:p text:style-name="Preformatted_20_Text">0090 <text:s text:c="1"/>00 00 00 00 00 5A 00 00 <text:s text:c="4"/>: 5A</text:p>
      <text:p text:style-name="Preformatted_20_Text">0098 <text:s text:c="1"/>00 60 00 02 00 34 FF FF <text:s text:c="4"/>: 94</text:p>
      <text:p text:style-name="Preformatted_20_Text">00A0 <text:s text:c="1"/>00 02 00 34 FF FF 00 00 <text:s text:c="4"/>: 34</text:p>
      <text:p text:style-name="Preformatted_20_Text">00A8 <text:s text:c="1"/>00 72 00 00 00 E4 00 00 <text:s text:c="4"/>: 56</text:p>
      <text:p text:style-name="Preformatted_20_Text">00B0 <text:s text:c="1"/>00 00 20 6F 00 16 43 E8 <text:s text:c="4"/>: D0</text:p>
      <text:p text:style-name="Preformatted_20_Text">00B8 <text:s text:c="1"/>00 0A 20 2F 00 0C 2F 09 <text:s text:c="4"/>: 9D</text:p>
      <text:p text:style-name="Preformatted_20_Text">00C0 <text:s text:c="1"/>2F 00 61 06 50 8F 70 00 <text:s text:c="4"/>: E5</text:p>
      <text:p text:style-name="Preformatted_20_Text">00C8 <text:s text:c="1"/>4E 75 42 A7 FF 20 58 8F <text:s text:c="4"/>: B2</text:p>
      <text:p text:style-name="Preformatted_20_Text">00D0 <text:s text:c="1"/>23 C0 00 00 00 6E 00 7C <text:s text:c="4"/>: CD</text:p>
      <text:p text:style-name="Preformatted_20_Text"/>
      <text:p text:style-name="Preformatted_20_Text"><text:s text:c="78"/>266</text:p>
      <text:p text:style-name="Horizontal_20_Line"/>
      <text:h text:style-name="Heading_20_2" text:outline-level="2"><text:bookmark-start text:name="outs-000271"/>outs-000271<text:bookmark-end text:name="outs-000271"/></text:h>
      <text:p text:style-name="First_20_paragraph">The image contains hexadecimal values and memory addresses with Japanese text in the upper right corner that translates to "Microcontroller." Here is the translation of that text:</text:p>
      <text:p text:style-name="Text_20_body">"Microcontroller"</text:p>
      <text:p text:style-name="Text_20_body">The rest of the text primarily includes hexadecimal data and memory addresses, which do not require translation as they are numerical values and universally understood in computing contexts.</text:p>
      <text:p text:style-name="Text_20_body">Furthermore, the term "Microcontroller" appears to describe the context of this data, likely relevant to embedded systems or programming.</text:p>
      <text:p text:style-name="Horizontal_20_Line"/>
      <text:h text:style-name="Heading_20_2" text:outline-level="2"><text:bookmark-start text:name="outs-000272"/>outs-000272<text:bookmark-end text:name="outs-000272"/></text:h>
      <text:p text:style-name="Horizontal_20_Line"/>
      <text:p text:style-name="Preformatted_20_Text">01E8: 00 00 00 00 00 00 00 00 : 00 <text:s text:c="1"/></text:p>
      <text:p text:style-name="Preformatted_20_Text">01F0: 00 00 00 00 00 00 00 00 : 00 <text:s text:c="1"/></text:p>
      <text:p text:style-name="Preformatted_20_Text">01F8: 00 00 00 00 00 00 00 00 : 00 <text:s text:c="1"/></text:p>
      <text:p text:style-name="Horizontal_20_Line"/>
      <text:p text:style-name="First_20_paragraph">SUM: CE 28 E1 36 D9 16 C3 3E 4999</text:p>
      <text:p text:style-name="Text_20_body">●List......3 Infrared Remote Control Support Function</text:p>
      <text:p text:style-name="Horizontal_20_Line"/>
      <text:list text:style-name="List_20_1">
        <text:list-item>
          <text:p text:style-name="Preformatted_20_Text"><text:s text:c="51"/>*</text:p>
        </text:list-item>
        <text:list-item>
          <text:p text:style-name="Preformatted_20_Text"><text:s text:c="6"/>Infrared Remote Control Support Function <text:s text:c="5"/>*</text:p>
        </text:list-item>
        <text:list-item>
          <text:p text:style-name="Preformatted_20_Text"><text:s text:c="51"/>*</text:p>
        </text:list-item>
        <text:list-item>
          <text:p text:style-name="Preformatted_20_Text">1989-02-24 <text:s text:c="1"/>Programmed by M. Kuwano <text:s text:c="16"/>*</text:p>
        </text:list-item>
        <text:list-item>
          <text:p text:style-name="Preformatted_20_Text"><text:s text:c="11"/>No rights reserved <text:s text:c="21"/>*</text:p>
        </text:list-item>
        <text:list-item>
          <text:p text:style-name="Preformatted_20_Text"><text:s text:c="51"/>*</text:p>
        </text:list-item>
        <text:list-item>
          <text:p text:style-name="List_20_Bullet">..................................................... *</text:p>
        </text:list-item>
        <text:list-item>
          <text:p text:style-name="List_20_Bullet">rmread(size, buffer) *</text:p>
        </text:list-item>
        <text:list-item>
          <text:p text:style-name="Preformatted_20_Text">unsigned short size; <text:s text:c="30"/>*</text:p>
        </text:list-item>
        <text:list-item>
          <text:p text:style-name="Preformatted_20_Text">unsigned char *buffer; <text:s text:c="28"/>*</text:p>
        </text:list-item>
        <text:list-item>
          <text:p text:style-name="List_20_Bullet">..................................................... *</text:p>
        </text:list-item>
        <text:list-item>
          <text:p text:style-name="List_20_Bullet">rmwrite(size, buffer) *</text:p>
        </text:list-item>
        <text:list-item>
          <text:p text:style-name="Preformatted_20_Text">unsigned short size; <text:s text:c="30"/>*</text:p>
        </text:list-item>
        <text:list-item>
          <text:p text:style-name="Preformatted_20_Text">unsigned char *buffer; <text:s text:c="28"/>*</text:p>
        </text:list-item>
        <text:list-item>
          <text:p text:style-name="Preformatted_20_Text"><text:s text:c="51"/>*</text:p>
        </text:list-item>
        <text:list-item>
          <text:p text:style-name="List_20_Bullet">External function/common library *</text:p>
        </text:list-item>
        <text:list-item>
          <text:p text:style-name="Preformatted_20_Text"><text:s text:c="51"/>*</text:p>
        </text:list-item>
        <text:list-item>
          <text:p text:style-name="List_20_Bullet">BASIC as an external function *</text:p>
        </text:list-item>
        <text:list-item>
          <text:p text:style-name="Preformatted_20_Text">as remocon.s <text:s text:c="38"/>*</text:p>
        </text:list-item>
        <text:list-item>
          <text:p text:style-name="Preformatted_20_Text">1k /o remocon.fnc remocon.o <text:s text:c="23"/>*</text:p>
        </text:list-item>
        <text:list-item>
          <text:p text:style-name="Preformatted_20_Text"><text:s text:c="51"/>*</text:p>
        </text:list-item>
        <text:list-item>
          <text:p text:style-name="List_20_Bullet">To compile *</text:p>
        </text:list-item>
        <text:list-item>
          <text:p text:style-name="Preformatted_20_Text">cc wave.bas remocon.o <text:s text:c="29"/>*</text:p>
        </text:list-item>
        <text:list-item>
          <text:p text:style-name="Preformatted_20_Text"><text:s text:c="51"/>*</text:p>
        </text:list-item>
        <text:list-item>
          <text:p text:style-name="List_20_Bullet">Please do so as follows *</text:p>
        </text:list-item>
        <text:list-item>
          <text:p text:style-name="Preformatted_20_Text"><text:s text:c="51"/>*</text:p>
        </text:list-item>
      </text:list>
      <text:p text:style-name="Horizontal_20_Line"/>
      <text:p text:style-name="First_20_paragraph">.include doscall.mac</text:p>
      <text:p text:style-name="Horizontal_20_Line"/>
      <text:p text:style-name="Horizontal_20_Line"/>
      <text:h text:style-name="Heading_20_2" text:outline-level="2"><text:bookmark-start text:name="outs-000273"/>outs-000273<text:bookmark-end text:name="outs-000273"/></text:h>
      <text:p text:style-name="Preformatted_20_Text">.include <text:s text:c="7"/>fdef.h</text:p>
      <text:p text:style-name="Preformatted_20_Text">.globl <text:s text:c="9"/>_rmread</text:p>
      <text:p text:style-name="Preformatted_20_Text">.globl <text:s text:c="9"/>_rmwrite</text:p>
      <text:p text:style-name="Preformatted_20_Text">.text</text:p>
      <text:p text:style-name="Preformatted_20_Text">.even</text:p>
      <text:list text:style-name="List_20_1">
        <text:list-item>
  </text:list-item>
        <text:list-item>
          <text:p text:style-name="List_20_Bullet">Information Table</text:p>
        </text:list-item>
        <text:list-item>
  </text:list-item>
      </text:list>
      <text:p text:style-name="Preformatted_20_Text"><text:s text:c="8"/>dc.l <text:s text:c="4"/>X_INIT</text:p>
      <text:p text:style-name="Preformatted_20_Text"><text:s text:c="8"/>dc.l <text:s text:c="4"/>X_RUN</text:p>
      <text:p text:style-name="Preformatted_20_Text"><text:s text:c="8"/>dc.l <text:s text:c="4"/>X_END</text:p>
      <text:p text:style-name="Preformatted_20_Text"><text:s text:c="8"/>dc.l <text:s text:c="4"/>X_SYS</text:p>
      <text:p text:style-name="Preformatted_20_Text"><text:s text:c="8"/>dc.l <text:s text:c="4"/>X_BRK</text:p>
      <text:p text:style-name="Preformatted_20_Text"><text:s text:c="8"/>dc.l <text:s text:c="4"/>X_CTRL_D</text:p>
      <text:p text:style-name="Preformatted_20_Text"><text:s text:c="8"/>dc.l <text:s text:c="4"/>X_RES1</text:p>
      <text:p text:style-name="Preformatted_20_Text"><text:s text:c="8"/>dc.l <text:s text:c="4"/>X_RES2</text:p>
      <text:p text:style-name="Preformatted_20_Text"><text:s text:c="8"/>dc.l <text:s text:c="4"/>PTR_TOKEN</text:p>
      <text:p text:style-name="Preformatted_20_Text"><text:s text:c="8"/>dc.l <text:s text:c="4"/>PTR_PARAM</text:p>
      <text:p text:style-name="Preformatted_20_Text"><text:s text:c="8"/>dc.l <text:s text:c="4"/>PTR_EXEC</text:p>
      <text:p text:style-name="Preformatted_20_Text"><text:s text:c="8"/>dc.l <text:s text:c="4"/>0.0.0.0.0</text:p>
      <text:p text:style-name="Preformatted_20_Text"/>
      <text:p text:style-name="Preformatted_20_Text">X_INIT:</text:p>
      <text:p text:style-name="Preformatted_20_Text">X_RUN:</text:p>
      <text:p text:style-name="Preformatted_20_Text">X_END:</text:p>
      <text:p text:style-name="Preformatted_20_Text">X_SYS:</text:p>
      <text:p text:style-name="Preformatted_20_Text">X_BRK:</text:p>
      <text:p text:style-name="Preformatted_20_Text">X_CTRL_D:</text:p>
      <text:p text:style-name="Preformatted_20_Text">X_RES1:</text:p>
      <text:p text:style-name="Preformatted_20_Text">X_RES2:</text:p>
      <text:p text:style-name="Preformatted_20_Text"><text:s text:c="8"/>rts</text:p>
      <text:list text:style-name="List_20_1">
        <text:list-item>
  </text:list-item>
        <text:list-item>
          <text:p text:style-name="List_20_Bullet">Function Name Table</text:p>
        </text:list-item>
        <text:list-item>
  </text:list-item>
      </text:list>
      <text:p text:style-name="Preformatted_20_Text">PTR_TOKEN:</text:p>
      <text:p text:style-name="Preformatted_20_Text"><text:s text:c="8"/>dc.b <text:s text:c="4"/>'rmread'.0</text:p>
      <text:p text:style-name="Preformatted_20_Text"><text:s text:c="8"/>dc.b <text:s text:c="4"/>'rmwrite'.0</text:p>
      <text:p text:style-name="Preformatted_20_Text"><text:s text:c="8"/>dc.b <text:s text:c="4"/>0</text:p>
      <text:p text:style-name="Preformatted_20_Text"/>
      <text:p text:style-name="Preformatted_20_Text">.even</text:p>
      <text:p text:style-name="Horizontal_20_Line"/>
      <text:h text:style-name="Heading_20_2" text:outline-level="2"><text:bookmark-start text:name="outs-000274"/>outs-000274<text:bookmark-end text:name="outs-000274"/></text:h>
      <text:p text:style-name="First_20_paragraph">Sure, here is the translated text from Japanese to English.</text:p>
      <text:list text:style-name="List_20_1">
        <text:list-item>
  </text:list-item>
        <text:list-item>
          <text:p text:style-name="List_20_Bullet">Parameter Table</text:p>
        </text:list-item>
        <text:list-item>
  </text:list-item>
      </text:list>
      <text:p text:style-name="Preformatted_20_Text">PTR_PARAM:</text:p>
      <text:p text:style-name="Preformatted_20_Text"><text:s text:c="7"/>dc.l <text:s text:c="8"/>RMREAD_PAR</text:p>
      <text:p text:style-name="Preformatted_20_Text"><text:s text:c="7"/>dc.l <text:s text:c="8"/>RMWRITE_PAR</text:p>
      <text:list text:style-name="List_20_1">
        <text:list-item>
  </text:list-item>
        <text:list-item>
          <text:p text:style-name="List_20_Bullet">Parameter ID Table</text:p>
        </text:list-item>
        <text:list-item>
  </text:list-item>
      </text:list>
      <text:p text:style-name="Preformatted_20_Text">RMREAD_PAR:</text:p>
      <text:p text:style-name="Preformatted_20_Text"><text:s text:c="7"/>dc.w <text:s text:c="7"/>int_val</text:p>
      <text:p text:style-name="Preformatted_20_Text"><text:s text:c="7"/>dc.w <text:s text:c="7"/>aryl_c</text:p>
      <text:p text:style-name="Preformatted_20_Text"><text:s text:c="7"/>dc.w <text:s text:c="7"/>void_ret</text:p>
      <text:p text:style-name="Preformatted_20_Text"/>
      <text:p text:style-name="Preformatted_20_Text">RMWRITE_PAR:</text:p>
      <text:p text:style-name="Preformatted_20_Text"><text:s text:c="7"/>dc.w <text:s text:c="7"/>int_val</text:p>
      <text:p text:style-name="Preformatted_20_Text"><text:s text:c="7"/>dc.w <text:s text:c="7"/>aryl_c</text:p>
      <text:p text:style-name="Preformatted_20_Text"><text:s text:c="7"/>dc.w <text:s text:c="7"/>void_ret</text:p>
      <text:list text:style-name="List_20_1">
        <text:list-item>
  </text:list-item>
        <text:list-item>
          <text:p text:style-name="List_20_Bullet">Function Address Table</text:p>
        </text:list-item>
        <text:list-item>
  </text:list-item>
      </text:list>
      <text:p text:style-name="Preformatted_20_Text">PTR_EXEC:</text:p>
      <text:p text:style-name="Preformatted_20_Text"><text:s text:c="7"/>dc.l <text:s text:c="8"/>rmbread</text:p>
      <text:p text:style-name="Preformatted_20_Text"><text:s text:c="7"/>dc.l <text:s text:c="8"/>rmbwrite</text:p>
      <text:list text:style-name="List_20_1">
        <text:list-item>
  </text:list-item>
        <text:list-item>
          <text:p text:style-name="List_20_Bullet">Stack Buffer</text:p>
        </text:list-item>
        <text:list-item>
  </text:list-item>
      </text:list>
      <text:p text:style-name="Preformatted_20_Text">SPBUF:</text:p>
      <text:p text:style-name="Preformatted_20_Text"><text:s text:c="7"/>ds.l <text:s text:c="8"/>1</text:p>
      <text:p text:style-name="Preformatted_20_Text"/>
      <text:p text:style-name="Preformatted_20_Text"><text:s text:c="7"/>.even</text:p>
      <text:list text:style-name="List_20_1">
        <text:list-item>
  </text:list-item>
        <text:list-item>
          <text:p text:style-name="List_20_Bullet">Remote Control Data Readout</text:p>
        </text:list-item>
        <text:list-item>
  </text:list-item>
      </text:list>
      <text:p text:style-name="Preformatted_20_Text">JOYPORT <text:s text:c="3"/>equ <text:s text:c="3"/>$e9a001</text:p>
      <text:p text:style-name="Preformatted_20_Text">rmbread:</text:p>
      <text:p text:style-name="Horizontal_20_Line"/>
      <text:h text:style-name="Heading_20_2" text:outline-level="2"><text:bookmark-start text:name="outs-000275"/>outs-000275<text:bookmark-end text:name="outs-000275"/></text:h>
      <text:p text:style-name="First_20_paragraph">Universal Remote Control</text:p>
      <text:p text:style-name="Preformatted_20_Text"><text:s text:c="16"/>movea.l <text:s text:c="8"/>22(sp),a0</text:p>
      <text:p text:style-name="Preformatted_20_Text"><text:s text:c="16"/>lea.l <text:s text:c="10"/>10(a0),a1</text:p>
      <text:p text:style-name="Preformatted_20_Text"><text:s text:c="16"/>move.l <text:s text:c="9"/>12(sp),d0</text:p>
      <text:p text:style-name="Preformatted_20_Text"><text:s text:c="16"/>move.l <text:s text:c="9"/>a1,-(sp)</text:p>
      <text:p text:style-name="Preformatted_20_Text"><text:s text:c="16"/>move.l <text:s text:c="9"/>d0,-(sp)</text:p>
      <text:p text:style-name="Preformatted_20_Text"><text:s text:c="16"/>bsr <text:s text:c="12"/>_rmread</text:p>
      <text:p text:style-name="Preformatted_20_Text"><text:s text:c="16"/>addq.l <text:s text:c="9"/>#8,sp</text:p>
      <text:p text:style-name="Preformatted_20_Text"><text:s text:c="16"/>moveq.l <text:s text:c="8"/>#0,d0</text:p>
      <text:p text:style-name="Preformatted_20_Text"><text:s text:c="16"/>rts</text:p>
      <text:p text:style-name="Preformatted_20_Text"/>
      <text:p text:style-name="Preformatted_20_Text">_rmread:</text:p>
      <text:p text:style-name="Preformatted_20_Text"><text:s text:c="16"/>clr.l <text:s text:c="10"/>-(sp)</text:p>
      <text:p text:style-name="Preformatted_20_Text"><text:s text:c="16"/>dc.w <text:s text:c="11"/>_SUPER</text:p>
      <text:p text:style-name="Preformatted_20_Text"><text:s text:c="16"/>addq.l <text:s text:c="9"/>#4,sp</text:p>
      <text:p text:style-name="Preformatted_20_Text"><text:s text:c="16"/>move.l <text:s text:c="9"/>d0,SPBUF</text:p>
      <text:p text:style-name="Preformatted_20_Text"/>
      <text:p text:style-name="Preformatted_20_Text"><text:s text:c="16"/>ori.w <text:s text:c="10"/>#$0700,sr <text:s text:c="6"/>* <text:s text:c="6"/>disable_trap</text:p>
      <text:p text:style-name="First_20_paragraph">();</text:p>
      <text:p text:style-name="Preformatted_20_Text"><text:s text:c="16"/>move.l <text:s text:c="9"/>4(sp),d0</text:p>
      <text:p text:style-name="Preformatted_20_Text"><text:s text:c="16"/>movea.l <text:s text:c="8"/>8(sp),a0</text:p>
      <text:p text:style-name="Preformatted_20_Text"/>
      <text:p text:style-name="Preformatted_20_Text"><text:s text:c="16"/>subq.l <text:s text:c="9"/>#1,d0</text:p>
      <text:p text:style-name="Preformatted_20_Text"><text:s text:c="16"/>bmi <text:s text:c="12"/>rmread_end</text:p>
      <text:p text:style-name="Preformatted_20_Text"/>
      <text:p text:style-name="Preformatted_20_Text"><text:s text:c="16"/>movea.l <text:s text:c="8"/>#JOYPORT,a1</text:p>
      <text:p text:style-name="Preformatted_20_Text">rmread_wait:</text:p>
      <text:p text:style-name="Preformatted_20_Text"><text:s text:c="16"/>btst <text:s text:c="11"/>#0,(a1)</text:p>
      <text:p text:style-name="Preformatted_20_Text"><text:s text:c="16"/>bne <text:s text:c="12"/>rmread_wait</text:p>
      <text:p text:style-name="Preformatted_20_Text">rmread_loop:</text:p>
      <text:p text:style-name="Preformatted_20_Text"><text:s text:c="16"/>move.b <text:s text:c="9"/>(a1),(a0)+</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read_loop</text:p>
      <text:p text:style-name="Preformatted_20_Text"/>
      <text:p text:style-name="Preformatted_20_Text">rmread_end:</text:p>
      <text:p text:style-name="Preformatted_20_Text"><text:s text:c="16"/>andi <text:s text:c="11"/>#$f8ff,sr <text:s text:c="6"/>* <text:s text:c="6"/>enable_trap</text:p>
      <text:p text:style-name="First_20_paragraph">();</text:p>
      <text:p text:style-name="Preformatted_20_Text"><text:s text:c="74"/>271</text:p>
      <text:p text:style-name="Horizontal_20_Line"/>
      <text:h text:style-name="Heading_20_2" text:outline-level="2"><text:bookmark-start text:name="outs-000276"/>outs-000276<text:bookmark-end text:name="outs-000276"/></text:h>
      <text:p text:style-name="First_20_paragraph">move.l 4(sp),d0 movea.l 8(sp),a0</text:p>
      <text:p text:style-name="Preformatted_20_Text">rmread_conv:</text:p>
      <text:p text:style-name="Preformatted_20_Text"><text:s text:c="3"/>andi.b <text:s text:c="2"/>#$01,(a0)</text:p>
      <text:p text:style-name="Preformatted_20_Text"><text:s text:c="3"/>ori.b <text:s text:c="3"/>#$8,(a0)+</text:p>
      <text:p text:style-name="Preformatted_20_Text"><text:s text:c="3"/>dbra <text:s text:c="4"/>d0,rmread_conv</text:p>
      <text:p text:style-name="Preformatted_20_Text"/>
      <text:p text:style-name="Preformatted_20_Text"><text:s text:c="3"/>move.l <text:s text:c="2"/>SPBUF,-(sp)</text:p>
      <text:p text:style-name="Preformatted_20_Text"><text:s text:c="3"/>dc.w <text:s text:c="4"/>_SUPER</text:p>
      <text:p text:style-name="Preformatted_20_Text"><text:s text:c="3"/>addq.l <text:s text:c="2"/>#4,sp</text:p>
      <text:p text:style-name="Preformatted_20_Text"/>
      <text:p text:style-name="Preformatted_20_Text"><text:s text:c="3"/>rts</text:p>
      <text:list text:style-name="List_20_1">
        <text:list-item>
  </text:list-item>
        <text:list-item>
          <text:p text:style-name="List_20_Bullet">Remote control data output</text:p>
        </text:list-item>
        <text:list-item>
  </text:list-item>
      </text:list>
      <text:p text:style-name="Preformatted_20_Text">STBPORT <text:s text:c="2"/>equ <text:s text:c="3"/>$e9a007</text:p>
      <text:p text:style-name="Preformatted_20_Text">rmwrite:</text:p>
      <text:p text:style-name="Preformatted_20_Text"><text:s text:c="3"/>movea.l <text:s text:c="1"/>22(sp),a0</text:p>
      <text:p text:style-name="Preformatted_20_Text"><text:s text:c="3"/>lea.l <text:s text:c="3"/>10(a0),a1</text:p>
      <text:p text:style-name="Preformatted_20_Text"><text:s text:c="3"/>move.l <text:s text:c="2"/>12(sp),d0</text:p>
      <text:p text:style-name="Preformatted_20_Text"><text:s text:c="3"/>move.l <text:s text:c="2"/>a1,-(sp)</text:p>
      <text:p text:style-name="Preformatted_20_Text"><text:s text:c="3"/>move.l <text:s text:c="2"/>d0,-(sp)</text:p>
      <text:p text:style-name="Preformatted_20_Text"><text:s text:c="3"/>bsr <text:s text:c="5"/>_rmwrite</text:p>
      <text:p text:style-name="Preformatted_20_Text"><text:s text:c="3"/>addq.l <text:s text:c="2"/>#8,sp</text:p>
      <text:p text:style-name="Preformatted_20_Text"><text:s text:c="3"/>moveq.l <text:s text:c="1"/>#0,d0</text:p>
      <text:p text:style-name="Preformatted_20_Text"><text:s text:c="3"/>rts</text:p>
      <text:p text:style-name="Preformatted_20_Text"/>
      <text:p text:style-name="Preformatted_20_Text">_rmwrite:</text:p>
      <text:p text:style-name="Preformatted_20_Text"><text:s text:c="3"/>clr.l <text:s text:c="3"/>-(sp)</text:p>
      <text:p text:style-name="Preformatted_20_Text"><text:s text:c="3"/>dc.w <text:s text:c="4"/>_SUPER</text:p>
      <text:p text:style-name="Preformatted_20_Text"><text:s text:c="3"/>addq.l <text:s text:c="2"/>#4,sp</text:p>
      <text:p text:style-name="Preformatted_20_Text"><text:s text:c="3"/>move.l <text:s text:c="2"/>d0,SPBUF</text:p>
      <text:p text:style-name="Preformatted_20_Text"><text:s text:c="3"/>ori.w <text:s text:c="3"/>#$0700,sr <text:s text:c="5"/>* disable_trap</text:p>
      <text:p text:style-name="First_20_paragraph">:</text:p>
      <text:p text:style-name="Preformatted_20_Text"><text:s text:c="3"/>move.l <text:s text:c="2"/>4(sp),d0</text:p>
      <text:p text:style-name="Preformatted_20_Text"><text:s text:c="3"/>movea.l <text:s text:c="1"/>8(sp),a0</text:p>
      <text:p text:style-name="Horizontal_20_Line"/>
      <text:h text:style-name="Heading_20_2" text:outline-level="2"><text:bookmark-start text:name="outs-000277"/>outs-000277<text:bookmark-end text:name="outs-000277"/></text:h>
      <text:p text:style-name="First_20_paragraph">Universal Remote Control</text:p>
      <text:p text:style-name="Preformatted_20_Text"><text:s text:c="16"/>subq.l <text:s text:c="9"/>#1,d0</text:p>
      <text:p text:style-name="Preformatted_20_Text"><text:s text:c="16"/>bmi <text:s text:c="12"/>rmwrite_end</text:p>
      <text:p text:style-name="Preformatted_20_Text"/>
      <text:p text:style-name="Preformatted_20_Text"><text:s text:c="16"/>movea.l <text:s text:c="8"/>#STBPORT,a1</text:p>
      <text:p text:style-name="Preformatted_20_Text"><text:s text:c="8"/>rmwrite_loop:</text:p>
      <text:p text:style-name="Preformatted_20_Text"><text:s text:c="16"/>move.b <text:s text:c="9"/>(a0)+,(a1)</text:p>
      <text:p text:style-name="Preformatted_20_Text"><text:s text:c="16"/>nop</text:p>
      <text:p text:style-name="Preformatted_20_Text"><text:s text:c="16"/>nop</text:p>
      <text:p text:style-name="Preformatted_20_Text"><text:s text:c="16"/>nop</text:p>
      <text:p text:style-name="Preformatted_20_Text"><text:s text:c="16"/>nop</text:p>
      <text:p text:style-name="Preformatted_20_Text"><text:s text:c="16"/>dbra <text:s text:c="11"/>d0,rmwrite_loop</text:p>
      <text:p text:style-name="Preformatted_20_Text"/>
      <text:p text:style-name="Preformatted_20_Text"><text:s text:c="8"/>rmwrite_end:</text:p>
      <text:p text:style-name="Preformatted_20_Text"><text:s text:c="16"/>andi <text:s text:c="11"/>#$f8ff,sr <text:s text:c="14"/>* <text:s text:c="6"/>enable_trap</text:p>
      <text:p text:style-name="First_20_paragraph">();</text:p>
      <text:p text:style-name="Preformatted_20_Text"><text:s text:c="16"/>move.l <text:s text:c="9"/>SPBUF,-(sp)</text:p>
      <text:p text:style-name="Preformatted_20_Text"><text:s text:c="16"/>dc.w <text:s text:c="11"/>_SUPER</text:p>
      <text:p text:style-name="Preformatted_20_Text"><text:s text:c="16"/>addq.l <text:s text:c="9"/>#4,sp</text:p>
      <text:p text:style-name="Preformatted_20_Text"/>
      <text:p text:style-name="Preformatted_20_Text"><text:s text:c="16"/>rts</text:p>
      <text:p text:style-name="Preformatted_20_Text"/>
      <text:p text:style-name="Preformatted_20_Text"><text:s text:c="16"/>.end</text:p>
      <text:p text:style-name="Preformatted_20_Text"/>
      <text:p text:style-name="Preformatted_20_Text"><text:s text:c="78"/>273</text:p>
      <text:p text:style-name="Horizontal_20_Line"/>
      <text:h text:style-name="Heading_20_2" text:outline-level="2"><text:bookmark-start text:name="outs-000278"/>outs-000278<text:bookmark-end text:name="outs-000278"/></text:h>
      <text:p text:style-name="First_20_paragraph"><text:span text:style-name="Emphasis">(Blank page in the original.)</text:span></text:p>
      <text:p text:style-name="Horizontal_20_Line"/>
      <text:h text:style-name="Heading_20_2" text:outline-level="2"><text:bookmark-start text:name="outs-000279"/>outs-000279<text:bookmark-end text:name="outs-000279"/></text:h>
      <text:h text:style-name="Heading_20_3" text:outline-level="3"><text:bookmark-start text:name="crt-switcher"/>CRT Switcher<text:bookmark-end text:name="crt-switcher"/></text:h>
      <text:p text:style-name="First_20_paragraph">When the number of computers begins to increase, it becomes convenient to use a CRT switcher. Commercially available products exist, but here we made one as a peripheral device for the X68000, which can automatically switch based on the main power ON or key operations.</text:p>
      <text:p text:style-name="Text_20_body">If you already own an X68000 and are considering buying another device, a CRT switcher will be convenient. This allows you to use one CRT for two X68000s, saving the cost of a second display. Additionally, it will free up space on your desk and may have other uses as well. Some commercial products can switch the display signal of the analog RGB connector with just a switch, but these generally require manual switch operations.</text:p>
      <text:p text:style-name="Text_20_body">However, the X68000 can perform display switching and even channel switching up to the keyboard because it manages display control from the main unit. For this reason, it would be convenient if the display switches automatically when the main unit power is turned on.</text:p>
      <text:p text:style-name="Text_20_body">Here, we will use a relay instead of a switch to make a simple manual switch as well as an automatic switch that toggles the display signal based on the main unit's power status. Furthermore, key operations will allow for display switching while playing, resulting in a convenient switcher unit made for this purpose.</text:p>
      <text:p text:style-name="Text_20_body">(Page 275)</text:p>
      <text:p text:style-name="Horizontal_20_Line"/>
      <text:h text:style-name="Heading_20_2" text:outline-level="2"><text:bookmark-start text:name="outs-000280"/>outs-000280<text:bookmark-end text:name="outs-000280"/></text:h>
      <text:p text:style-name="Horizontal_20_Line"/>
      <text:h text:style-name="Heading_20_3" text:outline-level="3"><text:bookmark-start text:name="experiment-on-switching"/>Experiment on Switching<text:bookmark-end text:name="experiment-on-switching"/></text:h>
      <text:p text:style-name="First_20_paragraph">First, I experimented to see if analog RGB signals could be switched using a relay. Analog RGB signals use a much wider frequency band compared to audio and display control signals.</text:p>
      <text:p text:style-name="Text_20_body">● Diagram 1: Confirmation of switching by relay</text:p>
      <text:p text:style-name="Text_20_body">X68000 Display R →-------------------------→ R G →-------------------------→ G B →-------------------------→ B</text:p>
      <text:p text:style-name="Text_20_body">※ All other signals are directly connected.</text:p>
      <text:h text:style-name="Heading_20_2" text:outline-level="2"><text:bookmark-start text:name="page-276"/>Page 276<text:bookmark-end text:name="page-276"/></text:h>
      <text:p text:style-name="Horizontal_20_Line"/>
      <text:h text:style-name="Heading_20_2" text:outline-level="2"><text:bookmark-start text:name="outs-000281"/>outs-000281<text:bookmark-end text:name="outs-000281"/></text:h>
      <text:p text:style-name="Horizontal_20_Line"/>
      <text:p text:style-name="First_20_paragraph">When there is signal noise, the display may show motion blur or discoloration, making them appear as eyestrain. We decided to actually perform a switch experiment using a general relay. The relay used is from Omron's G6A series with 4 circuits. It is relatively inexpensive and can be easily obtained if you go to a store that carries relays. The relay is completely shielded, so it's safe in terms of preventing noise contact inside.</text:p>
      <text:p text:style-name="Text_20_body">As shown in Figure 1, using the 3 relay circuits, the analog RGB signal output from the X68000 main unit is turned ON/OFF. When routed through the relay, there was no noticeable change to the image, such as loss of synchronization, discoloration, or flickering. Incidentally, even when the relay was turned OFF, there was no significant issue, suggesting it’s satisfactory for practical use. The relay for analog RGB signal switching in the X68000 seems to be sufficient for practical use.</text:p>
      <text:p text:style-name="Horizontal_20_Line"/>
      <text:h text:style-name="Heading_20_3" text:outline-level="3"><text:bookmark-start text:name="examination-of-switching-circuits"/>Examination of Switching Circuits<text:bookmark-end text:name="examination-of-switching-circuits"/></text:h>
      <text:p text:style-name="First_20_paragraph">When it comes to problems with the relay itself for switching circuits, next, let’s consider practical use. When ON/OFF for the main power is operated automatically, it starts with the joystick port, using the display control signal. This method can be reliably generated depending on the operation of the keyboard, so utilizing the relay in combination with keyboard operation allows easy and reliable switching of the display. Also, the display control terminal jack has a 5V output, which enables the driving of a relay circuit.</text:p>
      <text:p text:style-name="Text_20_body">Next is examining the switching circuit. It's difficult to react to special codes by analyzing the display control signal. Performing a simple switching when a display control signal comes is easy. Let's set it up to switch manually when necessary. The display control signal comes from both sides when the two X68000 units are connected. If one's power is OFF and this side’s display turns OFF, that’s the only issue. In this case, the display must also switch manually. This remains the only point of concern. פתרון ממש פשוט הוא מיתוג ידני עם שלט אינפרא-אדום.</text:p>
      <text:p text:style-name="Horizontal_20_Line"/>
      <text:p text:style-name="First_20_paragraph">Page 277</text:p>
      <text:p text:style-name="Horizontal_20_Line"/>
      <text:h text:style-name="Heading_20_2" text:outline-level="2"><text:bookmark-start text:name="outs-000282"/>outs-000282<text:bookmark-end text:name="outs-000282"/></text:h>
      <text:p text:style-name="Horizontal_20_Line"/>
      <text:p text:style-name="First_20_paragraph">Let's create a small program to generate an ON code from the main body to deal with it.</text:p>
      <text:p text:style-name="Text_20_body">•3 Circuit Design</text:p>
      <text:p text:style-name="Text_20_body">Figure 2 is the complete circuit diagram of the switchboard we manufactured. Let’s briefly review each circuit block.</text:p>
      <text:p text:style-name="Text_20_body">3.1 Display Selection Section</text:p>
      <text:p text:style-name="Text_20_body">The control signal for the display is changed by switching to the opposite side, further switching alternately by the switch (this is called toggle operation). Therefore, an HC14 is used. The reset of the flip-flop is adjusted so that the display control signal of system B turns to the display control signal written on the opposite side. Additionally, by taking a switch between the clock input and the ground, an FF where the output is inverted is inserted.</text:p>
      <text:p text:style-name="Text_20_body">The output of the 68000's display control signal is a TTL (LS11) level output, and the H level is such that current flows through the transistor, causing the voltage to drop. Therefore, a pull-down resistor and Schmitt Trigger Inverter IC (HC14) are used. The H level output of LS11 is minimal at 2.7V; considering this, the H level threshold of HC14 is about 2.4V, and the maximum value is around 3V. If both are connected directly, the issue of voltage drop arises, so the use of LS and HC directly is avoided by using the HCT series gate or another simple level shifter.</text:p>
      <text:p text:style-name="Text_20_body">3.2 Display Control Signal Composite Section</text:p>
      <text:p text:style-name="Text_20_body">The display control signal output by the switchboard is integrated into a single series of display control signals. Since it is either one or the other, the signal will not be generated simultaneously. This much is already known. The return of the output of the display control signal generated from the switchboard is routed back to the main unit's return circuit, so this should be sufficient.</text:p>
      <text:p text:style-name="Horizontal_20_Line"/>
      <text:h text:style-name="Heading_20_2" text:outline-level="2"><text:bookmark-start text:name="outs-000283"/>outs-000283<text:bookmark-end text:name="outs-000283"/></text:h>
      <text:p text:style-name="First_20_paragraph">CRT Switcher</text:p>
      <text:p text:style-name="Text_20_body">● Fig. ...2 CRT Switcher Circuit Diagram</text:p>
      <text:p text:style-name="Text_20_body">[Circuit diagram]</text:p>
      <text:p text:style-name="Text_20_body">Left side (DIN connectors):</text:p>
      <text:p text:style-name="Preformatted_20_Text"><text:s text:c="4"/>System A DIN Connector</text:p>
      <text:p text:style-name="Preformatted_20_Text"><text:s text:c="8"/>HC14 <text:s text:c="3"/>15K</text:p>
      <text:p text:style-name="Preformatted_20_Text"><text:s text:c="4"/>System B DIN Connector</text:p>
      <text:p text:style-name="Preformatted_20_Text"><text:s text:c="8"/>HC14 <text:s text:c="3"/>HC14 <text:s text:c="3"/>15K <text:s text:c="3"/>5V <text:s text:c="3"/>0.1u <text:s text:c="3"/>HC74</text:p>
      <text:p text:style-name="First_20_paragraph">Left side (D-sub connectors):</text:p>
      <text:p text:style-name="Preformatted_20_Text"><text:s text:c="4"/>System A D-sub Connector</text:p>
      <text:p text:style-name="Preformatted_20_Text"><text:s text:c="4"/>System B D-sub Connector</text:p>
      <text:p text:style-name="First_20_paragraph">Right side (DIN connector):</text:p>
      <text:p text:style-name="Preformatted_20_Text"><text:s text:c="4"/>Display DIN Connector</text:p>
      <text:p text:style-name="Preformatted_20_Text"><text:s text:c="8"/>100u <text:s text:c="3"/>5V <text:s text:c="3"/>10D-1 <text:s text:c="1"/>X4 <text:s text:c="3"/>10D-1</text:p>
      <text:p text:style-name="Preformatted_20_Text"><text:s text:c="8"/>2SA940</text:p>
      <text:p text:style-name="Preformatted_20_Text"><text:s text:c="8"/>HC14 <text:s text:c="3"/>1K <text:s text:c="3"/>1K <text:s text:c="3"/>Red <text:s text:c="3"/>5V</text:p>
      <text:p text:style-name="Preformatted_20_Text"><text:s text:c="14"/>1K <text:s text:c="3"/>Green</text:p>
      <text:p text:style-name="Preformatted_20_Text"><text:s text:c="8"/>HC00 <text:s text:c="3"/>IS1588</text:p>
      <text:p text:style-name="First_20_paragraph">Right side (D-sub connector):</text:p>
      <text:p text:style-name="Preformatted_20_Text"><text:s text:c="4"/>Display D-sub Connector</text:p>
      <text:p text:style-name="Preformatted_20_Text"/>
      <text:p text:style-name="Preformatted_20_Text"><text:s text:c="78"/>279</text:p>
      <text:p text:style-name="Horizontal_20_Line"/>
      <text:h text:style-name="Heading_20_2" text:outline-level="2"><text:bookmark-start text:name="outs-000284"/>outs-000284<text:bookmark-end text:name="outs-000284"/></text:h>
      <text:p text:style-name="Horizontal_20_Line"/>
      <text:p text:style-name="First_20_paragraph">We continue to use the diode. The device uses HC00, and the minimum output voltage at the high level (H level) is higher than the LS series by about 1V, so instead of a Schottky-type diode, I tried using a general small silicon diode. We have confirmed the output waveform with an oscilloscope for peace of mind, but it seems that there are no particular problems.</text:p>
      <text:p text:style-name="Horizontal_20_Line"/>
      <text:p text:style-name="First_20_paragraph">3.3 Relay Drive Section</text:p>
      <text:p text:style-name="Text_20_body">Finally, let's consider the part that drives the coil of the relay. When I measured the resistance of the coil, it was about 66Ω. If the voltage is 5V, approximately 76mA will flow, and for two, 152mA will flow. The maximum driving capability of the 74 series is a few mA, so to drive the relay directly, we add a transistor. Any NPN transistor such as 2SA or 2SB type will suffice if the collector current is above 200mA and hfe (DC current gain) is above 50.</text:p>
      <text:p text:style-name="Horizontal_20_Line"/>
      <text:p text:style-name="First_20_paragraph">4 Precautions in Manufacturing</text:p>
      <text:p text:style-name="Text_20_body">It's not so complex a circuit, but it's safest to produce it while checking with a tester, so we will summarize the points we want to be cautious of in manufacturing.</text:p>
      <text:p text:style-name="Horizontal_20_Line"/>
      <text:p text:style-name="First_20_paragraph">4.1 Analog RGB Signal Wiring</text:p>
      <text:p text:style-name="Text_20_body">Analog RGB signals are high-frequency analog signals, so deterioration in waveform quality can directly affect the image quality. When wiring, use a coaxial cable, and try to keep it as short as possible. The impedance for the analog RGB signal is generally 75Ω, so use coaxial cables that are rated for 75Ω with a signal level between 1.5V to 2V. In my creation, I use coaxial cables meant for video signals, but you can also use flat cables if done properly.</text:p>
      <text:p text:style-name="Horizontal_20_Line"/>
      <text:h text:style-name="Heading_20_2" text:outline-level="2"><text:bookmark-start text:name="outs-000285"/>outs-000285<text:bookmark-end text:name="outs-000285"/></text:h>
      <text:p text:style-name="Horizontal_20_Line"/>
      <text:p text:style-name="First_20_paragraph">4-2 Attention to Relay Polarity</text:p>
      <text:p text:style-name="Text_20_body">Please be careful with the polarity of the relay coils as it is easy to mistake (this type of relay has higher sensitivity for polarity). If the diagram shown on the top of the relay is from a top view, the polarity may become reversed when wiring. If you are uncertain, it is better to use a battery or other methods to confirm the polarity before connecting.</text:p>
      <text:p text:style-name="Text_20_body">4-3 About LEDs</text:p>
      <text:p text:style-name="Text_20_body">There is no problem with using any color for the switching display LEDs, but it will be easier to see if you differentiate colors such as green and red. In the old days, LEDs like green or orange were commonly used, but now there are multiple colors like purple and blue, so you can use whichever color matches your preference or taste.</text:p>
      <text:p text:style-name="Text_20_body">4-4 Case Selection</text:p>
      <text:p text:style-name="Text_20_body">Cases designed for horizontal placement of X68000 are quite rare. After searching, I found a suitable case from Takechi Electric Works, Model SY-190 that fits this purpose. The case is made of plastic (ABS resin), and there are two screws on the front and the back panel to fix it. Since the screw heads do not protrude, there’s no worry about scratch damage to the X68000 placed horizontally. The colors available are ivory (white) and black.</text:p>
      <text:p text:style-name="Text_20_body">The dimensions of the case are 190x54x200 mm, similar in size to the base plate, giving it a neat appearance. The back panel includes a D-SUB connector and an 8-pin DIN connector, each attached individually, making it necessary to have about two face panel surfaces. The panels are firmly connected to prevent small parts from falling out during operations. Given its size, assembly is conveniently manageable.</text:p>
      <text:h text:style-name="Heading_20_2" text:outline-level="2"><text:bookmark-start text:name="please-note-for-ease-of-work-its-recommended-to-disassemble-the-case-before-movement-checks-and-work-on-it-in-its-disassembled-state-and-finally-assemble-it-after-completing-all-other-tasks"/>Please note, for ease of work, it's recommended to disassemble the case before movement checks and work on it in its disassembled state, and finally assemble it after completing all other tasks.<text:bookmark-end text:name="please-note-for-ease-of-work-its-recommended-to-disassemble-the-case-before-movement-checks-and-work-on-it-in-its-disassembled-state-and-finally-assemble-it-after-completing-all-other-tasks"/></text:h>
      <text:p text:style-name="First_20_paragraph">Page 281</text:p>
      <text:p text:style-name="Horizontal_20_Line"/>
      <text:h text:style-name="Heading_20_2" text:outline-level="2"><text:bookmark-start text:name="outs-000286"/>outs-000286<text:bookmark-end text:name="outs-000286"/></text:h>
      <text:p text:style-name="Horizontal_20_Line"/>
      <text:p text:style-name="First_20_paragraph">●5 Display Connection Cable</text:p>
      <text:p text:style-name="Text_20_body">The cables that come with the X68000 unit and the switcher can be used as they are, but new cables must be obtained for connecting the switcher and the display. A 1-to-1 cable with an 8-pin DIN connector for display control signals and a 1-to-1 cable with a 15-pin D-SUB connector for analog RGB signal conversion are necessary. Both should be available at computer shops, I think. I got the DIN cable from Junk Street for 300 yen. For the D-SUB cable, I used a flat cable that I made myself. Although making a flat cable was troublesome and caused signal loss unless proper GND was used, I managed to do it. Isolating the analog RGB signal with a flat cable was also somewhat unsatisfying due to interference, but it mainly occurred due to the wiring of the room. In real use, it should not be sensitive to noise or interference if you purchase proper cables.</text:p>
      <text:p text:style-name="Text_20_body">@5 Testing</text:p>
      <text:p text:style-name="Text_20_body">I actually used the switcher I made. When I powered up the X68000 unit of series A, the LED lit up, and the usual title appeared on the display. When I turned the power on to unit B series, the relay of the switcher clicked! and the display switched. If you press one of the SHIFT + number keys on the keyboard, the relay moves and the screen switches back to unit A. The display's audio output is also synchronized, so the switching happens seamlessly. When I turn on an unused power source, the display switches automatically, so lately, I tend to forget about the presence of the switcher.</text:p>
      <text:p text:style-name="Horizontal_20_Line"/>
      <text:p text:style-name="First_20_paragraph">Page 282</text:p>
      <text:p text:style-name="Horizontal_20_Line"/>
      <text:h text:style-name="Heading_20_2" text:outline-level="2"><text:bookmark-start text:name="outs-000287"/>outs-000287<text:bookmark-end text:name="outs-000287"/></text:h>
      <text:p text:style-name="First_20_paragraph">"6. In Conclusion</text:p>
      <text:p text:style-name="Text_20_body">It has become possible to share one display with two X68000 units. Although it was not something I necessarily had to make myself, once I actually used it, I found it to be very convenient. With a little more modification, it might even be possible to share a display among three or more X68000 units, but let's leave that as a future challenge."</text:p>
      <text:p text:style-name="Text_20_body">Page 283</text:p>
      <text:p text:style-name="Horizontal_20_Line"/>
      <text:h text:style-name="Heading_20_2" text:outline-level="2"><text:bookmark-start text:name="outs-000288"/>outs-000288<text:bookmark-end text:name="outs-000288"/></text:h>
      <text:p text:style-name="First_20_paragraph"><text:span text:style-name="Emphasis">(Blank page in the original.)</text:span></text:p>
      <text:p text:style-name="Horizontal_20_Line"/>
      <text:h text:style-name="Heading_20_2" text:outline-level="2"><text:bookmark-start text:name="outs-000289"/>outs-000289<text:bookmark-end text:name="outs-000289"/></text:h>
      <text:p text:style-name="First_20_paragraph">( Afterword )</text:p>
      <text:p text:style-name="Preformatted_20_Text">Time flies — it has already been about a year since "Inside X68000" went on sale. To my</text:p>
      <text:p text:style-name="First_20_paragraph">delight, it has come out in exactly the form I had hoped for: a two-volume hardware commentary set consisting of "Inside" and "Outside."</text:p>
      <text:p text:style-name="Preformatted_20_Text">During this time we received a great deal of correspondence. Among it were comments</text:p>
      <text:p text:style-name="First_20_paragraph">that the price of 6,800 yen was a bit steep, as well as observations that the title "Inside..." was the same as the famous commentary books from Apple in the United States. Quite a few people kindly pointed these things out, so let me offer a few words on each here.</text:p>
      <text:p text:style-name="Preformatted_20_Text">Regarding the price, I did indeed have my own doubts when I first heard it. But because</text:p>
      <text:p text:style-name="First_20_paragraph">most of the many figures and diagrams were hand-drawn originals, having all of them typeset and engraved pushed the cost up, much like a made-to-order meal at a restaurant, and that is how it ended up in the six-thousand-to-seven-thousand-yen range.</text:p>
      <text:p text:style-name="Preformatted_20_Text">As for the content, when it came to writing a book about the X68000's hardware, my honest</text:p>
      <text:p text:style-name="First_20_paragraph">first thought was that simply writing up the hardware information would be the most direct approach. But as it turned out, the information ballooned to two or three times the original plan: the people who write OS and device drivers, the people who build option boards and peripherals, and others all contributed their own knowledge, and the project transformed into something quite different from what it had been. So I split the more advanced parts off, gave the first half the title "Inside X68000" and the second half "Outside X68000," and that is the form in which it was published.</text:p>
      <text:p text:style-name="Preformatted_20_Text">Software and hardware are often said to be two sides of the same coin, but lately the gap</text:p>
      <text:p text:style-name="First_20_paragraph">in their rates of progress has widened considerably. CPU speeds, for instance, have increased severalfold, yet regrettably the hardware side seems to be hardening — the software side cannot keep pace with the speed-up on the hardware side. Hardware races ahead while software cannot advance as it did before. As software grows ever larger, the balance tips so that hardware grows relatively smaller.</text:p>
      <text:p text:style-name="Preformatted_20_Text">Surely this holds true at the individual level as well, does it not? Things you cannot see</text:p>
      <text:p text:style-name="First_20_paragraph">in other machines —</text:p>
      <text:p text:style-name="Preformatted_20_Text"><text:s text:c="74"/>285</text:p>
      <text:p text:style-name="Horizontal_20_Line"/>
      <text:h text:style-name="Heading_20_2" text:outline-level="2"><text:bookmark-start text:name="outs-000290"/>outs-000290<text:bookmark-end text:name="outs-000290"/></text:h>
      <text:p text:style-name="Horizontal_20_Line"/>
      <text:p text:style-name="First_20_paragraph">When hardware such as the X68000, which came with numerous features as standard, was released, it was a godsend for users who had struggled with poor software environments. Nevertheless, it also brought with it the dream of running software on a machine that was unparalleled until now. Until then, evaluating a computer’s speed was typically limited to the CPU alone (for example, the performance of Intel 80286 is about 1/30 that of the 20 MHz 486). Nevertheless, simply thinking in terms of the CPU no longer works, and users must toil to improve their software environments. Game developers, in particular, find it challenging. Those with a 486 + MS-Windows or something even faster, surpassing generation two, can realize GUI environments by connecting with image control controllers (akin to "SX-WINDOW"), thus eliminating the need for costly CPU accessories.</text:p>
      <text:p text:style-name="Text_20_body">Certainly, hardware innovations will continue to emerge, but they must also provide various functionalities that are currently missing in confrontational software environments. At the level where the standalone X68000’s featured capabilities become insufficient, additional expansion boards are available to assist users in implementing such methods. Provided users are satisfied with the diverse yet fundamental memory options, all of which seem possible given the equipment’s limitations.</text:p>
      <text:p text:style-name="Text_20_body">From a hardware perspective, while one may lean toward additional software or data expansion with a personal color computer or console, another decision besides being provided with hardware limitations connects with the immensely fun concept of an intelligent machine that bridges exterior worlds.</text:p>
      <text:p text:style-name="Text_20_body">This book is not just a vehicle reference but various reference materials for those who share similar thoughts or concerns, with a hope that it will be useful.</text:p>
      <text:p text:style-name="Text_20_body">February 27, 1993</text:p>
      <text:p text:style-name="Text_20_body">While admiring the legendary giant Ideon</text:p>
      <text:p text:style-name="Text_20_body">Yoshiyuki Nakanoshima</text:p>
      <text:p text:style-name="Horizontal_20_Line"/>
      <text:p text:style-name="First_20_paragraph">The number "286" at the bottom of the page is likely a page number from the original document/book.</text:p>
      <text:p text:style-name="Horizontal_20_Line"/>
      <text:h text:style-name="Heading_20_2" text:outline-level="2"><text:bookmark-start text:name="outs-000291"/>outs-000291<text:bookmark-end text:name="outs-000291"/></text:h>
      <text:p text:style-name="First_20_paragraph">● References</text:p>
      <text:p text:style-name="Text_20_body">Multi-Chip .............................................................................................. NEC</text:p>
      <text:p text:style-name="Text_20_body">mcs YM3802 Application Manual ........................................... Nippon Gakki (Yamaha)</text:p>
      <text:p text:style-name="Text_20_body">Main Unit and Various Boards Application Manuals ............................................ Sharp</text:p>
      <text:p text:style-name="Text_20_body">MC68000 Microprocessor User's Manual ......................................... CQ Publishing</text:p>
      <text:p text:style-name="Text_20_body">16-bit Microprocessor TLCS-68000 Microprocessor Edition ............................ Toshiba</text:p>
      <text:p text:style-name="Text_20_body">Inside X68000 ................................................................................. SoftBank</text:p>
      <text:p text:style-name="Preformatted_20_Text"><text:s text:c="74"/>287</text:p>
      <text:p text:style-name="Horizontal_20_Line"/>
      <text:h text:style-name="Heading_20_2" text:outline-level="2"><text:bookmark-start text:name="outs-000292"/>outs-000292<text:bookmark-end text:name="outs-000292"/></text:h>
      <text:p text:style-name="Horizontal_20_Line"/>
      <text:p text:style-name="First_20_paragraph">INDEX</text:p>
      <text:p text:style-name="Text_20_body">3D Scope Terminal ▶︎ 29 10 MHz Clock ▶︎ 20 20 MHz Clock ▶︎ 20</text:p>
      <text:p text:style-name="Text_20_body">A AB (1~23) ▶︎ 50 AS ▶︎ 51</text:p>
      <text:p text:style-name="Text_20_body">B BG ▶︎ 20 BG-1 ▶︎ 56 BG-2 ▶︎ 56 BGACK ▶︎ 20, 56 BR ▶︎ 20 BR-1 ▶︎ 56 BR-2 ▶︎ 56</text:p>
      <text:p text:style-name="Text_20_body">C CASDREN ▶︎ 23 CASREDEN ▶︎ 53 CASWRL ▶︎ 23, 53 CASWRU ▶︎ 23, 53 CRT Switch Equipment ▶︎ 275 CZ-6BC1 ▶︎ 160 CZ-6BE1 ▶︎ 76 CZ-6BE1A ▶︎ 76 CZ-6BE1A(A) ▶︎ 76 CZ-6BE2A ▶︎ 76 CZ-6BE2B ▶︎ 76 CZ-6BED ▶︎ 76 CZ-6BF1 ▶︎ 150 CZ-6BG1 ▶︎ 142 CZ-6BM1 ▶︎ 89 CZ-6BN1 ▶︎ 112 CZ-6BP1 ▶︎ 84</text:p>
      <text:p text:style-name="Text_20_body">CZ-6BP1A ▶︎ 84 CZ-6BS1 ▶︎ 131 CZ-6BU1 ▶︎ 176 CZ-6DVI ▶︎ 126</text:p>
      <text:p text:style-name="Text_20_body">D DB (0~15) ▶︎ 50 Display Control Connector ▶︎ 25 DONE ▶︎ 23, 54 D-RAM Control ▶︎ 66 DTACK ▶︎ 20, 51 DTC ▶︎ 23, 54</text:p>
      <text:p text:style-name="Text_20_body">E E ▶︎ 51 EXACK ▶︎ 23, 54 EXBERR ▶︎ 20, 52 EXNMI ▶︎ 55 EXOWN ▶︎ 23, 55 EXOWN ▶︎ 63 EXPCL ▶︎ 23, 55 EXPWON ▶︎ 23, 52 EXREQ ▶︎ 23, 54 EXRESET ▶︎ 52 EXVPA ▶︎ 51</text:p>
      <text:p text:style-name="Text_20_body">F FC (0~2) ▶︎ 50</text:p>
      <text:p text:style-name="Text_20_body">G External FDD Connector ▶︎ 34 External HDD Connector ▶︎ 37 Gateway Array ▶︎ 37</text:p>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chapter" style:family="paragraph" style:name="Title" style:next-style-name="Subtitle" style:parent-style-name="Heading">
      <style:paragraph-properties style:contextual-spacing="false" style:justify-single-word="false" fo:margin-bottom="0.0835in" fo:margin-top="0in"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0835in" fo:margin-top="0.0835in" fo:text-align="center"/>
      <style:text-properties style:font-size-asian="18pt" style:font-size-complex="18pt" style:font-style-asian="italic" style:font-style-complex="italic" fo:font-size="18pt" fo:font-style="italic"/>
    </style: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list" style:display-name="List Bullet" style:family="paragraph" style:name="List_20_Bullet" style:parent-style-name="List"/>
    <style:style style:class="list" style:display-name="List Bullet Tight" style:family="paragraph" style:name="List_20_Bullet_20_Tight" style:parent-style-name="List">
      <style:paragraph-properties style:contextual-spacing="false" fo:margin-bottom="0in" fo:margin-top="0in"/>
    </style:style>
    <style:style style:class="list" style:display-name="List Number" style:family="paragraph" style:name="List_20_Number" style:parent-style-name="List"/>
    <style:style style:class="list" style:display-name="List Number Tight" style:family="paragraph" style:name="List_20_Number_20_Tight" style:parent-style-name="List">
      <style:paragraph-properties style:contextual-spacing="false" fo:margin-bottom="0in" fo:margin-top="0in"/>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0</meta:generator>
    <dc:title/>
    <dc:description/>
    <dc:subject/>
    <meta:keyword/>
    <meta:initial-creator/>
    <dc:creator/>
    <meta:creation-date>2026-06-19T16:20:39Z</meta:creation-date>
    <dc:date>2026-06-19T16:20:39Z</dc:date>
  </office:meta>
</office:document-meta>
</file>

<file path=Formula-0/content.xml><?xml version="1.0" encoding="utf-8"?>
<math xmlns="http://www.w3.org/1998/Math/MathML" display="inline">
  <mrow>
    <mi>E</mi>
    <mi>C</mi>
    <mn>0000</mn>
    <mi>～</mi>
  </mrow>
</math>
</file>

<file path=Formula-10/content.xml><?xml version="1.0" encoding="utf-8"?>
<math xmlns="http://www.w3.org/1998/Math/MathML" display="inline">
  <mrow>
    <mi>E</mi>
    <mi>A</mi>
    <mi>F</mi>
    <mi>A</mi>
    <mn>00</mn>
    <mi>～</mi>
  </mrow>
</math>
</file>

<file path=Formula-12/content.xml><?xml version="1.0" encoding="utf-8"?>
<math xmlns="http://www.w3.org/1998/Math/MathML" display="inline">
  <mrow>
    <mi>E</mi>
    <mi>A</mi>
    <mi>F</mi>
    <mi>A</mi>
    <mn>10</mn>
    <mi>～</mi>
  </mrow>
</math>
</file>

<file path=Formula-14/content.xml><?xml version="1.0" encoding="utf-8"?>
<math xmlns="http://www.w3.org/1998/Math/MathML" display="inline">
  <mrow>
    <mi>E</mi>
    <mi>A</mi>
    <mi>F</mi>
    <mi>B</mi>
    <mn>00</mn>
    <mi>～</mi>
  </mrow>
</math>
</file>

<file path=Formula-16/content.xml><?xml version="1.0" encoding="utf-8"?>
<math xmlns="http://www.w3.org/1998/Math/MathML" display="inline">
  <mrow>
    <mi>E</mi>
    <mi>A</mi>
    <mi>F</mi>
    <mi>B</mi>
    <mn>10</mn>
    <mi>～</mi>
  </mrow>
</math>
</file>

<file path=Formula-18/content.xml><?xml version="1.0" encoding="utf-8"?>
<math xmlns="http://www.w3.org/1998/Math/MathML" display="inline">
  <mrow>
    <mi>E</mi>
    <mi>A</mi>
    <mi>F</mi>
    <mi>C</mi>
    <mn>00</mn>
    <mi>～</mi>
  </mrow>
</math>
</file>

<file path=Formula-2/content.xml><?xml version="1.0" encoding="utf-8"?>
<math xmlns="http://www.w3.org/1998/Math/MathML" display="inline">
  <mrow>
    <mi>E</mi>
    <mn>9</mn>
    <mi>E</mi>
    <mn>000</mn>
    <mi>～</mi>
  </mrow>
</math>
</file>

<file path=Formula-20/content.xml><?xml version="1.0" encoding="utf-8"?>
<math xmlns="http://www.w3.org/1998/Math/MathML" display="inline">
  <mrow>
    <mi>E</mi>
    <mi>A</mi>
    <mi>F</mi>
    <mi>C</mi>
    <mn>10</mn>
    <mi>～</mi>
  </mrow>
</math>
</file>

<file path=Formula-22/content.xml><?xml version="1.0" encoding="utf-8"?>
<math xmlns="http://www.w3.org/1998/Math/MathML" display="inline">
  <mrow>
    <mi>E</mi>
    <mi>A</mi>
    <mi>F</mi>
    <mi>C</mi>
    <mn>20</mn>
    <mi>～</mi>
  </mrow>
</math>
</file>

<file path=Formula-24/content.xml><?xml version="1.0" encoding="utf-8"?>
<math xmlns="http://www.w3.org/1998/Math/MathML" display="inline">
  <mrow>
    <mi>E</mi>
    <mi>A</mi>
    <mi>F</mi>
    <mi>C</mi>
    <mn>30</mn>
    <mi>～</mi>
  </mrow>
</math>
</file>

<file path=Formula-26/content.xml><?xml version="1.0" encoding="utf-8"?>
<math xmlns="http://www.w3.org/1998/Math/MathML" display="inline">
  <mrow>
    <mi>E</mi>
    <mi>A</mi>
    <mi>F</mi>
    <mi>D</mi>
    <mi>X</mi>
    <mn>0</mn>
    <mi>～</mi>
  </mrow>
</math>
</file>

<file path=Formula-28/content.xml><?xml version="1.0" encoding="utf-8"?>
<math xmlns="http://www.w3.org/1998/Math/MathML" display="inline">
  <mrow>
    <mi>E</mi>
    <mi>A</mi>
    <mi>F</mi>
    <mi>D</mi>
    <mi>X</mi>
    <mn>4</mn>
    <mi>～</mi>
  </mrow>
</math>
</file>

<file path=Formula-30/content.xml><?xml version="1.0" encoding="utf-8"?>
<math xmlns="http://www.w3.org/1998/Math/MathML" display="inline">
  <mrow>
    <mi>E</mi>
    <mi>A</mi>
    <mi>F</mi>
    <mi>D</mi>
    <mi>X</mi>
    <mn>8</mn>
    <mi>～</mi>
  </mrow>
</math>
</file>

<file path=Formula-32/content.xml><?xml version="1.0" encoding="utf-8"?>
<math xmlns="http://www.w3.org/1998/Math/MathML" display="inline">
  <mrow>
    <mi>E</mi>
    <mi>A</mi>
    <mi>F</mi>
    <mi>D</mi>
    <mi>X</mi>
    <mi>C</mi>
    <mi>～</mi>
  </mrow>
</math>
</file>

<file path=Formula-34/content.xml><?xml version="1.0" encoding="utf-8"?>
<math xmlns="http://www.w3.org/1998/Math/MathML" display="inline">
  <mrow>
    <mi>E</mi>
    <mi>A</mi>
    <mi>F</mi>
    <mi>E</mi>
    <mn>00</mn>
    <mi>～</mi>
  </mrow>
</math>
</file>

<file path=Formula-36/content.xml><?xml version="1.0" encoding="utf-8"?>
<math xmlns="http://www.w3.org/1998/Math/MathML" display="inline">
  <mrow>
    <mi>E</mi>
    <mn>9</mn>
    <mi>E</mi>
    <mn>000</mn>
    <mspace width="0.222em"/>
  </mrow>
</math>
</file>

<file path=Formula-38/content.xml><?xml version="1.0" encoding="utf-8"?>
<math xmlns="http://www.w3.org/1998/Math/MathML" display="inline">
  <mrow>
    <mi>E</mi>
    <mn>9</mn>
    <mi>E</mi>
    <mn>080</mn>
    <mspace width="0.222em"/>
  </mrow>
</math>
</file>

<file path=Formula-4/content.xml><?xml version="1.0" encoding="utf-8"?>
<math xmlns="http://www.w3.org/1998/Math/MathML" display="inline">
  <mrow>
    <mi>E</mi>
    <mn>9</mn>
    <mi>E</mi>
    <mn>080</mn>
    <mi>～</mi>
  </mrow>
</math>
</file>

<file path=Formula-40/content.xml><?xml version="1.0" encoding="utf-8"?>
<math xmlns="http://www.w3.org/1998/Math/MathML" display="inline">
  <mrow>
    <mi>E</mi>
    <mn>9</mn>
    <mi>E</mi>
    <mn>000</mn>
    <mspace width="0.222em"/>
  </mrow>
</math>
</file>

<file path=Formula-42/content.xml><?xml version="1.0" encoding="utf-8"?>
<math xmlns="http://www.w3.org/1998/Math/MathML" display="inline">
  <mrow>
    <mi>E</mi>
    <mn>9</mn>
    <mi>E</mi>
    <mn>080</mn>
    <mspace width="0.222em"/>
  </mrow>
</math>
</file>

<file path=Formula-44/content.xml><?xml version="1.0" encoding="utf-8"?>
<math xmlns="http://www.w3.org/1998/Math/MathML" display="inline">
  <mrow>
    <mi>E</mi>
    <mn>9</mn>
    <mi>E</mi>
    <mn>000</mn>
    <mspace width="0.222em"/>
  </mrow>
</math>
</file>

<file path=Formula-46/content.xml><?xml version="1.0" encoding="utf-8"?>
<math xmlns="http://www.w3.org/1998/Math/MathML" display="inline">
  <mrow>
    <mi>E</mi>
    <mn>9</mn>
    <mi>E</mi>
    <mn>080</mn>
    <mspace width="0.222em"/>
  </mrow>
</math>
</file>

<file path=Formula-48/content.xml><?xml version="1.0" encoding="utf-8"?>
<math xmlns="http://www.w3.org/1998/Math/MathML" display="inline">
  <mrow>
    <mi>E</mi>
    <mi>A</mi>
    <mi>F</mi>
    <mi>A</mi>
    <mn>01</mn>
    <mi>/</mi>
  </mrow>
</math>
</file>

<file path=Formula-50/content.xml><?xml version="1.0" encoding="utf-8"?>
<math xmlns="http://www.w3.org/1998/Math/MathML" display="inline">
  <mrow>
    <mi>E</mi>
    <mi>A</mi>
    <mi>F</mi>
    <mi>A</mi>
    <mn>07</mn>
    <mi>/</mi>
  </mrow>
</math>
</file>

<file path=Formula-52/content.xml><?xml version="1.0" encoding="utf-8"?>
<math xmlns="http://www.w3.org/1998/Math/MathML" display="inline">
  <mrow>
    <mi>E</mi>
    <mi>A</mi>
    <mi>F</mi>
    <mi>A</mi>
    <mn>0</mn>
    <mi>B</mi>
    <mi>/</mi>
  </mrow>
</math>
</file>

<file path=Formula-54/content.xml><?xml version="1.0" encoding="utf-8"?>
<math xmlns="http://www.w3.org/1998/Math/MathML" display="inline">
  <mrow>
    <mi>E</mi>
    <mi>A</mi>
    <mi>F</mi>
    <mi>B</mi>
    <mn>01</mn>
    <mspace width="0.222em"/>
  </mrow>
</math>
</file>

<file path=Formula-56/content.xml><?xml version="1.0" encoding="utf-8"?>
<math xmlns="http://www.w3.org/1998/Math/MathML" display="inline">
  <mrow>
    <mi>E</mi>
    <mi>A</mi>
    <mi>F</mi>
    <mi>B</mi>
    <mn>11</mn>
    <mspace width="0.222em"/>
  </mrow>
</math>
</file>

<file path=Formula-58/content.xml><?xml version="1.0" encoding="utf-8"?>
<math xmlns="http://www.w3.org/1998/Math/MathML" display="inline">
  <mrow>
    <mi>E</mi>
    <mi>A</mi>
    <mi>F</mi>
    <mi>B</mi>
    <mn>09</mn>
    <mi>/</mi>
  </mrow>
</math>
</file>

<file path=Formula-6/content.xml><?xml version="1.0" encoding="utf-8"?>
<math xmlns="http://www.w3.org/1998/Math/MathML" display="inline">
  <mrow>
    <mi>E</mi>
    <mi>A</mi>
    <mn>0000</mn>
    <mi>～</mi>
  </mrow>
</math>
</file>

<file path=Formula-60/content.xml><?xml version="1.0" encoding="utf-8"?>
<math xmlns="http://www.w3.org/1998/Math/MathML" display="inline">
  <mrow>
    <mi>E</mi>
    <mi>A</mi>
    <mi>F</mi>
    <mi>B</mi>
    <mn>01</mn>
    <mi>/</mi>
  </mrow>
</math>
</file>

<file path=Formula-62/content.xml><?xml version="1.0" encoding="utf-8"?>
<math xmlns="http://www.w3.org/1998/Math/MathML" display="inline">
  <mrow>
    <mi>E</mi>
    <mi>A</mi>
    <mi>F</mi>
    <mi>B</mi>
    <mn>07</mn>
    <mi>/</mi>
  </mrow>
</math>
</file>

<file path=Formula-64/content.xml><?xml version="1.0" encoding="utf-8"?>
<math xmlns="http://www.w3.org/1998/Math/MathML" display="inline">
  <mrow>
    <mi>E</mi>
    <mi>A</mi>
    <mi>F</mi>
    <mi>B</mi>
    <mn>09</mn>
    <mi>/</mi>
  </mrow>
</math>
</file>

<file path=Formula-66/content.xml><?xml version="1.0" encoding="utf-8"?>
<math xmlns="http://www.w3.org/1998/Math/MathML" display="inline">
  <mrow>
    <mi>E</mi>
    <mi>A</mi>
    <mi>F</mi>
    <mi>B</mi>
    <mn>08</mn>
    <mi>/</mi>
  </mrow>
</math>
</file>

<file path=Formula-68/content.xml><?xml version="1.0" encoding="utf-8"?>
<math xmlns="http://www.w3.org/1998/Math/MathML" display="inline">
  <mrow>
    <mn>8</mn>
    <mi>C</mi>
    <mi>～</mi>
  </mrow>
</math>
</file>

<file path=Formula-70/content.xml><?xml version="1.0" encoding="utf-8"?>
<math xmlns="http://www.w3.org/1998/Math/MathML" display="inline">
  <mrow>
    <mi>E</mi>
    <mi>A</mi>
    <mn>0000</mn>
    <mi>–</mi>
  </mrow>
</math>
</file>

<file path=Formula-72/content.xml><?xml version="1.0" encoding="utf-8"?>
<math xmlns="http://www.w3.org/1998/Math/MathML" display="inline">
  <mrow>
    <mi>E</mi>
    <mi>A</mi>
    <mn>0000</mn>
    <mi>–</mi>
  </mrow>
</math>
</file>

<file path=Formula-74/content.xml><?xml version="1.0" encoding="utf-8"?>
<math xmlns="http://www.w3.org/1998/Math/MathML" display="inline">
  <mrow>
    <mi>E</mi>
    <mi>A</mi>
    <mn>0020</mn>
    <mi>–</mi>
  </mrow>
</math>
</file>

<file path=Formula-76/content.xml><?xml version="1.0" encoding="utf-8"?>
<math xmlns="http://www.w3.org/1998/Math/MathML" display="inline">
  <mrow>
    <mi>E</mi>
    <mi>A</mi>
    <mi>F</mi>
    <mi>E</mi>
    <mn>00</mn>
    <mo>−</mo>
  </mrow>
</math>
</file>

<file path=Formula-78/content.xml><?xml version="1.0" encoding="utf-8"?>
<math xmlns="http://www.w3.org/1998/Math/MathML" display="inline">
  <mrow>
    <mi>E</mi>
    <mi>A</mi>
    <mi>F</mi>
    <mi>E</mi>
    <mn>01</mn>
    <mo>−</mo>
  </mrow>
</math>
</file>

<file path=Formula-8/content.xml><?xml version="1.0" encoding="utf-8"?>
<math xmlns="http://www.w3.org/1998/Math/MathML" display="inline">
  <mrow>
    <mi>E</mi>
    <mi>A</mi>
    <mi>F</mi>
    <mn>900</mn>
    <mi>～</mi>
  </mrow>
</math>
</file>

<file path=Formula-80/content.xml><?xml version="1.0" encoding="utf-8"?>
<math xmlns="http://www.w3.org/1998/Math/MathML" display="inline">
  <mrow>
    <mi>E</mi>
    <mi>A</mi>
    <mi>F</mi>
    <mi>E</mi>
    <mn>11</mn>
    <mo>−</mo>
  </mrow>
</math>
</file>

<file path=Formula-82/content.xml><?xml version="1.0" encoding="utf-8"?>
<math xmlns="http://www.w3.org/1998/Math/MathML" display="inline">
  <mrow>
    <mi>E</mi>
    <mi>A</mi>
    <mi>F</mi>
    <mi>E</mi>
    <mn>11</mn>
    <mo>−</mo>
  </mrow>
</math>
</file>

<file path=Formula-84/content.xml><?xml version="1.0" encoding="utf-8"?>
<math xmlns="http://www.w3.org/1998/Math/MathML" display="inline">
  <mrow>
    <mi>E</mi>
    <mi>A</mi>
    <mi>F</mi>
    <mn>01</mn>
    <mspace width="0.222em"/>
  </mrow>
</math>
</file>

<file path=Formula-86/content.xml><?xml version="1.0" encoding="utf-8"?>
<math xmlns="http://www.w3.org/1998/Math/MathML" display="inline">
  <mrow>
    <mi>E</mi>
    <mi>A</mi>
    <mi>F</mi>
    <mi>C</mi>
    <mn>11</mn>
    <mspace width="0.222em"/>
  </mrow>
</math>
</file>

<file path=Formula-88/content.xml><?xml version="1.0" encoding="utf-8"?>
<math xmlns="http://www.w3.org/1998/Math/MathML" display="inline">
  <mrow>
    <mi>E</mi>
    <mi>A</mi>
    <mi>F</mi>
    <mi>C</mi>
    <mn>21</mn>
    <mspace width="0.222em"/>
  </mrow>
</math>
</file>

<file path=Formula-90/content.xml><?xml version="1.0" encoding="utf-8"?>
<math xmlns="http://www.w3.org/1998/Math/MathML" display="inline">
  <mrow>
    <mi>E</mi>
    <mi>A</mi>
    <mi>F</mi>
    <mi>C</mi>
    <mn>31</mn>
    <mspace width="0.222em"/>
  </mrow>
</math>
</file>

<file path=Formula-92/content.xml><?xml version="1.0" encoding="utf-8"?>
<math xmlns="http://www.w3.org/1998/Math/MathML" display="inline">
  <mrow>
    <mi>E</mi>
    <mi>A</mi>
    <mi>F</mi>
    <mn>900</mn>
    <mspace width="0.222em"/>
  </mrow>
</math>
</file>

<file path=Formula-94/content.xml><?xml version="1.0" encoding="utf-8"?>
<math xmlns="http://www.w3.org/1998/Math/MathML" display="inline">
  <mrow>
    <mo stretchy="false" form="prefix">(</mo>
    <mn>80</mn>
    <mo stretchy="false" form="postfix">)</mo>
    <mo>;</mo>
    <mi>c</mi>
    <mi>o</mi>
    <mi>n</mi>
    <mi>s</mi>
    <mi>o</mi>
    <mi>l</mi>
    <mi>e</mi>
    <mn>0</mn>
    <mo>,</mo>
    <mn>32</mn>
    <mo>,</mo>
    <mn>0</mn>
    <mi>e</mi>
    <mi>n</mi>
    <mi>d</mi>
    <mi>f</mi>
    <mi>u</mi>
    <mi>n</mi>
    <mi>c</mi>
    <mi>f</mi>
    <mi>u</mi>
    <mi>n</mi>
    <mi>c</mi>
    <mi>e</mi>
    <mi>d</mi>
    <msub>
      <mi>w</mi>
      <mi>r</mi>
    </msub>
    <mi>e</mi>
    <mi>d</mi>
    <mi>r</mi>
    <mi>a</mi>
    <mi>w</mi>
    <mo stretchy="false" form="prefix">(</mo>
    <mo stretchy="false" form="postfix">)</mo>
    <mi>i</mi>
    <mi>n</mi>
    <mi>t</mi>
    <mi>i</mi>
    <mi>f</mi>
    <mi>o</mi>
    <mi>r</mi>
    <mi>i</mi>
    <mo>=</mo>
    <mn>0</mn>
    <mi>t</mi>
    <mi>o</mi>
    <mn>29</mn>
    <mi>d</mi>
    <mi>r</mi>
    <mi>a</mi>
    <msub>
      <mi>w</mi>
      <mi>w</mi>
    </msub>
    <mi>a</mi>
    <mi>v</mi>
    <mi>e</mi>
    <mo stretchy="false" form="prefix">(</mo>
    <mi>i</mi>
    <mo stretchy="false" form="postfix">)</mo>
    <mi>n</mi>
    <mi>e</mi>
    <mi>x</mi>
    <mi>t</mi>
    <mi>e</mi>
    <mi>n</mi>
    <mi>d</mi>
    <mi>f</mi>
    <mi>u</mi>
    <mi>n</mi>
    <mi>c</mi>
    <mi>f</mi>
    <mi>u</mi>
    <mi>n</mi>
    <mi>c</mi>
    <mi>d</mi>
    <mi>i</mi>
    <mi>s</mi>
    <msub>
      <mi>p</mi>
      <mi>f</mi>
    </msub>
    <mi>n</mi>
    <mi>a</mi>
    <mi>m</mi>
    <mi>e</mi>
    <mo stretchy="false" form="prefix">(</mo>
    <mo stretchy="false" form="postfix">)</mo>
    <mi>l</mi>
    <mi>o</mi>
    <mi>c</mi>
    <mi>a</mi>
    <mi>t</mi>
    <mi>e</mi>
    <mn>40</mn>
    <mo>,</mo>
    <mn>0</mn>
    <mi>p</mi>
    <mi>r</mi>
    <mi>i</mi>
    <mi>n</mi>
    <mi>t</mi>
    <mi>s</mi>
    <mi>p</mi>
    <mi>a</mi>
    <mi>c</mi>
    <mi>e</mi>
  </mrow>
</math>
</file>