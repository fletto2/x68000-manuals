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meta.xml"/>
  <manifest:file-entry manifest:media-type="application/xml" manifest:full-path="style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Heading">
      <style:paragraph-properties fo:text-align="center" style:justify-single-word="false"/>
    </style:style>
    <style:style style:name="P12" style:family="paragraph" style:parent-style-name="Table_20_Heading">
      <style:paragraph-properties fo:text-align="center" style:justify-single-word="false"/>
    </style:style>
    <style:style style:name="P13" style:family="paragraph" style:parent-style-name="Table_20_Heading">
      <style:paragraph-properties fo:text-align="center" style:justify-single-word="false"/>
    </style:style>
    <style:style style:name="P14" style:family="paragraph" style:parent-style-name="Table_20_Heading">
      <style:paragraph-properties fo:text-align="center" style:justify-single-word="false"/>
    </style:style>
    <style:style style:name="P15" style:family="paragraph" style:parent-style-name="Table_20_Heading">
      <style:paragraph-properties fo:text-align="center" style:justify-single-word="false"/>
    </style:style>
    <style:style style:name="P16" style:family="paragraph" style:parent-style-name="Table_20_Heading">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style>
    <style:style style:name="P27" style:family="paragraph" style:parent-style-name="Table_20_Heading">
      <style:paragraph-properties fo:text-align="center"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E"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style:style style:name="Table5.F" style:family="table-column"/>
    <style:style style:name="Table5.G"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E"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7.E" style:family="table-column"/>
    <style:style style:name="Table7.F" style:family="table-column"/>
    <style:style style:name="Table7.G"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4.F" style:family="table-column"/>
    <style:style style:name="Table14.G" style:family="table-column"/>
    <style:style style:name="Table14.H" style:family="table-column"/>
    <style:style style:name="Table14.I" style:family="table-column"/>
    <style:style style:name="Table14.J" style:family="table-column"/>
    <style:style style:name="Table14.K" style:family="table-column"/>
    <style:style style:name="Table14.L" style:family="table-column"/>
    <style:style style:name="Table14.M" style:family="table-column"/>
    <style:style style:name="Table14.N" style:family="table-column"/>
    <style:style style:name="Table14.O" style:family="table-column"/>
    <style:style style:name="Table14.P" style:family="table-column"/>
    <style:style style:name="Table14.Q" style:family="table-column"/>
    <style:style style:name="Table14.R" style:family="table-column"/>
    <style:style style:name="Table14.S"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5.E" style:family="table-column"/>
    <style:style style:name="Table15.F" style:family="table-column"/>
    <style:style style:name="Table15.G" style:family="table-column"/>
    <style:style style:name="Table15.H"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8.E" style:family="table-column"/>
    <style:style style:name="Table18.F"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0.E" style:family="table-column"/>
    <style:style style:name="Table20.F" style:family="table-column"/>
    <style:style style:name="Table20.G" style:family="table-column"/>
    <style:style style:name="Table20.H"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1.D" style:family="table-column"/>
    <style:style style:name="Table21.E" style:family="table-column"/>
    <style:style style:name="Table21.F"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2.D"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3.D"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4.D" style:family="table-column"/>
    <style:style style:name="Table24.E" style:family="table-column"/>
    <style:style style:name="Table24.F" style:family="table-column"/>
    <style:style style:name="Table24.G" style:family="table-column"/>
    <style:style style:name="Table24.H"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5.D" style:family="table-column"/>
    <style:style style:name="Table25.E" style:family="table-column"/>
    <style:style style:name="Table25.F" style:family="table-column"/>
    <style:style style:name="Table25.G" style:family="table-column"/>
    <style:style style:name="Table25.H"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6.D" style:family="table-column"/>
    <style:style style:name="Table26.E" style:family="table-column"/>
    <style:style style:name="Table26.F" style:family="table-column"/>
    <style:style style:name="Table26.G" style:family="table-column"/>
    <style:style style:name="Table26.H" style:family="table-column"/>
    <style:style style:name="Table27" style:family="table">
      <style:table-properties table:align="center"/>
    </style:style>
    <style:style style:name="Table27.A" style:family="table-column"/>
    <style:style style:name="Table27.B" style:family="table-column"/>
    <style:style style:name="Table27.C" style:family="table-column"/>
    <style:style style:name="Table27.D" style:family="table-column"/>
    <style:style style:name="Table27.E" style:family="table-column"/>
    <style:style style:name="Table27.F" style:family="table-column"/>
    <style:style style:name="Table27.G" style:family="table-column"/>
    <style:style style:name="Table28" style:family="table">
      <style:table-properties table:align="center"/>
    </style:style>
    <style:style style:name="Table28.A" style:family="table-column"/>
    <style:style style:name="Table28.B" style:family="table-column"/>
    <style:style style:name="Table28.C" style:family="table-column"/>
    <style:style style:name="Table28.D" style:family="table-column"/>
    <style:style style:name="Table28.E" style:family="table-column"/>
    <style:style style:name="Table28.F" style:family="table-column"/>
    <style:style style:name="Table28.G" style:family="table-column"/>
    <style:style style:name="Table29" style:family="table">
      <style:table-properties table:align="center"/>
    </style:style>
    <style:style style:name="Table29.A" style:family="table-column"/>
    <style:style style:name="Table29.B" style:family="table-column"/>
    <style:style style:name="Table30" style:family="table">
      <style:table-properties table:align="center"/>
    </style:style>
    <style:style style:name="Table30.A" style:family="table-column"/>
    <style:style style:name="Table30.B" style:family="table-column"/>
    <style:style style:name="Table31" style:family="table">
      <style:table-properties table:align="center"/>
    </style:style>
    <style:style style:name="Table31.A" style:family="table-column"/>
    <style:style style:name="Table31.B" style:family="table-column"/>
    <style:style style:name="Table32" style:family="table">
      <style:table-properties table:align="center"/>
    </style:style>
    <style:style style:name="Table32.A" style:family="table-column"/>
    <style:style style:name="Table32.B" style:family="table-column"/>
    <style:style style:name="Table32.C" style:family="table-column"/>
    <style:style style:name="Table33" style:family="table">
      <style:table-properties table:align="center"/>
    </style:style>
    <style:style style:name="Table33.A" style:family="table-column"/>
    <style:style style:name="Table33.B" style:family="table-column"/>
    <style:style style:name="Table33.C" style:family="table-column"/>
    <style:style style:name="Table33.D" style:family="table-column"/>
    <style:style style:name="Table33.E" style:family="table-column"/>
    <style:style style:name="Table33.F" style:family="table-column"/>
    <style:style style:name="Table33.G" style:family="table-column"/>
    <style:style style:name="Table33.H" style:family="table-column"/>
    <style:style style:name="Table33.I" style:family="table-column"/>
    <style:style style:name="Table33.J" style:family="table-column"/>
    <style:style style:name="Table34" style:family="table">
      <style:table-properties table:align="center"/>
    </style:style>
    <style:style style:name="Table34.A" style:family="table-column"/>
    <style:style style:name="Table34.B" style:family="table-column"/>
    <style:style style:name="Table34.C" style:family="table-column"/>
    <style:style style:name="Table34.D" style:family="table-column"/>
    <style:style style:name="Table34.E" style:family="table-column"/>
    <style:style style:name="Table34.F" style:family="table-column"/>
    <style:style style:name="Table34.G" style:family="table-column"/>
    <style:style style:name="Table34.H" style:family="table-column"/>
    <style:style style:name="Table34.I" style:family="table-column"/>
    <style:style style:name="Table34.J" style:family="table-column"/>
    <style:style style:name="Table35" style:family="table">
      <style:table-properties table:align="center"/>
    </style:style>
    <style:style style:name="Table35.A" style:family="table-column"/>
    <style:style style:name="Table35.B" style:family="table-column"/>
    <style:style style:name="Table35.C" style:family="table-column"/>
    <style:style style:name="Table35.D" style:family="table-column"/>
    <style:style style:name="Table35.E" style:family="table-column"/>
    <style:style style:name="Table35.F" style:family="table-column"/>
    <style:style style:name="Table35.G" style:family="table-column"/>
    <style:style style:name="Table35.H" style:family="table-column"/>
    <style:style style:name="Table35.I" style:family="table-column"/>
    <style:style style:name="Table35.J" style:family="table-column"/>
    <style:style style:name="Table36" style:family="table">
      <style:table-properties table:align="center"/>
    </style:style>
    <style:style style:name="Table36.A" style:family="table-column"/>
    <style:style style:name="Table36.B" style:family="table-column"/>
    <style:style style:name="Table36.C" style:family="table-column"/>
    <style:style style:name="Table36.D" style:family="table-column"/>
    <style:style style:name="Table36.E" style:family="table-column"/>
    <style:style style:name="Table36.F" style:family="table-column"/>
    <style:style style:name="Table36.G" style:family="table-column"/>
    <style:style style:name="Table36.H" style:family="table-column"/>
    <style:style style:name="Table36.I" style:family="table-column"/>
    <style:style style:name="Table36.J" style:family="table-column"/>
    <style:style style:name="Table37" style:family="table">
      <style:table-properties table:align="center"/>
    </style:style>
    <style:style style:name="Table37.A" style:family="table-column"/>
    <style:style style:name="Table37.B" style:family="table-column"/>
    <style:style style:name="Table37.C" style:family="table-column"/>
    <style:style style:name="Table37.D" style:family="table-column"/>
    <style:style style:name="Table37.E" style:family="table-column"/>
    <style:style style:name="Table37.F" style:family="table-column"/>
    <style:style style:name="Table37.G" style:family="table-column"/>
    <style:style style:name="Table37.H" style:family="table-column"/>
    <style:style style:name="Table37.I" style:family="table-column"/>
    <style:style style:name="Table38" style:family="table">
      <style:table-properties table:align="center"/>
    </style:style>
    <style:style style:name="Table38.A" style:family="table-column"/>
    <style:style style:name="Table38.B" style:family="table-column"/>
    <style:style style:name="Table38.C" style:family="table-column"/>
    <style:style style:name="Table38.D" style:family="table-column"/>
    <style:style style:name="Table38.E" style:family="table-column"/>
    <style:style style:name="Table39" style:family="table">
      <style:table-properties table:align="center"/>
    </style:style>
    <style:style style:name="Table39.A" style:family="table-column"/>
    <style:style style:name="Table39.B" style:family="table-column"/>
    <style:style style:name="Table39.C" style:family="table-column"/>
    <style:style style:name="Table39.D" style:family="table-column"/>
    <style:style style:name="Table39.E" style:family="table-column"/>
    <style:style style:name="Table39.F" style:family="table-column"/>
    <style:style style:name="Table39.G" style:family="table-column"/>
    <style:style style:name="Table39.H" style:family="table-column"/>
    <style:style style:name="Table39.I" style:family="table-column"/>
    <style:style style:name="Table39.J" style:family="table-column"/>
    <style:style style:name="Table40" style:family="table">
      <style:table-properties table:align="center"/>
    </style:style>
    <style:style style:name="Table40.A" style:family="table-column"/>
    <style:style style:name="Table40.B" style:family="table-column"/>
    <style:style style:name="Table40.C" style:family="table-column"/>
    <style:style style:name="Table40.D" style:family="table-column"/>
    <style:style style:name="Table41" style:family="table">
      <style:table-properties table:align="center"/>
    </style:style>
    <style:style style:name="Table41.A" style:family="table-column"/>
    <style:style style:name="Table41.B" style:family="table-column"/>
    <style:style style:name="Table41.C" style:family="table-column"/>
    <style:style style:name="Table41.D" style:family="table-column"/>
    <style:style style:name="Table41.E" style:family="table-column"/>
    <style:style style:name="Table41.F" style:family="table-column"/>
    <style:style style:name="Table41.G" style:family="table-column"/>
    <style:style style:name="Table41.H" style:family="table-column"/>
    <style:style style:name="Table42" style:family="table">
      <style:table-properties table:align="center"/>
    </style:style>
    <style:style style:name="Table42.A" style:family="table-column"/>
    <style:style style:name="Table42.B" style:family="table-column"/>
    <style:style style:name="Table42.C" style:family="table-column"/>
    <style:style style:name="Table42.D" style:family="table-column"/>
    <style:style style:name="Table42.E" style:family="table-column"/>
    <style:style style:name="Table42.F" style:family="table-column"/>
    <style:style style:name="Table42.G" style:family="table-column"/>
    <style:style style:name="Table42.H" style:family="table-column"/>
    <style:style style:name="Table42.I" style:family="table-column"/>
    <style:style style:name="Table43" style:family="table">
      <style:table-properties table:align="center"/>
    </style:style>
    <style:style style:name="Table43.A" style:family="table-column"/>
    <style:style style:name="Table43.B" style:family="table-column"/>
    <style:style style:name="Table43.C" style:family="table-column"/>
    <style:style style:name="Table43.D" style:family="table-column"/>
    <style:style style:name="Table43.E" style:family="table-column"/>
    <style:style style:name="Table43.F" style:family="table-column"/>
    <style:style style:name="Table43.G" style:family="table-column"/>
    <style:style style:name="Table43.H" style:family="table-column"/>
    <style:style style:name="Table44" style:family="table">
      <style:table-properties table:align="center"/>
    </style:style>
    <style:style style:name="Table44.A" style:family="table-column"/>
    <style:style style:name="Table44.B" style:family="table-column"/>
    <style:style style:name="Table44.C" style:family="table-column"/>
    <style:style style:name="Table44.D" style:family="table-column"/>
    <style:style style:name="Table44.E" style:family="table-column"/>
    <style:style style:name="Table44.F" style:family="table-column"/>
    <style:style style:name="Table44.G" style:family="table-column"/>
    <style:style style:name="Table44.H" style:family="table-column"/>
    <style:style style:name="Table44.I" style:family="table-column"/>
    <style:style style:name="Table44.J" style:family="table-column"/>
    <style:style style:name="Table44.K" style:family="table-column"/>
    <style:style style:name="Table44.L" style:family="table-column"/>
    <style:style style:name="Table45" style:family="table">
      <style:table-properties table:align="center"/>
    </style:style>
    <style:style style:name="Table45.A" style:family="table-column"/>
    <style:style style:name="Table45.B" style:family="table-column"/>
    <style:style style:name="Table45.C" style:family="table-column"/>
    <style:style style:name="Table45.D" style:family="table-column"/>
    <style:style style:name="Table45.E" style:family="table-column"/>
    <style:style style:name="Table45.F" style:family="table-column"/>
    <style:style style:name="Table45.G" style:family="table-column"/>
    <style:style style:name="Table45.H" style:family="table-column"/>
    <style:style style:name="Table46" style:family="table">
      <style:table-properties table:align="center"/>
    </style:style>
    <style:style style:name="Table46.A" style:family="table-column"/>
    <style:style style:name="Table46.B" style:family="table-column"/>
    <style:style style:name="Table46.C" style:family="table-column"/>
    <style:style style:name="Table46.D" style:family="table-column"/>
    <style:style style:name="Table46.E" style:family="table-column"/>
    <style:style style:name="Table46.F" style:family="table-column"/>
    <style:style style:name="Table46.G" style:family="table-column"/>
    <style:style style:name="Table46.H" style:family="table-column"/>
    <style:style style:name="Table47" style:family="table">
      <style:table-properties table:align="center"/>
    </style:style>
    <style:style style:name="Table47.A" style:family="table-column"/>
    <style:style style:name="Table47.B" style:family="table-column"/>
    <style:style style:name="Table47.C" style:family="table-column"/>
    <style:style style:name="Table47.D" style:family="table-column"/>
    <style:style style:name="Table47.E" style:family="table-column"/>
    <style:style style:name="Table47.F" style:family="table-column"/>
    <style:style style:name="Table47.G" style:family="table-column"/>
    <style:style style:name="Table47.H" style:family="table-column"/>
    <style:style style:name="Table48" style:family="table">
      <style:table-properties table:align="center"/>
    </style:style>
    <style:style style:name="Table48.A" style:family="table-column"/>
    <style:style style:name="Table48.B" style:family="table-column"/>
    <style:style style:name="Table48.C" style:family="table-column"/>
    <style:style style:name="Table48.D" style:family="table-column"/>
    <style:style style:name="Table48.E" style:family="table-column"/>
    <style:style style:name="Table48.F" style:family="table-column"/>
    <style:style style:name="Table48.G" style:family="table-column"/>
    <style:style style:name="Table48.H" style:family="table-column"/>
    <style:style style:name="Table48.I" style:family="table-column"/>
    <style:style style:name="Table48.J" style:family="table-column"/>
    <style:style style:name="Table49" style:family="table">
      <style:table-properties table:align="center"/>
    </style:style>
    <style:style style:name="Table49.A" style:family="table-column"/>
    <style:style style:name="Table49.B" style:family="table-column"/>
    <style:style style:name="Table49.C" style:family="table-column"/>
    <style:style style:name="Table49.D" style:family="table-column"/>
    <style:style style:name="Table49.E" style:family="table-column"/>
    <style:style style:name="Table49.F" style:family="table-column"/>
    <style:style style:name="Table49.G" style:family="table-column"/>
    <style:style style:name="Table49.H" style:family="table-column"/>
    <style:style style:name="Table50" style:family="table">
      <style:table-properties table:align="center"/>
    </style:style>
    <style:style style:name="Table50.A" style:family="table-column"/>
    <style:style style:name="Table50.B" style:family="table-column"/>
    <style:style style:name="Table50.C" style:family="table-column"/>
    <style:style style:name="Table50.D" style:family="table-column"/>
    <style:style style:name="Table50.E" style:family="table-column"/>
    <style:style style:name="Table50.F" style:family="table-column"/>
    <style:style style:name="Table50.G" style:family="table-column"/>
    <style:style style:name="Table50.H" style:family="table-column"/>
    <style:style style:name="Table51" style:family="table">
      <style:table-properties table:align="center"/>
    </style:style>
    <style:style style:name="Table51.A" style:family="table-column"/>
    <style:style style:name="Table51.B" style:family="table-column"/>
    <style:style style:name="Table51.C" style:family="table-column"/>
    <style:style style:name="Table51.D" style:family="table-column"/>
    <style:style style:name="Table52" style:family="table">
      <style:table-properties table:align="center"/>
    </style:style>
    <style:style style:name="Table52.A" style:family="table-column"/>
    <style:style style:name="Table52.B" style:family="table-column"/>
    <style:style style:name="Table52.C" style:family="table-column"/>
    <style:style style:name="Table52.D" style:family="table-column"/>
    <style:style style:name="Table52.E" style:family="table-column"/>
    <style:style style:name="Table52.F" style:family="table-column"/>
    <style:style style:name="Table52.G" style:family="table-column"/>
    <style:style style:name="Table52.H" style:family="table-column"/>
    <style:style style:name="Table52.I" style:family="table-column"/>
    <style:style style:name="Table52.J" style:family="table-column"/>
    <style:style style:name="Table52.K" style:family="table-column"/>
    <style:style style:name="Table53" style:family="table">
      <style:table-properties table:align="center"/>
    </style:style>
    <style:style style:name="Table53.A" style:family="table-column"/>
    <style:style style:name="Table53.B" style:family="table-column"/>
    <style:style style:name="Table53.C" style:family="table-column"/>
    <style:style style:name="Table53.D" style:family="table-column"/>
    <style:style style:name="Table53.E" style:family="table-column"/>
    <style:style style:name="Table53.F" style:family="table-column"/>
    <style:style style:name="Table53.G" style:family="table-column"/>
    <style:style style:name="Table53.H" style:family="table-column"/>
    <style:style style:name="Table53.I" style:family="table-column"/>
    <style:style style:name="Table53.J" style:family="table-column"/>
    <style:style style:name="Table53.K" style:family="table-column"/>
    <style:style style:name="Table53.L" style:family="table-column"/>
    <style:style style:name="Table54" style:family="table">
      <style:table-properties table:align="center"/>
    </style:style>
    <style:style style:name="Table54.A" style:family="table-column"/>
    <style:style style:name="Table54.B" style:family="table-column"/>
    <style:style style:name="Table54.C" style:family="table-column"/>
    <style:style style:name="Table55" style:family="table">
      <style:table-properties table:align="center"/>
    </style:style>
    <style:style style:name="Table55.A" style:family="table-column"/>
    <style:style style:name="Table55.B" style:family="table-column"/>
    <style:style style:name="Table55.C" style:family="table-column"/>
    <style:style style:name="Table55.D" style:family="table-column"/>
    <style:style style:name="Table55.E" style:family="table-column"/>
    <style:style style:name="Table55.F" style:family="table-column"/>
    <style:style style:name="Table55.G" style:family="table-column"/>
    <style:style style:name="Table55.H" style:family="table-column"/>
    <style:style style:name="Table55.I" style:family="table-column"/>
    <style:style style:name="Table55.J" style:family="table-column"/>
    <style:style style:name="Table56" style:family="table">
      <style:table-properties table:align="center"/>
    </style:style>
    <style:style style:name="Table56.A" style:family="table-column"/>
    <style:style style:name="Table56.B" style:family="table-column"/>
    <style:style style:name="Table56.C" style:family="table-column"/>
    <style:style style:name="Table56.D" style:family="table-column"/>
    <style:style style:name="Table56.E" style:family="table-column"/>
    <style:style style:name="Table56.F" style:family="table-column"/>
    <style:style style:name="Table56.G" style:family="table-column"/>
    <style:style style:name="Table56.H" style:family="table-column"/>
    <style:style style:name="Table57" style:family="table">
      <style:table-properties table:align="center"/>
    </style:style>
    <style:style style:name="Table57.A" style:family="table-column"/>
    <style:style style:name="Table57.B" style:family="table-column"/>
    <style:style style:name="Table58" style:family="table">
      <style:table-properties table:align="center"/>
    </style:style>
    <style:style style:name="Table58.A" style:family="table-column"/>
    <style:style style:name="Table58.B" style:family="table-column"/>
    <style:style style:name="Table58.C" style:family="table-column"/>
    <style:style style:name="Table58.D" style:family="table-column"/>
    <style:style style:name="Table58.E" style:family="table-column"/>
    <style:style style:name="Table58.F" style:family="table-column"/>
    <style:style style:name="Table58.G" style:family="table-column"/>
    <style:style style:name="Table58.H" style:family="table-column"/>
    <style:style style:name="Table58.I" style:family="table-column"/>
    <style:style style:name="Table58.J" style:family="table-column"/>
    <style:style style:name="Table58.K" style:family="table-column"/>
    <style:style style:name="Table59" style:family="table">
      <style:table-properties table:align="center"/>
    </style:style>
    <style:style style:name="Table59.A" style:family="table-column"/>
    <style:style style:name="Table59.B" style:family="table-column"/>
    <style:style style:name="Table59.C" style:family="table-column"/>
    <style:style style:name="Table60" style:family="table">
      <style:table-properties table:align="center"/>
    </style:style>
    <style:style style:name="Table60.A" style:family="table-column"/>
    <style:style style:name="Table60.B" style:family="table-column"/>
    <style:style style:name="Table60.C" style:family="table-column"/>
    <style:style style:name="Table60.D" style:family="table-column"/>
    <style:style style:name="Table60.E" style:family="table-column"/>
    <style:style style:name="Table60.F" style:family="table-column"/>
    <style:style style:name="Table60.G" style:family="table-column"/>
    <style:style style:name="Table60.H" style:family="table-column"/>
    <style:style style:name="Table60.I" style:family="table-column"/>
    <style:style style:name="Table60.J" style:family="table-column"/>
    <style:style style:name="Table61" style:family="table">
      <style:table-properties table:align="center"/>
    </style:style>
    <style:style style:name="Table61.A" style:family="table-column"/>
    <style:style style:name="Table61.B" style:family="table-column"/>
    <style:style style:name="Table61.C" style:family="table-column"/>
    <style:style style:name="Table62" style:family="table">
      <style:table-properties table:align="center"/>
    </style:style>
    <style:style style:name="Table62.A" style:family="table-column"/>
    <style:style style:name="Table63" style:family="table">
      <style:table-properties table:align="center"/>
    </style:style>
    <style:style style:name="Table63.A" style:family="table-column"/>
    <style:style style:name="Table63.B" style:family="table-column"/>
    <style:style style:name="Table63.C" style:family="table-column"/>
    <style:style style:name="Table63.D" style:family="table-column"/>
    <style:style style:name="Table63.E" style:family="table-column"/>
    <style:style style:name="Table63.F" style:family="table-column"/>
    <style:style style:name="Table63.G" style:family="table-column"/>
    <style:style style:name="Table63.H" style:family="table-column"/>
    <style:style style:name="Table63.I" style:family="table-column"/>
    <style:style style:name="Table63.J" style:family="table-column"/>
    <style:style style:name="Table63.K" style:family="table-column"/>
    <style:style style:name="Table63.L" style:family="table-column"/>
    <style:style style:name="Table64" style:family="table">
      <style:table-properties table:align="center"/>
    </style:style>
    <style:style style:name="Table64.A" style:family="table-column"/>
    <style:style style:name="Table64.B" style:family="table-column"/>
    <style:style style:name="Table64.C" style:family="table-column"/>
    <style:style style:name="Table64.D" style:family="table-column"/>
    <style:style style:name="Table64.E" style:family="table-column"/>
    <style:style style:name="Table64.F" style:family="table-column"/>
    <style:style style:name="Table64.G" style:family="table-column"/>
    <style:style style:name="Table64.H" style:family="table-column"/>
    <style:style style:name="Table65" style:family="table">
      <style:table-properties table:align="center"/>
    </style:style>
    <style:style style:name="Table65.A" style:family="table-column"/>
    <style:style style:name="Table65.B" style:family="table-column"/>
    <style:style style:name="Table65.C" style:family="table-column"/>
    <style:style style:name="Table66" style:family="table">
      <style:table-properties table:align="center"/>
    </style:style>
    <style:style style:name="Table66.A" style:family="table-column"/>
    <style:style style:name="Table67" style:family="table">
      <style:table-properties table:align="center"/>
    </style:style>
    <style:style style:name="Table67.A" style:family="table-column"/>
    <style:style style:name="Table67.B" style:family="table-column"/>
    <style:style style:name="Table67.C" style:family="table-column"/>
    <style:style style:name="Table68" style:family="table">
      <style:table-properties table:align="center"/>
    </style:style>
    <style:style style:name="Table68.A" style:family="table-column"/>
    <style:style style:name="Table68.B" style:family="table-column"/>
    <style:style style:name="Table68.C" style:family="table-column"/>
    <style:style style:name="Table68.D" style:family="table-column"/>
    <style:style style:name="Table68.E" style:family="table-column"/>
    <style:style style:name="Table68.F" style:family="table-column"/>
    <style:style style:name="Table68.G" style:family="table-column"/>
    <style:style style:name="Table68.H" style:family="table-column"/>
    <style:style style:name="Table68.I" style:family="table-column"/>
    <style:style style:name="Table69" style:family="table">
      <style:table-properties table:align="center"/>
    </style:style>
    <style:style style:name="Table69.A" style:family="table-column"/>
    <style:style style:name="Table69.B" style:family="table-column"/>
    <style:style style:name="Table69.C" style:family="table-column"/>
    <style:style style:name="Table69.D" style:family="table-column"/>
    <style:style style:name="Table69.E" style:family="table-column"/>
    <style:style style:name="Table69.F" style:family="table-column"/>
    <style:style style:name="Table69.G" style:family="table-column"/>
    <style:style style:name="Table69.H" style:family="table-column"/>
    <style:style style:name="Table69.I" style:family="table-column"/>
    <style:style style:name="Table70" style:family="table">
      <style:table-properties table:align="center"/>
    </style:style>
    <style:style style:name="Table70.A" style:family="table-column"/>
    <style:style style:name="Table70.B" style:family="table-column"/>
    <style:style style:name="Table70.C" style:family="table-column"/>
    <style:style style:name="Table71" style:family="table">
      <style:table-properties table:align="center"/>
    </style:style>
    <style:style style:name="Table71.A" style:family="table-column"/>
    <style:style style:name="Table71.B" style:family="table-column"/>
    <style:style style:name="Table71.C" style:family="table-column"/>
    <style:style style:name="Table71.D" style:family="table-column"/>
    <style:style style:name="Table71.E" style:family="table-column"/>
    <style:style style:name="Table71.F" style:family="table-column"/>
    <style:style style:name="Table71.G" style:family="table-column"/>
    <style:style style:name="Table71.H" style:family="table-column"/>
    <style:style style:name="Table72" style:family="table">
      <style:table-properties table:align="center"/>
    </style:style>
    <style:style style:name="Table72.A" style:family="table-column"/>
    <style:style style:name="Table72.B" style:family="table-column"/>
    <style:style style:name="Table72.C" style:family="table-column"/>
    <style:style style:name="Table72.D" style:family="table-column"/>
    <style:style style:name="Table73" style:family="table">
      <style:table-properties table:align="center"/>
    </style:style>
    <style:style style:name="Table73.A" style:family="table-column"/>
    <style:style style:name="Table73.B" style:family="table-column"/>
    <style:style style:name="Table73.C" style:family="table-column"/>
    <style:style style:name="Table73.D" style:family="table-column"/>
    <style:style style:name="Table74" style:family="table">
      <style:table-properties table:align="center"/>
    </style:style>
    <style:style style:name="Table74.A" style:family="table-column"/>
    <style:style style:name="Table74.B" style:family="table-column"/>
    <style:style style:name="Table74.C" style:family="table-column"/>
    <style:style style:name="Table74.D" style:family="table-column"/>
    <style:style style:name="Table74.E" style:family="table-column"/>
    <style:style style:name="Table74.F" style:family="table-column"/>
    <style:style style:name="Table75" style:family="table">
      <style:table-properties table:align="center"/>
    </style:style>
    <style:style style:name="Table75.A" style:family="table-column"/>
    <style:style style:name="Table75.B" style:family="table-column"/>
    <style:style style:name="Table75.C" style:family="table-column"/>
    <style:style style:name="Table75.D" style:family="table-column"/>
    <style:style style:name="Table75.E" style:family="table-column"/>
    <style:style style:name="Table76" style:family="table">
      <style:table-properties table:align="center"/>
    </style:style>
    <style:style style:name="Table76.A" style:family="table-column"/>
    <style:style style:name="Table76.B" style:family="table-column"/>
    <style:style style:name="Table76.C" style:family="table-column"/>
    <style:style style:name="Table76.D" style:family="table-column"/>
    <style:style style:name="Table76.E" style:family="table-column"/>
    <style:style style:name="Table76.F" style:family="table-column"/>
    <style:style style:name="Table76.G" style:family="table-column"/>
    <style:style style:name="Table76.H" style:family="table-column"/>
    <style:style style:name="Table76.I" style:family="table-column"/>
    <style:style style:name="Table76.J" style:family="table-column"/>
    <style:style style:name="Table76.K" style:family="table-column"/>
    <style:style style:name="Table76.L" style:family="table-column"/>
    <style:style style:name="Table77" style:family="table">
      <style:table-properties table:align="center"/>
    </style:style>
    <style:style style:name="Table77.A" style:family="table-column"/>
    <style:style style:name="Table77.B" style:family="table-column"/>
    <style:style style:name="Table77.C" style:family="table-column"/>
    <style:style style:name="Table78" style:family="table">
      <style:table-properties table:align="center"/>
    </style:style>
    <style:style style:name="Table78.A" style:family="table-column"/>
    <style:style style:name="Table78.B" style:family="table-column"/>
    <style:style style:name="Table78.C" style:family="table-column"/>
    <style:style style:name="Table79" style:family="table">
      <style:table-properties table:align="center"/>
    </style:style>
    <style:style style:name="Table79.A" style:family="table-column"/>
    <style:style style:name="Table79.B" style:family="table-column"/>
    <style:style style:name="Table79.C" style:family="table-column"/>
    <style:style style:name="Table80" style:family="table">
      <style:table-properties table:align="center"/>
    </style:style>
    <style:style style:name="Table80.A" style:family="table-column"/>
    <style:style style:name="Table80.B" style:family="table-column"/>
    <style:style style:name="Table80.C" style:family="table-column"/>
    <style:style style:name="Table80.D" style:family="table-column"/>
    <style:style style:name="Table81" style:family="table">
      <style:table-properties table:align="center"/>
    </style:style>
    <style:style style:name="Table81.A" style:family="table-column"/>
    <style:style style:name="Table81.B" style:family="table-column"/>
    <style:style style:name="Table81.C" style:family="table-column"/>
    <style:style style:name="Table81.D" style:family="table-column"/>
    <style:style style:name="Table81.E" style:family="table-column"/>
    <style:style style:name="Table81.F" style:family="table-column"/>
    <style:style style:name="Table81.G" style:family="table-column"/>
    <style:style style:name="Table81.H" style:family="table-column"/>
    <style:style style:name="Table81.I" style:family="table-column"/>
    <style:style style:name="Table81.J" style:family="table-column"/>
    <style:style style:name="Table81.K" style:family="table-column"/>
    <style:style style:name="Table81.L" style:family="table-column"/>
    <style:style style:name="Table81.M" style:family="table-column"/>
    <style:style style:name="Table81.N" style:family="table-column"/>
    <style:style style:name="Table81.O" style:family="table-column"/>
    <style:style style:name="Table81.P" style:family="table-column"/>
    <style:style style:name="Table81.Q" style:family="table-column"/>
    <text:list-style style:name="Pandoc_5f_Numbering_5f_1">
      <text:list-level-style-number text:level="1" text:style-name="Numbering_20_Symbols" style:num-format="1" style:num-suffix=")">
        <style:list-level-properties text:space-before="0.0000in" text:min-label-width="0.1965in" text:min-label-distance="0.1in"/>
      </text:list-level-style-number>
      <text:list-level-style-number text:level="2" text:style-name="Numbering_20_Symbols" style:num-format="1" style:num-suffix=")">
        <style:list-level-properties text:space-before="0.1972in" text:min-label-width="0.1965in" text:min-label-distance="0.1in"/>
      </text:list-level-style-number>
      <text:list-level-style-number text:level="3" text:style-name="Numbering_20_Symbols" style:num-format="1" style:num-suffix=")">
        <style:list-level-properties text:space-before="0.3944in" text:min-label-width="0.1965in" text:min-label-distance="0.1in"/>
      </text:list-level-style-number>
      <text:list-level-style-number text:level="4" text:style-name="Numbering_20_Symbols" style:num-format="1" style:num-suffix=")">
        <style:list-level-properties text:space-before="0.5916in" text:min-label-width="0.1965in" text:min-label-distance="0.1in"/>
      </text:list-level-style-number>
      <text:list-level-style-number text:level="5" text:style-name="Numbering_20_Symbols" style:num-format="1" style:num-suffix=")">
        <style:list-level-properties text:space-before="0.7888in" text:min-label-width="0.1965in" text:min-label-distance="0.1in"/>
      </text:list-level-style-number>
      <text:list-level-style-number text:level="6" text:style-name="Numbering_20_Symbols" style:num-format="1" style:num-suffix=")">
        <style:list-level-properties text:space-before="0.9860in" text:min-label-width="0.1965in" text:min-label-distance="0.1in"/>
      </text:list-level-style-number>
      <text:list-level-style-number text:level="7" text:style-name="Numbering_20_Symbols" style:num-format="1" style:num-suffix=")">
        <style:list-level-properties text:space-before="1.1832in" text:min-label-width="0.1965in" text:min-label-distance="0.1in"/>
      </text:list-level-style-number>
      <text:list-level-style-number text:level="8" text:style-name="Numbering_20_Symbols" style:num-format="1" style:num-suffix=")">
        <style:list-level-properties text:space-before="1.3804in" text:min-label-width="0.1965in" text:min-label-distance="0.1in"/>
      </text:list-level-style-number>
      <text:list-level-style-number text:level="9" text:style-name="Numbering_20_Symbols" style:num-format="1" style:num-suffix=")">
        <style:list-level-properties text:space-before="1.5776in" text:min-label-width="0.1965in" text:min-label-distance="0.1in"/>
      </text:list-level-style-number>
      <text:list-level-style-number text:level="10" text:style-name="Numbering_20_Symbols" style:num-format="1" style:num-suffix=")">
        <style:list-level-properties text:space-before="1.7748in" text:min-label-width="0.1965in" text:min-label-distance="0.1in"/>
      </text:list-level-style-number>
    </text:list-style>
  </office:automatic-styles>
  <office:body>
    <office:text>
      <text:p text:style-name="Title">X68000 Technical Guide</text:p>
      <text:p text:style-name="Subtitle">English translation from the Japanese original</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PERSONAL WORKSTATION X68000</text:p>
      <text:p text:style-name="Text_20_body">Technical Data Book</text:p>
      <text:p text:style-name="Text_20_body">Supervised by Sharp Corporation TV Business Division Edited by ASCII Publishing Technical Writing Section</text:p>
      <text:p text:style-name="Text_20_body">ASCII Publishing"</text:p>
      <text:p text:style-name="Text_20_body"><text:span text:style-name="Emphasis">(Blank page in the original.)</text:span></text:p>
      <text:p text:style-name="Text_20_body"><text:span text:style-name="Emphasis">(Blank page in the original.)</text:span></text:p>
      <text:p text:style-name="Text_20_body"><text:span text:style-name="Emphasis">(Blank page in the original.)</text:span></text:p>
      <text:p text:style-name="Text_20_body"><text:span text:style-name="Strong_20_Emphasis">PERSONAL WORKSTATION</text:span> <text:span text:style-name="Strong_20_Emphasis">X68000</text:span> <text:span text:style-name="Strong_20_Emphasis">Technical Data Book</text:span></text:p>
      <text:p text:style-name="Text_20_body"><text:span text:style-name="Strong_20_Emphasis">Supervised by Sharp Corporation Television Business Division</text:span> <text:span text:style-name="Strong_20_Emphasis">Compiled by ASCII Publishing Department Tech Write Section</text:span></text:p>
      <text:p text:style-name="Text_20_body"><text:span text:style-name="Strong_20_Emphasis">ASCII Publishing Department</text:span></text:p>
      <text:p text:style-name="Text_20_body">"PERSONAL WORKSTATION ZX58000"</text:p>
      <text:p text:style-name="Text_20_body"><text:span text:style-name="Strong_20_Emphasis">Introduction</text:span></text:p>
      <text:p text:style-name="Text_20_body">This document is a data book that collects technical information mainly related to the hardware of the Sharp personal workstation X68000.</text:p>
      <text:p text:style-name="Text_20_body">Since its release in 1986, the X68000 has attracted the attention of the media with its sophisticated specifications and unique features. In particular, by using the MPU 68000, the X68000 was able to directly manipulate 1M byte of main RAM, standardize the unique sprite function, bit-map mode with a resolution of 768 x 512 dots (with 65,536 colors in dot units), high-level graphic functions, FM sound source LSI, sound synthesis LSI, and various other features, making it an ideal machine for software development.</text:p>
      <text:p text:style-name="Text_20_body">We hope that the hardware information in this document will be useful for both amateur enthusiasts and professional programmers in developing software for the X68000.</text:p>
      <text:p text:style-name="Text_20_body">While we strive to ensure the accuracy of the content in this document, please let us know if there are any errors or concerns. If you intend to use this information, please conduct sufficient evaluations beforehand.</text:p>
      <text:p text:style-name="Text_20_body">For any questions regarding the contents of this document, please send a postcard to Ascii Publishing’s editorial department. We can only respond to questions via mail.</text:p>
      <text:p text:style-name="Text_20_body">Table of Contents</text:p>
      <text:p text:style-name="Text_20_body">Chapter 1 Overview of the System 1</text:p>
      <text:p text:style-name="Preformatted_20_Text">1 Features of the System <text:s text:c="1"/>1</text:p>
      <text:p text:style-name="Preformatted_20_Text">2 Specifications <text:s text:c="1"/>3</text:p>
      <text:p text:style-name="Preformatted_20_Text">3 Block Diagram <text:s text:c="1"/>7</text:p>
      <text:p text:style-name="Preformatted_20_Text">4 Memory Map <text:s text:c="1"/>8</text:p>
      <text:p text:style-name="First_20_paragraph">Chapter 2 Screen Control 9 1 Text Screen Configuration 11</text:p>
      <text:p text:style-name="Preformatted_20_Text"><text:s text:c="2"/>1-1 Display Screen Configuration <text:s text:c="1"/>11</text:p>
      <text:p text:style-name="Preformatted_20_Text"><text:s text:c="2"/>1-2 Text VRAM Memory Map <text:s text:c="1"/>11</text:p>
      <text:p text:style-name="Preformatted_20_Text"><text:s text:c="2"/>1-3 Text Screen Address Allocation <text:s text:c="1"/>12</text:p>
      <text:p text:style-name="Preformatted_20_Text"><text:s text:c="2"/>1-4 Text Palette Address <text:s text:c="1"/>13</text:p>
      <text:p text:style-name="First_20_paragraph">2 Graphic Screen Configuration 14</text:p>
      <text:p text:style-name="Preformatted_20_Text"><text:s text:c="2"/>2-1 Display Screen Configuration <text:s text:c="1"/>14</text:p>
      <text:p text:style-name="Preformatted_20_Text"><text:s text:c="2"/>2-2 Graphic VRAM Memory Map <text:s text:c="1"/>14</text:p>
      <text:p text:style-name="Preformatted_20_Text"><text:s text:c="2"/>2-3 Graphic Screen Address Allocation <text:s text:c="1"/>17</text:p>
      <text:p text:style-name="Preformatted_20_Text"><text:s text:c="2"/>2-4 Graphic Palette Address <text:s text:c="1"/>21</text:p>
      <text:p text:style-name="First_20_paragraph">3 Text Screen and Graphic Screen Control (CRTC) 23</text:p>
      <text:p text:style-name="Preformatted_20_Text"><text:s text:c="2"/>3-1 CRTC Connection and Internal Registers <text:s text:c="1"/>24</text:p>
      <text:p text:style-name="Preformatted_20_Text"><text:s text:c="2"/>3-2 Details of the CRTC Registers <text:s text:c="1"/>27</text:p>
      <text:p text:style-name="Preformatted_20_Text"><text:s text:c="2"/>3-3 CRTC Special Feature Details (Text) <text:s text:c="1"/>33</text:p>
      <text:p text:style-name="Preformatted_20_Text"><text:s text:c="2"/>3-4 CRTC Special Feature Details (Graphic) <text:s text:c="1"/>34</text:p>
      <text:p text:style-name="First_20_paragraph">4 Sprite 35</text:p>
      <text:p text:style-name="Preformatted_20_Text"><text:s text:c="2"/>4-1 Features of Sprites <text:s text:c="1"/>35</text:p>
      <text:p text:style-name="Preformatted_20_Text"><text:s text:c="2"/>4-2 Sprite Control Register Address Map <text:s text:c="1"/>37</text:p>
      <text:p text:style-name="Preformatted_20_Text"><text:s text:c="2"/>4-3 Details of Sprite Control Registers <text:s text:c="1"/>40</text:p>
      <text:p text:style-name="Preformatted_20_Text"><text:s text:c="2"/>4-4 Background Control Register and Screen Mode Register <text:s text:c="1"/>42</text:p>
      <text:p text:style-name="First_20_paragraph">Table of Contents</text:p>
      <text:p text:style-name="Text_20_body">4-5 PCG Area ................................................................. 47 4-6 Details of Text Area (1) ................................................ 49 4-7 Details of Text Area (2) ................................................ 50 4-8 How to Access CPU ................................................... 51</text:p>
      <text:p text:style-name="Text_20_body">5 Video Controller ........................................................ 55 5-1 Address Map of Video Controller Registers ................. 56 5-2 Details of Video Controller Registers ......................... 57 5-3 Special Mode Details ............................................... 65</text:p>
      <text:p text:style-name="Text_20_body">6 CGROM ........................................................................ 74 6-1 CGROM Specifications .............................................. 74 6-2 Address Map of CGROM .......................................... 75 6-3 Configuration of CGROM Address ........................... 76</text:p>
      <text:p text:style-name="Text_20_body">7 Superimpose &amp; Overscan ........................................ 80</text:p>
      <text:p text:style-name="Text_20_body">Chapter 3 Sound Functions ...................................... 83 1 FM Sound Source ........................................................ 84 1-1 Characteristics .......................................................... 84 1-2 Block Diagram of FM Sound Source ........................ 84 1-3 FM Sound Source Registers Configuration ............. 85 1-4 Address Map of FM Sound Source Registers .......... 86 1-5 Channels &amp; Slots ...................................................... 87 1-6 Details of FM Sound Source Registers .................... 87 1-7 Method for Correcting the System Clock at 4MHz ................................................................. 111</text:p>
      <text:p text:style-name="Text_20_body">2 PSG Sound Source .................................................... 114 2-1 Characteristics ........................................................ 114 2-2 Address Map of PSG Sound Source Registers ........ 115 2-3 Details of PSG Sound Source Registers ................... 115 2-4 How to Access PSG Sound Source .......................... 117</text:p>
      <text:p text:style-name="Text_20_body">Contents</text:p>
      <text:p text:style-name="Text_20_body">Chapter 4: Peripheral LSI .......................................................... 119</text:p>
      <text:list text:style-name="Numbering_20_1">
        <text:list-item>
          <text:p text:style-name="List_20_Number_20_Tight">DMA Controller (Direct Memory Access Controller) …… 119</text:p>
        </text:list-item>
      </text:list>
      <text:p text:style-name="Preformatted_20_Text"><text:s text:c="4"/>1-1 Features ........................................................................... 120</text:p>
      <text:p text:style-name="Preformatted_20_Text"><text:s text:c="4"/>1-2 DMAC Register Address Map ..................................... 121</text:p>
      <text:p text:style-name="Preformatted_20_Text"><text:s text:c="4"/>1-3 Details of DMAC Registers ........................................ 122</text:p>
      <text:list text:style-name="Numbering_20_1" text:start-value="2">
        <text:list-item>
          <text:p text:style-name="List_20_Number_20_Tight">MFP (Multi Function Peripheral) .................................... 123</text:p>
        </text:list-item>
      </text:list>
      <text:p text:style-name="Preformatted_20_Text"><text:s text:c="4"/>2-1 Features ........................................................................... 124</text:p>
      <text:p text:style-name="Preformatted_20_Text"><text:s text:c="4"/>2-2 MFP Register Address Map ...................................... 125</text:p>
      <text:p text:style-name="Preformatted_20_Text"><text:s text:c="4"/>2-3 Details of MFP Registers ......................................... 130</text:p>
      <text:list text:style-name="Numbering_20_1" text:start-value="3">
        <text:list-item>
          <text:p text:style-name="List_20_Number_20_Tight">SCC (Serial Communication Controller) .......................... 139</text:p>
        </text:list-item>
      </text:list>
      <text:p text:style-name="Preformatted_20_Text"><text:s text:c="4"/>3-1 Features ........................................................................... 139</text:p>
      <text:p text:style-name="Preformatted_20_Text"><text:s text:c="4"/>3-2 SCC Register Address Map ....................................... 141</text:p>
      <text:p text:style-name="Preformatted_20_Text"><text:s text:c="4"/>3-3 Details of SCC Registers .......................................... 141</text:p>
      <text:list text:style-name="Numbering_20_1" text:start-value="4">
        <text:list-item>
          <text:p text:style-name="List_20_Number_20_Tight">RTC (Real Time Clock) ....................................................... 142</text:p>
        </text:list-item>
      </text:list>
      <text:p text:style-name="Preformatted_20_Text"><text:s text:c="4"/>4-1 Features ........................................................................... 142</text:p>
      <text:p text:style-name="Preformatted_20_Text"><text:s text:c="4"/>4-2 RTC Register Address Map ...................................... 144</text:p>
      <text:p text:style-name="Preformatted_20_Text"><text:s text:c="4"/>4-3 Details of RTC Registers ......................................... 146</text:p>
      <text:list text:style-name="Numbering_20_1" text:start-value="5">
        <text:list-item>
          <text:p text:style-name="List_20_Number_20_Tight">FDC (Floppy Disk Controller) ......................................... 148</text:p>
        </text:list-item>
      </text:list>
      <text:p text:style-name="Preformatted_20_Text"><text:s text:c="4"/>5-1 Disk Drive Features and Specifications ................. 148</text:p>
      <text:p text:style-name="Preformatted_20_Text"><text:s text:c="4"/>5-2 Features of FDC .......................................................... 152</text:p>
      <text:p text:style-name="Preformatted_20_Text"><text:s text:c="4"/>5-3 FDC Register Address Map ...................................... 153</text:p>
      <text:p text:style-name="Preformatted_20_Text"><text:s text:c="4"/>5-4 Details of FDC Registers .......................................... 153</text:p>
      <text:p text:style-name="Preformatted_20_Text"><text:s text:c="4"/>5-5 FDC Access ..................................................................... 156</text:p>
      <text:p text:style-name="First_20_paragraph">Chapter 5: Other Hardware .................................................... 159</text:p>
      <text:list text:style-name="Numbering_20_1">
        <text:list-item>
          <text:p text:style-name="List_20_Number_20_Tight">Keyboard ................................................................................. 159</text:p>
        </text:list-item>
      </text:list>
      <text:p text:style-name="Preformatted_20_Text"><text:s text:c="4"/>1-1 Sub CPU ........................................................................... 160</text:p>
      <text:p text:style-name="Preformatted_20_Text"><text:s text:c="4"/>1-2 Keyboard Data Processing Procedure ....................... 168</text:p>
      <text:list text:style-name="Numbering_20_1" text:start-value="2">
        <text:list-item>
          <text:p text:style-name="List_20_Number_20_Tight">Mouse ...................................................................................... 174</text:p>
        </text:list-item>
      </text:list>
      <text:p text:style-name="Preformatted_20_Text"><text:s text:c="4"/>2-1 Mouse Data Transmission Procedure ....................... 175</text:p>
      <text:p text:style-name="Preformatted_20_Text"><text:s text:c="4"/>2-2 Mouse Access .................................................................. 176</text:p>
      <text:p text:style-name="First_20_paragraph">Page [4]</text:p>
      <text:p text:style-name="Text_20_body">Contents</text:p>
      <text:p text:style-name="Text_20_body">3 Joystick .................................................................................................... 179 3-1 Joystick Register Address Map ............................................. 179 3-2 Joystick Register Details ........................................................ 180 3-3 Joystick Access ....................................................................... 181</text:p>
      <text:p text:style-name="Text_20_body">4 Printer .................................................................................................... 181 4-1 Printer Access .......................................................................... 182</text:p>
      <text:p text:style-name="Text_20_body">5 Switch and Others ................................................................................ 183 5-1 Main Unit Switch ..................................................................... 183 5-2 Power Supply ........................................................................... 184 5-3 LED ............................................................................................ 185 5-4 8255 Ports ............................................................................... 186</text:p>
      <text:p text:style-name="Text_20_body">Appendix .................................................................................................. 187</text:p>
      <text:p text:style-name="Preformatted_20_Text">1 I/O Port Address List .................................................................... 187</text:p>
      <text:p text:style-name="Preformatted_20_Text">2 Reset ............................................................................................. 191</text:p>
      <text:p text:style-name="Preformatted_20_Text">3 System Port .................................................................................. 192</text:p>
      <text:p text:style-name="Preformatted_20_Text"><text:s text:c="4"/>3-1 System Port Register Address Map .............................. 192</text:p>
      <text:p text:style-name="Preformatted_20_Text"><text:s text:c="4"/>3-2 System Port Register Details ........................................ 192</text:p>
      <text:p text:style-name="First_20_paragraph">4 Interrupts .................................................................................... 195</text:p>
      <text:p text:style-name="Preformatted_20_Text"><text:s text:c="4"/>4-1 68000 MPU Interrupts .................................................... 195</text:p>
      <text:p text:style-name="Preformatted_20_Text"><text:s text:c="4"/>4-2 MFP Interrupts and Reading Report ......................... 195</text:p>
      <text:p text:style-name="Preformatted_20_Text"><text:s text:c="4"/>4-3 Interrupt Vector Settings ............................................... 196</text:p>
      <text:p text:style-name="Preformatted_20_Text">5 IPL (Initial Program Loader) .................................................. 197</text:p>
      <text:p text:style-name="Preformatted_20_Text">6 Character Code Table ........................................................... 198</text:p>
      <text:p text:style-name="First_20_paragraph">Index ....................................................................................................... 199</text:p>
      <text:p text:style-name="Text_20_body"><text:span text:style-name="Emphasis">(This page is too faint in the original to transcribe.)</text:span></text:p>
      <text:p text:style-name="Text_20_body">Chapter 1 System Overview</text:p>
      <text:list text:style-name="Numbering_20_1">
        <text:list-item>
          <text:p text:style-name="List_20_Number_20_Tight">System Features</text:p>
        </text:list-item>
      </text:list>
      <text:p text:style-name="First_20_paragraph">(1) Employs a 16/32-bit MPU 68000 (10 MHz) CPU.</text:p>
      <text:list text:style-name="List_20_1">
        <text:list-item>
          <text:p text:style-name="List_20_Bullet_20_Tight">Direct addressing of an address space of 16 M bytes (8 M words) is possible.</text:p>
        </text:list-item>
        <text:list-item>
          <text:p text:style-name="List_20_Bullet_20_Tight">Memory-mapped I/O method (standard with 1 M byte of main memory).</text:p>
        </text:list-item>
        <text:list-item>
          <text:p text:style-name="List_20_Bullet_20_Tight">Utilizes the 63450 as the DMAC (DMA controller) and the 68901 as the MFP (multi-function peripheral).</text:p>
        </text:list-item>
        <text:list-item>
          <text:p text:style-name="List_20_Bullet_20_Tight">Uses multiple custom ICs.</text:p>
        </text:list-item>
      </text:list>
      <text:p text:style-name="First_20_paragraph">(2) Utilizes a bit-mapped method for text VRAM and graphic VRAM.</text:p>
      <text:list text:style-name="List_20_1">
        <text:list-item>
          <text:p text:style-name="List_20_Bullet_20_Tight">Supports an actual screen size of 1024 x 1024 dots (512 x 512 dots for the graphics screen).</text:p>
        </text:list-item>
        <text:list-item>
          <text:p text:style-name="List_20_Bullet_20_Tight">Display screen sizes of 768 x 512, 512 x 512, 512 x 256, 256 x 256 are selectable.</text:p>
        </text:list-item>
        <text:list-item>
          <text:p text:style-name="List_20_Bullet_20_Tight">Supports high resolution (31.5 kHz) and standard resolution (15.98 kHz) for screen display scanning.</text:p>
        </text:list-item>
      </text:list>
      <text:p text:style-name="First_20_paragraph">(3) On the graphics screen, each dot can be assigned a desired color out of 65,536 colors (in 512 x 512 mode).</text:p>
      <text:list text:style-name="List_20_1">
        <text:list-item>
          <text:p text:style-name="List_20_Bullet_20_Tight">In graphic 768 x 512 mode, each dot can be assigned one of 16 desired colors out of 65,536 colors.</text:p>
        </text:list-item>
      </text:list>
      <text:p text:style-name="First_20_paragraph">(4) Smooth scrolling is possible on a dot-by-dot basis.</text:p>
      <text:p text:style-name="Text_20_body">(5) Equipped with a proprietary sprite IC.</text:p>
      <text:list text:style-name="List_20_1">
        <text:list-item>
          <text:p text:style-name="List_20_Bullet_20_Tight">128 sprites of 16 x 16 dot patterns are possible (up to 256).</text:p>
        </text:list-item>
        <text:list-item>
          <text:p text:style-name="List_20_Bullet_20_Tight">Up to 32 sprites can be displayed simultaneously in a single line.</text:p>
        </text:list-item>
        <text:list-item>
          <text:p text:style-name="List_20_Bullet_20_Tight">Up to 128 sprites can be displayed simultaneously on one screen.</text:p>
        </text:list-item>
      </text:list>
      <text:p text:style-name="First_20_paragraph">(6) Equipped with a palette function to change colors instantly.</text:p>
      <text:p text:style-name="Text_20_body">(7) Equipped with a priority function that allows text, graphics, and sprites to be ordered by priority.</text:p>
      <text:p text:style-name="Text_20_body">Chapter 1 System Overview</text:p>
      <text:p text:style-name="Text_20_body">(8) Semi-transparent color specification and special priority are possible.</text:p>
      <text:p text:style-name="Text_20_body">(9) Standard resolution, overscan, superimpose functions (with support for pseudo high resolution in interlace mode).</text:p>
      <text:p text:style-name="Text_20_body">(10) Equipped with CGROM for ANK characters and JIS level 1 and level 2 standard kanji characters.</text:p>
      <text:p text:style-name="Text_20_body">(11) FM sound source and sound synthesis function equipped.</text:p>
      <text:p text:style-name="Text_20_body">(12) Equipped with various interfaces such as analog RGB I/F, hard disk I/F, RS-232C I/F, printer I/F, joystick I/F, mouse I/F, etc.</text:p>
      <text:p text:style-name="Text_20_body">(13) Uses a keyboard with cylindrical step sculpture.</text:p>
      <text:p text:style-name="Text_20_body">(14) Equipped with two 5" floppy disk drives (2HD). Also includes a mouse trackball.</text:p>
      <text:list text:style-name="Numbering_20_1" text:start-value="2">
        <text:list-item>
          <text:p text:style-name="List_20_Number_20_Tight">Specifications</text:p>
        </text:list-item>
      </text:list>
      <text:p text:style-name="First_20_paragraph">(Hardwar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Item</text:p>
            </table:table-cell>
            <table:table-cell table:style-name="TableHeaderRowCell" office:value-type="string">
              <text:p text:style-name="Table_20_Heading">Classification</text:p>
            </table:table-cell>
            <table:table-cell table:style-name="TableHeaderRowCell" office:value-type="string">
              <text:p text:style-name="Table_20_Heading">Name &amp; Model</text:p>
            </table:table-cell>
            <table:table-cell table:style-name="TableHeaderRowCell" office:value-type="string">
              <text:p text:style-name="Table_20_Heading">Content</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PU</text:p>
          </table:table-cell>
          <table:table-cell table:style-name="TableRowCell" office:value-type="string">
            <text:p text:style-name="Table_20_Contents">MPU</text:p>
          </table:table-cell>
          <table:table-cell table:style-name="TableRowCell" office:value-type="string">
            <text:p text:style-name="Table_20_Contents">HD68HC000</text:p>
          </table:table-cell>
          <table:table-cell table:style-name="TableRowCell" office:value-type="string">
            <text:p text:style-name="Table_20_Contents">16/32-bit MPU (10 MHz)</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Sub CPU</text:p>
          </table:table-cell>
          <table:table-cell table:style-name="TableRowCell" office:value-type="string">
            <text:p text:style-name="Table_20_Contents">MSM80C51</text:p>
          </table:table-cell>
          <table:table-cell table:style-name="TableRowCell" office:value-type="string">
            <text:p text:style-name="Table_20_Contents">Keyboard scanning</text:p>
          </table:table-cell>
          <table:table-cell table:style-name="TableRowCell" office:value-type="string">
    </table:table-cell>
        </table:table-row>
        <table:table-row>
          <table:table-cell table:style-name="TableRowCell" office:value-type="string">
            <text:p text:style-name="Table_20_Contents">DMAC</text:p>
          </table:table-cell>
          <table:table-cell table:style-name="TableRowCell" office:value-type="string">
    </table:table-cell>
          <table:table-cell table:style-name="TableRowCell" office:value-type="string">
            <text:p text:style-name="Table_20_Contents">HD63450</text:p>
          </table:table-cell>
          <table:table-cell table:style-name="TableRowCell" office:value-type="string">
            <text:p text:style-name="Table_20_Contents">4-channel DMA controlle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Peripheral device-memory data transfer control</text:p>
          </table:table-cell>
          <table:table-cell table:style-name="TableRowCell" office:value-type="string">
    </table:table-cell>
        </table:table-row>
        <table:table-row>
          <table:table-cell table:style-name="TableRowCell" office:value-type="string">
            <text:p text:style-name="Table_20_Contents">MFP</text:p>
          </table:table-cell>
          <table:table-cell table:style-name="TableRowCell" office:value-type="string">
    </table:table-cell>
          <table:table-cell table:style-name="TableRowCell" office:value-type="string">
            <text:p text:style-name="Table_20_Contents">MC68901</text:p>
          </table:table-cell>
          <table:table-cell table:style-name="TableRowCell" office:value-type="string">
            <text:p text:style-name="Table_20_Contents">Multifunction peripheral</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Keyboard data reception, various interrupt control, etc.</text:p>
          </table:table-cell>
          <table:table-cell table:style-name="TableRowCell" office:value-type="string">
    </table:table-cell>
        </table:table-row>
        <table:table-row>
          <table:table-cell table:style-name="TableRowCell" office:value-type="string">
            <text:p text:style-name="Table_20_Contents">SCC</text:p>
          </table:table-cell>
          <table:table-cell table:style-name="TableRowCell" office:value-type="string">
    </table:table-cell>
          <table:table-cell table:style-name="TableRowCell" office:value-type="string">
            <text:p text:style-name="Table_20_Contents">Z8530</text:p>
          </table:table-cell>
          <table:table-cell table:style-name="TableRowCell" office:value-type="string">
            <text:p text:style-name="Table_20_Contents">Serial communication controlle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ual-channel serial (RS-232C, mouse)</text:p>
          </table:table-cell>
          <table:table-cell table:style-name="TableRowCell" office:value-type="string">
    </table:table-cell>
        </table:table-row>
        <table:table-row>
          <table:table-cell table:style-name="TableRowCell" office:value-type="string">
            <text:p text:style-name="Table_20_Contents">RTC</text:p>
          </table:table-cell>
          <table:table-cell table:style-name="TableRowCell" office:value-type="string">
    </table:table-cell>
          <table:table-cell table:style-name="TableRowCell" office:value-type="string">
            <text:p text:style-name="Table_20_Contents">RP5C15</text:p>
          </table:table-cell>
          <table:table-cell table:style-name="TableRowCell" office:value-type="string">
            <text:p text:style-name="Table_20_Contents">Real-time clock</text:p>
          </table:table-cell>
          <table:table-cell table:style-name="TableRowCell" office:value-type="string">
    </table:table-cell>
        </table:table-row>
        <table:table-row>
          <table:table-cell table:style-name="TableRowCell" office:value-type="string">
            <text:p text:style-name="Table_20_Contents">FDC</text:p>
          </table:table-cell>
          <table:table-cell table:style-name="TableRowCell" office:value-type="string">
    </table:table-cell>
          <table:table-cell table:style-name="TableRowCell" office:value-type="string">
            <text:p text:style-name="Table_20_Contents">µPD72065</text:p>
          </table:table-cell>
          <table:table-cell table:style-name="TableRowCell" office:value-type="string">
            <text:p text:style-name="Table_20_Contents">Internal 5" 2HD floppy disk drive control</text:p>
          </table:table-cell>
          <table:table-cell table:style-name="TableRowCell" office:value-type="string">
    </table:table-cell>
        </table:table-row>
        <table:table-row>
          <table:table-cell table:style-name="TableRowCell" office:value-type="string">
            <text:p text:style-name="Table_20_Contents">CRTC</text:p>
          </table:table-cell>
          <table:table-cell table:style-name="TableRowCell" office:value-type="string">
            <text:p text:style-name="Table_20_Contents">Peripheral LSI</text:p>
          </table:table-cell>
          <table:table-cell table:style-name="TableRowCell" office:value-type="string">
    </table:table-cell>
          <table:table-cell table:style-name="TableRowCell" office:value-type="string">
            <text:p text:style-name="Table_20_Contents">Text, graphics control CRT controlle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ual port VRAM controller</text:p>
          </table:table-cell>
          <table:table-cell table:style-name="TableRowCell" office:value-type="string">
            <text:p text:style-name="Table_20_Contents">For Super-imposed image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creen scroll function</text:p>
          </table:table-cell>
          <table:table-cell table:style-name="TableRowCell" office:value-type="string">
            <text:p text:style-name="Table_20_Contents">Internal CRTC</text:p>
          </table:table-cell>
        </table:table-row>
        <table:table-row>
          <table:table-cell table:style-name="TableRowCell" office:value-type="string">
            <text:p text:style-name="Table_20_Contents">Sprite LSI</text:p>
          </table:table-cell>
          <table:table-cell table:style-name="TableRowCell" office:value-type="string">
            <text:p text:style-name="Table_20_Contents">(custom IC)</text:p>
          </table:table-cell>
          <table:table-cell table:style-name="TableRowCell" office:value-type="string">
    </table:table-cell>
          <table:table-cell table:style-name="TableRowCell" office:value-type="string">
            <text:p text:style-name="Table_20_Contents">Sprite function</text:p>
          </table:table-cell>
          <table:table-cell table:style-name="TableRowCell" office:value-type="string">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custom IC)</text:p>
          </table:table-cell>
          <table:table-cell table:style-name="TableRowCell" office:value-type="string">
    </table:table-cell>
          <table:table-cell table:style-name="TableRowCell" office:value-type="string">
            <text:p text:style-name="Table_20_Contents">Palette prioritization function, special effects mode</text:p>
          </table:table-cell>
          <table:table-cell table:style-name="TableRowCell" office:value-type="string">
    </table:table-cell>
        </table:table-row>
        <table:table-row>
          <table:table-cell table:style-name="TableRowCell" office:value-type="string">
            <text:p text:style-name="Table_20_Contents">FM Sound Source</text:p>
          </table:table-cell>
          <table:table-cell table:style-name="TableRowCell" office:value-type="string">
            <text:p text:style-name="Table_20_Contents">(custom IC)</text:p>
          </table:table-cell>
          <table:table-cell table:style-name="TableRowCell" office:value-type="string">
            <text:p text:style-name="Table_20_Contents">YM2151</text:p>
          </table:table-cell>
          <table:table-cell table:style-name="TableRowCell" office:value-type="string">
            <text:p text:style-name="Table_20_Contents">8-channel FM sound source playback</text:p>
          </table:table-cell>
          <table:table-cell table:style-name="TableRowCell" office:value-type="string">
            <text:p text:style-name="Table_20_Contents">2 channels, 8 octaves</text:p>
          </table:table-cell>
        </table:table-row>
        <table:table-row>
          <table:table-cell table:style-name="TableRowCell" office:value-type="string">
            <text:p text:style-name="Table_20_Contents">Sound Synthesis</text:p>
          </table:table-cell>
          <table:table-cell table:style-name="TableRowCell" office:value-type="string">
            <text:p text:style-name="Table_20_Contents">(custom IC)</text:p>
          </table:table-cell>
          <table:table-cell table:style-name="TableRowCell" office:value-type="string">
            <text:p text:style-name="Table_20_Contents">MSM6258</text:p>
          </table:table-cell>
          <table:table-cell table:style-name="TableRowCell" office:value-type="string">
            <text:p text:style-name="Table_20_Contents">Adaptive Differential PCM</text:p>
          </table:table-cell>
          <table:table-cell table:style-name="TableRowCell" office:value-type="string">
    </table:table-cell>
        </table:table-row>
        <table:table-row>
          <table:table-cell table:style-name="TableRowCell" office:value-type="string">
            <text:p text:style-name="Table_20_Contents">PPI</text:p>
          </table:table-cell>
          <table:table-cell table:style-name="TableRowCell" office:value-type="string">
    </table:table-cell>
          <table:table-cell table:style-name="TableRowCell" office:value-type="string">
            <text:p text:style-name="Table_20_Contents">µPD8255</text:p>
          </table:table-cell>
          <table:table-cell table:style-name="TableRowCell" office:value-type="string">
            <text:p text:style-name="Table_20_Contents">Joystick 2 port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ound synthesis switching control</text:p>
          </table:table-cell>
          <table:table-cell table:style-name="TableRowCell" office:value-type="string">
    </table:table-cell>
        </table:table-row>
        <table:table-row>
          <table:table-cell table:style-name="TableRowCell" office:value-type="string">
            <text:p text:style-name="Table_20_Contents">I/O Control</text:p>
          </table:table-cell>
          <table:table-cell table:style-name="TableRowCell" office:value-type="string">
            <text:p text:style-name="Table_20_Contents">(custom IC)</text:p>
          </table:table-cell>
          <table:table-cell table:style-name="TableRowCell" office:value-type="string">
    </table:table-cell>
          <table:table-cell table:style-name="TableRowCell" office:value-type="string">
            <text:p text:style-name="Table_20_Contents">Floppy disk, hard disk</text:p>
          </table:table-cell>
          <table:table-cell table:style-name="TableRowCell" office:value-type="string">
    </table:table-cell>
        </table:table-row>
        <table:table-row>
          <table:table-cell table:style-name="TableRowCell" office:value-type="string">
            <text:p text:style-name="Table_20_Contents">Others</text:p>
          </table:table-cell>
          <table:table-cell table:style-name="TableRowCell" office:value-type="string">
            <text:p text:style-name="Table_20_Contents">(custom IC)</text:p>
          </table:table-cell>
          <table:table-cell table:style-name="TableRowCell" office:value-type="string">
    </table:table-cell>
          <table:table-cell table:style-name="TableRowCell" office:value-type="string">
            <text:p text:style-name="Table_20_Contents">Memory controller, system controller</text:p>
          </table:table-cell>
          <table:table-cell table:style-name="TableRowCell" office:value-type="string">
    </table:table-cell>
        </table:table-row>
      </table:table>
      <text:p text:style-name="First_20_paragraph">Chapter 1: Overview of the System</text:p>
      <text:p text:style-name="Text_20_body">Item Category Name/Type Contents Notes</text:p>
      <text:p text:style-name="Text_20_body">ROM</text:p>
      <text:p text:style-name="Preformatted_20_Text"><text:s text:c="8"/>IPL ROM <text:s text:c="4"/>256 K bytes (IPL, BIOS, dictionary)</text:p>
      <text:p text:style-name="Preformatted_20_Text"><text:s text:c="8"/>CG ROM <text:s text:c="4"/>768 K bytes <text:s text:c="4"/></text:p>
      <text:p text:style-name="Preformatted_20_Text"><text:s text:c="20"/>16x16**8 double pixels, <text:s text:c="1"/>24x24**8 double pixels <text:s text:c="1"/>...... <text:s text:c="1"/>Full-width (JIS 1st and 2nd level)</text:p>
      <text:p text:style-name="Preformatted_20_Text"><text:s text:c="20"/>8x16 <text:s text:c="4"/>12x24 <text:s text:c="1"/>...... <text:s text:c="1"/>Half-width</text:p>
      <text:p text:style-name="Preformatted_20_Text"><text:s text:c="20"/>8x8 <text:s text:c="6"/>12x12 <text:s text:c="2"/>...... <text:s text:c="1"/>1/4 quarter-width</text:p>
      <text:p text:style-name="First_20_paragraph">Memory</text:p>
      <text:p text:style-name="Preformatted_20_Text"><text:s text:c="8"/>Main Memory <text:s text:c="1"/>1 M byte <text:s text:c="15"/>Expandable to 12 M bytes</text:p>
      <text:p text:style-name="Preformatted_20_Text"/>
      <text:p text:style-name="Preformatted_20_Text"><text:s text:c="8"/>Text VRAM <text:s text:c="2"/>512 K bytes</text:p>
      <text:p text:style-name="Preformatted_20_Text"><text:s text:c="8"/>VRAM <text:s text:c="7"/>Bitmap format (setting of left-to-right direction for data storage)</text:p>
      <text:p text:style-name="Preformatted_20_Text"><text:s text:c="20"/>1024x1024 dots <text:s text:c="1"/>4 planes <text:s text:c="42"/>Dual port DRAM adopted</text:p>
      <text:p text:style-name="Preformatted_20_Text"/>
      <text:p text:style-name="Preformatted_20_Text"><text:s text:c="8"/>Graphic <text:s text:c="8"/>512 K bytes</text:p>
      <text:p text:style-name="Preformatted_20_Text"><text:s text:c="8"/>VRAM <text:s text:c="7"/>Bitmap format (setting of left-to-right direction for data storage)</text:p>
      <text:p text:style-name="Preformatted_20_Text"><text:s text:c="20"/>1024x1024 dots <text:s text:c="1"/>4 planes</text:p>
      <text:p text:style-name="Preformatted_20_Text"><text:s text:c="20"/>(512x512 dots <text:s text:c="1"/>16 planes) <text:s text:c="42"/>Dual port DRAM adopted</text:p>
      <text:p text:style-name="Preformatted_20_Text"/>
      <text:p text:style-name="Preformatted_20_Text"><text:s text:c="8"/>Adapter VRAM <text:s text:c="2"/>32 K bytes</text:p>
      <text:p text:style-name="Preformatted_20_Text"><text:s text:c="8"/>SRAM <text:s text:c="7"/>16 K bytes</text:p>
      <text:p text:style-name="First_20_paragraph">Disk</text:p>
      <text:p text:style-name="Preformatted_20_Text"><text:s text:c="8"/>Built-in mini FDD <text:s text:c="2"/>5" double-sided high-density (2HD) 2 drives installed</text:p>
      <text:p text:style-name="Preformatted_20_Text"/>
      <text:p text:style-name="Preformatted_20_Text"><text:s text:c="8"/>4-slot FDD for triple-side (option) external FD drive</text:p>
      <text:p text:style-name="Preformatted_20_Text"><text:s text:c="8"/>interfex</text:p>
      <text:p text:style-name="Preformatted_20_Text"><text:s text:c="8"/>Hard Disk drive interfex for optional hard disk drive</text:p>
      <text:p text:style-name="Preformatted_20_Text"/>
      <text:p text:style-name="Preformatted_20_Text"><text:s text:c="8"/>Optional Hard Disk Drive <text:s text:c="2"/>CZ-500H, CZ-501H</text:p>
      <text:p text:style-name="Preformatted_20_Text"><text:s text:c="34"/>(10MB)</text:p>
      <text:p text:style-name="First_20_paragraph">Built-in I/O and other ports</text:p>
      <text:p text:style-name="Preformatted_20_Text"><text:s text:c="8"/>Keyboard Connector <text:s text:c="2"/>for dedicated keyboard</text:p>
      <text:p text:style-name="Preformatted_20_Text"/>
      <text:p text:style-name="Preformatted_20_Text"><text:s text:c="8"/>CRT Interface <text:s text:c="6"/>Analog RGB output</text:p>
      <text:p text:style-name="Preformatted_20_Text"><text:s text:c="68"/>15 pins</text:p>
      <text:p text:style-name="Preformatted_20_Text"/>
      <text:p text:style-name="Preformatted_20_Text"><text:s text:c="8"/>Television Control Connector <text:s text:c="1"/>for dedicated display <text:s text:c="3"/>8 pin DIN</text:p>
      <text:p text:style-name="Preformatted_20_Text"/>
      <text:p text:style-name="Preformatted_20_Text"><text:s text:c="8"/>RS-232C Interface <text:s text:c="4"/>1 channel RS-232C</text:p>
      <text:p text:style-name="Preformatted_20_Text"/>
      <text:p text:style-name="Preformatted_20_Text"><text:s text:c="8"/>Mouse Interface <text:s text:c="7"/>For attached Mouse and Trackball </text:p>
      <text:p text:style-name="Preformatted_20_Text"/>
      <text:p text:style-name="Preformatted_20_Text"><text:s text:c="8"/>Printer Interface <text:s text:c="8"/>Centronics Parallel Printer </text:p>
      <text:p text:style-name="Preformatted_20_Text"/>
      <text:p text:style-name="Preformatted_20_Text"><text:s text:c="8"/>Joystick Interface <text:s text:c="7"/>Atari Standard Interface (2 ports)</text:p>
      <text:p text:style-name="Preformatted_20_Text"><text:s text:c="8"/></text:p>
      <text:p text:style-name="Preformatted_20_Text"><text:s text:c="8"/>Audio Input/Output Connector <text:s text:c="2"/>Line Output, Headphone Output</text:p>
      <text:p text:style-name="Preformatted_20_Text"/>
      <text:p text:style-name="Preformatted_20_Text"><text:s text:c="8"/>Image Input Interface <text:s text:c="6"/>Available for SCSI interface</text:p>
      <text:p text:style-name="Preformatted_20_Text"/>
      <text:p text:style-name="Preformatted_20_Text"><text:s text:c="8"/>(Other connectors) <text:s text:c="1"/>Remote control, S-Video, 3D glasses, etc.</text:p>
      <text:p text:style-name="First_20_paragraph">Expansion I/O Slot 2 slots</text:p>
      <text:p text:style-name="Text_20_body">Table 1-1 Hardware Specifications</text:p>
      <text:p text:style-name="Text_20_body"/>
      <table:table table:name="Table2" table:style-name="Table2">
        <table:table-column table:style-name="Table2.A"/>
        <table:table-column table:style-name="Table2.B"/>
        <table:table-header-rows>
          <table:table-row>
            <table:table-cell table:style-name="TableHeaderRowCell" office:value-type="string">
              <text:p text:style-name="Table_20_Heading">Specification</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Rated Voltage</text:p>
          </table:table-cell>
          <table:table-cell table:style-name="TableRowCell" office:value-type="string">
            <text:p text:style-name="Table_20_Contents">AC100 V</text:p>
          </table:table-cell>
        </table:table-row>
        <table:table-row>
          <table:table-cell table:style-name="TableRowCell" office:value-type="string">
            <text:p text:style-name="Table_20_Contents">Rated Frequency</text:p>
          </table:table-cell>
          <table:table-cell table:style-name="TableRowCell" office:value-type="string">
            <text:p text:style-name="Table_20_Contents">50/60 Hz</text:p>
          </table:table-cell>
        </table:table-row>
        <table:table-row>
          <table:table-cell table:style-name="TableRowCell" office:value-type="string">
            <text:p text:style-name="Table_20_Contents">Power Consumption</text:p>
          </table:table-cell>
          <table:table-cell table:style-name="TableRowCell" office:value-type="string">
            <text:p text:style-name="Table_20_Contents">44 W (10 W or less in standby mode)</text:p>
          </table:table-cell>
        </table:table-row>
      </table:table>
      <text:p text:style-name="First_20_paragraph">Table 1-2 Hardware Specifications</text:p>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HeaderRowCell" office:value-type="string">
              <text:p text:style-name="Table_20_Heading">Item</text:p>
            </table:table-cell>
            <table:table-cell table:style-name="TableHeaderRowCell" office:value-type="string">
              <text:p text:style-name="Table_20_Heading">Type</text:p>
            </table:table-cell>
            <table:table-cell table:style-name="TableHeaderRowCell" office:value-type="string">
              <text:p text:style-name="Table_20_Heading">Name/Type</text:p>
            </table:table-cell>
            <table:table-cell table:style-name="TableHeaderRowCell" office:value-type="string">
              <text:p text:style-name="Table_20_Heading">Contents</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Display Size</text:p>
          </table:table-cell>
          <table:table-cell table:style-name="TableRowCell" office:value-type="string">
    </table:table-cell>
          <table:table-cell table:style-name="TableRowCell" office:value-type="string">
            <text:p text:style-name="Table_20_Contents">Text Screen</text:p>
          </table:table-cell>
          <table:table-cell table:style-name="TableRowCell" office:value-type="string">
            <text:p text:style-name="Table_20_Contents">1024 x 1024 dots, 4 planes</text:p>
          </table:table-cell>
          <table:table-cell table:style-name="TableRowCell" office:value-type="string">
            <text:p text:style-name="Table_20_Contents">Bitmap format</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Graphic Screen</text:p>
          </table:table-cell>
          <table:table-cell table:style-name="TableRowCell" office:value-type="string">
            <text:p text:style-name="Table_20_Contents">1024 x 1024 dots, 4 planes (512 x 512 dots, 16 planes)</text:p>
          </table:table-cell>
          <table:table-cell table:style-name="TableRowCell" office:value-type="string">
            <text:p text:style-name="Table_20_Contents">Bitmap format</text:p>
          </table:table-cell>
        </table:table-row>
        <table:table-row>
          <table:table-cell table:style-name="TableRowCell" office:value-type="string">
    </table:table-cell>
          <table:table-cell table:style-name="TableRowCell" office:value-type="string">
            <text:p text:style-name="Table_20_Contents">Text Screen</text:p>
          </table:table-cell>
          <table:table-cell table:style-name="TableRowCell" office:value-type="string">
    </table:table-cell>
          <table:table-cell table:style-name="TableRowCell" office:value-type="string">
            <text:p text:style-name="Table_20_Contents">High resolution mode</text:p>
          </table:table-cell>
          <table:table-cell table:style-name="TableRowCell" office:value-type="string">
            <text:p text:style-name="Table_20_Contents">768 x 512 dot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512</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edium resolution mode 1</text:p>
          </table:table-cell>
          <table:table-cell table:style-name="TableRowCell" office:value-type="string">
            <text:p text:style-name="Table_20_Contents">512 x 256 (2 page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edium resolution mode 2</text:p>
          </table:table-cell>
          <table:table-cell table:style-name="TableRowCell" office:value-type="string">
            <text:p text:style-name="Table_20_Contents">256 x 256 (4 pages)</text:p>
          </table:table-cell>
        </table:table-row>
        <table:table-row>
          <table:table-cell table:style-name="TableRowCell" office:value-type="string">
    </table:table-cell>
          <table:table-cell table:style-name="TableRowCell" office:value-type="string">
            <text:p text:style-name="Table_20_Contents">Graphic Screen</text:p>
          </table:table-cell>
          <table:table-cell table:style-name="TableRowCell" office:value-type="string">
    </table:table-cell>
          <table:table-cell table:style-name="TableRowCell" office:value-type="string">
            <text:p text:style-name="Table_20_Contents">High resolution mode</text:p>
          </table:table-cell>
          <table:table-cell table:style-name="TableRowCell" office:value-type="string">
            <text:p text:style-name="Table_20_Contents">768 x 512 dots 512 x 512</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edium resolution mode 1</text:p>
          </table:table-cell>
          <table:table-cell table:style-name="TableRowCell" office:value-type="string">
            <text:p text:style-name="Table_20_Contents">512 x 256 (2 page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edium resolution mode 2</text:p>
          </table:table-cell>
          <table:table-cell table:style-name="TableRowCell" office:value-type="string">
            <text:p text:style-name="Table_20_Contents">256 x 256 (4 pages)</text:p>
          </table:table-cell>
        </table:table-row>
        <table:table-row>
          <table:table-cell table:style-name="TableRowCell" office:value-type="string">
            <text:p text:style-name="Table_20_Contents">Display Mode</text:p>
          </table:table-cell>
          <table:table-cell table:style-name="TableRowCell" office:value-type="string">
    </table:table-cell>
          <table:table-cell table:style-name="TableRowCell" office:value-type="string">
            <text:p text:style-name="Table_20_Contents">Text Screen</text:p>
          </table:table-cell>
          <table:table-cell table:style-name="TableRowCell" office:value-type="string">
            <text:p text:style-name="Table_20_Contents">1024 x 1024</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Brightness</text:p>
          </table:table-cell>
          <table:table-cell table:style-name="TableRowCell" office:value-type="string">
            <text:p text:style-name="Table_20_Contents">High Resolution: 31.5 kHz Low Resolution: 15.98 kHz</text:p>
          </table:table-cell>
          <table:table-cell table:style-name="TableRowCell" office:value-type="string">
            <text:p text:style-name="Table_20_Contents">high resolution mode: 1024x1024 dots medium resolution mode: 512x512 dots (bitmap format)</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Color Depth</text:p>
          </table:table-cell>
          <table:table-cell table:style-name="TableRowCell" office:value-type="string">
            <text:p text:style-name="Table_20_Contents">High resolution: 31.5 kHz Low resolution: 15.98 kHz</text:p>
          </table:table-cell>
          <table:table-cell table:style-name="TableRowCell" office:value-type="string">
            <text:p text:style-name="Table_20_Contents">Per dot: up to 65536 colors from a palette 256 colors displayed</text:p>
          </table:table-cell>
        </table:table-row>
        <table:table-row>
          <table:table-cell table:style-name="TableRowCell" office:value-type="string">
            <text:p text:style-name="Table_20_Contents">Graphics Screen</text:p>
          </table:table-cell>
          <table:table-cell table:style-name="TableRowCell" office:value-type="string">
    </table:table-cell>
          <table:table-cell table:style-name="TableRowCell" office:value-type="string">
    </table:table-cell>
          <table:table-cell table:style-name="TableRowCell" office:value-type="string">
            <text:p text:style-name="Table_20_Contents">High resolution mode</text:p>
          </table:table-cell>
          <table:table-cell table:style-name="TableRowCell" office:value-type="string">
            <text:p text:style-name="Table_20_Contents">512 x 512 dot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edium resolution mode 1</text:p>
          </table:table-cell>
          <table:table-cell table:style-name="TableRowCell" office:value-type="string">
            <text:p text:style-name="Table_20_Contents">512 x 256 (2 page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edium resolution mode 2</text:p>
          </table:table-cell>
          <table:table-cell table:style-name="TableRowCell" office:value-type="string">
            <text:p text:style-name="Table_20_Contents">256 x 256 (4 pages)</text:p>
          </table:table-cell>
        </table:table-row>
        <table:table-row>
          <table:table-cell table:style-name="TableRowCell" office:value-type="string">
    </table:table-cell>
          <table:table-cell table:style-name="TableRowCell" office:value-type="string">
            <text:p text:style-name="Table_20_Contents">Raster Mode</text:p>
          </table:table-cell>
          <table:table-cell table:style-name="TableRowCell" office:value-type="string">
    </table:table-cell>
          <table:table-cell table:style-name="TableRowCell" office:value-type="string">
            <text:p text:style-name="Table_20_Contents">High resolution mode</text:p>
          </table:table-cell>
          <table:table-cell table:style-name="TableRowCell" office:value-type="string">
            <text:p text:style-name="Table_20_Contents">512 x 512 dot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edium resolution mode 1</text:p>
          </table:table-cell>
          <table:table-cell table:style-name="TableRowCell" office:value-type="string">
            <text:p text:style-name="Table_20_Contents">512 x 256 (2 page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edium resolution mode 2</text:p>
          </table:table-cell>
          <table:table-cell table:style-name="TableRowCell" office:value-type="string">
            <text:p text:style-name="Table_20_Contents">256 x 256 (4 pages)</text:p>
          </table:table-cell>
        </table:table-row>
      </table:table>
      <text:p text:style-name="First_20_paragraph">Chapter 1 System Overview</text:p>
      <text:p text:style-name="Text_20_body">Styles</text:p>
      <text:p text:style-name="Text_20_body">Pattern Definition</text:p>
      <text:p text:style-name="Text_20_body">Size: 16x16 dot/pattern Number of Patterns: 128 patterns (BG0.1 unused: maximum 256) Colors: 1 pattern can use 16 colors out of 65536 colors (dot units) Entire screen: 256 colors out of 65536 colors</text:p>
      <text:p text:style-name="Text_20_body">Display Resolution: 1024 x 1024 dots Display Area: Horizontal 512 dots or 256 dots / Vertical 512 lines or 256 lines Display Ability: 128 sprites / screen 32 sprites / line</text:p>
      <text:p text:style-name="Text_20_body">Table 1-3 X68000 Capabilities</text:p>
      <text:p text:style-name="Text_20_body">Category</text:p>
      <text:p text:style-name="Text_20_body">Content</text:p>
      <text:p text:style-name="Text_20_body">Smooth Scroll Function Text screen has dot unit longitudinal scroll, graphics screen has dot unit lateral scroll</text:p>
      <text:p text:style-name="Text_20_body">Special Screen Capabilities: Graphic VRAM image input function, text raster copy function, higher bit text clear, text and bitmap mask function Priority Function: Text, graphic, and sprite can be designated in priority. 2 out of 4 screens are available in graphic extending over 512x512 dot mode, and you can designate any one priority among texts. Palette Function: Possible to exchange any color to any other color freely Semi-Transparent Display: Semi-transparent color display</text:p>
      <text:p text:style-name="Text_20_body">Special Priority Function:</text:p>
      <text:p text:style-name="Text_20_body">Function allowing heightened priority of a certain area of the graphics screen in the display area Super Interpose Function: Even in high mode super scan, super interpose is possible (supports interlace method and pseudo resolution mode)</text:p>
      <text:p text:style-name="Text_20_body">Table 1-4 X68000 Functions</text:p>
      <text:p text:style-name="Text_20_body">Page 6</text:p>
      <text:p text:style-name="Text_20_body">Title: 3. Block Diagram</text:p>
      <text:p text:style-name="Text_20_body">Note: Figure 3.1 Block Diagram</text:p>
      <text:p text:style-name="Text_20_body">Top left: Chapter 1 System Overview</text:p>
      <text:p text:style-name="Text_20_body">Heading: 4. Memory Map</text:p>
      <text:p text:style-name="Text_20_body">Labels on the map: SUPERVISOR AREA USER AREA Address pointer is in 8-byte units (2^32) MAIN MEMORY (USER AREA) GRAPHIC VRAM (16 color mode) GRAPHIC VRAM (256 color mode) (65536 color mode) TEXT VRAM SYSTEM I/O MEMORY SW (RAM) CG ROM (768 KB) IPL ROM I/O AREA (SUPERVISOR AREA) SYSTEM I/O (SUPERVISOR AREA) USER I/O (USER AREA) MEMORY SW (RAM) RAM ON BOARD (empty) (empty) (empty) CRTC VIDEO DMAC AREA SET MFP KCC PRINTER SYS. PORT FM SOUND Voice synthesis FD HD SCC INT1 SPRITE REGISTER SPRITE VRAM</text:p>
      <text:p text:style-name="Text_20_body">Address column (right side): E80000H E82000H E84000H E86000H E88000H E8A000H E8C000H E8E000H E90000H E92000H E94000H E96000H E98000H E9A000H E9C000H E9E000H EA0000H EB0000H EB8000H EBFFFFH</text:p>
      <text:p text:style-name="Text_20_body">Bottom right: Figure 1-2 Memory Map</text:p>
      <text:p text:style-name="Text_20_body"><text:span text:style-name="Strong_20_Emphasis">Chapter 2</text:span> <text:span text:style-name="Strong_20_Emphasis">Screen Control</text:span></text:p>
      <text:p text:style-name="Text_20_body">The X68000 has three independent screens: text, graphic, and sprite. The text screen and graphics screen are controlled by the CRTC, and the sprite screen is controlled by the sprite controller. The priority functions for the three screens, semi-transparency, special priority functions, palette functions per screen, and screen display functions are controlled by the video controller.</text:p>
      <text:p text:style-name="Text_20_body">However, regardless of whether you use the CRTC, sprite controller, or video controller, be sure to set up the screen when you access it.</text:p>
      <text:p text:style-name="Text_20_body">Figure 2-1 Screen Control Block Diagram</text:p>
      <text:list text:style-name="Pandoc_5f_Numbering_5f_1">
        <text:list-item>
          <text:p text:style-name="List_20_Number_20_Tight">Text Screen (Bitmap Method) The text screen displays text such as alphanumeric characters (ANK: alphanumeric-KANA) and kanji. Similar to the graphical screen of the X1 and X1turbo series, the settings are done horizontally. Scrolling on the text screen is circular scrolling. The display mode supports high resolution (horizontal sync frequency 31.5 kHz) and standard resolution (horizontal sync frequency 15.98 kHz).</text:p>
        </text:list-item>
      </text:list>
      <text:p text:style-name="First_20_paragraph">Chapter 2 Screen Control</text:p>
      <text:p text:style-name="Text_20_body">Figure 2-2 Text Screen</text:p>
      <text:list text:style-name="Pandoc_5f_Numbering_5f_1" text:start-value="2">
        <text:list-item>
          <text:p text:style-name="List_20_Number_20_Tight">Graphic Screen This is the screen for performing graphic processing such as drawing lines and circles and painting. The settings will be oriented in the depth direction.</text:p>
        </text:list-item>
      </text:list>
      <text:p text:style-name="First_20_paragraph">The scroll on the graphics screen is a spherical surface scroll.</text:p>
      <text:p text:style-name="Text_20_body">As a display screen mode, it supports high resolution (horizontal synchronization frequency 31.5 kHz) and standard resolution (horizontal synchronization frequency 15.98 kHz).</text:p>
      <text:p text:style-name="Text_20_body">Figure 2-3 Graphic Screen</text:p>
      <text:list text:style-name="Pandoc_5f_Numbering_5f_1" text:start-value="3">
        <text:list-item>
          <text:p text:style-name="List_20_Number_20_Tight">Sprite Screen This is the screen for moving sprite patterns smoothly dot by dot, as used in Famicom or MSX.</text:p>
        </text:list-item>
      </text:list>
      <text:p text:style-name="First_20_paragraph">As a display screen mode, it supports high resolution (horizontal synchronization frequency 31.5 kHz) and standard resolution (horizontal synchronization frequency 15.98 kHz).</text:p>
      <text:p text:style-name="Text_20_body">Page 10</text:p>
      <text:list text:style-name="Numbering_20_1">
        <text:list-item>
          <text:p text:style-name="List_20_Number_20_Tight">Composition of the Text Screen</text:p>
        </text:list-item>
      </text:list>
      <text:p text:style-name="First_20_paragraph">1-1 Display Screen Structure</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HeaderRowCell" office:value-type="string">
              <text:p text:style-name="Table_20_Heading">Actual Screen (H×V)</text:p>
            </table:table-cell>
            <table:table-cell table:style-name="TableHeaderRowCell" office:value-type="string">
              <text:p text:style-name="Table_20_Heading">Simultaneous Display Colors (Palette Colors)</text:p>
            </table:table-cell>
            <table:table-cell table:style-name="TableHeaderRowCell" office:value-type="string">
              <text:p text:style-name="Table_20_Heading">Number of Simultaneous Display Screens (Overlapping Screens)</text:p>
            </table:table-cell>
            <table:table-cell table:style-name="TableHeaderRowCell" office:value-type="string">
              <text:p text:style-name="Table_20_Heading">Display Screen (H×V)</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1024×1024</text:p>
          </table:table-cell>
          <table:table-cell table:style-name="TableRowCell" office:value-type="string">
            <text:p text:style-name="Table_20_Contents">16 (65536)</text:p>
          </table:table-cell>
          <table:table-cell table:style-name="TableRowCell" office:value-type="string">
            <text:p text:style-name="Table_20_Contents">1</text:p>
          </table:table-cell>
          <table:table-cell table:style-name="TableRowCell" office:value-type="string">
            <text:p text:style-name="Table_20_Contents">High-Resolution Mode</text:p>
          </table:table-cell>
          <table:table-cell table:style-name="TableRowCell" office:value-type="string">
            <text:p text:style-name="Table_20_Contents">768×512 512×512 512×256 256×256</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tandard Resolution Mode (Over Scan)</text:p>
          </table:table-cell>
          <table:table-cell table:style-name="TableRowCell" office:value-type="string">
            <text:p text:style-name="Table_20_Contents">512×512 512×256 256×256</text:p>
          </table:table-cell>
        </table:table-row>
      </table:table>
      <text:p text:style-name="First_20_paragraph">Table 2-1. Composition of Display Screen</text:p>
      <text:p text:style-name="Text_20_body">1-2 Memory Map of VRAM for Text</text:p>
      <text:p text:style-name="Text_20_body">MSB 16-bit LSB</text:p>
      <text:p text:style-name="Text_20_body">| E00000H | | T0 Plane | | E1FFF0H | | | | E20000H | | T1 Plane | | E3FFF0H | | | | E40000H | | T2 Plane | | E5FFF0H | | | | E60000H | | T3 Plane | | E7FFF0H | | |</text:p>
      <text:p text:style-name="Text_20_body">Figure 2-4. Memory Map of VRAM for Text</text:p>
      <text:p text:style-name="Text_20_body"><text:span text:style-name="Strong_20_Emphasis">Chapter 2: Screen Control</text:span></text:p>
      <text:p text:style-name="Text_20_body">1-3 Text Real Screen Address Layout</text:p>
      <text:p text:style-name="Text_20_body"><text:span text:style-name="Strong_20_Emphasis">16-Bit</text:span></text:p>
      <text:p text:style-name="Text_20_body">T3 Plane</text:p>
      <text:p text:style-name="Text_20_body">T2 Plane</text:p>
      <text:p text:style-name="Text_20_body">T1 Plane</text:p>
      <text:p text:style-name="Text_20_body">T0 Plane</text:p>
      <text:p text:style-name="Text_20_body">Text Palette Address for each Bit</text:p>
      <text:p text:style-name="Text_20_body"><text:span text:style-name="Strong_20_Emphasis">Figure 2-5</text:span> Text Real Screen Address Layout</text:p>
      <text:p text:style-name="Text_20_body">1-4 Text Palette Address</text:p>
      <text:p text:style-name="Text_20_body">[READ/WRITE Permissibl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header-rows>
          <table:table-row>
            <table:table-cell table:style-name="TableHeaderRowCell" office:value-type="string">
              <text:p text:style-name="Table_20_Heading">Palette Address</text:p>
            </table:table-cell>
            <table:table-cell table:style-name="TableHeaderRowCell" office:value-type="string">
              <text:p text:style-name="Table_20_Heading">Register Address</text:p>
            </table:table-cell>
            <table:table-cell table:style-name="TableHeaderRowCell" office:value-type="string">
              <text:p text:style-name="Table_20_Heading">D15-D11</text:p>
            </table:table-cell>
            <table:table-cell table:style-name="TableHeaderRowCell" office:value-type="string">
              <text:p text:style-name="Table_20_Heading">D10-D06</text:p>
            </table:table-cell>
            <table:table-cell table:style-name="TableHeaderRowCell" office:value-type="string">
              <text:p text:style-name="Table_20_Heading">D05-D01</text:p>
            </table:table-cell>
            <table:table-cell table:style-name="TableHeaderRowCell" office:value-type="string">
              <text:p text:style-name="Table_20_Heading">D0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00H</text:p>
          </table:table-cell>
          <table:table-cell table:style-name="TableRowCell" office:value-type="string">
            <text:p text:style-name="Table_20_Contents">E82200H</text:p>
          </table:table-cell>
          <table:table-cell table:style-name="TableRowCell" office:value-type="string">
            <text:p text:style-name="Table_20_Contents">Green</text:p>
          </table:table-cell>
          <table:table-cell table:style-name="TableRowCell" office:value-type="string">
            <text:p text:style-name="Table_20_Contents">Red</text:p>
          </table:table-cell>
          <table:table-cell table:style-name="TableRowCell" office:value-type="string">
            <text:p text:style-name="Table_20_Contents">Blue</text:p>
          </table:table-cell>
          <table:table-cell table:style-name="TableRowCell" office:value-type="string">
            <text:p text:style-name="Table_20_Contents">I</text:p>
          </table:table-cell>
          <table:table-cell table:style-name="TableRowCell" office:value-type="string">
    </table:table-cell>
        </table:table-row>
        <table:table-row>
          <table:table-cell table:style-name="TableRowCell" office:value-type="string">
            <text:p text:style-name="Table_20_Contents">01H</text:p>
          </table:table-cell>
          <table:table-cell table:style-name="TableRowCell" office:value-type="string">
            <text:p text:style-name="Table_20_Contents">E82202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2H</text:p>
          </table:table-cell>
          <table:table-cell table:style-name="TableRowCell" office:value-type="string">
            <text:p text:style-name="Table_20_Contents">E82204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3H</text:p>
          </table:table-cell>
          <table:table-cell table:style-name="TableRowCell" office:value-type="string">
            <text:p text:style-name="Table_20_Contents">E82206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CH</text:p>
          </table:table-cell>
          <table:table-cell table:style-name="TableRowCell" office:value-type="string">
            <text:p text:style-name="Table_20_Contents">E82218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DH</text:p>
          </table:table-cell>
          <table:table-cell table:style-name="TableRowCell" office:value-type="string">
            <text:p text:style-name="Table_20_Contents">E8221A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EH</text:p>
          </table:table-cell>
          <table:table-cell table:style-name="TableRowCell" office:value-type="string">
            <text:p text:style-name="Table_20_Contents">E8221C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FH</text:p>
          </table:table-cell>
          <table:table-cell table:style-name="TableRowCell" office:value-type="string">
            <text:p text:style-name="Table_20_Contents">E8221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able 2-2 Text Palette Address</text:p>
      <text:p text:style-name="Text_20_body">However, this palette address is intended to be used in conjunction with sprite color 0.</text:p>
      <text:p text:style-name="Text_20_body">For example, suppose the text VRAM memory data is:</text:p>
      <text:p text:style-name="Preformatted_20_Text">E00000H = "0000H"</text:p>
      <text:p text:style-name="Preformatted_20_Text">E20000H = "0021H"</text:p>
      <text:p text:style-name="Preformatted_20_Text">E40000H = "0022H"</text:p>
      <text:p text:style-name="Preformatted_20_Text">E60000H = "0023H"</text:p>
      <text:p text:style-name="First_20_paragraph">In this case, the palette address for the D01 bit (horizontal 14 dots, vertical 0 lines) would be 0EH. As per Table 2-2, that palette address is E8221CH, so the palette data output will be the content of E8221CH.</text:p>
      <text:p text:style-name="Text_20_body">※ For the palette address 00H, please enter "0000H" as a rule.</text:p>
      <text:p text:style-name="Text_20_body">Page 13</text:p>
      <text:p text:style-name="Text_20_body">Chapter 2: Screen Control</text:p>
      <text:list text:style-name="Numbering_20_1" text:start-value="2">
        <text:list-item>
          <text:p text:style-name="List_20_Number_20_Tight">Graphic Screen Composition</text:p>
        </text:list-item>
      </text:list>
      <text:p text:style-name="First_20_paragraph">2-1 Composition of Display Scree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HeaderRowCell" office:value-type="string">
              <text:p text:style-name="Table_20_Heading">Actual Screen (H x V)</text:p>
            </table:table-cell>
            <table:table-cell table:style-name="TableHeaderRowCell" office:value-type="string">
              <text:p text:style-name="Table_20_Heading">Simultaneous Display Colors (Palette Colors)</text:p>
            </table:table-cell>
            <table:table-cell table:style-name="TableHeaderRowCell" office:value-type="string">
              <text:p text:style-name="Table_20_Heading">Simultaneous Display Areas (Combined Areas)</text:p>
            </table:table-cell>
            <table:table-cell table:style-name="TableHeaderRowCell" office:value-type="string">
              <text:p text:style-name="Table_20_Heading">Display Areas (H x V)</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024 x 1024</text:p>
          </table:table-cell>
          <table:table-cell table:style-name="TableRowCell" office:value-type="string">
    </table:table-cell>
          <table:table-cell table:style-name="TableRowCell" office:value-type="string">
            <text:p text:style-name="Table_20_Contents">1</text:p>
          </table:table-cell>
          <table:table-cell table:style-name="TableRowCell" office:value-type="string">
            <text:p text:style-name="Table_20_Contents">High Resolution Mod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16 (65536)</text:p>
          </table:table-cell>
          <table:table-cell table:style-name="TableRowCell" office:value-type="string">
    </table:table-cell>
          <table:table-cell table:style-name="TableRowCell" office:value-type="string">
            <text:p text:style-name="Table_20_Contents">768 x 512</text:p>
          </table:table-cell>
          <table:table-cell table:style-name="TableRowCell" office:value-type="string">
            <text:p text:style-name="Table_20_Contents">2 x overlap</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512</text:p>
          </table:table-cell>
          <table:table-cell table:style-name="TableRowCell" office:value-type="string">
            <text:p text:style-name="Table_20_Contents">2 x overlap</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256</text:p>
          </table:table-cell>
          <table:table-cell table:style-name="TableRowCell" office:value-type="string">
            <text:p text:style-name="Table_20_Contents">2 x overlap</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256 x 256</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Horizontal High Resolution Mode (OverScan)</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512</text:p>
          </table:table-cell>
          <table:table-cell table:style-name="TableRowCell" office:value-type="string">
            <text:p text:style-name="Table_20_Contents">* Ne/Sw</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256</text:p>
          </table:table-cell>
          <table:table-cell table:style-name="TableRowCell" office:value-type="string">
            <text:p text:style-name="Table_20_Contents">Ne/Sw</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256 x 256</text:p>
          </table:table-cell>
          <table:table-cell table:style-name="TableRowCell" office:value-type="string">
            <text:p text:style-name="Table_20_Contents">overlap</text:p>
          </table:table-cell>
        </table:table-row>
        <table:table-row>
          <table:table-cell table:style-name="TableRowCell" office:value-type="string">
            <text:p text:style-name="Table_20_Contents">512 x 512</text:p>
          </table:table-cell>
          <table:table-cell table:style-name="TableRowCell" office:value-type="string">
            <text:p text:style-name="Table_20_Contents">16 (65536)</text:p>
          </table:table-cell>
          <table:table-cell table:style-name="TableRowCell" office:value-type="string">
            <text:p text:style-name="Table_20_Contents">4</text:p>
          </table:table-cell>
          <table:table-cell table:style-name="TableRowCell" office:value-type="string">
            <text:p text:style-name="Table_20_Contents">High Resolution Mod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512</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256</text:p>
          </table:table-cell>
          <table:table-cell table:style-name="TableRowCell" office:value-type="string">
            <text:p text:style-name="Table_20_Contents">2 x overlap</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256 x 256</text:p>
          </table:table-cell>
          <table:table-cell table:style-name="TableRowCell" office:value-type="string">
            <text:p text:style-name="Table_20_Contents">2 x overlap</text:p>
          </table:table-cell>
        </table:table-row>
        <table:table-row>
          <table:table-cell table:style-name="TableRowCell" office:value-type="string">
            <text:p text:style-name="Table_20_Contents">256 x 256</text:p>
          </table:table-cell>
          <table:table-cell table:style-name="TableRowCell" office:value-type="string">
    </table:table-cell>
          <table:table-cell table:style-name="TableRowCell" office:value-type="string">
            <text:p text:style-name="Table_20_Contents">2</text:p>
          </table:table-cell>
          <table:table-cell table:style-name="TableRowCell" office:value-type="string">
            <text:p text:style-name="Table_20_Contents">Horizontal High Resolution Mode (OverSca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65536)</text:p>
          </table:table-cell>
          <table:table-cell table:style-name="TableRowCell" office:value-type="string">
    </table:table-cell>
          <table:table-cell table:style-name="TableRowCell" office:value-type="string">
            <text:p text:style-name="Table_20_Contents">512 x 512</text:p>
          </table:table-cell>
          <table:table-cell table:style-name="TableRowCell" office:value-type="string">
            <text:p text:style-name="Table_20_Contents">* Ne/Sw</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256</text:p>
          </table:table-cell>
          <table:table-cell table:style-name="TableRowCell" office:value-type="string">
            <text:p text:style-name="Table_20_Contents">Ne/Sw</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256 x 256</text:p>
          </table:table-cell>
          <table:table-cell table:style-name="TableRowCell" office:value-type="string">
            <text:p text:style-name="Table_20_Contents">overlap</text:p>
          </table:table-cell>
        </table:table-row>
        <table:table-row>
          <table:table-cell table:style-name="TableRowCell" office:value-type="string">
    </table:table-cell>
          <table:table-cell table:style-name="TableRowCell" office:value-type="string">
            <text:p text:style-name="Table_20_Contents">65536 (65536)</text:p>
          </table:table-cell>
          <table:table-cell table:style-name="TableRowCell" office:value-type="string">
            <text:p text:style-name="Table_20_Contents">1</text:p>
          </table:table-cell>
          <table:table-cell table:style-name="TableRowCell" office:value-type="string">
    </table:table-cell>
          <table:table-cell table:style-name="TableRowCell" office:value-type="string">
            <text:p text:style-name="Table_20_Contents">512 x 512</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12 x 256</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256 x 256</text:p>
          </table:table-cell>
          <table:table-cell table:style-name="TableRowCell" office:value-type="string">
    </table:table-cell>
        </table:table-row>
      </table:table>
      <text:p text:style-name="First_20_paragraph">Table 2-3: Graphic Screen Composition</text:p>
      <text:p text:style-name="Text_20_body">2-2 Graphic VRAM Memory Map</text:p>
      <text:p text:style-name="Text_20_body">(1) Actual Screen 1024 x 1024, 16 colors, 1 face mode (* is invalid)</text:p>
      <text:p text:style-name="Text_20_body">MSB LSB (Address)<text:line-break/>D15 D14 D13 D12 D11 D10 D09 D08 D07 D06 D05 D04 D03 D02 D01 D00 C00000H G03 G02 G01 G00 (X0, Y0) C00002H G03 G02 G01 G00 (X0, Y1) ...<text:line-break/>DEFFFEH G03 G02 G01 G00 (X1023, Y1023)</text:p>
      <text:p text:style-name="Text_20_body">Graphic Layout Map</text:p>
      <text:p text:style-name="Text_20_body">Page 14</text:p>
      <text:list text:style-name="Numbering_20_1" text:start-value="2">
        <text:list-item>
          <text:p text:style-name="List_20_Number_20_Tight">Graphic Screen Configuration</text:p>
        </text:list-item>
      </text:list>
      <text:p text:style-name="First_20_paragraph">(2) Screen Area 512×512, 16 colors, 4 screen mode (* is invalid)</text:p>
      <text:p text:style-name="Text_20_body">MSB LSB</text:p>
      <text:p text:style-name="Text_20_body">(Genesis)</text:p>
      <text:p text:style-name="Text_20_body">SC0 (Screen 0)</text:p>
      <text:p text:style-name="Text_20_body">SC1 (Screen 1)</text:p>
      <text:p text:style-name="Text_20_body">SC2 (Screen 2)</text:p>
      <text:p text:style-name="Text_20_body">SC3 (Screen 3)</text:p>
      <text:p text:style-name="Text_20_body">G03 G02 G01 G00</text:p>
      <text:p text:style-name="Text_20_body">(X0, Y0)</text:p>
      <text:p text:style-name="Text_20_body">(X512, Y512)</text:p>
      <text:p text:style-name="Text_20_body">(X0, Y0)</text:p>
      <text:p text:style-name="Text_20_body">(X512, Y512)</text:p>
      <text:p text:style-name="Text_20_body">(X0, Y0)</text:p>
      <text:p text:style-name="Text_20_body">(X512, Y512)</text:p>
      <text:p text:style-name="Text_20_body">G03 G02 G01 G00</text:p>
      <text:p text:style-name="Text_20_body">(X512, Y512)</text:p>
      <text:p text:style-name="Text_20_body">Graphic Address</text:p>
      <text:p text:style-name="Text_20_body">Chapter 2 Screen Control</text:p>
      <text:p text:style-name="Text_20_body">(3) Actual Screen 512×512, 256 Colors, 2 Screen Mode (* is invalid) (Note: D represents a data bit)</text:p>
      <text:p text:style-name="Text_20_body">MSB LSB</text:p>
      <text:p text:style-name="Preformatted_20_Text"><text:s text:c="6"/>+-----------+-----------+-----------+-----------+-----------+</text:p>
      <text:p text:style-name="Preformatted_20_Text"><text:s text:c="6"/>| <text:s text:c="3"/>D15 <text:s text:c="3"/>| <text:s text:c="3"/>D14 <text:s text:c="3"/>| <text:s text:c="3"/>D13 <text:s text:c="3"/>| <text:s text:c="3"/>D12 <text:s text:c="3"/>| <text:s text:c="3"/>D11 <text:s text:c="3"/>|</text:p>
      <text:p text:style-name="Preformatted_20_Text"><text:s text:c="6"/>+-----------+-----------+-----------+-----------+-----------+</text:p>
      <text:p text:style-name="First_20_paragraph">C0000H| .... * * * * * * * * | G07 G06 G05 G04 G03 G02 G01 G00| (X0,Y0) +-----------+-----------+-----------+-----------+-----------+ C7FFEH| .... * * * * * * * * | G07 G06 G05 G04 G03 G02 G01 G00| (X512, Y512) +-----------+-----------+-----------+-----------+-----------+ C8000H| .... * * * * * * * * | G07 G06 G05 G04 G03 G02 G01 G00| (X0,Y0) +-----------+-----------+-----------+-----------+-----------+ CFFFFEH|.... * * * * * * * * | G07 G06 G05 G04 G03 G02 G01 G00| (X512, Y512)</text:p>
      <text:p text:style-name="Preformatted_20_Text"><text:s text:c="6"/>+-----------+-----------+-----------+-----------+-----------+</text:p>
      <text:p text:style-name="Preformatted_20_Text"><text:s text:c="7"/>Graphic Palette Address</text:p>
      <text:p text:style-name="First_20_paragraph">(4) Actual Screen 512×512, 65536 Colors, 1 Screen Mode (Note: D represents a data bit)</text:p>
      <text:p text:style-name="Text_20_body">MSB LSB</text:p>
      <text:p text:style-name="Preformatted_20_Text"><text:s text:c="6"/>+-----------+-----------+-----------+-----------+-----------+</text:p>
      <text:p text:style-name="Preformatted_20_Text"><text:s text:c="6"/>| <text:s text:c="3"/>D15 <text:s text:c="3"/>| <text:s text:c="3"/>D14 <text:s text:c="3"/>| <text:s text:c="3"/>D13 <text:s text:c="3"/>| <text:s text:c="3"/>D12 <text:s text:c="3"/>| <text:s text:c="3"/>D11 <text:s text:c="3"/>|</text:p>
      <text:p text:style-name="Preformatted_20_Text"><text:s text:c="6"/>+-----------+-----------+-----------+-----------+-----------+</text:p>
      <text:p text:style-name="First_20_paragraph">C00000H| G15 G14 G13 G12 G11 G10 G09 G08 G07 G06 G05 G04 G03 G02 G01 G00| (X0, Y0) +-----------+-----------+-----------+-----------+-----------+ C00002H| G15 G14 G13 G12 G11 G10 G09 G08 G07 G06 G05 G04 G03 G02 G01 G00| (X0, Y1) +-----------+-----------+-----------+-----------+-----------+ C7FFFEH|G15 G14 G13 G12 G11 G10 G09 G08 G07 G06 G05 G04 G03 G02 G01 G00| (X512, Y512)</text:p>
      <text:p text:style-name="Preformatted_20_Text"><text:s text:c="6"/>+-----------+-----------+-----------+-----------+-----------+</text:p>
      <text:p text:style-name="Preformatted_20_Text"><text:s text:c="7"/>Graphic Palette Address</text:p>
      <text:p text:style-name="First_20_paragraph">The characters <text:span text:style-name="Source_20_Text">* * * * * * * *</text:span> represent "wildcards" or placeholders for unspecified data bits.</text:p>
      <text:p text:style-name="Text_20_body">2-3 Address Mapping of Graphics Display Screen</text:p>
      <text:p text:style-name="Text_20_body">(1) 1024×1024 Dots (16 Color Mode)</text:p>
      <text:p text:style-name="Text_20_body">(Top diagram indicates various memory addresses and planes for different dots in a 1024×1024 graphics representation.)</text:p>
      <text:p text:style-name="Text_20_body">Figure 2-6 Address Mapping of Graphics Display Screen (1)</text:p>
      <text:p text:style-name="Text_20_body">(Left to right description) [Address] MSB 2M Bytes (1M Word) C00000H C00002H ... DFFFFEH</text:p>
      <text:p text:style-name="Text_20_body">(No care) G03 G02 G01 G00</text:p>
      <text:p text:style-name="Text_20_body">LSB [Coordinates on Screen] (x0, y0) (x1, y0) (x1023, y0) (x1023, y1023)</text:p>
      <text:p text:style-name="Text_20_body">Table 2-4 Memory Map</text:p>
      <text:p text:style-name="Text_20_body">Chapter 2 Screen Control</text:p>
      <text:p text:style-name="Text_20_body">(2) 512 x 512 Dots (16 Colors, 4-Plane Mode)</text:p>
      <text:p text:style-name="Text_20_body">Diagram labels: G03 G02 G01 G00 of SC.3 G03 G02 G01 G00 of SC.2 G03 G02 G01 G00 of SC.1 G03 G02 G01 G00 of SC.0 MSB 3 2 1 0 LSB</text:p>
      <text:p text:style-name="Text_20_body">SCREEN 0 SCREEN 1 SCREEN 2 SCREEN 3</text:p>
      <text:p text:style-name="Text_20_body">C00000 C00002 ... (G00 page) C00400 (G01 page) C3F000 C40000 (G02 page) C7FC00 C7FE00 (G03 page) C7FFFE</text:p>
      <text:p text:style-name="Text_20_body">D00000 (G00 page) D00002 (G01 page) D003FE (G02 page) (G03 page) DFFFFE</text:p>
      <text:p text:style-name="Preformatted_20_Text">512 dots</text:p>
      <text:p text:style-name="Preformatted_20_Text">512 dots</text:p>
      <text:p text:style-name="First_20_paragraph">+400H (=1024)</text:p>
      <text:p text:style-name="Text_20_body">Page B0 Page B1 B2 ... B15</text:p>
      <text:p text:style-name="Text_20_body">Figure 2-7 Graphics Actual Screen Address Configuration (2)</text:p>
      <text:p text:style-name="Text_20_body">[Address] MSB 15~4 3 2 1 0 LSB don't care G03 G02 G01 G00</text:p>
      <text:p text:style-name="Text_20_body">C00000H (512 bytes) C7FFFEH SC.0</text:p>
      <text:p text:style-name="Text_20_body">C80000H SC.1 CFFFFEH</text:p>
      <text:p text:style-name="Text_20_body">D00000H 2W bytes (1W word) D7FFFEH SC.2</text:p>
      <text:p text:style-name="Text_20_body">D80000H SC.3 DFFFFEH</text:p>
      <text:p text:style-name="Text_20_body">Table 2-5 Memory Map</text:p>
      <text:list text:style-name="Numbering_20_1" text:start-value="2">
        <text:list-item>
          <text:p text:style-name="List_20_Number_20_Tight">Graphic Screen Configuration</text:p>
        </text:list-item>
      </text:list>
      <text:p text:style-name="First_20_paragraph">(3) 512×512 Dots (256 Colors, 2-Screen Mode)</text:p>
      <text:p text:style-name="Text_20_body">Figure 2-8: Address Configuration of Graphic Virtual Screens (3)</text:p>
      <text:p text:style-name="Text_20_body">Table 2-6: Memory Map</text:p>
      <text:p text:style-name="Text_20_body">Chapter 2 Screen Control</text:p>
      <text:p text:style-name="Text_20_body">(4) 512 x 512 Dots (65536 Colors, Single-Plane Mode)</text:p>
      <text:p text:style-name="Text_20_body">Diagram labels: G15 G14 G13 G12 G11 G10 G09 G08 G07 G06 G05 G04 G03 G02 G01 G00 of SC.1 MSB 15 14 13 12 11 10 9 8 7 6 5 4 3 2 1 0 LSB</text:p>
      <text:p text:style-name="Text_20_body">SCREEN 0 C00000 C00002 ... (G00 page) C3F000 C40000 C7FC00 C7FFFE C00000 (G15 page) (G14 page) (G13 page) (G12 page) (G11 page) (G10 page) (G09 page) (G08 page) (G07 page) (G06 page) (G05 page) (G04 page) (G03 page) (G02 page) (G01 page) +400H (=1024)</text:p>
      <text:p text:style-name="Preformatted_20_Text">512 dots</text:p>
      <text:p text:style-name="Preformatted_20_Text">512 dots</text:p>
      <text:p text:style-name="First_20_paragraph">Page B0 B1 B2 ... B15</text:p>
      <text:p text:style-name="Text_20_body">Figure 2-9 Graphics Actual Screen Address Configuration (4)</text:p>
      <text:p text:style-name="Text_20_body">[Address] MSB 15 14 13 12 11 10 9 8 7 6 5 4 3 2 1 0 LSB G15 G14 G13 G12 G11 G10 G09 G08 G07 G06 G05 G04 G03 G02 G01 G00</text:p>
      <text:p text:style-name="Text_20_body">C00000H 512K bytes (256K words) C7FFFEH</text:p>
      <text:p text:style-name="Text_20_body">Table 2-7 Memory Map</text:p>
      <text:p text:style-name="Text_20_body"><text:span text:style-name="Strong_20_Emphasis">2-4 Graphic Palette Address</text:span></text:p>
      <text:p text:style-name="Text_20_body">(1) Graphic 16 Color, 256 Color Mode [READ/WRITE Availabl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header-rows>
          <table:table-row>
            <table:table-cell table:style-name="TableHeaderRowCell" office:value-type="string">
              <text:p text:style-name="Table_20_Heading">Palette VRAM Data</text:p>
            </table:table-cell>
            <table:table-cell table:style-name="TableHeaderRowCell" office:value-type="string">
              <text:p text:style-name="Table_20_Heading">Register Address</text:p>
            </table:table-cell>
            <table:table-cell table:style-name="TableHeaderRowCell" office:value-type="string">
              <text:p text:style-name="Table_20_Heading">D15-D11</text:p>
            </table:table-cell>
            <table:table-cell table:style-name="TableHeaderRowCell" office:value-type="string">
              <text:p text:style-name="Table_20_Heading">D10-D06</text:p>
            </table:table-cell>
            <table:table-cell table:style-name="TableHeaderRowCell" office:value-type="string">
              <text:p text:style-name="Table_20_Heading">D05-D01</text:p>
            </table:table-cell>
            <table:table-cell table:style-name="TableHeaderRowCell" office:value-type="string">
              <text:p text:style-name="Table_20_Heading">D0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00H</text:p>
          </table:table-cell>
          <table:table-cell table:style-name="TableRowCell" office:value-type="string">
            <text:p text:style-name="Table_20_Contents">E82000H</text:p>
          </table:table-cell>
          <table:table-cell table:style-name="TableRowCell" office:value-type="string">
            <text:p text:style-name="Table_20_Contents">Green</text:p>
          </table:table-cell>
          <table:table-cell table:style-name="TableRowCell" office:value-type="string">
            <text:p text:style-name="Table_20_Contents">Red</text:p>
          </table:table-cell>
          <table:table-cell table:style-name="TableRowCell" office:value-type="string">
            <text:p text:style-name="Table_20_Contents">Blue</text:p>
          </table:table-cell>
          <table:table-cell table:style-name="TableRowCell" office:value-type="string">
            <text:p text:style-name="Table_20_Contents">I</text:p>
          </table:table-cell>
          <table:table-cell table:style-name="TableRowCell" office:value-type="string">
    </table:table-cell>
        </table:table-row>
        <table:table-row>
          <table:table-cell table:style-name="TableRowCell" office:value-type="string">
            <text:p text:style-name="Table_20_Contents">01H</text:p>
          </table:table-cell>
          <table:table-cell table:style-name="TableRowCell" office:value-type="string">
            <text:p text:style-name="Table_20_Contents">E82002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2H</text:p>
          </table:table-cell>
          <table:table-cell table:style-name="TableRowCell" office:value-type="string">
            <text:p text:style-name="Table_20_Contents">E82004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3H</text:p>
          </table:table-cell>
          <table:table-cell table:style-name="TableRowCell" office:value-type="string">
            <text:p text:style-name="Table_20_Contents">E82006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CH</text:p>
          </table:table-cell>
          <table:table-cell table:style-name="TableRowCell" office:value-type="string">
            <text:p text:style-name="Table_20_Contents">E82018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DH</text:p>
          </table:table-cell>
          <table:table-cell table:style-name="TableRowCell" office:value-type="string">
            <text:p text:style-name="Table_20_Contents">E8201A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EH</text:p>
          </table:table-cell>
          <table:table-cell table:style-name="TableRowCell" office:value-type="string">
            <text:p text:style-name="Table_20_Contents">E8201C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FH</text:p>
          </table:table-cell>
          <table:table-cell table:style-name="TableRowCell" office:value-type="string">
            <text:p text:style-name="Table_20_Contents">E8201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H</text:p>
          </table:table-cell>
          <table:table-cell table:style-name="TableRowCell" office:value-type="string">
            <text:p text:style-name="Table_20_Contents">E8202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H</text:p>
          </table:table-cell>
          <table:table-cell table:style-name="TableRowCell" office:value-type="string">
            <text:p text:style-name="Table_20_Contents">E82022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2H</text:p>
          </table:table-cell>
          <table:table-cell table:style-name="TableRowCell" office:value-type="string">
            <text:p text:style-name="Table_20_Contents">E82024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DH</text:p>
          </table:table-cell>
          <table:table-cell table:style-name="TableRowCell" office:value-type="string">
            <text:p text:style-name="Table_20_Contents">E821FA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EH</text:p>
          </table:table-cell>
          <table:table-cell table:style-name="TableRowCell" office:value-type="string">
            <text:p text:style-name="Table_20_Contents">E821FC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FH</text:p>
          </table:table-cell>
          <table:table-cell table:style-name="TableRowCell" office:value-type="string">
            <text:p text:style-name="Table_20_Contents">E821F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able 2-8 Graphic Palette Address (1)</text:p>
      <text:list text:style-name="List_20_1">
        <text:list-item>
          <text:p text:style-name="List_20_Bullet_20_Tight">In the case of the graphic 256 color 2-layer mode, if the memory data of the graphic VRAM is 11H, the corresponding palette register address will be E82022H as per Table 2-8. Thus, the output palette data will be the content of E82022H. Also, the same applies to the 16 color mode, but only the number of palette addresses differs.</text:p>
        </text:list-item>
        <text:list-item>
          <text:p text:style-name="List_20_Bullet_20_Tight">As a rule, please input "0000H" for the data of the palette address 00H.</text:p>
        </text:list-item>
      </text:list>
      <text:p text:style-name="First_20_paragraph">Page 21</text:p>
      <text:p text:style-name="Text_20_body">Chapter 2 Screen Control</text:p>
      <text:p text:style-name="Text_20_body">(2) Graphics 65536 Color Mode (READ/WRITE Possible)</text:p>
      <text:p text:style-name="Text_20_body">| Palette (VA) Graphics VR AM Mode ↓ Lower Byte | Register Address | D15-D14 | D13-D09 | D08 | D07-D06 | D05-D01 | D00 | Notes | | --- | --- | --- | --- | --- | --- | --- | --- | | 00H | 01H | E82000H | Red Lower | Blue Lower | 8-bit | Red Lower | Blue Lower | 8-bit | 65536 color mode palette D15-D08 in 8 bits, D07-D00 in 8 bits are selected and output as lower 8 bits. | | 02H | 03H | E82004H | --- | --- | --- | --- | --- | --- | | 04H | 05H | E82008H | --- | --- | --- | --- | --- | --- | | FCH | FDH | E821F8H | --- | --- | --- | --- | --- | --- | | FEH | FFH | E821FCH | --- | --- | --- | --- | --- | --- |</text:p>
      <text:p text:style-name="Text_20_body">Table 2-9 Graphic Palette Address (2)</text:p>
      <text:p text:style-name="Text_20_body">※ For the data of each palette register address, please enter the palette address value as the original. In particular, the palette structure in graphic 65536 color 1 surface mode is as shown in Table 2-9. Simply changing the upper and lower bytes will correspondingly change the 256 color palette. When setting preliminary data, please note that it is different from 16-color and 256-color mode.</text:p>
      <text:p text:style-name="Text_20_body">※In graphics 65536 color 1-surface mode, if the graphics VRAM memory data is, for example, 0101H, the palette register address at that time will be E82002H and E82000H as in Table 2-9, and the output palette data will be E82002H for D07-D00 and E82000H for D07-D00 combined. In other words, if E82000H is 3521H, and E82002H is 4CFFH, the palette output data will be FF21H.</text:p>
      <text:list text:style-name="Numbering_20_1" text:start-value="3">
        <text:list-item>
          <text:p text:style-name="List_20_Number_20_Tight">Control of Text and Graphics Screens (CRTC)</text:p>
        </text:list-item>
      </text:list>
      <text:p text:style-name="First_20_paragraph">The CRTC of the X68000 is a custom CRTC that supports dual-port DRAM (MB81461) used in text and graphics VRAM. This CRTC has 23 internal registers and provides the following screen control features:</text:p>
      <text:list text:style-name="Numbering_20_1">
        <text:list-item>
          <text:p text:style-name="List_20_Number_20_Tight">Generation of horizontal and vertical synchronization signals</text:p>
        </text:list-item>
        <text:list-item>
          <text:p text:style-name="List_20_Number_20_Tight">Generation of display size and display timing signals</text:p>
        </text:list-item>
        <text:list-item>
          <text:p text:style-name="List_20_Number_20_Tight">Scrolling of text and graphics screens</text:p>
        </text:list-item>
        <text:list-item>
          <text:p text:style-name="List_20_Number_20_Tight">Image capture function to graphics VRAM</text:p>
        </text:list-item>
        <text:list-item>
          <text:p text:style-name="List_20_Number_20_Tight">Cluster copy and bit mask functions for text VRAM</text:p>
        </text:list-item>
        <text:list-item>
          <text:p text:style-name="List_20_Number_20_Tight">Text single/double and simultaneous two-page access switch function</text:p>
        </text:list-item>
        <text:list-item>
          <text:p text:style-name="List_20_Number_20_Tight">High-speed clear function for graphics VRAM</text:p>
        </text:list-item>
        <text:list-item>
          <text:p text:style-name="List_20_Number_20_Tight">External synchronization horizontal position adjustment function (when superimposing)</text:p>
        </text:list-item>
      </text:list>
      <text:p text:style-name="First_20_paragraph">The CPU can always access the data in VRAM, but for setting scrolling registers and the like inside the CRTC, perform it during the blanking period of the V-DISP signal (when "0" on MFP or GPIP4 port). Also, the SAM (Serial Access Memory) in dual-port DRAM is controlled by the CRTC during horizontal blanking.</text:p>
      <text:p text:style-name="Text_20_body">Chapter 2 Screen Control</text:p>
      <text:p text:style-name="Text_20_body">3-1 Specifications and Internal Registers of CRTC</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Display Mode</text:p>
            </table:table-cell>
            <table:table-cell table:style-name="TableHeaderRowCell" office:value-type="string">
              <text:p text:style-name="Table_20_Heading">High Resolution</text:p>
            </table:table-cell>
            <table:table-cell table:style-name="TableHeaderRowCell" office:value-type="string">
              <text:p text:style-name="Table_20_Heading">High Density</text:p>
            </table:table-cell>
          </table:table-row>
        </table:table-header-rows>
        <table:table-row>
          <table:table-cell table:style-name="TableRowCell" office:value-type="string">
            <text:p text:style-name="Table_20_Contents">Display Method</text:p>
          </table:table-cell>
          <table:table-cell table:style-name="TableRowCell" office:value-type="string">
            <text:p text:style-name="Table_20_Contents">Non-Interlace</text:p>
          </table:table-cell>
          <table:table-cell table:style-name="TableRowCell" office:value-type="string">
            <text:p text:style-name="Table_20_Contents">Non-Interlace, Interlace</text:p>
          </table:table-cell>
        </table:table-row>
        <table:table-row>
          <table:table-cell table:style-name="TableRowCell" office:value-type="string">
            <text:p text:style-name="Table_20_Contents">Sync Frequency</text:p>
          </table:table-cell>
          <table:table-cell table:style-name="TableRowCell" office:value-type="string">
            <text:p text:style-name="Table_20_Contents">Horizontal (kHz)</text:p>
          </table:table-cell>
          <table:table-cell table:style-name="TableRowCell" office:value-type="string">
            <text:p text:style-name="Table_20_Contents">31.5</text:p>
          </table:table-cell>
        </table:table-row>
        <table:table-row>
          <table:table-cell table:style-name="TableRowCell" office:value-type="string">
    </table:table-cell>
          <table:table-cell table:style-name="TableRowCell" office:value-type="string">
            <text:p text:style-name="Table_20_Contents">Vertical (Hz)</text:p>
          </table:table-cell>
          <table:table-cell table:style-name="TableRowCell" office:value-type="string">
            <text:p text:style-name="Table_20_Contents">55.46</text:p>
          </table:table-cell>
        </table:table-row>
        <table:table-row>
          <table:table-cell table:style-name="TableRowCell" office:value-type="string">
            <text:p text:style-name="Table_20_Contents">Data Display Period (1)</text:p>
          </table:table-cell>
          <table:table-cell table:style-name="TableRowCell" office:value-type="string">
            <text:p text:style-name="Table_20_Contents">Horizontal (usec)</text:p>
          </table:table-cell>
          <table:table-cell table:style-name="TableRowCell" office:value-type="string">
            <text:p text:style-name="Table_20_Contents">22.09</text:p>
          </table:table-cell>
        </table:table-row>
        <table:table-row>
          <table:table-cell table:style-name="TableRowCell" office:value-type="string">
    </table:table-cell>
          <table:table-cell table:style-name="TableRowCell" office:value-type="string">
            <text:p text:style-name="Table_20_Contents">Vertical (msec)</text:p>
          </table:table-cell>
          <table:table-cell table:style-name="TableRowCell" office:value-type="string">
            <text:p text:style-name="Table_20_Contents">16.25</text:p>
          </table:table-cell>
        </table:table-row>
        <table:table-row>
          <table:table-cell table:style-name="TableRowCell" office:value-type="string">
            <text:p text:style-name="Table_20_Contents">Sync Period (2)</text:p>
          </table:table-cell>
          <table:table-cell table:style-name="TableRowCell" office:value-type="string">
            <text:p text:style-name="Table_20_Contents">Horizontal (usec)</text:p>
          </table:table-cell>
          <table:table-cell table:style-name="TableRowCell" office:value-type="string">
            <text:p text:style-name="Table_20_Contents">31.75</text:p>
          </table:table-cell>
        </table:table-row>
        <table:table-row>
          <table:table-cell table:style-name="TableRowCell" office:value-type="string">
    </table:table-cell>
          <table:table-cell table:style-name="TableRowCell" office:value-type="string">
            <text:p text:style-name="Table_20_Contents">Vertical (msec)</text:p>
          </table:table-cell>
          <table:table-cell table:style-name="TableRowCell" office:value-type="string">
            <text:p text:style-name="Table_20_Contents">18.03</text:p>
          </table:table-cell>
        </table:table-row>
        <table:table-row>
          <table:table-cell table:style-name="TableRowCell" office:value-type="string">
            <text:p text:style-name="Table_20_Contents">Sync Width (3)</text:p>
          </table:table-cell>
          <table:table-cell table:style-name="TableRowCell" office:value-type="string">
            <text:p text:style-name="Table_20_Contents">Horizontal (usec)</text:p>
          </table:table-cell>
          <table:table-cell table:style-name="TableRowCell" office:value-type="string">
            <text:p text:style-name="Table_20_Contents">3.45</text:p>
          </table:table-cell>
        </table:table-row>
        <table:table-row>
          <table:table-cell table:style-name="TableRowCell" office:value-type="string">
    </table:table-cell>
          <table:table-cell table:style-name="TableRowCell" office:value-type="string">
            <text:p text:style-name="Table_20_Contents">Vertical (msec)</text:p>
          </table:table-cell>
          <table:table-cell table:style-name="TableRowCell" office:value-type="string">
            <text:p text:style-name="Table_20_Contents">0.191</text:p>
          </table:table-cell>
        </table:table-row>
        <table:table-row>
          <table:table-cell table:style-name="TableRowCell" office:value-type="string">
            <text:p text:style-name="Table_20_Contents">Back Porch (4)</text:p>
          </table:table-cell>
          <table:table-cell table:style-name="TableRowCell" office:value-type="string">
            <text:p text:style-name="Table_20_Contents">Horizontal (usec)</text:p>
          </table:table-cell>
          <table:table-cell table:style-name="TableRowCell" office:value-type="string">
            <text:p text:style-name="Table_20_Contents">4.14</text:p>
          </table:table-cell>
        </table:table-row>
        <table:table-row>
          <table:table-cell table:style-name="TableRowCell" office:value-type="string">
    </table:table-cell>
          <table:table-cell table:style-name="TableRowCell" office:value-type="string">
            <text:p text:style-name="Table_20_Contents">Vertical (msec)</text:p>
          </table:table-cell>
          <table:table-cell table:style-name="TableRowCell" office:value-type="string">
            <text:p text:style-name="Table_20_Contents">1.111</text:p>
          </table:table-cell>
        </table:table-row>
        <table:table-row>
          <table:table-cell table:style-name="TableRowCell" office:value-type="string">
            <text:p text:style-name="Table_20_Contents">Front Porch (5)</text:p>
          </table:table-cell>
          <table:table-cell table:style-name="TableRowCell" office:value-type="string">
            <text:p text:style-name="Table_20_Contents">Horizontal (usec)</text:p>
          </table:table-cell>
          <table:table-cell table:style-name="TableRowCell" office:value-type="string">
            <text:p text:style-name="Table_20_Contents">2.07</text:p>
          </table:table-cell>
        </table:table-row>
        <table:table-row>
          <table:table-cell table:style-name="TableRowCell" office:value-type="string">
    </table:table-cell>
          <table:table-cell table:style-name="TableRowCell" office:value-type="string">
            <text:p text:style-name="Table_20_Contents">Vertical (msec)</text:p>
          </table:table-cell>
          <table:table-cell table:style-name="TableRowCell" office:value-type="string">
            <text:p text:style-name="Table_20_Contents">0.476</text:p>
          </table:table-cell>
        </table:table-row>
      </table:table>
      <text:p text:style-name="First_20_paragraph">Image Signal</text:p>
      <text:p text:style-name="Text_20_body">Sync Signal</text:p>
      <text:p text:style-name="Text_20_body">Image Signal Analog 0.7 Vp-p (75 ohms termination) Positive Polarity Sync Signal TTL Level Negative Polarity</text:p>
      <text:p text:style-name="Text_20_body">Table 2-10 CRTC Specifications</text:p>
      <text:p text:style-name="Text_20_body">(Note: Some formatting elements such as tables may not perfectly align here.)</text:p>
      <text:list text:style-name="Numbering_20_1" text:start-value="2">
        <text:list-item>
          <text:p text:style-name="List_20_Number_20_Tight">Control of the Text Screen and Graphics Screen (CRTC) — p.25</text:p>
        </text:list-item>
      </text:list>
      <text:p text:style-name="First_20_paragraph">Table: CRTC register map. The dots (•) in the original mark which bits of the 16-bit word are valid for each register.</text:p>
      <table:table table:name="Table9" table:style-name="Table9">
        <table:table-column table:style-name="Table9.A"/>
        <table:table-column table:style-name="Table9.B"/>
        <table:table-column table:style-name="Table9.C"/>
        <table:table-column table:style-name="Table9.D"/>
        <table:table-header-rows>
          <table:table-row>
            <table:table-cell table:style-name="TableHeaderRowCell" office:value-type="string">
              <text:p text:style-name="Table_20_Heading">Reg</text:p>
            </table:table-cell>
            <table:table-cell table:style-name="TableHeaderRowCell" office:value-type="string">
              <text:p text:style-name="Table_20_Heading">Address</text:p>
            </table:table-cell>
            <table:table-cell table:style-name="TableHeaderRowCell" office:value-type="string">
              <text:p text:style-name="Table_20_Heading">Field</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R00</text:p>
          </table:table-cell>
          <table:table-cell table:style-name="TableRowCell" office:value-type="string">
            <text:p text:style-name="Table_20_Contents">E80000H</text:p>
          </table:table-cell>
          <table:table-cell table:style-name="TableRowCell" office:value-type="string">
            <text:p text:style-name="Table_20_Contents">Horizontal total</text:p>
          </table:table-cell>
          <table:table-cell table:style-name="TableRowCell" office:value-type="string">
            <text:p text:style-name="Table_20_Contents">Horizontal sync signal section, in 8-dot units (note: the LSB of R00 is invalid)</text:p>
          </table:table-cell>
        </table:table-row>
        <table:table-row>
          <table:table-cell table:style-name="TableRowCell" office:value-type="string">
            <text:p text:style-name="Table_20_Contents">R01</text:p>
          </table:table-cell>
          <table:table-cell table:style-name="TableRowCell" office:value-type="string">
            <text:p text:style-name="Table_20_Contents">E80002H</text:p>
          </table:table-cell>
          <table:table-cell table:style-name="TableRowCell" office:value-type="string">
            <text:p text:style-name="Table_20_Contents">Horizontal sync end position</text:p>
          </table:table-cell>
          <table:table-cell table:style-name="TableRowCell" office:value-type="string">
            <text:p text:style-name="Table_20_Contents">"</text:p>
          </table:table-cell>
        </table:table-row>
        <table:table-row>
          <table:table-cell table:style-name="TableRowCell" office:value-type="string">
            <text:p text:style-name="Table_20_Contents">R02</text:p>
          </table:table-cell>
          <table:table-cell table:style-name="TableRowCell" office:value-type="string">
            <text:p text:style-name="Table_20_Contents">E80004H</text:p>
          </table:table-cell>
          <table:table-cell table:style-name="TableRowCell" office:value-type="string">
            <text:p text:style-name="Table_20_Contents">Horizontal display start position</text:p>
          </table:table-cell>
          <table:table-cell table:style-name="TableRowCell" office:value-type="string">
            <text:p text:style-name="Table_20_Contents">"</text:p>
          </table:table-cell>
        </table:table-row>
        <table:table-row>
          <table:table-cell table:style-name="TableRowCell" office:value-type="string">
            <text:p text:style-name="Table_20_Contents">R03</text:p>
          </table:table-cell>
          <table:table-cell table:style-name="TableRowCell" office:value-type="string">
            <text:p text:style-name="Table_20_Contents">E80006H</text:p>
          </table:table-cell>
          <table:table-cell table:style-name="TableRowCell" office:value-type="string">
            <text:p text:style-name="Table_20_Contents">Horizontal display end position</text:p>
          </table:table-cell>
          <table:table-cell table:style-name="TableRowCell" office:value-type="string">
            <text:p text:style-name="Table_20_Contents">"</text:p>
          </table:table-cell>
        </table:table-row>
        <table:table-row>
          <table:table-cell table:style-name="TableRowCell" office:value-type="string">
            <text:p text:style-name="Table_20_Contents">R04</text:p>
          </table:table-cell>
          <table:table-cell table:style-name="TableRowCell" office:value-type="string">
            <text:p text:style-name="Table_20_Contents">E80008H</text:p>
          </table:table-cell>
          <table:table-cell table:style-name="TableRowCell" office:value-type="string">
            <text:p text:style-name="Table_20_Contents">Vertical total</text:p>
          </table:table-cell>
          <table:table-cell table:style-name="TableRowCell" office:value-type="string">
            <text:p text:style-name="Table_20_Contents">Vertical sync signal section, in raster units</text:p>
          </table:table-cell>
        </table:table-row>
        <table:table-row>
          <table:table-cell table:style-name="TableRowCell" office:value-type="string">
            <text:p text:style-name="Table_20_Contents">R05</text:p>
          </table:table-cell>
          <table:table-cell table:style-name="TableRowCell" office:value-type="string">
            <text:p text:style-name="Table_20_Contents">E8000AH</text:p>
          </table:table-cell>
          <table:table-cell table:style-name="TableRowCell" office:value-type="string">
            <text:p text:style-name="Table_20_Contents">Vertical sync end position</text:p>
          </table:table-cell>
          <table:table-cell table:style-name="TableRowCell" office:value-type="string">
            <text:p text:style-name="Table_20_Contents">"</text:p>
          </table:table-cell>
        </table:table-row>
        <table:table-row>
          <table:table-cell table:style-name="TableRowCell" office:value-type="string">
            <text:p text:style-name="Table_20_Contents">R06</text:p>
          </table:table-cell>
          <table:table-cell table:style-name="TableRowCell" office:value-type="string">
            <text:p text:style-name="Table_20_Contents">E8000CH</text:p>
          </table:table-cell>
          <table:table-cell table:style-name="TableRowCell" office:value-type="string">
            <text:p text:style-name="Table_20_Contents">Vertical display start position</text:p>
          </table:table-cell>
          <table:table-cell table:style-name="TableRowCell" office:value-type="string">
            <text:p text:style-name="Table_20_Contents">"</text:p>
          </table:table-cell>
        </table:table-row>
        <table:table-row>
          <table:table-cell table:style-name="TableRowCell" office:value-type="string">
            <text:p text:style-name="Table_20_Contents">R07</text:p>
          </table:table-cell>
          <table:table-cell table:style-name="TableRowCell" office:value-type="string">
            <text:p text:style-name="Table_20_Contents">E8000EH</text:p>
          </table:table-cell>
          <table:table-cell table:style-name="TableRowCell" office:value-type="string">
            <text:p text:style-name="Table_20_Contents">Vertical display end position</text:p>
          </table:table-cell>
          <table:table-cell table:style-name="TableRowCell" office:value-type="string">
            <text:p text:style-name="Table_20_Contents">"</text:p>
          </table:table-cell>
        </table:table-row>
        <table:table-row>
          <table:table-cell table:style-name="TableRowCell" office:value-type="string">
            <text:p text:style-name="Table_20_Contents">R08</text:p>
          </table:table-cell>
          <table:table-cell table:style-name="TableRowCell" office:value-type="string">
            <text:p text:style-name="Table_20_Contents">E80010H</text:p>
          </table:table-cell>
          <table:table-cell table:style-name="TableRowCell" office:value-type="string">
            <text:p text:style-name="Table_20_Contents">External-sync horizontal adjust</text:p>
          </table:table-cell>
          <table:table-cell table:style-name="TableRowCell" office:value-type="string">
            <text:p text:style-name="Table_20_Contents">Horizontal position fine adjustment</text:p>
          </table:table-cell>
        </table:table-row>
        <table:table-row>
          <table:table-cell table:style-name="TableRowCell" office:value-type="string">
            <text:p text:style-name="Table_20_Contents">R09</text:p>
          </table:table-cell>
          <table:table-cell table:style-name="TableRowCell" office:value-type="string">
            <text:p text:style-name="Table_20_Contents">E80012H</text:p>
          </table:table-cell>
          <table:table-cell table:style-name="TableRowCell" office:value-type="string">
            <text:p text:style-name="Table_20_Contents">Raster interrupt position</text:p>
          </table:table-cell>
          <table:table-cell table:style-name="TableRowCell" office:value-type="string">
            <text:p text:style-name="Table_20_Contents">Raster address</text:p>
          </table:table-cell>
        </table:table-row>
        <table:table-row>
          <table:table-cell table:style-name="TableRowCell" office:value-type="string">
            <text:p text:style-name="Table_20_Contents">R10</text:p>
          </table:table-cell>
          <table:table-cell table:style-name="TableRowCell" office:value-type="string">
            <text:p text:style-name="Table_20_Contents">E80014H</text:p>
          </table:table-cell>
          <table:table-cell table:style-name="TableRowCell" office:value-type="string">
            <text:p text:style-name="Table_20_Contents">X-direction scroll</text:p>
          </table:table-cell>
          <table:table-cell table:style-name="TableRowCell" office:value-type="string">
            <text:p text:style-name="Table_20_Contents">Text scroll register</text:p>
          </table:table-cell>
        </table:table-row>
        <table:table-row>
          <table:table-cell table:style-name="TableRowCell" office:value-type="string">
            <text:p text:style-name="Table_20_Contents">R11</text:p>
          </table:table-cell>
          <table:table-cell table:style-name="TableRowCell" office:value-type="string">
            <text:p text:style-name="Table_20_Contents">E80016H</text:p>
          </table:table-cell>
          <table:table-cell table:style-name="TableRowCell" office:value-type="string">
            <text:p text:style-name="Table_20_Contents">Y-direction scroll</text:p>
          </table:table-cell>
          <table:table-cell table:style-name="TableRowCell" office:value-type="string">
            <text:p text:style-name="Table_20_Contents">"</text:p>
          </table:table-cell>
        </table:table-row>
        <table:table-row>
          <table:table-cell table:style-name="TableRowCell" office:value-type="string">
            <text:p text:style-name="Table_20_Contents">R12</text:p>
          </table:table-cell>
          <table:table-cell table:style-name="TableRowCell" office:value-type="string">
            <text:p text:style-name="Table_20_Contents">E80018H</text:p>
          </table:table-cell>
          <table:table-cell table:style-name="TableRowCell" office:value-type="string">
            <text:p text:style-name="Table_20_Contents">Screen 0 X</text:p>
          </table:table-cell>
          <table:table-cell table:style-name="TableRowCell" office:value-type="string">
            <text:p text:style-name="Table_20_Contents">Graphics scroll register</text:p>
          </table:table-cell>
        </table:table-row>
        <table:table-row>
          <table:table-cell table:style-name="TableRowCell" office:value-type="string">
            <text:p text:style-name="Table_20_Contents">R13</text:p>
          </table:table-cell>
          <table:table-cell table:style-name="TableRowCell" office:value-type="string">
            <text:p text:style-name="Table_20_Contents">E8001AH</text:p>
          </table:table-cell>
          <table:table-cell table:style-name="TableRowCell" office:value-type="string">
            <text:p text:style-name="Table_20_Contents">Screen 0 Y</text:p>
          </table:table-cell>
          <table:table-cell table:style-name="TableRowCell" office:value-type="string">
            <text:p text:style-name="Table_20_Contents">"</text:p>
          </table:table-cell>
        </table:table-row>
        <table:table-row>
          <table:table-cell table:style-name="TableRowCell" office:value-type="string">
            <text:p text:style-name="Table_20_Contents">R14</text:p>
          </table:table-cell>
          <table:table-cell table:style-name="TableRowCell" office:value-type="string">
            <text:p text:style-name="Table_20_Contents">E8001CH</text:p>
          </table:table-cell>
          <table:table-cell table:style-name="TableRowCell" office:value-type="string">
            <text:p text:style-name="Table_20_Contents">Screen 1 X</text:p>
          </table:table-cell>
          <table:table-cell table:style-name="TableRowCell" office:value-type="string">
            <text:p text:style-name="Table_20_Contents">"</text:p>
          </table:table-cell>
        </table:table-row>
        <table:table-row>
          <table:table-cell table:style-name="TableRowCell" office:value-type="string">
            <text:p text:style-name="Table_20_Contents">R15</text:p>
          </table:table-cell>
          <table:table-cell table:style-name="TableRowCell" office:value-type="string">
            <text:p text:style-name="Table_20_Contents">E8001EH</text:p>
          </table:table-cell>
          <table:table-cell table:style-name="TableRowCell" office:value-type="string">
            <text:p text:style-name="Table_20_Contents">Screen 1 Y</text:p>
          </table:table-cell>
          <table:table-cell table:style-name="TableRowCell" office:value-type="string">
            <text:p text:style-name="Table_20_Contents">"</text:p>
          </table:table-cell>
        </table:table-row>
        <table:table-row>
          <table:table-cell table:style-name="TableRowCell" office:value-type="string">
            <text:p text:style-name="Table_20_Contents">R16</text:p>
          </table:table-cell>
          <table:table-cell table:style-name="TableRowCell" office:value-type="string">
            <text:p text:style-name="Table_20_Contents">E80020H</text:p>
          </table:table-cell>
          <table:table-cell table:style-name="TableRowCell" office:value-type="string">
            <text:p text:style-name="Table_20_Contents">Screen 2 X</text:p>
          </table:table-cell>
          <table:table-cell table:style-name="TableRowCell" office:value-type="string">
            <text:p text:style-name="Table_20_Contents">"</text:p>
          </table:table-cell>
        </table:table-row>
        <table:table-row>
          <table:table-cell table:style-name="TableRowCell" office:value-type="string">
            <text:p text:style-name="Table_20_Contents">R17</text:p>
          </table:table-cell>
          <table:table-cell table:style-name="TableRowCell" office:value-type="string">
            <text:p text:style-name="Table_20_Contents">E80022H</text:p>
          </table:table-cell>
          <table:table-cell table:style-name="TableRowCell" office:value-type="string">
            <text:p text:style-name="Table_20_Contents">Screen 2 Y</text:p>
          </table:table-cell>
          <table:table-cell table:style-name="TableRowCell" office:value-type="string">
            <text:p text:style-name="Table_20_Contents">"</text:p>
          </table:table-cell>
        </table:table-row>
        <table:table-row>
          <table:table-cell table:style-name="TableRowCell" office:value-type="string">
            <text:p text:style-name="Table_20_Contents">R18</text:p>
          </table:table-cell>
          <table:table-cell table:style-name="TableRowCell" office:value-type="string">
            <text:p text:style-name="Table_20_Contents">E80024H</text:p>
          </table:table-cell>
          <table:table-cell table:style-name="TableRowCell" office:value-type="string">
            <text:p text:style-name="Table_20_Contents">Screen 3 X</text:p>
          </table:table-cell>
          <table:table-cell table:style-name="TableRowCell" office:value-type="string">
            <text:p text:style-name="Table_20_Contents">Graphics scroll register</text:p>
          </table:table-cell>
        </table:table-row>
        <table:table-row>
          <table:table-cell table:style-name="TableRowCell" office:value-type="string">
            <text:p text:style-name="Table_20_Contents">R19</text:p>
          </table:table-cell>
          <table:table-cell table:style-name="TableRowCell" office:value-type="string">
            <text:p text:style-name="Table_20_Contents">E80026H</text:p>
          </table:table-cell>
          <table:table-cell table:style-name="TableRowCell" office:value-type="string">
            <text:p text:style-name="Table_20_Contents">Screen 3 Y</text:p>
          </table:table-cell>
          <table:table-cell table:style-name="TableRowCell" office:value-type="string">
            <text:p text:style-name="Table_20_Contents">"</text:p>
          </table:table-cell>
        </table:table-row>
        <table:table-row>
          <table:table-cell table:style-name="TableRowCell" office:value-type="string">
            <text:p text:style-name="Table_20_Contents">R20</text:p>
          </table:table-cell>
          <table:table-cell table:style-name="TableRowCell" office:value-type="string">
            <text:p text:style-name="Table_20_Contents">E80028H</text:p>
          </table:table-cell>
          <table:table-cell table:style-name="TableRowCell" office:value-type="string">
            <text:p text:style-name="Table_20_Contents">Memory-mode set / Display-mode set</text:p>
          </table:table-cell>
          <table:table-cell table:style-name="TableRowCell" office:value-type="string">
            <text:p text:style-name="Table_20_Contents">Control register</text:p>
          </table:table-cell>
        </table:table-row>
        <table:table-row>
          <table:table-cell table:style-name="TableRowCell" office:value-type="string">
            <text:p text:style-name="Table_20_Contents">R21</text:p>
          </table:table-cell>
          <table:table-cell table:style-name="TableRowCell" office:value-type="string">
            <text:p text:style-name="Table_20_Contents">E8002AH</text:p>
          </table:table-cell>
          <table:table-cell table:style-name="TableRowCell" office:value-type="string">
            <text:p text:style-name="Table_20_Contents">Text-access set / Clear-P.S</text:p>
          </table:table-cell>
          <table:table-cell table:style-name="TableRowCell" office:value-type="string">
            <text:p text:style-name="Table_20_Contents">"</text:p>
          </table:table-cell>
        </table:table-row>
        <table:table-row>
          <table:table-cell table:style-name="TableRowCell" office:value-type="string">
            <text:p text:style-name="Table_20_Contents">R22</text:p>
          </table:table-cell>
          <table:table-cell table:style-name="TableRowCell" office:value-type="string">
            <text:p text:style-name="Table_20_Contents">E8002CH</text:p>
          </table:table-cell>
          <table:table-cell table:style-name="TableRowCell" office:value-type="string">
            <text:p text:style-name="Table_20_Contents">Source raster / Destination raster</text:p>
          </table:table-cell>
          <table:table-cell table:style-name="TableRowCell" office:value-type="string">
            <text:p text:style-name="Table_20_Contents">Raster address</text:p>
          </table:table-cell>
        </table:table-row>
        <table:table-row>
          <table:table-cell table:style-name="TableRowCell" office:value-type="string">
            <text:p text:style-name="Table_20_Contents">R23</text:p>
          </table:table-cell>
          <table:table-cell table:style-name="TableRowCell" office:value-type="string">
            <text:p text:style-name="Table_20_Contents">E8002EH</text:p>
          </table:table-cell>
          <table:table-cell table:style-name="TableRowCell" office:value-type="string">
            <text:p text:style-name="Table_20_Contents">Bit-mask register</text:p>
          </table:table-cell>
          <table:table-cell table:style-name="TableRowCell" office:value-type="string">
            <text:p text:style-name="Table_20_Contents">Mask data</text:p>
          </table:table-cell>
        </table:table-row>
        <table:table-row>
          <table:table-cell table:style-name="TableRowCell" office:value-type="string">
            <text:p text:style-name="Table_20_Contents">—</text:p>
          </table:table-cell>
          <table:table-cell table:style-name="TableRowCell" office:value-type="string">
            <text:p text:style-name="Table_20_Contents">E80480H</text:p>
          </table:table-cell>
          <table:table-cell table:style-name="TableRowCell" office:value-type="string">
            <text:p text:style-name="Table_20_Contents">(operation port)</text:p>
          </table:table-cell>
          <table:table-cell table:style-name="TableRowCell" office:value-type="string">
            <text:p text:style-name="Table_20_Contents">CRTC operation port</text:p>
          </table:table-cell>
        </table:table-row>
      </table:table>
      <text:p text:style-name="First_20_paragraph">Chapter 2 Screen Control</text:p>
      <text:p text:style-name="Text_20_body">DISPTMG SYNC Synchronization position Display start position Display end position Total</text:p>
      <text:list text:style-name="List_20_1">
        <text:list-item>
          <text:p text:style-name="List_20_Bullet_20_Tight">R20, R21, E80480H are READ/WRITE enabled; when writing is effective, reading returns to 0.</text:p>
        </text:list-item>
        <text:list-item>
          <text:p text:style-name="List_20_Bullet_20_Tight">R00-R19, R22, R23 are WRITE only; reading is invalid.</text:p>
        </text:list-item>
        <text:list-item>
          <text:p text:style-name="List_20_Bullet_20_Tight">The setting value of R00-R07 must include a margin of 1 for calculation.</text:p>
        </text:list-item>
      </text:list>
      <text:p text:style-name="First_20_paragraph">Table 2-11 CRTC Register Address Map</text:p>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P1">Reg. No</text:p>
            </table:table-cell>
            <table:table-cell table:style-name="TableHeaderRowCell" office:value-type="string">
              <text:p text:style-name="Table_20_Heading">High Resolution (768x512, 512x512, 512x256, 256x256)</text:p>
            </table:table-cell>
            <table:table-cell table:style-name="TableHeaderRowCell" office:value-type="string">
              <text:p text:style-name="Table_20_Heading">Standard Resolution (512x512, 512x256, 256x256)</text:p>
            </table:table-cell>
          </table:table-row>
        </table:table-header-rows>
        <table:table-row>
          <table:table-cell table:style-name="TableRowCell" office:value-type="string">
            <text:p text:style-name="P2">R00 E800001H</text:p>
          </table:table-cell>
          <table:table-cell table:style-name="TableRowCell" office:value-type="string">
            <text:p text:style-name="Table_20_Contents">89H (137), 5BH (91), 5BH (91), 2DH (45), 4BH (75), 4BH (75), 25H (37)</text:p>
          </table:table-cell>
          <table:table-cell table:style-name="TableRowCell" office:value-type="string">
    </table:table-cell>
        </table:table-row>
        <table:table-row>
          <table:table-cell table:style-name="TableRowCell" office:value-type="string">
            <text:p text:style-name="P2">R01 E800002H</text:p>
          </table:table-cell>
          <table:table-cell table:style-name="TableRowCell" office:value-type="string">
            <text:p text:style-name="Table_20_Contents">0EH (14), 09H (9), 09H (9), 04H (4), 03H (3), 03H (3), 01H (1)</text:p>
          </table:table-cell>
          <table:table-cell table:style-name="TableRowCell" office:value-type="string">
    </table:table-cell>
        </table:table-row>
        <table:table-row>
          <table:table-cell table:style-name="TableRowCell" office:value-type="string">
            <text:p text:style-name="P2">R02 E800004H</text:p>
          </table:table-cell>
          <table:table-cell table:style-name="TableRowCell" office:value-type="string">
            <text:p text:style-name="Table_20_Contents">1CH (28), 11H (17), 11H (17), 06H (6), 05H (5), 05H (5), 00H (0)</text:p>
          </table:table-cell>
          <table:table-cell table:style-name="TableRowCell" office:value-type="string">
    </table:table-cell>
        </table:table-row>
        <table:table-row>
          <table:table-cell table:style-name="TableRowCell" office:value-type="string">
            <text:p text:style-name="P2">R03 E800006H</text:p>
          </table:table-cell>
          <table:table-cell table:style-name="TableRowCell" office:value-type="string">
            <text:p text:style-name="Table_20_Contents">7CH (124), 51H (81), 51H (81), 26H (38), 45H (69), 45H (69), 20H (32)</text:p>
          </table:table-cell>
          <table:table-cell table:style-name="TableRowCell" office:value-type="string">
    </table:table-cell>
        </table:table-row>
        <table:table-row>
          <table:table-cell table:style-name="TableRowCell" office:value-type="string">
            <text:p text:style-name="P2">R04 E800008H</text:p>
          </table:table-cell>
          <table:table-cell table:style-name="TableRowCell" office:value-type="string">
            <text:p text:style-name="Table_20_Contents">237H (567), 237H (567), 237H (567), 237H (567), 103H (259), 103H (259), 103H (259)</text:p>
          </table:table-cell>
          <table:table-cell table:style-name="TableRowCell" office:value-type="string">
    </table:table-cell>
        </table:table-row>
        <table:table-row>
          <table:table-cell table:style-name="TableRowCell" office:value-type="string">
            <text:p text:style-name="P2">R05 E80000AH</text:p>
          </table:table-cell>
          <table:table-cell table:style-name="TableRowCell" office:value-type="string">
            <text:p text:style-name="Table_20_Contents">005H (5), 005H (5), 005H (5), 005H (5), 002H (2), 002H (2), 002H (2)</text:p>
          </table:table-cell>
          <table:table-cell table:style-name="TableRowCell" office:value-type="string">
    </table:table-cell>
        </table:table-row>
        <table:table-row>
          <table:table-cell table:style-name="TableRowCell" office:value-type="string">
            <text:p text:style-name="P2">R06 E80000CH</text:p>
          </table:table-cell>
          <table:table-cell table:style-name="TableRowCell" office:value-type="string">
            <text:p text:style-name="Table_20_Contents">028H (40), 028H (40), 028H (40), 028H (40), 010H (16), 010H (16), 010H (16)</text:p>
          </table:table-cell>
          <table:table-cell table:style-name="TableRowCell" office:value-type="string">
    </table:table-cell>
        </table:table-row>
        <table:table-row>
          <table:table-cell table:style-name="TableRowCell" office:value-type="string">
            <text:p text:style-name="P2">R07 E80000EH</text:p>
          </table:table-cell>
          <table:table-cell table:style-name="TableRowCell" office:value-type="string">
            <text:p text:style-name="Table_20_Contents">228H (552), 228H (552), 228H (552), 228H (552), 100H (256), 100H (256), 100H (256)</text:p>
          </table:table-cell>
          <table:table-cell table:style-name="TableRowCell" office:value-type="string">
    </table:table-cell>
        </table:table-row>
        <table:table-row>
          <table:table-cell table:style-name="TableRowCell" office:value-type="string">
            <text:p text:style-name="P2">R08 E800010H</text:p>
          </table:table-cell>
          <table:table-cell table:style-name="TableRowCell" office:value-type="string">
            <text:p text:style-name="Table_20_Contents">18H (27), 18H (27), 18H (27), 18H (27), 2CH (44), 2CH (44), 24H (36)</text:p>
          </table:table-cell>
          <table:table-cell table:style-name="TableRowCell" office:value-type="string">
    </table:table-cell>
        </table:table-row>
      </table:table>
      <text:p text:style-name="First_20_paragraph">Table 2-12 Changing CRTC Register Values for Each Screen Mode: When capturing screen images, change the value of R08 (E80010H) as follows:</text:p>
      <text:list text:style-name="List_20_1">
        <text:list-item>
          <text:p text:style-name="List_20_Bullet_20_Tight">512x512 Mode, 512x256 Mode: ...... 9A (154)</text:p>
        </text:list-item>
        <text:list-item>
          <text:p text:style-name="List_20_Bullet_20_Tight">256x256 Mode: ...... EB (235)</text:p>
        </text:list-item>
      </text:list>
      <text:p text:style-name="First_20_paragraph">Page 26</text:p>
      <text:list text:style-name="Numbering_20_1" text:start-value="3">
        <text:list-item>
          <text:p text:style-name="List_20_Number_20_Tight">Text Screen and Graphic Screen Control (CRTC)</text:p>
        </text:list-item>
      </text:list>
      <text:p text:style-name="First_20_paragraph">3-2 CRTC Register Details</text:p>
      <text:p text:style-name="Text_20_body">(1) For R00-R07, please refer to Table 2-12.</text:p>
      <text:p text:style-name="Text_20_body">(2) R08 (Horizontal Position Adjustment) Adjust the horizontal displacement between the TV or video screen and the computer screen in superimpose mode on the TV or video. Adjust the delay time of the TV and video signal horizontal synchronization signal and the computer-side horizontal synchronization signal standing up.</text:p>
      <text:p text:style-name="Text_20_body">The adjustment range is 25.7 nsec per unit, and can be set within the range of 0~6.5535 µs (R08=0~255).</text:p>
      <text:p text:style-name="Text_20_body">(3) R09 (Raster Address) Set the raster address to initiate an interrupt caused by the CRTC or IRQ signal (interrupt on channel 14 of the MFP). If you do not use this interrupt, mask it with the MFP or GPIO port interrupt.</text:p>
      <text:p text:style-name="Text_20_body">(4) R10~R11 (Text Scroll Register) Set the display start address for scrolling the text screen (circular scroll).</text:p>
      <text:p text:style-name="Text_20_body">The setting range of R10 depends on the display mode:</text:p>
      <text:list text:style-name="List_20_1">
        <text:list-item>
          <text:p text:style-name="List_20_Bullet_20_Tight">When in Horizontal 768 dot display mode, 0~255</text:p>
        </text:list-item>
        <text:list-item>
          <text:p text:style-name="List_20_Bullet_20_Tight">When in Horizontal 512 dot display mode, 0~511</text:p>
        </text:list-item>
        <text:list-item>
          <text:p text:style-name="List_20_Bullet_20_Tight">When in Horizontal 256 dot display mode, 0~767</text:p>
        </text:list-item>
      </text:list>
      <text:p text:style-name="First_20_paragraph">The setting range of R11 is 0~1023.</text:p>
      <text:p text:style-name="Text_20_body">(5) R12~R19 (Graphic Scroll Register) Set the display start address for scrolling the graphics screen (circular scroll).</text:p>
      <text:p text:style-name="Text_20_body">The setting range for R12~R13 is 0~1023. The setting range for R14~R19 is 0~511 as these registers are only used in 512×512 dot display mode.</text:p>
      <text:p text:style-name="Text_20_body">Chapter 2: Screen Control</text:p>
      <text:p text:style-name="Text_20_body">(6) R20-R21 (Control Registers)</text:p>
      <text:list text:style-name="List_20_1">
        <text:list-item>
          <text:p text:style-name="List_20_Bullet_20_Tight">R20 (Upper Byte)</text:p>
        </text:list-item>
      </text:list>
      <text:p text:style-name="First_20_paragraph">D15 D14 D13 D12 D11 D10 D09 D08</text:p>
      <text:list text:style-name="List_20_1">
        <text:list-item>
          <text:list text:style-name="List_20_1">
            <text:list-item>
              <text:list text:style-name="List_20_1">
                <text:list-item>
                  <text:list text:style-name="List_20_1">
                    <text:list-item>
                      <text:p text:style-name="List_20_Bullet_20_Tight">0 0 0 0</text:p>
                    </text:list-item>
                  </text:list>
                </text:list-item>
              </text:list>
            </text:list-item>
          </text:list>
        </text:list-item>
      </text:list>
      <text:p text:style-name="Preformatted_20_Text">0 0: Graphics 16 colors 4 screens mode</text:p>
      <text:p text:style-name="Preformatted_20_Text">0 1: Graphics 256 colors 2 screens mode</text:p>
      <text:p text:style-name="Preformatted_20_Text">1 0: (unused)</text:p>
      <text:p text:style-name="Preformatted_20_Text">1 1: Graphics 65536 colors 1 screen mode</text:p>
      <text:p text:style-name="Preformatted_20_Text">0 0: Graphics real screen 512-dot mode</text:p>
      <text:p text:style-name="Preformatted_20_Text">1 1: Graphics pseudo screen 1024-dot mode</text:p>
      <text:p text:style-name="First_20_paragraph">(When setting, please make sure D08="0", D09="0")</text:p>
      <text:list text:style-name="List_20_1">
        <text:list-item>
          <text:p text:style-name="List_20_Bullet_20_Tight">R20 (Lower Byte)</text:p>
        </text:list-item>
      </text:list>
      <text:p text:style-name="First_20_paragraph">D07 D06 D05 D04 D03 D02 D01 D00</text:p>
      <text:p text:style-name="Horizontal_20_Line"/>
      <text:p text:style-name="Preformatted_20_Text">0 0 0 0: Standard resolution (15.98 kHz) 256 x 256</text:p>
      <text:p text:style-name="Preformatted_20_Text">0 0 0 1: Standard resolution (15.98 kHz) 512 x 256 (Interlace)</text:p>
      <text:p text:style-name="Preformatted_20_Text">0 0 1 0: Standard resolution (15.98 kHz) 512 x 512 (Raster scroll 2 screens)</text:p>
      <text:p text:style-name="Preformatted_20_Text">0 0 1 1: High resolution (31.5 kHz) 256 x 256</text:p>
      <text:p text:style-name="Preformatted_20_Text">1 0 0 0: High resolution (31.5 kHz) 256 x 512 (Raster scroll 2 screens)</text:p>
      <text:p text:style-name="Preformatted_20_Text">1 0 0 1: High resolution (31.5 kHz) 512 x 256</text:p>
      <text:p text:style-name="Preformatted_20_Text">1 0 1 0: High resolution (31.5 kHz) 512 x 512</text:p>
      <text:p text:style-name="Preformatted_20_Text">1 0 1 1: High resolution (31.5 kHz) 768 x 512</text:p>
      <text:list text:style-name="List_20_1">
        <text:list-item>
          <text:p text:style-name="List_20_Bullet_20_Tight">R21 (Upper Byte)</text:p>
        </text:list-item>
      </text:list>
      <text:p text:style-name="First_20_paragraph">D15 D14 D13 D12 D11 D10 D09 D08</text:p>
      <text:list text:style-name="List_20_1">
        <text:list-item>
          <text:list text:style-name="List_20_1">
            <text:list-item>
              <text:list text:style-name="List_20_1">
                <text:list-item>
                  <text:list text:style-name="List_20_1">
                    <text:list-item>
                      <text:p text:style-name="List_20_Bullet_20_Tight">0 0 0 0</text:p>
                    </text:list-item>
                  </text:list>
                </text:list-item>
              </text:list>
            </text:list-item>
          </text:list>
        </text:list-item>
      </text:list>
      <text:p text:style-name="First_20_paragraph">0: Text memory CPU single access (R21 D04-D07 is invalid) 1: Text memory CPU dual access 0: Text CPU access bit mask OFF 1: Text CPU access bit mask ON</text:p>
      <text:p text:style-name="Text_20_body">Page 28</text:p>
      <text:list text:style-name="Numbering_20_1" text:start-value="3">
        <text:list-item>
          <text:p text:style-name="List_20_Number_20_Tight">Control of Text Screen and Graphics Screen (CRTC)</text:p>
        </text:list-item>
      </text:list>
      <text:p text:style-name="First_20_paragraph">*R21 (Lower Byte)</text:p>
      <table:table table:name="Table11" table:style-name="Table11">
        <table:table-column table:style-name="Table11.A"/>
        <table:table-header-rows>
          <table:table-row>
            <table:table-cell table:style-name="TableHeaderRowCell" office:value-type="string">
              <text:p text:style-name="Table_20_Heading">D07 D06 D05 D04</text:p>
            </table:table-cell>
          </table:table-row>
        </table:table-header-rows>
        <table:table-row>
          <table:table-cell table:style-name="TableRowCell" office:value-type="string">
            <text:p text:style-name="Table_20_Contents">(R21 D08 is valid at 1)</text:p>
          </table:table-cell>
        </table:table-row>
      </table:table>
      <text:p text:style-name="First_20_paragraph">0: Text T0 Plane Simultaneous Access OFF<text:line-break/>1: Text T0 Plane Simultaneous Access ON<text:line-break/>0: Text T1 Plane Simultaneous Access OFF<text:line-break/>1: Text T1 Plane Simultaneous Access ON<text:line-break/>0: Text T2 Plane Simultaneous Access OFF<text:line-break/>1: Text T2 Plane Simultaneous Access ON<text:line-break/>0: Text T3 Plane Simultaneous Access OFF<text:line-break/>1: Text T3 Plane Simultaneous Access ON</text:p>
      <text:list text:style-name="List_20_1">
        <text:list-item>
          <text:p text:style-name="List_20_Bullet_20_Tight">D00-D03 have two uses: selecting simultaneous access planes for text raster copy, and high-speed clearing of graphics screen (1024 x 1024).</text:p>
        </text:list-item>
      </text:list>
      <table:table table:name="Table12" table:style-name="Table12">
        <table:table-column table:style-name="Table12.A"/>
        <table:table-header-rows>
          <table:table-row>
            <table:table-cell table:style-name="TableHeaderRowCell" office:value-type="string">
              <text:p text:style-name="Table_20_Heading">D03 D02 D01 D00</text:p>
            </table:table-cell>
          </table:table-row>
        </table:table-header-rows>
      </table:table>
      <text:p text:style-name="First_20_paragraph">0: Text T0 Plane/ Raster Copy Simultaneous Access OFF<text:line-break/>1: Text T0 Plane/ Raster Copy Simultaneous Access ON<text:line-break/>0: Text T1 Plane/ Raster Copy Simultaneous Access OFF<text:line-break/>1: Text T1 Plane/ Raster Copy Simultaneous Access ON<text:line-break/>0: Text T2 Plane/ Raster Copy Simultaneous Access OFF<text:line-break/>1: Text T2 Plane/ Raster Copy Simultaneous Access ON<text:line-break/>0: Text T3 Plane/ Raster Copy Simultaneous Access OFF<text:line-break/>1: Text T3 Plane/ Raster Copy Simultaneous Access ON</text:p>
      <text:p text:style-name="Text_20_body">1024 (Diagram with text T3 plane corresponding to D03 from E60000H-E7FFFEH and text T2 plane corresponding to D02 from E40000H-E5FFFEH, text T1 plane corresponding to D01 from E20000H-E3FFFEH, and text T0 plane corresponding to D00 from E00000H-E1FFFEH)</text:p>
      <text:p text:style-name="Text_20_body">1024 - Text planes T0, T1, T2, and T3 representation</text:p>
      <text:p text:style-name="Text_20_body">This covers the main text content on the page.</text:p>
      <text:p text:style-name="Text_20_body">Chapter 2: Screen Control</text:p>
      <text:p text:style-name="Text_20_body">&lt;When Rapidly Clearing a Graphics Real Screen 1024×1024 (Valid When R20 and D10 are 1)&gt;</text:p>
      <text:list text:style-name="List_20_1">
        <text:list-item>
          <text:p text:style-name="List_20_Bullet_20_Tight">R21 (Lower 4 bits)</text:p>
        </text:list-item>
      </text:list>
      <text:p text:style-name="Preformatted_20_Text"><text:s text:c="2"/>+----+----+----+----+</text:p>
      <text:p text:style-name="Preformatted_20_Text"><text:s text:c="2"/>| D03 | D02 | D01 | D00 |</text:p>
      <text:p text:style-name="Preformatted_20_Text"><text:s text:c="2"/>+----+----+----+----+</text:p>
      <text:p text:style-name="Preformatted_20_Text"/>
      <text:p text:style-name="Preformatted_20_Text"><text:s text:c="2"/>(D03−D00 are invalid)</text:p>
      <text:list text:style-name="List_20_1">
        <text:list-item>
          <text:p text:style-name="List_20_Bullet_20_Tight">Horizontal 768 or 512 dot mode</text:p>
        </text:list-item>
      </text:list>
      <text:p text:style-name="Preformatted_20_Text"><text:s text:c="2"/>+-------+-------+</text:p>
      <text:p text:style-name="Preformatted_20_Text"><text:s text:c="2"/>| Display Range |</text:p>
      <text:p text:style-name="Preformatted_20_Text"><text:s text:c="2"/>| <text:s text:c="3"/>512×512 <text:s text:c="3"/>|</text:p>
      <text:p text:style-name="Preformatted_20_Text"><text:s text:c="2"/>+-------+-------+</text:p>
      <text:p text:style-name="Preformatted_20_Text"/>
      <text:p text:style-name="Preformatted_20_Text"><text:s text:c="2"/>Width: 1024</text:p>
      <text:p text:style-name="Preformatted_20_Text"/>
      <text:p text:style-name="Preformatted_20_Text"><text:s text:c="2"/>Execute Rapid Clear</text:p>
      <text:p text:style-name="Preformatted_20_Text"/>
      <text:p text:style-name="Preformatted_20_Text"><text:s text:c="2"/>The range to be cleared rapidly will be the vertical range from 0 to 1023 dots in the horizontal direction within the display range.</text:p>
      <text:list text:style-name="List_20_1">
        <text:list-item>
          <text:p text:style-name="List_20_Bullet_20_Tight">Horizontal 256 dot mode</text:p>
        </text:list-item>
      </text:list>
      <text:p text:style-name="Preformatted_20_Text"><text:s text:c="2"/>+-------+-------+</text:p>
      <text:p text:style-name="Preformatted_20_Text"><text:s text:c="2"/>| Display Range |</text:p>
      <text:p text:style-name="Preformatted_20_Text"><text:s text:c="2"/>| <text:s text:c="3"/>256×256 <text:s text:c="3"/>|</text:p>
      <text:p text:style-name="Preformatted_20_Text"><text:s text:c="2"/>+-------+-------+</text:p>
      <text:p text:style-name="Preformatted_20_Text"/>
      <text:p text:style-name="Preformatted_20_Text"><text:s text:c="2"/>Width: 1024</text:p>
      <text:p text:style-name="Preformatted_20_Text"/>
      <text:p text:style-name="Preformatted_20_Text"><text:s text:c="2"/>Execute Rapid Clear</text:p>
      <text:p text:style-name="Preformatted_20_Text"/>
      <text:p text:style-name="Preformatted_20_Text"><text:s text:c="2"/>The range to be cleared rapidly will be the vertical range from the horizontal range and the horizontal range within the display range.</text:p>
      <text:p text:style-name="First_20_paragraph">&lt;When Rapidly Clearing a Graphics Real Screen 512×512 (Valid When R20 and D10 are 0)&gt;</text:p>
      <text:p text:style-name="Preformatted_20_Text"><text:s text:c="2"/>+-------+-------+-------+-------+</text:p>
      <text:p text:style-name="Preformatted_20_Text"><text:s text:c="2"/>| <text:s text:c="16"/>Display Range <text:s text:c="15"/>|</text:p>
      <text:p text:style-name="Preformatted_20_Text"><text:s text:c="2"/>| <text:s text:c="12"/>512×512, Different Depth Screens <text:s text:c="9"/>|</text:p>
      <text:p text:style-name="Preformatted_20_Text"><text:s text:c="2"/>+-------+-------+-------+-------+</text:p>
      <text:p text:style-name="Preformatted_20_Text"/>
      <text:p text:style-name="Preformatted_20_Text"><text:s text:c="3"/>Screen 3 (16 colors, corresponds to D03)</text:p>
      <text:p text:style-name="Preformatted_20_Text"><text:s text:c="3"/>Screen 2 (256 colors, corresponds to D02)</text:p>
      <text:p text:style-name="Preformatted_20_Text"><text:s text:c="3"/>Screen 1 (65536 colors, corresponds to D01)</text:p>
      <text:p text:style-name="Preformatted_20_Text"><text:s text:c="3"/>Screen 0 (D00 corresponds)</text:p>
      <text:p text:style-name="First_20_paragraph">Width: 512</text:p>
      <text:list text:style-name="Numbering_20_1" text:start-value="3">
        <text:list-item>
          <text:p text:style-name="List_20_Number_20_Tight">Text Screen and Graphics Screen Control (CRTC)</text:p>
        </text:list-item>
      </text:list>
      <text:list text:style-name="List_20_1">
        <text:list-item>
          <text:p text:style-name="List_20_Bullet_20_Tight">Graphics 16 Color 4 Screen Mode (Valid when D10 of R20 is 0, D09 is 0, and D08 is 0)</text:p>
        </text:list-item>
      </text:list>
      <text:p text:style-name="First_20_paragraph">D03 D02 D01 D00</text:p>
      <text:p text:style-name="Preformatted_20_Text"><text:s text:c="1"/>0 : Graphics Screen 0 Display Area Clear OFF</text:p>
      <text:p text:style-name="Preformatted_20_Text"><text:s text:c="1"/>1 : Graphics Screen 0 Display Area Clear ON</text:p>
      <text:p text:style-name="Preformatted_20_Text"><text:s text:c="1"/>0 : Graphics Screen 1 Display Area Clear OFF</text:p>
      <text:p text:style-name="Preformatted_20_Text"><text:s text:c="1"/>1 : Graphics Screen 1 Display Area Clear ON</text:p>
      <text:p text:style-name="Preformatted_20_Text"><text:s text:c="1"/>0 : Graphics Screen 2 Display Area Clear OFF</text:p>
      <text:p text:style-name="Preformatted_20_Text"><text:s text:c="1"/>1 : Graphics Screen 2 Display Area Clear ON</text:p>
      <text:p text:style-name="Preformatted_20_Text"><text:s text:c="1"/>0 : Graphics Screen 3 Display Area Clear OFF</text:p>
      <text:p text:style-name="Preformatted_20_Text"><text:s text:c="1"/>1 : Graphics Screen 3 Display Area Clear ON</text:p>
      <text:list text:style-name="List_20_1">
        <text:list-item>
          <text:p text:style-name="List_20_Bullet_20_Tight">Graphics 256 Color 2 Screen Mode (Valid when D10 of R20 is 0, D09 is 0, and D08 is 1)</text:p>
        </text:list-item>
      </text:list>
      <text:p text:style-name="First_20_paragraph">D03 D02 D01 D00</text:p>
      <text:p text:style-name="Preformatted_20_Text"><text:s text:c="1"/>0 : Graphics Screen 0 Display Area Clear OFF</text:p>
      <text:p text:style-name="Preformatted_20_Text"><text:s text:c="1"/>1 : Graphics Screen 0 Display Area Clear ON</text:p>
      <text:p text:style-name="Preformatted_20_Text"><text:s text:c="1"/>0 : Graphics Screen 1 Display Area Clear OFF</text:p>
      <text:p text:style-name="Preformatted_20_Text"><text:s text:c="1"/>1 : Graphics Screen 1 Display Area Clear ON</text:p>
      <text:list text:style-name="List_20_1">
        <text:list-item>
          <text:p text:style-name="List_20_Bullet_20_Tight">Graphics 65536 Color 1 Screen Mode (Valid when D10 of R20 is 0, D09 is 1, and D08 is 1)</text:p>
        </text:list-item>
      </text:list>
      <text:p text:style-name="First_20_paragraph">D03 D02 D01 D00</text:p>
      <text:p text:style-name="Preformatted_20_Text"><text:s text:c="1"/>0 : Graphics Screen 0 Display Area Clear OFF</text:p>
      <text:p text:style-name="Preformatted_20_Text"><text:s text:c="1"/>1 : Graphics Screen 0 Display Area Clear ON</text:p>
      <text:p text:style-name="First_20_paragraph">Additionally, in 256 color 2 screen mode and 65536 color 1 screen mode, if data other than the above is set, the corresponding bit screen display area will be high-speed cleared.</text:p>
      <text:p text:style-name="Text_20_body">Chapter 2 Screen Control</text:p>
      <text:p text:style-name="Text_20_body">(7) CRTC Operation Mode Setting Port (E80480H) The CRTC operates various functions through dual port DRAM or SAM (Serial Access Memory). Each function has a different meaning depending on the read or write operation.</text:p>
      <text:list text:style-name="List_20_1">
        <text:list-item>
          <text:p text:style-name="List_20_Bullet_20_Tight">Write Operation</text:p>
        </text:list-item>
      </text:list>
      <text:p text:style-name="First_20_paragraph">D7 D6 D5 D4 D3 D2 D1 D0</text:p>
      <text:list text:style-name="List_20_1">
        <text:list-item>
          <text:list text:style-name="List_20_1">
            <text:list-item>
              <text:list text:style-name="List_20_1">
                <text:list-item>
                  <text:list text:style-name="List_20_1">
                    <text:list-item>
                      <text:list text:style-name="List_20_1">
                        <text:list-item>
                          <text:list text:style-name="List_20_1">
                            <text:list-item>
                              <text:p text:style-name="List_20_Bullet_20_Tight">0</text:p>
                            </text:list-item>
                          </text:list>
                        </text:list-item>
                      </text:list>
                    </text:list-item>
                  </text:list>
                </text:list-item>
              </text:list>
            </text:list-item>
          </text:list>
        </text:list-item>
      </text:list>
      <text:p text:style-name="First_20_paragraph">0: Graphic write to RAM stop (normal display) 1: Execute graphic write to RAM 1: Execute graphic clear to RAM 0: Text raster copy stop 1: Execute text raster copy</text:p>
      <text:list text:style-name="List_20_1">
        <text:list-item>
          <text:p text:style-name="List_20_Bullet_20_Tight">Read Operation</text:p>
        </text:list-item>
      </text:list>
      <text:p text:style-name="First_20_paragraph">D7 D6 D5 D4 D3 D2 D1 D0</text:p>
      <text:list text:style-name="List_20_1">
        <text:list-item>
          <text:list text:style-name="List_20_1">
            <text:list-item>
              <text:list text:style-name="List_20_1">
                <text:list-item>
                  <text:list text:style-name="List_20_1">
                    <text:list-item>
                      <text:list text:style-name="List_20_1">
                        <text:list-item>
                          <text:list text:style-name="List_20_1">
                            <text:list-item>
                              <text:p text:style-name="List_20_Bullet_20_Tight">0</text:p>
                            </text:list-item>
                          </text:list>
                        </text:list-item>
                      </text:list>
                    </text:list-item>
                  </text:list>
                </text:list-item>
              </text:list>
            </text:list-item>
          </text:list>
        </text:list-item>
      </text:list>
      <text:p text:style-name="First_20_paragraph">1: Graphic write to RAM in progress 0: Execute graphic clear to RAM (When D0, D1 are both 0, the graphic is in normal display) 1: Text raster copy in progress</text:p>
      <text:list text:style-name="List_20_1">
        <text:list-item>
          <text:p text:style-name="List_20_Bullet_20_Tight">Note on CRTC screen mode change: When setting the CRTC registers, pay attention to the setting order.</text:p>
        </text:list-item>
      </text:list>
      <text:p text:style-name="First_20_paragraph">(1) When switching from high display mode to low display mode: R20 (E80028H) ..... Set display mode R01 (E80002H) R07 (E8000EH) .... H, V registers, etc.</text:p>
      <text:p text:style-name="Text_20_body">(2) When switching from low display mode to high display mode: R00 (E80000H) R07 (E8000EH) R20 (E80028H)</text:p>
      <text:p text:style-name="Text_20_body">Screen mode size restrictions:</text:p>
      <text:p text:style-name="Preformatted_20_Text">768 x 512 (high) &gt; 512 x 512 (high) or 256</text:p>
      <text:p text:style-name="Preformatted_20_Text">512 x 512 (high) &gt; 256 x 256 (high)</text:p>
      <text:p text:style-name="Preformatted_20_Text">256 x 256 (low)</text:p>
      <text:p text:style-name="First_20_paragraph">Also, comparison with the current display mode and the next display mode is performed by bits 0, 1, 4 of R20.</text:p>
      <text:p text:style-name="Text_20_body">3-3 Detailed CRTC Special Functions (Text)</text:p>
      <text:p text:style-name="Text_20_body">The text screen has the following functions.</text:p>
      <text:p text:style-name="Text_20_body">(1) Scroll Scrolls the text display screen. Specifically, the X and Y coordinates of the top left of the display screen are set in single units through R10 (EB0014H) and R11 (EB0016H), and scrolling is performed up to that point.</text:p>
      <text:p text:style-name="Text_20_body">(2) Simultaneous/Singular Access In the right mode, it is a feature that allows switching between simultaneous access and singular access to each plane VRAM of the text. (Single access only in the rear mode.) Specifically, by setting simultaneous/singular access for text VRAM in R21 (EB002AH) D08 to 0D07-04, the target plane for simultaneous access is set. Note that for simultaneous access, if the specified plane does not exist, it will be accessed simultaneously, so be careful.</text:p>
      <text:p text:style-name="Text_20_body">(3) Raster Copy Any raster (because of 4 raster units, the start address is 0-255) will be completely copied to another raster position (horizontal direction of 4 raster units, total 1024 dots). Specifically, by setting plane and start address D03-D00 in R21 (EB002AH) for executing raster copy, D15-D08 of R22 (EB002CH), the destination copy will be executed in raster. If all of D03-D00 in R21 (EB002AH) are not set to "0", raster copy will not be performed. Also, for this raster copy, when raster copy execution occurs, data transfer is performed synchronously with the horizontal sync period.</text:p>
      <text:p text:style-name="Text_20_body">(4) Bit Mask In the text VRAM data access of X68000, processing is performed in 16-bit units in the horizontal direction, but it is possible to mask the lowest 16-bit pitch out of those for efficient operation. Specifically, the bit mask can be set by writing "1" into the mask bits, using R21 (EB002AH) D09 for R23 (EB002EH) of D15-D00.</text:p>
      <text:p text:style-name="Text_20_body">Use simultaneous access or raster copy for high-speed clear of the text screen. However, be aware that if raster copy is used, it must be valuable on the execution screen rather than the display screen.</text:p>
      <text:p text:style-name="Text_20_body">Page 33</text:p>
      <text:p text:style-name="Text_20_body">Chapter 2 Screen Control</text:p>
      <text:p text:style-name="Text_20_body">3-4 CRTC Special Feature Details (Graphics)</text:p>
      <text:p text:style-name="Text_20_body">The graphics screen offers the following features:</text:p>
      <text:p text:style-name="Text_20_body">(1) Scroll It scrolls the graphics display screen. Specifically, in the case of an actual screen of 1024×1024, scrolling is performed by setting dot units in the X and Y coordinates of each display screen to registers (R12(E8001AH) to R13(E8001AH)). In the case of a 512×512 actual screen, scrolling is performed by setting data to registers (R12 to R19) corresponding to each screen according to the screen mode.</text:p>
      <text:p text:style-name="Text_20_body">(2) High-speed Clear It is a function that clears the contents of the graphics VRAM at high speed. Specifically, a graphics plane for high-speed clearing is selected by D03 to D00 of R21(E8002AH), and the graphics VRAM is cleared using D01 of E80480H. Additionally, this high-speed clear completes one horizontal period by switching the VDIP signal to the rising edge of the D00 bit of E80480H, and the CRTC writes "0" to each data within the memory SAM (1 raster unit per horizontal period). In the case of interlace, it finishes after 2 vertical periods.</text:p>
      <text:p text:style-name="Text_20_body">(3) Image Input By connecting the optional "Digitizer Swap" and using D00 of E80480H, it is a feature to input video image data converted via A/D to graphics VRAM. Also, the E80480H D00 bit by the rising edge of the VDIP signal latches, and the CRTC writes the video image data from the memory SAM within the input image period into one surface of the graphics VRAM. In the case of interlace, it completes after 2 vertical periods. However, this image input will not stop without writing "0" to D00 of E80480H.</text:p>
      <text:list text:style-name="Numbering_20_1" text:start-value="4">
        <text:list-item>
          <text:p text:style-name="List_20_Number_20_Tight">Sprite</text:p>
        </text:list-item>
      </text:list>
      <text:h text:style-name="Heading_20_1" text:outline-level="1"><text:bookmark-start text:name="id_4-1-characteristics-of-the-sprite"/>4-1 Characteristics of the sprite<text:bookmark-end text:name="id_4-1-characteristics-of-the-sprite"/></text:h>
      <text:p text:style-name="First_20_paragraph">The X68000 has its own sprite screen, independent from text screens and graphics screens, controlled by a custom sprite IC.</text:p>
      <text:p text:style-name="Text_20_body">With this sprite function, you can smoothly move any sprite pattern dot by dot. Furthermore, by utilizing the sprite priority (priority order) relative to the text or graphics screens, you can construct a varied screen.</text:p>
      <text:p text:style-name="Text_20_body">The specifications and address map of this sprite IC are shown below.</text:p>
      <text:p text:style-name="Text_20_body"><text:span text:style-name="Strong_20_Emphasis">Item Details Notes</text:span></text:p>
      <text:p text:style-name="Text_20_body"><text:span text:style-name="Strong_20_Emphasis">Sprite Pattern Specifications</text:span></text:p>
      <text:list text:style-name="List_20_1">
        <text:list-item>
          <text:p text:style-name="List_20_Bullet_20_Tight">Size 16 x 16 dot pattern</text:p>
        </text:list-item>
        <text:list-item>
          <text:p text:style-name="List_20_Bullet_20_Tight">Regular 128 patterns (up to 256 patterns if not displaying background)</text:p>
        </text:list-item>
        <text:list-item>
          <text:p text:style-name="List_20_Bullet_20_Tight">Colors 1 pattern has 16 - 65536 (in dot unit)</text:p>
        </text:list-item>
        <text:list-item>
          <text:p text:style-name="List_20_Bullet_20_Tight">Screen maximum 256 colors - 65536 colors</text:p>
        </text:list-item>
      </text:list>
      <text:p text:style-name="First_20_paragraph"><text:span text:style-name="Strong_20_Emphasis">Sprite Display</text:span></text:p>
      <text:list text:style-name="List_20_1">
        <text:list-item>
          <text:p text:style-name="List_20_Bullet_20_Tight">Maximum sprite count 1024 x 1024 dots</text:p>
        </text:list-item>
        <text:list-item>
          <text:p text:style-name="List_20_Bullet_20_Tight">Vertical: 512 dots per screen up to 256 dots</text:p>
        </text:list-item>
        <text:list-item>
          <text:p text:style-name="List_20_Bullet_20_Tight">Horizontal: 512 lines per screen up to 256 lines</text:p>
        </text:list-item>
        <text:list-item>
          <text:p text:style-name="List_20_Bullet_20_Tight">Display limit 128 lines per display</text:p>
        </text:list-item>
        <text:list-item>
          <text:p text:style-name="List_20_Bullet_20_Tight">Individual lines/screen</text:p>
        </text:list-item>
      </text:list>
      <text:p text:style-name="First_20_paragraph"><text:span text:style-name="Strong_20_Emphasis">Other Functions</text:span></text:p>
      <text:list text:style-name="List_20_1">
        <text:list-item>
          <text:p text:style-name="List_20_Bullet_20_Tight">Horizontal flip</text:p>
        </text:list-item>
        <text:list-item>
          <text:p text:style-name="List_20_Bullet_20_Tight">Vertical flip</text:p>
        </text:list-item>
        <text:list-item>
          <text:p text:style-name="List_20_Bullet_20_Tight">Priority with BG (Background) Priority (this function can be set for each sprite)</text:p>
        </text:list-item>
        <text:list-item>
          <text:p text:style-name="List_20_Bullet_20_Tight">Display priority (BG0 &gt; BG1)</text:p>
        </text:list-item>
        <text:list-item>
          <text:p text:style-name="List_20_Bullet_20_Tight">(SP0 &gt; SPn &gt; SP127)</text:p>
        </text:list-item>
      </text:list>
      <text:p text:style-name="First_20_paragraph">The above text is a detailed breakdown of the capabilities and functions of the sprite feature in the X68000, detailing pattern sizes, display counts, color limits, and other notable features such as flipping and priority settings.</text:p>
      <text:p text:style-name="Text_20_body"><text:span text:style-name="Strong_20_Emphasis">Chapter 2 Screen Control</text:span></text:p>
      <text:p text:style-name="Text_20_body">EB0000H - 16 bit EB0002H - Sprite scroll register EB0400H - Reserved EB0800H - BG scroll X register EB0802H - Screen scroll Y register EB0812H - Reserved</text:p>
      <text:p text:style-name="Text_20_body"><text:span text:style-name="Strong_20_Emphasis">Register Address</text:span> EB8000H - PCG area EBFCFEH</text:p>
      <text:p text:style-name="Text_20_body"><text:span text:style-name="Strong_20_Emphasis">PCG Area</text:span></text:p>
      <text:p text:style-name="Text_20_body">The PCG area's text area is generally divided into 16K word segments, as shown above, into 2 parts. However, the use of BG allows the following arrangement.</text:p>
      <text:p text:style-name="Text_20_body">Example 1 EB8000H - PCG area EBC000H - Text area 0</text:p>
      <text:p text:style-name="Text_20_body">Example 2 EB8000H - PCG area EBC000H - Text area 0 EBE000H - Text area 1</text:p>
      <text:p text:style-name="Text_20_body">Example 3 EB8000H - PCG area</text:p>
      <text:list text:style-name="Numbering_20_1">
        <text:list-item>
          <text:p text:style-name="List_20_Number">Both text areas 0 and 1 can be used for background 1, allowing it to be displayed on two screens. If only text area 0 is used, background 1 can be specified in the scroll register as "Text SEL".</text:p>
        </text:list-item>
        <text:list-item>
          <text:p text:style-name="List_20_Number">If background 1 is only displayed on one screen, only 1 text area is necessary. The remaining text area can be used as the PCG area.</text:p>
        </text:list-item>
        <text:list-item>
          <text:p text:style-name="List_20_Number">If background 1 is not displayed, the entire 16K words can be used as the PCG area. This results in 256 possible sprite patterns.</text:p>
        </text:list-item>
      </text:list>
      <text:p text:style-name="First_20_paragraph">Figure 2-10. Sprite register address map</text:p>
      <text:p text:style-name="Text_20_body">Page 36</text:p>
      <text:p text:style-name="Text_20_body">4-2 Sprite Register Address Map</text:p>
      <text:p text:style-name="Text_20_body">[Sprite, Background, and Scroll Registers] (note: Can be expanded) (All registers can be READ/WRITE)</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HeaderRowCell" office:value-type="string">
              <text:p text:style-name="Table_20_Heading">Name</text:p>
            </table:table-cell>
            <table:table-cell table:style-name="TableHeaderRowCell" office:value-type="string">
              <text:p text:style-name="Table_20_Heading">Width Bit</text:p>
            </table:table-cell>
            <table:table-cell table:style-name="TableHeaderRowCell" office:value-type="string">
              <text:p text:style-name="Table_20_Heading">D15 D14 D13 D12 D11 D10 D09 D08 D07 D06 D05 D04 D03 D02 D01 D00</text:p>
            </table:table-cell>
            <table:table-cell table:style-name="TableHeaderRowCell" office:value-type="string">
              <text:p text:style-name="Table_20_Heading">Notes</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A set of four registers is allocated for each sprite.</text:p>
          </table:table-cell>
        </table:table-row>
        <table:table-row>
          <table:table-cell table:style-name="TableRowCell" office:value-type="string">
    </table:table-cell>
          <table:table-cell table:style-name="TableRowCell" office:value-type="string">
            <text:p text:style-name="Table_20_Contents">EB0000</text:p>
          </table:table-cell>
          <table:table-cell table:style-name="TableRowCell" office:value-type="string">
            <text:p text:style-name="Table_20_Contents">O O O O O O O O O O O O O O X</text:p>
          </table:table-cell>
          <table:table-cell table:style-name="TableRowCell" office:value-type="string">
            <text:p text:style-name="Table_20_Contents">X-coordinate</text:p>
          </table:table-cell>
        </table:table-row>
        <table:table-row>
          <table:table-cell table:style-name="TableRowCell" office:value-type="string">
    </table:table-cell>
          <table:table-cell table:style-name="TableRowCell" office:value-type="string">
            <text:p text:style-name="Table_20_Contents">EB0002</text:p>
          </table:table-cell>
          <table:table-cell table:style-name="TableRowCell" office:value-type="string">
            <text:p text:style-name="Table_20_Contents">O O O O O O O O O O O Y</text:p>
          </table:table-cell>
          <table:table-cell table:style-name="TableRowCell" office:value-type="string">
            <text:p text:style-name="Table_20_Contents">Y-coordinate</text:p>
          </table:table-cell>
        </table:table-row>
        <table:table-row>
          <table:table-cell table:style-name="TableRowCell" office:value-type="string">
            <text:p text:style-name="Table_20_Contents">SP 0</text:p>
          </table:table-cell>
          <table:table-cell table:style-name="TableRowCell" office:value-type="string">
            <text:p text:style-name="Table_20_Contents">EB0004</text:p>
          </table:table-cell>
          <table:table-cell table:style-name="TableRowCell" office:value-type="string">
            <text:p text:style-name="Table_20_Contents">O O O O COLOR (SP) SP COD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0006</text:p>
          </table:table-cell>
          <table:table-cell table:style-name="TableRowCell" office:value-type="string">
            <text:p text:style-name="Table_20_Contents">VR HR DISP O O O O O O PRW</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VR: Vertical Flip (Sprit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HR: Horizontal Flip (Sprite)</text:p>
          </table:table-cell>
        </table:table-row>
        <table:table-row>
          <table:table-cell table:style-name="TableRowCell" office:value-type="string">
    </table:table-cell>
          <table:table-cell table:style-name="TableRowCell" office:value-type="string">
            <text:p text:style-name="Table_20_Contents">EB03F8</text:p>
          </table:table-cell>
          <table:table-cell table:style-name="TableRowCell" office:value-type="string">
            <text:p text:style-name="Table_20_Contents">O O O O O O O O O O O O O O X</text:p>
          </table:table-cell>
          <table:table-cell table:style-name="TableRowCell" office:value-type="string">
            <text:p text:style-name="Table_20_Contents">X-coordinate</text:p>
          </table:table-cell>
        </table:table-row>
        <table:table-row>
          <table:table-cell table:style-name="TableRowCell" office:value-type="string">
            <text:p text:style-name="Table_20_Contents">SP 127</text:p>
          </table:table-cell>
          <table:table-cell table:style-name="TableRowCell" office:value-type="string">
            <text:p text:style-name="Table_20_Contents">EB03FA</text:p>
          </table:table-cell>
          <table:table-cell table:style-name="TableRowCell" office:value-type="string">
            <text:p text:style-name="Table_20_Contents">O O O O O O O O O O O Y</text:p>
          </table:table-cell>
          <table:table-cell table:style-name="TableRowCell" office:value-type="string">
            <text:p text:style-name="Table_20_Contents">Y-coordinate</text:p>
          </table:table-cell>
        </table:table-row>
        <table:table-row>
          <table:table-cell table:style-name="TableRowCell" office:value-type="string">
    </table:table-cell>
          <table:table-cell table:style-name="TableRowCell" office:value-type="string">
            <text:p text:style-name="Table_20_Contents">EB03FC</text:p>
          </table:table-cell>
          <table:table-cell table:style-name="TableRowCell" office:value-type="string">
            <text:p text:style-name="Table_20_Contents">O O O O COLOR (SP) SP COD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03FE</text:p>
          </table:table-cell>
          <table:table-cell table:style-name="TableRowCell" office:value-type="string">
            <text:p text:style-name="Table_20_Contents">VR HR DISP O O O O O O PRW</text:p>
          </table:table-cell>
          <table:table-cell table:style-name="TableRowCell" office:value-type="string">
    </table:table-cell>
        </table:table-row>
      </table:table>
      <text:p text:style-name="First_20_paragraph">| | BGD | | | | | EB0800 | O O O O O O O O X | X-coordinate | | | EB0802 | O O O O O O O Y | Y-coordinate | | BGI | EB0804 | O O O O O O O O X | X-coordinate | | | EB0806 | O O O O O O O Y | Y-coordinate |</text:p>
      <text:p text:style-name="Text_20_body">| BGI | EB0808 | O DISP O O O O BGi BG | | BGZ | | | | Total | EB080A | O O O O O O O O H total | Horizontal Total | | | EB080C | O O O O O O O O H disp | Horizontal Display Start Position | | | EB080E | O O O O O O O O V disp | Vertical Display Start Position | | | EB0810 | O O O O O O O O L/H freq | | | Total | | V Res. H Res. | Resolution |</text:p>
      <text:p text:style-name="Text_20_body">Table 2-14 Sprite Register Address Map (1)</text:p>
      <text:p text:style-name="Text_20_body">Chapter 2 Screen Control</text:p>
      <text:p text:style-name="Text_20_body">[PCG Area] (All registers READ/WRITE possible)</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column table:style-name="Table14.M"/>
        <table:table-column table:style-name="Table14.N"/>
        <table:table-column table:style-name="Table14.O"/>
        <table:table-column table:style-name="Table14.P"/>
        <table:table-column table:style-name="Table14.Q"/>
        <table:table-column table:style-name="Table14.R"/>
        <table:table-column table:style-name="Table14.S"/>
        <table:table-header-rows>
          <table:table-row>
            <table:table-cell table:style-name="TableHeaderRowCell" office:value-type="string">
              <text:p text:style-name="Table_20_Heading">Name</text:p>
            </table:table-cell>
            <table:table-cell table:style-name="TableHeaderRowCell" office:value-type="string">
              <text:p text:style-name="Table_20_Heading">Address</text:p>
            </table:table-cell>
            <table:table-cell table:style-name="TableHeaderRowCell" office:value-type="string">
              <text:p text:style-name="Table_20_Heading">D 15</text:p>
            </table:table-cell>
            <table:table-cell table:style-name="TableHeaderRowCell" office:value-type="string">
              <text:p text:style-name="Table_20_Heading">D 14</text:p>
            </table:table-cell>
            <table:table-cell table:style-name="TableHeaderRowCell" office:value-type="string">
              <text:p text:style-name="Table_20_Heading">D 13</text:p>
            </table:table-cell>
            <table:table-cell table:style-name="TableHeaderRowCell" office:value-type="string">
              <text:p text:style-name="Table_20_Heading">D 12</text:p>
            </table:table-cell>
            <table:table-cell table:style-name="TableHeaderRowCell" office:value-type="string">
              <text:p text:style-name="Table_20_Heading">D 11</text:p>
            </table:table-cell>
            <table:table-cell table:style-name="TableHeaderRowCell" office:value-type="string">
              <text:p text:style-name="Table_20_Heading">D 10</text:p>
            </table:table-cell>
            <table:table-cell table:style-name="TableHeaderRowCell" office:value-type="string">
              <text:p text:style-name="Table_20_Heading">D 09</text:p>
            </table:table-cell>
            <table:table-cell table:style-name="TableHeaderRowCell" office:value-type="string">
              <text:p text:style-name="Table_20_Heading">D 08</text:p>
            </table:table-cell>
            <table:table-cell table:style-name="TableHeaderRowCell" office:value-type="string">
              <text:p text:style-name="Table_20_Heading">D 07</text:p>
            </table:table-cell>
            <table:table-cell table:style-name="TableHeaderRowCell" office:value-type="string">
              <text:p text:style-name="Table_20_Heading">D 06</text:p>
            </table:table-cell>
            <table:table-cell table:style-name="TableHeaderRowCell" office:value-type="string">
              <text:p text:style-name="Table_20_Heading">D 05</text:p>
            </table:table-cell>
            <table:table-cell table:style-name="TableHeaderRowCell" office:value-type="string">
              <text:p text:style-name="Table_20_Heading">D 04</text:p>
            </table:table-cell>
            <table:table-cell table:style-name="TableHeaderRowCell" office:value-type="string">
              <text:p text:style-name="Table_20_Heading">D 03</text:p>
            </table:table-cell>
            <table:table-cell table:style-name="TableHeaderRowCell" office:value-type="string">
              <text:p text:style-name="Table_20_Heading">D 02</text:p>
            </table:table-cell>
            <table:table-cell table:style-name="TableHeaderRowCell" office:value-type="string">
              <text:p text:style-name="Table_20_Heading">D 01</text:p>
            </table:table-cell>
            <table:table-cell table:style-name="TableHeaderRowCell" office:value-type="string">
              <text:p text:style-name="Table_20_Heading">D 0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EB8000</text:p>
          </table:table-cell>
          <table:table-cell table:style-name="TableRowCell" office:value-type="string">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able:table-cell>
        </table:table-row>
        <table:table-row>
          <table:table-cell table:style-name="TableRowCell" office:value-type="string">
            <text:p text:style-name="Table_20_Contents">EB8007</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8001</text:p>
          </table:table-cell>
          <table:table-cell table:style-name="TableRowCell" office:value-type="string">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able:table-cell>
        </table:table-row>
        <table:table-row>
          <table:table-cell table:style-name="TableRowCell" office:value-type="string">
            <text:p text:style-name="Table_20_Contents">EB801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8020</text:p>
          </table:table-cell>
          <table:table-cell table:style-name="TableRowCell" office:value-type="string">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able:table-cell>
        </table:table-row>
        <table:table-row>
          <table:table-cell table:style-name="TableRowCell" office:value-type="string">
            <text:p text:style-name="Table_20_Contents">EB803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8040</text:p>
          </table:table-cell>
          <table:table-cell table:style-name="TableRowCell" office:value-type="string">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able:table-cell>
        </table:table-row>
        <table:table-row>
          <table:table-cell table:style-name="TableRowCell" office:value-type="string">
            <text:p text:style-name="Table_20_Contents">EB805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8060</text:p>
          </table:table-cell>
          <table:table-cell table:style-name="TableRowCell" office:value-type="string">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able:table-cell>
        </table:table-row>
        <table:table-row>
          <table:table-cell table:style-name="TableRowCell" office:value-type="string">
            <text:p text:style-name="Table_20_Contents">EB807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8080</text:p>
          </table:table-cell>
          <table:table-cell table:style-name="TableRowCell" office:value-type="string">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able:table-cell>
        </table:table-row>
        <table:table-row>
          <table:table-cell table:style-name="TableRowCell" office:value-type="string">
            <text:p text:style-name="Table_20_Contents">EB80F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8100</text:p>
          </table:table-cell>
          <table:table-cell table:style-name="TableRowCell" office:value-type="string">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able:table-cell>
        </table:table-row>
        <table:table-row>
          <table:table-cell table:style-name="TableRowCell" office:value-type="string">
            <text:p text:style-name="Table_20_Contents">EB817F</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BF80</text:p>
          </table:table-cell>
          <table:table-cell table:style-name="TableRowCell" office:value-type="string">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ext:p text:style-name="Table_20_Contents">I</text:p>
          </table:table-cell>
          <table:table-cell table:style-name="TableRowCell" office:value-type="string">
            <text:p text:style-name="Table_20_Contents">G</text:p>
          </table:table-cell>
          <table:table-cell table:style-name="TableRowCell" office:value-type="string">
            <text:p text:style-name="Table_20_Contents">R</text:p>
          </table:table-cell>
          <table:table-cell table:style-name="TableRowCell" office:value-type="string">
            <text:p text:style-name="Table_20_Contents">B</text:p>
          </table:table-cell>
          <table:table-cell table:style-name="TableRowCell" office:value-type="string">
    </table:table-cell>
        </table:table-row>
        <table:table-row>
          <table:table-cell table:style-name="TableRowCell" office:value-type="string">
            <text:p text:style-name="Table_20_Contents">EBBFF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Remarks:</text:p>
      <text:list text:style-name="List_20_1">
        <text:list-item>
          <text:p text:style-name="List_20_Bullet_20_Tight">SP code sizes configuration to PCG allocation:</text:p>
        </text:list-item>
      </text:list>
      <text:p text:style-name="Preformatted_20_Text"><text:s text:c="3"/>0 2</text:p>
      <text:p text:style-name="Preformatted_20_Text"><text:s text:c="3"/>1 3</text:p>
      <text:p text:style-name="Preformatted_20_Text"><text:s text:c="2"/>16 Bit mode.</text:p>
      <text:list text:style-name="List_20_1">
        <text:list-item>
          <text:p text:style-name="List_20_Bullet">Horizontal 512 dot mode. SP code size configuration (0123) = BG code size = 16x16 dot.</text:p>
        </text:list-item>
        <text:list-item>
          <text:p text:style-name="List_20_Bullet">Horizontal 256 dot mode.</text:p>
        </text:list-item>
      </text:list>
      <text:p text:style-name="Preformatted_20_Text"><text:s text:c="2"/>SP code size configuration (0123) = 16x16 dot.</text:p>
      <text:p text:style-name="Preformatted_20_Text"><text:s text:c="2"/>BG code size:</text:p>
      <text:p text:style-name="Preformatted_20_Text"><text:s text:c="3"/>- Upper (0) OR</text:p>
      <text:p text:style-name="Preformatted_20_Text"><text:s text:c="3"/>- Lower (1) OR</text:p>
      <text:p text:style-name="Preformatted_20_Text"><text:s text:c="3"/>- Upper (2) OR</text:p>
      <text:p text:style-name="Preformatted_20_Text"><text:s text:c="3"/>- Lower (3)</text:p>
      <text:p text:style-name="Preformatted_20_Text"><text:s text:c="3"/>= 8x8 dot.</text:p>
      <text:p text:style-name="First_20_paragraph">For details, please refer to the main text (4-5 PCG area).</text:p>
      <text:p text:style-name="Text_20_body">Note: The maximum values of the sprite code and background code are determined by the size of the PCG area.</text:p>
      <text:list text:style-name="Numbering_20_1">
        <text:list-item>
          <text:p text:style-name="List_20_Number_20_Tight">For text area EBC000H to EBBFFE H (8K words), the code is 0 to 127</text:p>
        </text:list-item>
        <text:list-item>
          <text:p text:style-name="List_20_Number_20_Tight">For text area EBC000H to EBBFFE H (4K words), the code is 0 to 191</text:p>
        </text:list-item>
        <text:list-item>
          <text:p text:style-name="List_20_Number_20_Tight">If the background is not displayed, the sprite code is 0 to 255</text:p>
        </text:list-item>
      </text:list>
      <text:p text:style-name="First_20_paragraph">[Text Area] (All registers READ/WRITE permitted)</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header-rows>
          <table:table-row>
            <table:table-cell table:style-name="TableHeaderRowCell" office:value-type="string">
              <text:p text:style-name="Table_20_Heading">Name</text:p>
            </table:table-cell>
            <table:table-cell table:style-name="TableHeaderRowCell" office:value-type="string">
              <text:p text:style-name="Table_20_Heading">VR</text:p>
            </table:table-cell>
            <table:table-cell table:style-name="TableHeaderRowCell" office:value-type="string">
              <text:p text:style-name="Table_20_Heading">HR</text:p>
            </table:table-cell>
            <table:table-cell table:style-name="TableHeaderRowCell" office:value-type="string">
              <text:p text:style-name="Table_20_Heading">O</text:p>
            </table:table-cell>
            <table:table-cell table:style-name="TableHeaderRowCell" office:value-type="string">
              <text:p text:style-name="Table_20_Heading">O</text:p>
            </table:table-cell>
            <table:table-cell table:style-name="TableHeaderRowCell" office:value-type="string">
              <text:p text:style-name="Table_20_Heading">COLOR (BG)</text:p>
            </table:table-cell>
            <table:table-cell table:style-name="TableHeaderRowCell" office:value-type="string">
              <text:p text:style-name="Table_20_Heading">BG Code</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ECB000</text:p>
          </table:table-cell>
          <table:table-cell table:style-name="TableRowCell" office:value-type="string">
    </table:table-cell>
          <table:table-cell table:style-name="TableRowCell" office:value-type="string">
            <text:p text:style-name="Table_20_Contents">VR</text:p>
          </table:table-cell>
          <table:table-cell table:style-name="TableRowCell" office:value-type="string">
            <text:p text:style-name="Table_20_Contents">HR</text:p>
          </table:table-cell>
          <table:table-cell table:style-name="TableRowCell" office:value-type="string">
            <text:p text:style-name="Table_20_Contents">O</text:p>
          </table:table-cell>
          <table:table-cell table:style-name="TableRowCell" office:value-type="string">
            <text:p text:style-name="Table_20_Contents">COLOR (BG)</text:p>
          </table:table-cell>
          <table:table-cell table:style-name="TableRowCell" office:value-type="string">
            <text:p text:style-name="Table_20_Contents">BG Code</text:p>
          </table:table-cell>
          <table:table-cell table:style-name="TableRowCell" office:value-type="string">
            <text:p text:style-name="Table_20_Contents">Remarks</text:p>
          </table:table-cell>
        </table:table-row>
        <table:table-row>
          <table:table-cell table:style-name="TableRowCell" office:value-type="string">
            <text:p text:style-name="Table_20_Contents">EBC00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VR: Inverse (Background)</text:p>
          </table:table-cell>
        </table:table-row>
        <table:table-row>
          <table:table-cell table:style-name="TableRowCell" office:value-type="string">
            <text:p text:style-name="Table_20_Contents">EBBFF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O</text:p>
          </table:table-cell>
          <table:table-cell table:style-name="TableRowCell" office:value-type="string">
            <text:p text:style-name="Table_20_Contents">COLOR (BG)</text:p>
          </table:table-cell>
          <table:table-cell table:style-name="TableRowCell" office:value-type="string">
            <text:p text:style-name="Table_20_Contents">BG Code</text:p>
          </table:table-cell>
          <table:table-cell table:style-name="TableRowCell" office:value-type="string">
            <text:p text:style-name="Table_20_Contents">HR: Inverse (Background)</text:p>
          </table:table-cell>
        </table:table-row>
        <table:table-row>
          <table:table-cell table:style-name="TableRowCell" office:value-type="string">
            <text:p text:style-name="Table_20_Contents">EBBFFE</text:p>
          </table:table-cell>
          <table:table-cell table:style-name="TableRowCell" office:value-type="string">
    </table:table-cell>
          <table:table-cell table:style-name="TableRowCell" office:value-type="string">
            <text:p text:style-name="Table_20_Contents">VR</text:p>
          </table:table-cell>
          <table:table-cell table:style-name="TableRowCell" office:value-type="string">
            <text:p text:style-name="Table_20_Contents">HR</text:p>
          </table:table-cell>
          <table:table-cell table:style-name="TableRowCell" office:value-type="string">
            <text:p text:style-name="Table_20_Contents">O</text:p>
          </table:table-cell>
          <table:table-cell table:style-name="TableRowCell" office:value-type="string">
            <text:p text:style-name="Table_20_Contents">COLOR (BG)</text:p>
          </table:table-cell>
          <table:table-cell table:style-name="TableRowCell" office:value-type="string">
            <text:p text:style-name="Table_20_Contents">BG Code</text:p>
          </table:table-cell>
          <table:table-cell table:style-name="TableRowCell" office:value-type="string">
    </table:table-cell>
        </table:table-row>
        <table:table-row>
          <table:table-cell table:style-name="TableRowCell" office:value-type="string">
            <text:p text:style-name="Table_20_Contents">EBB00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BFF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O</text:p>
          </table:table-cell>
          <table:table-cell table:style-name="TableRowCell" office:value-type="string">
            <text:p text:style-name="Table_20_Contents">COLOR (BG)</text:p>
          </table:table-cell>
          <table:table-cell table:style-name="TableRowCell" office:value-type="string">
            <text:p text:style-name="Table_20_Contents">BG Code</text:p>
          </table:table-cell>
          <table:table-cell table:style-name="TableRowCell" office:value-type="string">
    </table:table-cell>
        </table:table-row>
        <table:table-row>
          <table:table-cell table:style-name="TableRowCell" office:value-type="string">
            <text:p text:style-name="Table_20_Contents">EBBFFE</text:p>
          </table:table-cell>
          <table:table-cell table:style-name="TableRowCell" office:value-type="string">
    </table:table-cell>
          <table:table-cell table:style-name="TableRowCell" office:value-type="string">
            <text:p text:style-name="Table_20_Contents">VR</text:p>
          </table:table-cell>
          <table:table-cell table:style-name="TableRowCell" office:value-type="string">
            <text:p text:style-name="Table_20_Contents">HR</text:p>
          </table:table-cell>
          <table:table-cell table:style-name="TableRowCell" office:value-type="string">
            <text:p text:style-name="Table_20_Contents">O</text:p>
          </table:table-cell>
          <table:table-cell table:style-name="TableRowCell" office:value-type="string">
            <text:p text:style-name="Table_20_Contents">COLOR (BG)</text:p>
          </table:table-cell>
          <table:table-cell table:style-name="TableRowCell" office:value-type="string">
            <text:p text:style-name="Table_20_Contents">BG Code</text:p>
          </table:table-cell>
          <table:table-cell table:style-name="TableRowCell" office:value-type="string">
    </table:table-cell>
        </table:table-row>
      </table:table>
      <text:p text:style-name="First_20_paragraph">Table 2-16 Sprite Register Address Map (3)</text:p>
      <text:p text:style-name="Text_20_body">Chapter 2: Screen Control</text:p>
      <text:p text:style-name="Text_20_body">4-3 Details of Sprite Scroll Registers</text:p>
      <text:p text:style-name="Text_20_body">(1) X Coordinate (SP), Y Coordinate (SP) Set the display position of the sprite in the sprite temporary coordinates.</text:p>
      <text:p text:style-name="Text_20_body">X Coordinate (SP) ............ 0 - 1023 Y Coordinate (SP) ............ 0 - 1023</text:p>
      <text:p text:style-name="Text_20_body">Below is an example showing the relationship between the display screen and the sprite temporary coordinates.</text:p>
      <text:p text:style-name="Text_20_body">Example: Display Screen Mode | Display Screen Range</text:p>
      <text:p text:style-name="Preformatted_20_Text">512 dots × 512 lines: (16, 16) ~ (527, 527)</text:p>
      <text:p text:style-name="Preformatted_20_Text">256 dots × 256 lines: (16, 16) ~ (271, 271)</text:p>
      <text:p text:style-name="First_20_paragraph">._________________ X Coordinate | | | Y Coordinate | | | | | | | | | | | | Display Screen</text:p>
      <text:p text:style-name="Text_20_body">Sprite Temporary Coordinates System</text:p>
      <text:p text:style-name="Text_20_body">Figure 2-11: Display screen and sprite temporary coordinates</text:p>
      <text:list text:style-name="Numbering_20_1" text:start-value="4">
        <text:list-item>
          <text:p text:style-name="List_20_Number_20_Tight">Sprite</text:p>
        </text:list-item>
      </text:list>
      <text:p text:style-name="First_20_paragraph">(2) PRV (Priority) Set the display priority order between sprite and background (2 plane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D01</text:p>
            </table:table-cell>
            <table:table-cell table:style-name="TableHeaderRowCell" office:value-type="string">
              <text:p text:style-name="P3">D00</text:p>
            </table:table-cell>
            <table:table-cell table:style-name="TableHeaderRowCell" office:value-type="string">
              <text:p text:style-name="P4">Display Priority Order</text:p>
            </table:table-cell>
          </table:table-row>
        </table:table-header-rows>
        <table:table-row>
          <table:table-cell table:style-name="TableRowCell" office:value-type="string">
            <text:p text:style-name="Table_20_Contents">0</text:p>
          </table:table-cell>
          <table:table-cell table:style-name="TableRowCell" office:value-type="string">
            <text:p text:style-name="P5">0</text:p>
          </table:table-cell>
          <table:table-cell table:style-name="TableRowCell" office:value-type="string">
            <text:p text:style-name="P6">Don't display sprite</text:p>
          </table:table-cell>
        </table:table-row>
        <table:table-row>
          <table:table-cell table:style-name="TableRowCell" office:value-type="string">
            <text:p text:style-name="Table_20_Contents">0</text:p>
          </table:table-cell>
          <table:table-cell table:style-name="TableRowCell" office:value-type="string">
            <text:p text:style-name="P5">1</text:p>
          </table:table-cell>
          <table:table-cell table:style-name="TableRowCell" office:value-type="string">
            <text:p text:style-name="P6">BGO &gt; BG1 &gt; SP</text:p>
          </table:table-cell>
        </table:table-row>
        <table:table-row>
          <table:table-cell table:style-name="TableRowCell" office:value-type="string">
            <text:p text:style-name="Table_20_Contents">1</text:p>
          </table:table-cell>
          <table:table-cell table:style-name="TableRowCell" office:value-type="string">
            <text:p text:style-name="P5">0</text:p>
          </table:table-cell>
          <table:table-cell table:style-name="TableRowCell" office:value-type="string">
            <text:p text:style-name="P6">BGO &gt; SP &gt; BG1</text:p>
          </table:table-cell>
        </table:table-row>
        <table:table-row>
          <table:table-cell table:style-name="TableRowCell" office:value-type="string">
            <text:p text:style-name="Table_20_Contents">1</text:p>
          </table:table-cell>
          <table:table-cell table:style-name="TableRowCell" office:value-type="string">
            <text:p text:style-name="P5">1</text:p>
          </table:table-cell>
          <table:table-cell table:style-name="TableRowCell" office:value-type="string">
            <text:p text:style-name="P6">SP &gt; BGO &gt; BG1</text:p>
          </table:table-cell>
        </table:table-row>
      </table:table>
      <text:p text:style-name="First_20_paragraph"><text:span text:style-name="Strong_20_Emphasis">Figure 2-17</text:span> Display Priority Order</text:p>
      <text:p text:style-name="Text_20_body">When the color data B, R, G, I in the PCG area is 0000H, it is considered transparent and the lower priority plane is displayed.</text:p>
      <text:p text:style-name="Text_20_body">(3) For details on SP Code, COLOR (SP), H inversion (SP), and V inversion (SP), please refer to "4-6 Texture Area (1)" in this chapter.</text:p>
      <text:p text:style-name="Text_20_body">Chapter 2 Screen Control</text:p>
      <text:p text:style-name="Text_20_body">4-4 Background Scroll Registers and Screen Mode Registers</text:p>
      <text:p text:style-name="Text_20_body">(1) X Coordinate (BG) and Y Coordinate (BG) Sets the display starting position of the background surface in the text coordinate system.</text:p>
      <text:p text:style-name="Text_20_body">• X Coordinate (BG) ...... 0~511 or 0~1023 (When BGO, it's EB0800H, when BG1, it's EB0804H)</text:p>
      <text:p text:style-name="Preformatted_20_Text"><text:s text:c="6"/>EB0800H <text:s text:c="1"/>0 0 0 0 0 0 0 0 <text:s text:c="1"/>&lt;--- Background Surface 0 X Coordinate ---&gt; </text:p>
      <text:p text:style-name="Preformatted_20_Text"><text:s text:c="34"/>D15 D14 D13 D12 D11 <text:s text:c="1"/>D10 D09 D08 D07 D06 D05 D04 D03 D02 D01 D00</text:p>
      <text:p text:style-name="Preformatted_20_Text"/>
      <text:p text:style-name="Preformatted_20_Text"><text:s text:c="6"/>EB0804H <text:s text:c="1"/>0 0 0 0 0 0 0 0 <text:s text:c="1"/>&lt;--- Background Surface 1 X Coordinate ---&gt; </text:p>
      <text:p text:style-name="First_20_paragraph">• Y Coordinate (BG) ...... 0~511 or 0~1023 (When BGO, it's EB0802H, when BG1, it's EB0806H)</text:p>
      <text:p text:style-name="Preformatted_20_Text"><text:s text:c="6"/>EB0802H <text:s text:c="1"/>0 0 0 0 0 0 0 0 <text:s text:c="1"/>&lt;--- Background Surface 0 Y Coordinate ---&gt; </text:p>
      <text:p text:style-name="Preformatted_20_Text"><text:s text:c="34"/>D15 D14 D13 D12 D11 <text:s text:c="1"/>D10 D09 D08 D07 D06 D05 D04 D03 D02 D01 D00</text:p>
      <text:p text:style-name="Preformatted_20_Text"/>
      <text:p text:style-name="Preformatted_20_Text"><text:s text:c="6"/>EB0806H <text:s text:c="1"/>0 0 0 0 0 0 0 0 <text:s text:c="1"/>&lt;--- Background Surface 1 Y Coordinate ---&gt; </text:p>
      <text:p text:style-name="First_20_paragraph">The size of the text coordinate system changes depending on the value set in the "H Res." bit (D01, D00 of EB0810H) in the screen mode registers.</text:p>
      <text:list text:style-name="Numbering_20_1" text:start-value="4">
        <text:list-item>
          <text:p text:style-name="List_20_Number_20_Tight">Sprite</text:p>
        </text:list-item>
      </text:list>
      <text:p text:style-name="First_20_paragraph">[Top left] H Res.=00 (256 Dot Mode)</text:p>
      <text:p text:style-name="Text_20_body">[Top box] X Coordinate Y Coordinate BG Display Screen</text:p>
      <text:p text:style-name="Text_20_body">[Middle box] Text Area</text:p>
      <text:p text:style-name="Text_20_body">[Bottom left] H Res.=01 (512 Dot Mode)</text:p>
      <text:p text:style-name="Text_20_body">[Bottom box] Background 0 Display Screen</text:p>
      <text:p text:style-name="Text_20_body">Figure 2-12 Text Area Dimensions</text:p>
      <text:p text:style-name="Text_20_body">In 512-dot display mode, only the background 0 face is displayed, and the settings for the background 1 face are ignored.</text:p>
      <text:p text:style-name="Text_20_body">Chapter 2 Screen Control</text:p>
      <text:p text:style-name="Text_20_body">(2) DISP/CPU (EB0808H on D09)</text:p>
      <text:p text:style-name="Text_20_body">Bits | D15 D14 D13 D12 D11 D10 D09 D08 D07 D06 D05 D04 D03 D02 D01 D00 EB0808H |<text:span text:style-name="Emphasis">| 0 |</text:span>| 0 |<text:span text:style-name="Emphasis">| 0 |</text:span>| 0 |<text:span text:style-name="Emphasis">| 0 |</text:span>| 0 |_|</text:p>
      <text:p text:style-name="Text_20_body">BGO ON/OFF TEXTSEL (BGO) BG1 ON/OFF TEXTSEL (BG1) DISP/CPU *Not used (4-4 bits left)</text:p>
      <text:p text:style-name="Text_20_body">Cut all sprite and background display and release PCG and registers access to CPU.</text:p>
      <text:list text:style-name="List_20_1">
        <text:list-item>
          <text:p text:style-name="List_20_Bullet_20_Tight">0 ... Sprite and background display OFF. PCG and register access to CPU is fast.</text:p>
        </text:list-item>
        <text:list-item>
          <text:p text:style-name="List_20_Bullet_20_Tight">1 ... Sprite and background display ON. CPU access is slow.</text:p>
        </text:list-item>
      </text:list>
      <text:p text:style-name="First_20_paragraph">(3) TEXT SEL (BGO is D01~D02 of EB0808H, BG1 is D04~D05 of EB0808H) Set which of text area 0 or text area 1 to use.</text:p>
      <text:list text:style-name="List_20_1">
        <text:list-item>
          <text:p text:style-name="List_20_Bullet_20_Tight">00 ... Use text area 0 (PCG address: EBE000H~EBFFFEH).</text:p>
        </text:list-item>
        <text:list-item>
          <text:p text:style-name="List_20_Bullet_20_Tight">01 ... Use text area 1 (PCG address: EBE000H~EBFFFEH). *BGO and BG1 may use the same text area.</text:p>
        </text:list-item>
      </text:list>
      <text:p text:style-name="First_20_paragraph">(4) BGO ON/OFF, BG1 ON/OFF (BGO is D00 of EB0808H, BG1 is D03 of EB0808H) Set the display of BGO area and BG1 area to ON ("1") / OFF ("0"). If you do not display the background area by setting BGO ON/OFF and BG1 ON/OFF to (OFF), you can use all PCG addresses from EB8000H to EBFFFEH (16k words) as PCG area. At that time, you can register up to 256 sprite patterns. *BG1 is not displayed in 512 dot display mode.</text:p>
      <text:p text:style-name="Text_20_body">(5) H total (EB080AH), H disp (EB080CH), V disp (EB080EH) H total displays the horizontal total, H disp displays the horizontal display start position, and V disp displays the vertical display start position. For the definitions of each, refer to [4-8 CPU access methods].</text:p>
      <text:list text:style-name="Numbering_20_1" text:start-value="4">
        <text:list-item>
          <text:p text:style-name="List_20_Number_20_Tight">Sprite</text:p>
        </text:list-item>
      </text:list>
      <text:p text:style-name="First_20_paragraph">(6) L/H freq. (EB0810H D04) Set the scan frequency.</text:p>
      <text:p text:style-name="Text_20_body">D15 D14 D13 D12 D11 D10 D09 D08 D07 D06 D05 D04 D03 D02 D01 D00 +---+---+---+---+---+---+---+---+---+---+---+---+---+---+---+---+ | 0 | 0 | 0 | 0 | 0 | 0 | 0 | 0 | 0 | 0 | 0 | 0 | 0 | 0 | 0 | 0 | +---+---+---+---+---+---+---+---+---+---+---+---+---+---+---+---+ EB0810H</text:p>
      <text:p text:style-name="Text_20_body">| H Res. | | V Res. | | L/H freq. |</text:p>
      <text:p text:style-name="Text_20_body">Frequency mode: 0: Standard resolution mode (15.98 kHz) 1: High-resolution mode (31.5 kHz)</text:p>
      <text:p text:style-name="Text_20_body">(7) V Res. (EB0810H D02~D03) Set the display resolution for the vertical direction.</text:p>
      <text:p text:style-name="Text_20_body">D15 D14 D13 D12 D11 D10 D09 D08 D07 D06 D05 D04 D03 D02 D01 D00 +---+---+---+---+---+---+---+---+---+---+---+---+---+---+---+---+ | 0 | 0 | 0 | 0 | 0 | 0 | 0 | 0 | 0 | 0 | 0 | 0 | 0 | 0 | 0 | 0 | +---+---+---+---+---+---+---+---+---+---+---+---+---+---+---+---+ EB0810H</text:p>
      <text:p text:style-name="Text_20_body">| H Res. | | V Res. | 0: 256 lines 0: 512 lines 0: (Not used) 1: (Not used) | L/H freq. |</text:p>
      <text:p text:style-name="Text_20_body">(8) H Res. (EB0810H D00~D01) Set the display resolution for the horizontal direction.</text:p>
      <text:p text:style-name="Text_20_body">D15 D14 D13 D12 D11 D10 D09 D08 D07 D06 D05 D04 D03 D02 D01 D00 +---+---+---+---+---+---+---+---+---+---+---+---+---+---+---+---+ | 0 | 0 | 0 | 0 | 0 | 0 | 0 | 0 | 0 | 0 | 0 | 0 | 0 | 0 | 0 | 0 | +---+---+---+---+---+---+---+---+---+---+---+---+---+---+---+---+ EB0810H</text:p>
      <text:p text:style-name="Text_20_body">| H Res. | 0: 256 dots 0: 512 dots 0: (Not used) 1: (Not used) | V Res. | | L/H freq. |</text:p>
      <text:p text:style-name="Text_20_body">Page 45</text:p>
      <text:p text:style-name="Text_20_body">Chapter 2 Screen Control</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Screen Mode Register</text:p>
            </table:table-cell>
            <table:table-cell table:style-name="TableHeaderRowCell" office:value-type="string">
              <text:p text:style-name="Table_20_Heading">High Resolution</text:p>
            </table:table-cell>
            <table:table-cell table:style-name="TableHeaderRowCell" office:value-type="string">
              <text:p text:style-name="Table_20_Heading">Standard Resolution</text:p>
            </table:table-cell>
          </table:table-row>
        </table:table-header-rows>
        <table:table-row>
          <table:table-cell table:style-name="TableRowCell" office:value-type="string">
    </table:table-cell>
          <table:table-cell table:style-name="TableRowCell" office:value-type="string">
            <text:p text:style-name="Table_20_Contents">512×512</text:p>
          </table:table-cell>
          <table:table-cell table:style-name="TableRowCell" office:value-type="string">
            <text:p text:style-name="Table_20_Contents">256×256 2 colors/dot</text:p>
          </table:table-cell>
        </table:table-row>
        <table:table-row>
          <table:table-cell table:style-name="TableRowCell" office:value-type="string">
            <text:p text:style-name="Table_20_Contents">High Resolution</text:p>
          </table:table-cell>
          <table:table-cell table:style-name="TableRowCell" office:value-type="string">
            <text:p text:style-name="Table_20_Contents">512×256 16 colors/dot</text:p>
          </table:table-cell>
          <table:table-cell table:style-name="TableRowCell" office:value-type="string">
            <text:p text:style-name="Table_20_Contents">256×256 2 colors/dot</text:p>
          </table:table-cell>
        </table:table-row>
        <table:table-row>
          <table:table-cell table:style-name="TableRowCell" office:value-type="string">
            <text:p text:style-name="Table_20_Contents">Standard Resolution</text:p>
          </table:table-cell>
          <table:table-cell table:style-name="TableRowCell" office:value-type="string">
            <text:p text:style-name="Table_20_Contents">512×512 Interlaced</text:p>
          </table:table-cell>
          <table:table-cell table:style-name="TableRowCell" office:value-type="string">
            <text:p text:style-name="Table_20_Contents">512×256 16 colors/dot</text:p>
          </table:table-cell>
        </table:table-row>
      </table:table>
      <text:p text:style-name="First_20_paragraph">|H total (EBO80AH) | FFH (255) | FFH (255) | 25H (37) | |H disp (EBO80CH) | 15H (21) | 15H (21) | 0AH (10) | 09H (9) | 09H (9) | 04H (4) | |V disp (EBO80EH) | 28H (40) | 28H (40) | 28H (40) | 10H (16) | 10H (16) | 10H (16) |L/H freq | V Res. (EBO810H) | 15H (21) | 11H (17) | 10H (16) | 05H (5) | 01H (1) | 00H (0) | |H Res. | | | | | | | |Background Display | 1 screen | 1 screen | 2 screens | 1 screen | 1 screen | 2 screens |</text:p>
      <text:p text:style-name="Text_20_body">Table 2-18 Screen Mode Register List Upper row ( ) : Decimal number Lower row ( ) : Hexadecimal number</text:p>
      <text:p text:style-name="Text_20_body">Note: When setting the sprite screen mode register</text:p>
      <text:p text:style-name="Text_20_body">-If you set a value other than "FFH" in mode register 0 (H Total), you must set a value other than "130 µs delay" after setting mode register 1 for 256 standard resolution mode. Set mode register 0 to 0.</text:p>
      <text:p text:style-name="Text_20_body">************ Sample Program ************</text:p>
      <text:p text:style-name="Preformatted_20_Text"><text:s text:c="4"/>MOVE.W <text:s text:c="1"/>#$4, EB800CH.L</text:p>
      <text:p text:style-name="Preformatted_20_Text"><text:s text:c="4"/>BSR <text:s text:c="4"/>DELAY</text:p>
      <text:p text:style-name="Preformatted_20_Text"><text:s text:c="4"/>MOVE.W <text:s text:c="1"/>#$25, EB80AH.L</text:p>
      <text:p text:style-name="Preformatted_20_Text"><text:s text:c="4"/>RTS</text:p>
      <text:p text:style-name="First_20_paragraph">DELAY: MOVE #$FF, DO LOOP: DBF DO, LOOP RTS</text:p>
      <text:p text:style-name="Text_20_body">Note on sprite access</text:p>
      <text:p text:style-name="Text_20_body">When accessing PCG and text (address: EB8000H-EBFFFEH) after powering on, set the extended bit (D10 bit) of the background control register (address: EBB808H) to "0" before accessing PCG.</text:p>
      <text:h text:style-name="Heading_20_1" text:outline-level="1"><text:bookmark-start text:name="id_4-5-pcg-area"/>4-5 PCG Area<text:bookmark-end text:name="id_4-5-pcg-area"/></text:h>
      <text:p text:style-name="First_20_paragraph">(1) Relationship between PCG Address and PCG Code</text:p>
      <text:p text:style-name="Text_20_body">The PCG code includes two types: sprite code and background code. Sprites are always of a 16x16 dot pattern configuration, but backgrounds can be of either a 16x16 dot pattern configuration or an 8x8 dot pattern configuration. Therefore, when the background is in a 16x16 dot pattern configuration, it is possible for the sprite code and background code to share the same pattern. However, when the background is in an 8x8 dot pattern configuration, attention is required because the sprite code and background code differ. Also, the background dot pattern configuration (16x16 dot pattern or 8x8 dot pattern) is determined by the screen mode. In horizontal 512 dot mode, it is a 16x16 dot pattern configuration, and in horizontal 256 dot mode, it is an 8x8 dot pattern configuration (refer to Figure 2-13 for details).</text:p>
      <text:p text:style-name="Text_20_body">BG: 16x16 dot pattern configuration 16 dots ⎡ ⎤ ⎢SP Code = 0⎥ 16 dots ⎢BG Code = 0 ⎥ ⎣ ⎦</text:p>
      <text:p text:style-name="Text_20_body">BG: 8x8 dot pattern configuration 16 dots ⎡ ⎢ 0 2 ⎥ ⎤</text:p>
      <text:p text:style-name="Preformatted_20_Text"><text:s text:c="10"/>⎢ 1 3 ⎥ ⎥</text:p>
      <text:p text:style-name="Preformatted_20_Text"><text:s text:c="10"/>⎣ <text:s text:c="9"/>⎦</text:p>
      <text:p text:style-name="First_20_paragraph">SP Code = n, BG Code = 4n, 4n+1, 4n+2, 4n+3</text:p>
      <text:p text:style-name="Text_20_body">Figure 2-13 PCG Pattern Configuration</text:p>
      <text:p text:style-name="Text_20_body">Chapter 2 Screen Control</text:p>
      <text:p text:style-name="Text_20_body">The correspondence between PCG addresses and PCG codes is as follows.</text:p>
      <text:p text:style-name="Text_20_body">For BG: 16 x 16 + SP/Pattern For BG: 8 x 8 + SP/Patter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table-cell table:style-name="TableHeaderRowCell" office:value-type="string">
              <text:p text:style-name="Table_20_Heading">PCG Address</text:p>
            </table:table-cell>
            <table:table-cell table:style-name="TableHeaderRowCell" office:value-type="string">
              <text:p text:style-name="Table_20_Heading">16-bit Data</text:p>
            </table:table-cell>
            <table:table-cell table:style-name="TableHeaderRowCell" office:value-type="string">
              <text:p text:style-name="Table_20_Heading">SP Code</text:p>
            </table:table-cell>
            <table:table-cell table:style-name="TableHeaderRowCell" office:value-type="string">
              <text:p text:style-name="Table_20_Heading">BG Code</text:p>
            </table:table-cell>
            <table:table-cell table:style-name="TableHeaderRowCell" office:value-type="string">
              <text:p text:style-name="Table_20_Heading">SP Code</text:p>
            </table:table-cell>
            <table:table-cell table:style-name="TableHeaderRowCell" office:value-type="string">
              <text:p text:style-name="Table_20_Heading">BG Code</text:p>
            </table:table-cell>
          </table:table-row>
        </table:table-header-rows>
        <table:table-row>
          <table:table-cell table:style-name="TableRowCell" office:value-type="string">
            <text:p text:style-name="Table_20_Contents">EB8000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row>
        <table:table-row>
          <table:table-cell table:style-name="TableRowCell" office:value-type="string">
            <text:p text:style-name="Table_20_Contents">EB8020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able:table-cell>
        </table:table-row>
        <table:table-row>
          <table:table-cell table:style-name="TableRowCell" office:value-type="string">
            <text:p text:style-name="Table_20_Contents">EB804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2</text:p>
          </table:table-cell>
        </table:table-row>
        <table:table-row>
          <table:table-cell table:style-name="TableRowCell" office:value-type="string">
            <text:p text:style-name="Table_20_Contents">EB8060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40H</text:p>
          </table:table-cell>
          <table:table-cell table:style-name="TableRowCell" office:value-type="string">
    </table:table-cell>
          <table:table-cell table:style-name="TableRowCell" office:value-type="string">
            <text:p text:style-name="Table_20_Contents">3</text:p>
          </table:table-cell>
        </table:table-row>
        <table:table-row>
          <table:table-cell table:style-name="TableRowCell" office:value-type="string">
            <text:p text:style-name="Table_20_Contents">EB8080H</text:p>
          </table:table-cell>
          <table:table-cell table:style-name="TableRowCell" office:value-type="string">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4</text:p>
          </table:table-cell>
        </table:table-row>
        <table:table-row>
          <table:table-cell table:style-name="TableRowCell" office:value-type="string">
            <text:p text:style-name="Table_20_Contents">EB80A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5</text:p>
          </table:table-cell>
        </table:table-row>
        <table:table-row>
          <table:table-cell table:style-name="TableRowCell" office:value-type="string">
            <text:p text:style-name="Table_20_Contents">EB80C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6</text:p>
          </table:table-cell>
        </table:table-row>
        <table:table-row>
          <table:table-cell table:style-name="TableRowCell" office:value-type="string">
            <text:p text:style-name="Table_20_Contents">EB80E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7</text:p>
          </table:table-cell>
        </table:table-row>
        <table:table-row>
          <table:table-cell table:style-name="TableRowCell" office:value-type="string">
            <text:p text:style-name="Table_20_Contents">EB810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8</text:p>
          </table:table-cell>
        </table:table-row>
        <table:table-row>
          <table:table-cell table:style-name="TableRowCell" office:value-type="string">
            <text:p text:style-name="Table_20_Contents">EB8120H</text:p>
          </table:table-cell>
          <table:table-cell table:style-name="TableRowCell" office:value-type="string">
    </table:table-cell>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9</text:p>
          </table:table-cell>
        </table:table-row>
        <table:table-row>
          <table:table-cell table:style-name="TableRowCell" office:value-type="string">
            <text:p text:style-name="Table_20_Contents">EB814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text:p>
          </table:table-cell>
        </table:table-row>
        <table:table-row>
          <table:table-cell table:style-name="TableRowCell" office:value-type="string">
            <text:p text:style-name="Table_20_Contents">EB816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1</text:p>
          </table:table-cell>
        </table:table-row>
        <table:table-row>
          <table:table-cell table:style-name="TableRowCell" office:value-type="string">
            <text:p text:style-name="Table_20_Contents">EB818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2</text:p>
          </table:table-cell>
        </table:table-row>
        <table:table-row>
          <table:table-cell table:style-name="TableRowCell" office:value-type="string">
            <text:p text:style-name="Table_20_Contents">EB81A0H</text:p>
          </table:table-cell>
          <table:table-cell table:style-name="TableRowCell" office:value-type="string">
    </table:table-cell>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13</text:p>
          </table:table-cell>
        </table:table-row>
        <table:table-row>
          <table:table-cell table:style-name="TableRowCell" office:value-type="string">
            <text:p text:style-name="Table_20_Contents">EB81C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4</text:p>
          </table:table-cell>
        </table:table-row>
        <table:table-row>
          <table:table-cell table:style-name="TableRowCell" office:value-type="string">
            <text:p text:style-name="Table_20_Contents">EB81E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5</text:p>
          </table:table-cell>
        </table:table-row>
      </table:table>
      <text:p text:style-name="First_20_paragraph">Table 2-19 Relationship between PCG address and code</text:p>
      <text:p text:style-name="Text_20_body">4-6 Details of the Text Area (1)</text:p>
      <text:p text:style-name="Text_20_body">(1) V Flip Writing 1 will flip the pattern vertically. When it’s 0, the display is normal.</text:p>
      <text:p text:style-name="Text_20_body">(2) H Flip Writing 1 will flip the pattern horizontally. When it’s 0, the display is normal.</text:p>
      <text:p text:style-name="Text_20_body">(3) COLOR (SP, BG) Specifies the upper 4 bits of the sprite palette address (sprite color table 0~15). Thus, each sprite and background pattern unit can specify one of the 16 groups and 1 color table group (all registers are READ/WRITE allowed).</text:p>
      <text:p text:style-name="Text_20_body">Palette Address</text:p>
      <text:p text:style-name="Text_20_body">| COLOR | | PCG Data | Register Address | Notes<text:line-break/>| D11 | D10| D09 | D08 | I G R B | | | 0 | 0 | 0 | 0 | 0 0 0 0 | E82200H | [16 Bits] | (Transparent) / Shared with text palette / | | | | | | E82202H | |<text:line-break/>| | | | | 1 1 1 1 | E8221EH | | | 0 | 0 | 0 | 1 | | E82220H | | | | | | | | E82222H | | | | | | | | E8232EH | (Transparent)/<text:line-break/>| Table 0 | Table 1</text:p>
      <text:p text:style-name="Horizontal_20_Line"/>
      <text:p text:style-name="First_20_paragraph">| 1 | 1 | 1 | 1 | 0 0 0 1] | EB32E0H | | | | | | | | EB32F2H | | | | | | | | EB32F3H | (Transparent) / Table 15</text:p>
      <text:p text:style-name="Text_20_body">Table 2-20 Specification of Sprite Color Table</text:p>
      <text:p text:style-name="Text_20_body">Page 49</text:p>
      <text:p text:style-name="Text_20_body">Chapter 2 Screen Control</text:p>
      <text:p text:style-name="Text_20_body">The I, G, R, B data in the PCG area specifies the lower 4 bits of the sprite palette address. In other words, for each sprite and background pattern you can specify, on a per-dot basis, any 16 colors out of 65536 colors. Also, when the I, G, R, B color data defined in the PCG area is 0000H, it is treated as transparent.</text:p>
      <text:p text:style-name="Text_20_body">(4) BG Code (SP, BG) Sets which pattern in the PCG area to display (0-255).</text:p>
      <text:p text:style-name="Text_20_body">4-7 Details of the Text Area (2)</text:p>
      <text:p text:style-name="Text_20_body">The text area basically consists of two areas, Text Area 0 and Text Area 1. As shown below, the two areas can be considered exactly the same except for the difference in addresses.</text:p>
      <text:p text:style-name="Text_20_body">(1) Address layout of the PCG in Text Area 0 (EBC000H~EBDFFEH; 4K words)</text:p>
      <text:p text:style-name="Text_20_body">(EBC000H + ****H)</text:p>
      <text:p text:style-name="Text_20_body">64 patterns</text:p>
      <text:p text:style-name="Text_20_body">Diagram labels: C000 C002 C004 C006 ... C07C C07E C080 C082 C084 C086 ... C0FC C0FE ... DF00 DF02 DF04 DF06 ... DF7C DF7E DF80 DF82 DF84 DF86 ... DFFC DFFE</text:p>
      <text:p text:style-name="Text_20_body">BG: 8x8-dot/pattern structure BG: 16x16-dot/pattern structure</text:p>
      <text:p text:style-name="Preformatted_20_Text">512 dots <text:s text:c="25"/>1024 dots</text:p>
      <text:p text:style-name="Preformatted_20_Text">512 dots <text:s text:c="25"/>1024 dots</text:p>
      <text:p text:style-name="First_20_paragraph">Figure 2-14 Address Layout of Text Area 0</text:p>
      <text:list text:style-name="Numbering_20_1" text:start-value="4">
        <text:list-item>
          <text:p text:style-name="List_20_Number_20_Tight">Sprite</text:p>
        </text:list-item>
      </text:list>
      <text:p text:style-name="First_20_paragraph">(2) Address layout of the PCG in Text Area 1 (EBE000H~EBFFFEH; 4K words)</text:p>
      <text:p text:style-name="Text_20_body">(EBE000H + ****H)</text:p>
      <text:p text:style-name="Text_20_body">64 patterns</text:p>
      <text:p text:style-name="Text_20_body">Figure 2-15 Address Layout of Text Area 1</text:p>
      <text:p text:style-name="Text_20_body">4-8 CPU Access Methods</text:p>
      <text:p text:style-name="Text_20_body">(1) CPU Access Methods</text:p>
      <text:p text:style-name="Preformatted_20_Text"><text:s text:c="3"/>MOVE.W <text:s text:c="3"/>Dn, (An) <text:s text:c="3"/>... Write to PCG / text from a register (n=0~7)</text:p>
      <text:p text:style-name="Preformatted_20_Text"><text:s text:c="3"/>MOVE.W <text:s text:c="3"/>(An), Dn <text:s text:c="3"/>... Read <text:s text:c="2"/>word</text:p>
      <text:p text:style-name="Preformatted_20_Text"><text:s text:c="3"/>An: address (E8000H~EBFFFEH)</text:p>
      <text:p text:style-name="Preformatted_20_Text"><text:s text:c="3"/>Dn: 16-bit data</text:p>
      <text:p text:style-name="Preformatted_20_Text"><text:s text:c="3"/>* CPU access is performed on a word basis (byte transfer is prohibited).</text:p>
      <text:p text:style-name="First_20_paragraph">(2) CPU-Accessible Periods</text:p>
      <text:p text:style-name="Preformatted_20_Text"><text:s text:c="3"/>- Sprite Scroll Register</text:p>
      <text:p text:style-name="Preformatted_20_Text"><text:s text:c="5"/>Accessible at any time during the display period.</text:p>
      <text:p text:style-name="Preformatted_20_Text"><text:s text:c="5"/>A CPU period is secured once per character clock (1 QD).</text:p>
      <text:p text:style-name="Preformatted_20_Text"><text:s text:c="5"/>Therefore, a wait time of up to 1.8 QD (580 ns or 1440 ns) may occur.</text:p>
      <text:p text:style-name="Preformatted_20_Text"/>
      <text:p text:style-name="Preformatted_20_Text"><text:s text:c="3"/>* 1 QD period = 320 ns (high-resolution mode) or 800 ns (standard-resolution mode)</text:p>
      <text:p text:style-name="Preformatted_20_Text"><text:s text:c="3"/>* Setting "DISP/CPU" to "0" (background dot control register; E8008H, R09)</text:p>
      <text:p text:style-name="Preformatted_20_Text"><text:s text:c="5"/>prohibits sprite/background display during the period but allows</text:p>
      <text:p text:style-name="Preformatted_20_Text"><text:s text:c="5"/>high-speed RAM access; sprite and background display are halted.</text:p>
      <text:p text:style-name="First_20_paragraph">Chapter 2: Screen Control</text:p>
      <text:p text:style-name="Text_20_body">All screen displays are cut off during the V blanking period. Therefore, upon entering the V blanking period, first set the “DISP/CPU” bit to “0” (display cut off), and then you can efficiently access the sprite registers (refer to section “4-4 Background Scroll Registers and Screen Mode Registers”).</text:p>
      <text:p text:style-name="Text_20_body">Figure 2-16 CPU Access Timing</text:p>
      <text:p text:style-name="Text_20_body">The readout time for registers for display use is as follows (although there may be slight variations).</text:p>
      <text:p text:style-name="Text_20_body">Figure 2-17 Register Readout Timing</text:p>
      <text:p text:style-name="Text_20_body">Therefore, if you want to write to the sprite scroll registers during the V blanking period, you need to rewrite 2 lines before V-DISP. Also, if you want to write during the H blanking period, you need to rewrite up to 4 characters or clock cycles before H-DISP. Please note that the sprited scroll register changes will take effect 3 lines after being written.</text:p>
      <text:p text:style-name="Text_20_body">*In superimpose mode at high resolution, H blanking period part QD can stop when overlapping occurs during CPU access and potential delays may happen (the worst being around 60µs).</text:p>
      <text:p text:style-name="Text_20_body">● Background Scroll Registers and Screen Mode Registers It is possible to access them during any display period including the vertical blanking period. Basically, the CPU registers and internal registers have a two-stage register structure. The CPU registers can access the CPU, and usually the access is completed within one wait. The contents written into the CPU registers are transferred to the internal registers at a specific timing once during each horizontal period, and become effective inside the chip. Therefore, even if the CPU rewrites the registers, it does not become effective immediately.</text:p>
      <text:p text:style-name="Text_20_body">However, regarding the bit information below, since there is only one stage of register structure up to the CPU registers, when the CPU rewrites the registers, it becomes effective inside the chip immediately:</text:p>
      <text:p text:style-name="Preformatted_20_Text"><text:s text:c="4"/>- Background Scroll Registers: Address EB0808H "DISP/CPU" bit (D09)</text:p>
      <text:p text:style-name="Preformatted_20_Text"><text:s text:c="4"/>- Screen Mode Registers: Address EB080AH "H total" bit (D07-D00)</text:p>
      <text:p text:style-name="First_20_paragraph">The period required to transfer the CPU registers to the internal registers is approximately as follows:</text:p>
      <text:p text:style-name="Text_20_body">[Figure 2-18 Register Transfer Timing]</text:p>
      <text:p text:style-name="Text_20_body">Consequently, for example, if the background scroll registers are rewritten for each line, writing during the H display period before one line is sufficient (However, it should be completed by 3-4 QD before H-DISP).</text:p>
      <text:p text:style-name="Text_20_body">If there is a collision with the CPU not finishing the write cycle during the transfer period, a wait will occur on the CPU side. There is no wait for read cycles.</text:p>
      <text:p text:style-name="Text_20_body">● Access to Background Scroll Registers and Screen Mode Registers of CPU is not affected during superimpose.</text:p>
      <text:h text:style-name="Heading_20_1" text:outline-level="1"><text:bookmark-start text:name="chapter-2-screen-control"/>Chapter 2: Screen Control<text:bookmark-end text:name="chapter-2-screen-control"/></text:h>
      <text:p text:style-name="First_20_paragraph">● PCG and Text Access is possible throughout the display period. During the CPU period, it is synchronously confirmed once every character clock (QD). As a result, a minimum wait time of approximately 2.8 QD (900 ns or 2240 ns) may occur.</text:p>
      <text:p text:style-name="Text_20_body">*Note: If the "DISP/CPU" bit (Background Control Register; EB0080H or D09) is set to "0" (CPU side), the display period for PCG and text is stopped, and the CPU can access for the entire duration, ensuring high-speed access. However, during this time, all screen displays including sprites and background will be disrupted. Therefore, to achieve effective PCG and text access, it is recommended to set the "DISP/CPU" bit to "0" (display cut) during the synchronization period (refer to "4-4 Background Control Scroll Register &amp; Screen Mode Register" in the main text).</text:p>
      <text:p text:style-name="Text_20_body">Figure 2-19 CPU Access Timing</text:p>
      <text:p text:style-name="Text_20_body">The reading period for PCG and text is as shown below. <text:span text:style-name="Strong_20_Emphasis">H-Display Period</text:span></text:p>
      <text:list text:style-name="List_20_1">
        <text:list-item>
          <text:p text:style-name="List_20_Bullet_20_Tight">H-Disp (H Display Period)</text:p>
        </text:list-item>
        <text:list-item>
          <text:p text:style-name="List_20_Bullet_20_Tight">H Sync Period <text:span text:style-name="Strong_20_Emphasis">V-Display Period</text:span></text:p>
        </text:list-item>
        <text:list-item>
          <text:p text:style-name="List_20_Bullet_20_Tight">PCG/Text Read Period</text:p>
        </text:list-item>
      </text:list>
      <text:p text:style-name="First_20_paragraph">Communication timing within 1 line:</text:p>
      <text:list text:style-name="List_20_1">
        <text:list-item>
          <text:p text:style-name="List_20_Bullet_20_Tight">Display Period: ~31.8µs or 61.4µs</text:p>
        </text:list-item>
        <text:list-item>
          <text:p text:style-name="List_20_Bullet_20_Tight">H Sync Period: ~1.8ms or ~1.4ms</text:p>
        </text:list-item>
      </text:list>
      <text:p text:style-name="First_20_paragraph">Figure 2-20 Register Read Timing</text:p>
      <text:p text:style-name="Text_20_body">Therefore, when rewriting PCG and text within the V-Synchronization period, it must be rewritten up to 1 line before V-DISP. During the H-Synchronization period, rewrites should be minimized (the display will be almost in the screen mode).</text:p>
      <text:p text:style-name="Text_20_body">*Note: For high-resolution displays and superimpose modes, screen disruptions may temporarily stop H-Display, resulting in extended wait times during CPU access (maximum ~60µs).</text:p>
      <text:list text:style-name="Numbering_20_1" text:start-value="5">
        <text:list-item>
          <text:p text:style-name="List_20_Number_20_Tight">Video Controller</text:p>
        </text:list-item>
      </text:list>
      <text:p text:style-name="First_20_paragraph">The X68000 video controller has 3 registers, each with the following functionalities: (1) Register 1</text:p>
      <text:p text:style-name="Preformatted_20_Text"><text:s text:c="3"/>- Setting the actual size of the graphic display</text:p>
      <text:p text:style-name="Preformatted_20_Text"><text:s text:c="3"/>- Setting the color mode of the graphic memory</text:p>
      <text:p text:style-name="First_20_paragraph">(2) Register 2</text:p>
      <text:p text:style-name="Preformatted_20_Text"><text:s text:c="3"/>- Setting priority on graphic, text, and sprite screens</text:p>
      <text:p text:style-name="Preformatted_20_Text"><text:s text:c="3"/>- Setting the page priority of the graphics screen</text:p>
      <text:p text:style-name="First_20_paragraph">(3) Register 3</text:p>
      <text:p text:style-name="Preformatted_20_Text"><text:s text:c="3"/>- Setting semi-transparent mode</text:p>
      <text:p text:style-name="Preformatted_20_Text"><text:s text:c="3"/>- Setting special priority (a function to maximize the priority of any area on the graphics screen)</text:p>
      <text:p text:style-name="Preformatted_20_Text"><text:s text:c="3"/>- Setting display mode for graphics, text, sprites, and border color</text:p>
      <text:p text:style-name="First_20_paragraph">Please carry out access to the video controller's registers, just like with the CRTC, during V-DISP signal blanking periods (when the MFP or GPIP4 port is "0").</text:p>
      <text:p text:style-name="Text_20_body">Chapter 2 Screen Control</text:p>
      <text:p text:style-name="Text_20_body">5-1 Video Controller Register Address Map</text:p>
      <text:p text:style-name="Text_20_body">*1: G size *3: Sprite display ON/OFF *5: 1024x1024 Graphic display ON/OFF *2: 1024/512 *4: Text display ON/OFF</text:p>
      <text:p text:style-name="Text_20_body">Register Address | D15 D14 D13 D12 D11 D10 D09 D08 D07 D06 D05 D04 D03 D02 D01 D00</text:p>
      <text:p text:style-name="Text_20_body">Register 1 E82400H Reserved Memory Mode Setting *1 G. Mode *2 CL1 CL0</text:p>
      <text:p text:style-name="Text_20_body">Register 2 E82500H Reserved Gr./Tx./Sp. inter-priority setting | Graphics screen page priority setting Sprite SP1 SP0 Text TX1 TX0 Graphic GR1 GR0 Priority 4 page number Priority 3 page number Priority 2 page number Priority 1 page number</text:p>
      <text:p text:style-name="Text_20_body">Register 3 E82600H Special Mode | *3 *4 *5 512 Graphic display ON/OFF Ys AH (note)VHT EXON H/P B/P G/G G/T - SON TON GS4 GS3 GS2 GS1 GS0</text:p>
      <text:p text:style-name="Text_20_body">Table 2-21 Video Controller Access Map</text:p>
      <text:list text:style-name="List_20_1">
        <text:list-item>
          <text:p text:style-name="List_20_Bullet">Note: all registers are READ/WRITE capable; * marks fields that are invalid (no effect).</text:p>
        </text:list-item>
        <text:list-item>
          <text:p text:style-name="List_20_Bullet">(note) The VHT signal is used by the optional "Color Image Unit".</text:p>
        </text:list-item>
      </text:list>
      <text:p text:style-name="First_20_paragraph">5-2 Details of Video Controller Registers</text:p>
      <text:p text:style-name="Text_20_body">(1) Register 1 (E8240H) Setting the actual screen size of the graphics memory and color mode (Set values to D10-D08 as with R20 of the CRTC)</text:p>
      <table:table table:name="Table19" table:style-name="Table19">
        <table:table-column table:style-name="Table19.A"/>
        <table:table-column table:style-name="Table19.B"/>
        <table:table-header-rows>
          <table:table-row>
            <table:table-cell table:style-name="TableHeaderRowCell" office:value-type="string">
              <text:p text:style-name="Table_20_Heading">D02 D01 D00</text:p>
            </table:table-cell>
            <table:table-cell table:style-name="TableHeaderRowCell" office:value-type="string">
              <text:p text:style-name="Table_20_Heading">Mode</text:p>
            </table:table-cell>
          </table:table-row>
        </table:table-header-rows>
        <table:table-row>
          <table:table-cell table:style-name="TableRowCell" office:value-type="string">
            <text:p text:style-name="Table_20_Contents">0 : 0 : 0</text:p>
          </table:table-cell>
          <table:table-cell table:style-name="TableRowCell" office:value-type="string">
            <text:p text:style-name="Table_20_Contents">16 colors 4 pages mode (Valid only when D02 = 0)</text:p>
          </table:table-cell>
        </table:table-row>
        <table:table-row>
          <table:table-cell table:style-name="TableRowCell" office:value-type="string">
            <text:p text:style-name="Table_20_Contents">0 : 0 : 1</text:p>
          </table:table-cell>
          <table:table-cell table:style-name="TableRowCell" office:value-type="string">
            <text:p text:style-name="Table_20_Contents">256 colors 2 pages mode (Valid only when D02 = 0)</text:p>
          </table:table-cell>
        </table:table-row>
        <table:table-row>
          <table:table-cell table:style-name="TableRowCell" office:value-type="string">
            <text:p text:style-name="Table_20_Contents">0 : 1 : 1</text:p>
          </table:table-cell>
          <table:table-cell table:style-name="TableRowCell" office:value-type="string">
            <text:p text:style-name="Table_20_Contents">65536 colors 1 page mode (Valid only when D02 = 0)</text:p>
          </table:table-cell>
        </table:table-row>
        <table:table-row>
          <table:table-cell table:style-name="TableRowCell" office:value-type="string">
            <text:p text:style-name="Table_20_Contents">1 : 0 : 0</text:p>
          </table:table-cell>
          <table:table-cell table:style-name="TableRowCell" office:value-type="string">
            <text:p text:style-name="Table_20_Contents">Actual drawing screen mode 512×512</text:p>
          </table:table-cell>
        </table:table-row>
        <table:table-row>
          <table:table-cell table:style-name="TableRowCell" office:value-type="string">
            <text:p text:style-name="Table_20_Contents">1 : 0 : 1</text:p>
          </table:table-cell>
          <table:table-cell table:style-name="TableRowCell" office:value-type="string">
            <text:p text:style-name="Table_20_Contents">Actual drawing screen mode 1024×1024 (Ensure D00 = 0, D01 = 0)</text:p>
          </table:table-cell>
        </table:table-row>
      </table:table>
      <text:p text:style-name="First_20_paragraph">(2) Register 2 (E8250H) In the lower byte of Register 2 (D07-D00), settings for the priority between pages of the graphics screen can be made.</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header-rows>
          <table:table-row>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row>
        </table:table-header-rows>
        <table:table-row>
          <table:table-cell table:style-name="TableRowCell" office:value-type="string">
            <text:p text:style-name="Table_20_Contents">Page Priority Setting</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Most preferred graphics page number:</text:p>
      <text:p text:style-name="Text_20_body">| 0 | 0 | 0 : Graphics screen page 0 | | 0 | 0 | 1 : Graphics screen page 1 | | 0 | 1 | 0 : Graphics screen page 2 | | 0 | 1 | 1 : Graphics screen page 3 | | 1 | 0 | n-1: Graphics page number with n-1 priority (higher priority than graphic page number of 1| |Second preferred graphics page number|Higher priority than graphic page number of|More preferred graphics page number|High priority than more preferred graphic page number|</text:p>
      <text:list text:style-name="Numbering_20_1">
        <text:list-item>
          <text:p text:style-name="List_20_Number_20_Tight">Graphics Actual Screen 1024×1024 In a mode with an actual screen of 1024×1024 dots, the graphics screen page number is assigned as shown in Figure 2-21. The display page has only one side, and this represents the priority of the values of graphics screen page numbers.</text:p>
        </text:list-item>
      </text:list>
      <text:p text:style-name="First_20_paragraph">Chapter 2 Screen Control</text:p>
      <text:p text:style-name="Text_20_body">Diagram labels: G00 G01 G02 G03 Page 0 Page 1 Page 2 Page 3</text:p>
      <text:p text:style-name="Text_20_body">Figure 2-21 Graphic Screen Page Number (1)</text:p>
      <text:p text:style-name="Text_20_body">Normally the bit configuration is as follows (fixed).</text:p>
      <text:p text:style-name="Text_20_body">D07 D06 D05 D04 D03 D02 D01 D00 1 1 1 0 0 1 0 0</text:p>
      <text:list text:style-name="Numbering_20_1" text:start-value="2">
        <text:list-item>
          <text:p text:style-name="List_20_Number_20_Tight">Graphics Actual Screen 512 x 512 In this mode, the graphics screen page numbers are assigned as shown in Figure 2-22.</text:p>
        </text:list-item>
      </text:list>
      <text:p text:style-name="First_20_paragraph">Diagram labels: SC0 SC1 SC2 SC3 (16 color mode) (256 color mode) (65536 color mode) Page 3 Page 2 Page 0 Page 1 Page 0</text:p>
      <text:p text:style-name="Text_20_body">Figure 2-22 Graphic Screen Page Number (2)</text:p>
      <text:list text:style-name="Numbering_20_1" text:start-value="5">
        <text:list-item>
          <text:p text:style-name="List_20_Number_20_Tight">Video Controller</text:p>
        </text:list-item>
      </text:list>
      <text:p text:style-name="First_20_paragraph">● When the graphic mode is 65536 colors on 1 page, the bit structure is as follows (fixed). Note that it is not possible to set the same graphics screen number at different priority levels.</text:p>
      <text:p text:style-name="Text_20_body">D07 D06 D05 D04 D03 D02 D01 D00 1 1 0 0 1 0 0 0</text:p>
      <text:p text:style-name="Text_20_body">● When the graphic mode is 256 colors on 2 pages, 16 colors on 2 pages, the graphics screen pages 0 to 3 can be used. In other words, when a higher priority is given to graphics screen pages 0 and 1, or conversely, when a higher priority is given to graphics screen pages 2 and 3, the bit structure is as follows. Note that it is not possible to set the same graphics screen number at different priority levels.</text:p>
      <text:list text:style-name="List_20_1">
        <text:list-item>
          <text:p text:style-name="List_20_Bullet_20_Tight">When a higher priority is given to graphics screen pages 0 and 1</text:p>
        </text:list-item>
      </text:list>
      <text:p text:style-name="First_20_paragraph">D07 D06 D05 D04 D03 D02 D01 D00 1 1 0 0 0 0 0 0 (fixed)</text:p>
      <text:list text:style-name="List_20_1">
        <text:list-item>
          <text:p text:style-name="List_20_Bullet_20_Tight">When a higher priority is given to graphics screen pages 2 and 3</text:p>
        </text:list-item>
      </text:list>
      <text:p text:style-name="First_20_paragraph">D07 D06 D05 D04 D03 D02 D01 D00 0 1 0 0 1 1 0 0 (fixed)</text:p>
      <text:p text:style-name="Text_20_body">● When the graphic mode is 16 colors on 4 pages, the graphics screen number for each priority level will be set. Note that it is not possible to set the same graphics screen number at different priority levels.</text:p>
      <text:p text:style-name="Text_20_body">Furthermore, the screens given priority here will be subject to special settings (display ON/OFF control, semi-transparency function, special priority functions) in the future.</text:p>
      <text:p text:style-name="Text_20_body">Page 59</text:p>
      <text:p text:style-name="Text_20_body">Page 2: Screen control</text:p>
      <text:p text:style-name="Text_20_body">For register 2 (EB2500H), the lower byte (D13 to D08) sets the priority of the graphic, text, and sprite screens.</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header-rows>
          <table:table-row>
            <table:table-cell table:style-name="TableHeaderRowCell" office:value-type="string">
              <text:p text:style-name="Table_20_Heading">D13</text:p>
            </table:table-cell>
            <table:table-cell table:style-name="TableHeaderRowCell" office:value-type="string">
              <text:p text:style-name="Table_20_Heading">D12</text:p>
            </table:table-cell>
            <table:table-cell table:style-name="TableHeaderRowCell" office:value-type="string">
              <text:p text:style-name="Table_20_Heading">D11</text:p>
            </table:table-cell>
            <table:table-cell table:style-name="TableHeaderRowCell" office:value-type="string">
              <text:p text:style-name="Table_20_Heading">D10</text:p>
            </table:table-cell>
            <table:table-cell table:style-name="TableHeaderRowCell" office:value-type="string">
              <text:p text:style-name="Table_20_Heading">D09</text:p>
            </table:table-cell>
            <table:table-cell table:style-name="TableHeaderRowCell" office:value-type="string">
              <text:p text:style-name="Table_20_Heading">D08</text:p>
            </table:table-cell>
          </table:table-row>
        </table:table-header-rows>
      </table:table>
      <text:p text:style-name="First_20_paragraph">Graphics screen priority (D08, D09): 00: Lowest priority 01: Priority level 1 10: Priority level 2 11: Priority level 3</text:p>
      <text:p text:style-name="Text_20_body">Text screen priority (D10, D11) (The same method as above) Sprite screen priority (D12, D13) (The same method as above)</text:p>
      <text:p text:style-name="Text_20_body">Note that for the graphics screen (D08, D09), text screen (D10, D11), and sprite screen (D12, D13), the same value cannot be set for each data.</text:p>
      <text:p text:style-name="Text_20_body">(3) Register 3 (EB2600H)</text:p>
      <text:p text:style-name="Text_20_body">The upper 4 bits of register 3 can be used to set the on/off display of the actual 512 x 512 graphics screen. Note that this setting is only valid when D02-0 of register 1 is on.</text:p>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0: Display of the highest priority screen OFF 1: Display of the highest priority screen ON 0: Display of the second highest priority screen OFF 1: Display of the second highest priority screen ON 0: Display of the third highest priority screen OFF 1: Display of the third highest priority screen ON 0: Display of the fourth highest priority screen OFF 1: Display of the fourth highest priority screen ON</text:p>
      <text:p text:style-name="Text_20_body">When in 65536 color one surface mode, the bit configuration will be as follows (fixed).</text:p>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
      <text:p text:style-name="First_20_paragraph">However, in the case of any dot, if the palette address is 0000H, and the palette data is 0000H, it will become transparent.</text:p>
      <text:list text:style-name="Numbering_20_1" text:start-value="5">
        <text:list-item>
          <text:p text:style-name="List_20_Number_20_Tight">Video Controller</text:p>
        </text:list-item>
      </text:list>
      <text:p text:style-name="First_20_paragraph">However, regardless of the palette address indicated by any dot, 0000H will be outputted (transparent).</text:p>
      <text:p text:style-name="Text_20_body">• In graphic 256-color 2-page mode, the bit composition will be as follows (fixed). ∙ When displaying a graphic page with the highest priority and controlling the display of the next priority graphic page:</text:p>
      <text:p text:style-name="Text_20_body">D03 D02 D01 D00</text:p>
      <text:p text:style-name="Text_20_body">Display OFF 0 0 0 0</text:p>
      <text:p text:style-name="Text_20_body">Display the second graphic page ON 1 1 1 1</text:p>
      <text:p text:style-name="Text_20_body">However, if the palette address is 00H for any dot on the higher priority graphic page, the palette data of the dot of the higher priority page will be output. However, if the palette address is 00H, the palette data of the palette address 00H will not be output. Note that if the palette data of the palette address 00H is 0000H, it will become transparent.</text:p>
      <text:p text:style-name="Text_20_body">D03 D02 D01 D00</text:p>
      <text:p text:style-name="Text_20_body">Turning off the second graphic page display 0 0 1 1</text:p>
      <text:p text:style-name="Text_20_body">However, if the palette address is 00H for any dot on the higher priority graphic page, the palette data of the palette address 00H will be output. Note that if the palette data of the palette address 00H is 0000H, it will become transparent.</text:p>
      <text:p text:style-name="Text_20_body">• When controlling the display without displaying the graphic page with the highest priority and displaying the next priority graphic page:</text:p>
      <text:p text:style-name="Text_20_body">D03 D02 D01 D00</text:p>
      <text:p text:style-name="Text_20_body">Turning off the second graphic page display 0 1 1 0</text:p>
      <text:p text:style-name="Text_20_body">However, if the palette address is 00H for any dot on the higher priority graphic page, the palette data of the palette address 00H will be output. Note that if the palette data of the palette address 00H is 0000H, it will become transparent.</text:p>
      <text:p text:style-name="Text_20_body">Page 61</text:p>
      <text:p text:style-name="Text_20_body">Chapter 2: Screen Control</text:p>
      <text:p text:style-name="Text_20_body">Secondary Graphic Display Page OFF</text:p>
      <text:p text:style-name="Text_20_body">D03 D02 D01 D00 0 0 0 0</text:p>
      <text:p text:style-name="Text_20_body">However, at any dot, if its palette address indicates transparent palette data, 0000h is output (transparent).</text:p>
      <text:p text:style-name="Text_20_body">Note that in the case of graphic 16 colors 4 pages and 256 colors 2 pages mode, the page with the priority set in register 2 is targeted.</text:p>
      <text:p text:style-name="Text_20_body">In bit D04 of register 3, you can set the display ON/OFF for the actual graphics screen 1024x1024 (valid when D02-D01 of register 1 are enabled).</text:p>
      <text:p text:style-name="Text_20_body">D04 0: Screen display OFF 1: Screen display ON</text:p>
      <text:p text:style-name="Text_20_body">In bits D06-D07 of register 3, you can set the text and sprite display ON/OFF. Note that bit D07 is invalid.</text:p>
      <text:p text:style-name="Text_20_body">D07 D06 D05 * 0: Text screen display OFF 1: Text screen display ON 0: Sprite screen display OFF 1: Sprite screen display ON</text:p>
      <text:p text:style-name="Text_20_body">In the X68000, the priority between the graphic pages in modes with two text and sprite screens or more than two graphic pages is decided by the palette in each case (the palette of the text and sprite screen is shared, the graphic palette of the two or four pages is shared). Therefore, the priority of the palette address value is decided. Especially when the palette address is 00H, regardless of its palette data, the palette data of the next priority graphic page with the effective palette address will be used.</text:p>
      <text:p text:style-name="Text_20_body">However, when combining multiple graphics screens, if any one of the screen displays is set to ON with the palette address of all graphic pages being 00H, and even if only one screen display is set to ON, the palette address 00H is effective.</text:p>
      <text:p text:style-name="Text_20_body">The content of address 00H will be output. However, if the screen display is all OFF, the content of palette address 00H will be output regardless of the screen display. In addition, the priority of the graphics screen and text (sprite) screen for each palette is determined independently, with the displayed order determined by the priority data of the palette address.</text:p>
      <text:p text:style-name="Text_20_body">• Example of overlapping in graphics real screen 512x512, 16 colors, 4 pages mode:</text:p>
      <text:p text:style-name="Text_20_body">The screen of the four pages that overlap here is as shown below. However, the empty part is set as palette address 00H.</text:p>
      <text:p text:style-name="Text_20_body">(1) Page of the graphics screen with the highest priority (2) Page of the graphics screen with the second highest priority (3) Page of the graphics screen with the third highest priority (4) Page of the graphics screen with the lowest priority</text:p>
      <text:p text:style-name="Text_20_body">When these are overlapped:</text:p>
      <text:p text:style-name="Text_20_body">(1)(2)(3)(4) Overlapping display (1) Only (1) display (2) Only (2) display (1)(2) Overlapping display (3) Only (3) display (4) Only (4) display (3)(4) Overlapping display (1)(4) Overlapping display</text:p>
      <text:p text:style-name="Text_20_body">Page 63</text:p>
      <text:p text:style-name="Text_20_body">Chapter 2 Layer Control</text:p>
      <text:p text:style-name="Text_20_body">(1)(3) Overlapping Display (2)(4) Overlapping Display (1)(2)(3) Overlapping Display (1)(2)(4) Overlapping Display (1)(3)(4) Overlapping Display (2)(3)(4) Overlapping Display</text:p>
      <text:p text:style-name="Text_20_body">Display Omitted</text:p>
      <text:p text:style-name="Text_20_body">Figure 2-23 Examples of overlapping displays in graphics screen layers of 4 layers mode</text:p>
      <text:p text:style-name="Text_20_body">In the upper byte of Register 3, half-transparency mode and special priority function settings are performed.</text:p>
      <text:p text:style-name="Text_20_body">| D15 | D14 | D13 | D12 | D11 | D10 | D09 | D08 | | Ys | AH | VH | EO | HP | BP | GG | GT |</text:p>
      <text:p text:style-name="Text_20_body">GG: 0: Normal mode - 1: Allows for mask by filling the specified area on a graphic page, regardless of the layer assigned. If it's allowed for a graphic page, it becomes the highest priority for that graphic page, and it can be displayed over text (sprite) in that page. Except, when either D12 or D11 is set to 1, the GG mode setting will be limited to partial or full palette.</text:p>
      <text:p text:style-name="Text_20_body">GT: 0: Normal mode - 1: Sets a graphic page as a pseudo-horizontal page of 2 vertical pages, and displays text (sprite) of the lower priority pages based on color for a more detailed display.</text:p>
      <text:p text:style-name="Text_20_body">Reserve D12: 0: Normal mode - 1: When either D12 or D11 is set to 1, VRAM pages of the graphic VRAM overwrite each other, enabling special priority display. EO: 0: Normal mode - 1: When either D12 or D11 is set to 1, special priority mode is assigned. BP: 0: Normal mode - 1: Enables half-transparency mode - 0: Normal mode - 1: Priority adjustment, when GG mode is set and the EO bit is 0. Enables normal display's highest priority graphic page to overwrite the text page being used, similar to the video RAM page.</text:p>
      <text:p text:style-name="Text_20_body">GT: 0: Normal mode - 1: Allows priority control of color-based VRAM text (sprite) palette memory $00 to $FF.</text:p>
      <text:p text:style-name="Text_20_body">Ys: 0: Deactivate (Ys) signal. 1: Temporarily activates (Ys) signal and outputs the superimpose screen as black and white on a TV screen (TV screen is cut).</text:p>
      <text:p text:style-name="Text_20_body">Page 64</text:p>
      <text:p text:style-name="Text_20_body">5-3 Details of Special Modes</text:p>
      <text:p text:style-name="Text_20_body">(1) Transparent Mode</text:p>
      <text:p text:style-name="Text_20_body">Transparent mode refers to the condition between the graphics screens in the display screen where:</text:p>
      <text:p text:style-name="Text_20_body">a. Between the graphic page of higher priority (semi-transparent area designation page) and the graphic page of next higher priority.</text:p>
      <text:p text:style-name="Text_20_body">b. Between the graphic page of higher priority (semi-transparent area designation page) and the text (sprite) screen with lower priority than the graphics screen.</text:p>
      <text:p text:style-name="Text_20_body">c. Also, in superimpose mode, this refers to the condition between the graphic page of higher priority (semi-transparent area designation page) and the TV/video screen, where the designated region is blended at each part's half-tone (50%).</text:p>
      <text:p text:style-name="Text_20_body">It refers to D13="1" of register 3. Essentially, if bit D12 and D11 of the video controller register 3 are set to "1", it becomes the transparent mode.</text:p>
      <text:p text:style-name="Text_20_body">Figure 2-24 illustrates the concept of transparent mode.</text:p>
      <text:p text:style-name="Preformatted_20_Text"><text:s text:c="14"/>----</text:p>
      <text:p text:style-name="Preformatted_20_Text"/>
      <text:p text:style-name="Preformatted_20_Text"><text:s text:c="13"/>Green (D15-D11) <text:s text:c="10"/>Red (D10-D06) <text:s text:c="10"/>Blue (D05-D01) <text:s text:c="10"/>I <text:s text:c="1"/>(D00)</text:p>
      <text:p text:style-name="Preformatted_20_Text"><text:s text:c="14"/>| (Addition) <text:s text:c="16"/>| (Addition) <text:s text:c="17"/>| (Addition) <text:s text:c="13"/>|</text:p>
      <text:p text:style-name="First_20_paragraph">Green (D15-D11) Red (D10-D06) Blue (D05-D01) I (D00)</text:p>
      <text:p text:style-name="Preformatted_20_Text"><text:s text:c="15"/>| (Shift right) <text:s text:c="14"/>| (Shift right) <text:s text:c="21"/>| (Shift right)</text:p>
      <text:p text:style-name="Preformatted_20_Text"><text:s text:c="15"/>| <text:s text:c="6"/>1/2 <text:s text:c="23"/>| <text:s text:c="5"/>1/2 <text:s text:c="28"/>| <text:s text:c="4"/>1/2</text:p>
      <text:p text:style-name="First_20_paragraph">Green (D15-D11) Red (D10-D06) Blue (D05-D01)</text:p>
      <text:p text:style-name="Preformatted_20_Text"><text:s text:c="15"/>| <text:s text:c="35"/>| <text:s text:c="41"/>|</text:p>
      <text:p text:style-name="Preformatted_20_Text"><text:s text:c="15"/>| <text:s text:c="35"/>| <text:s text:c="41"/>|</text:p>
      <text:p text:style-name="Preformatted_20_Text"><text:s text:c="14"/>G <text:s text:c="34"/>R <text:s text:c="39"/>B</text:p>
      <text:p text:style-name="Preformatted_20_Text"><text:s text:c="14"/>DAC <text:s text:c="30"/>DAC <text:s text:c="36"/>DAC</text:p>
      <text:p text:style-name="Preformatted_20_Text"><text:s text:c="14"/>(Output) <text:s text:c="23"/>(Input) <text:s text:c="31"/>(Input)</text:p>
      <text:p text:style-name="Preformatted_20_Text"/>
      <text:p text:style-name="Preformatted_20_Text"><text:s text:c="20"/>---- <text:s text:c="6"/>(Text (sprite) palette data or graphics palette data)</text:p>
      <text:p text:style-name="First_20_paragraph">Figure 2-24 Transparent Mode</text:p>
      <text:p text:style-name="Text_20_body">Chapter 2: Screen Control</text:p>
      <text:p text:style-name="Text_20_body">Let's explain the details of various transparency modes below.</text:p>
      <text:p text:style-name="Text_20_body">[1] Regardless of screen color mode, transparency is performed between the graphics screen and a text (sprite) screen to merge with the content at palette address 00H.</text:p>
      <text:p text:style-name="Text_20_body">[Diagram with bits and flags] E82600H</text:p>
      <text:p text:style-name="Preformatted_20_Text"><text:s text:c="1"/>Palette Address</text:p>
      <text:p text:style-name="Preformatted_20_Text"><text:s text:c="1"/>Contents of 00H</text:p>
      <text:p text:style-name="First_20_paragraph">Picture of a boat on a graphical, text (sprite) screen</text:p>
      <text:p text:style-name="Text_20_body">Screen combined with text displays the contents and transparency of palette address 00H.</text:p>
      <text:p text:style-name="Text_20_body">Figure 2-25: Transparency Mode (1)</text:p>
      <text:p text:style-name="Text_20_body">[2] The transparency is performed between the graphic page screen and text (sprite) screen. Although the domain where the transparency is conducted is designated on the graphics screen, in this case, it requires that the graphic page is displayed on screen with the highest priority. If the priority of the text (sprite) screen is higher and does not transparently overlap, the text (sprite) screen is displayed as-is. Additionally, if transparency is performed, the colors of the graphic will become half.</text:p>
      <text:p text:style-name="Text_20_body">[Diagram with bits and flags] E82600H</text:p>
      <text:p text:style-name="Text_20_body">Priority of Dot Domain</text:p>
      <text:p text:style-name="Text_20_body">Graphic Page</text:p>
      <text:p text:style-name="Text_20_body">Text (Sprite) Screen</text:p>
      <text:p text:style-name="Text_20_body">Transparency</text:p>
      <text:p text:style-name="Text_20_body">Figure 2-26: Transparency Mode (2)</text:p>
      <text:h text:style-name="Heading_20_1" text:outline-level="1"><text:bookmark-start text:name="id_5-video-controller"/>5. Video Controller<text:bookmark-end text:name="id_5-video-controller"/></text:h>
      <text:p text:style-name="First_20_paragraph">[3] In a mode with two or more graphic pages, the most prioritized graphic page and the next prioritized graphic page form a semi-transparent region. Note that the area is defined in the graphic page with the highest priority among overlapping areas. Also, the number of colors available for use in that graphic page will be halved.</text:p>
      <text:p text:style-name="Text_20_body">E82600H table: | D15 | D14 | D13 | D12 | D11 | D10 | D09 | D08 | |----|----|----|----|----|----|----|----| | X | 0 | 0 | 1 | 1 | 1 | 1 | 0 |</text:p>
      <text:p text:style-name="Text_20_body">(X denotes don't care)</text:p>
      <text:p text:style-name="Text_20_body">Illustrations:</text:p>
      <text:list text:style-name="List_20_1">
        <text:list-item>
          <text:p text:style-name="List_20_Bullet_20_Tight">Diagram on the left shows Graphics Page 0 with a semi-transparent hatched area.</text:p>
        </text:list-item>
        <text:list-item>
          <text:p text:style-name="List_20_Bullet_20_Tight">Diagram on the right shows the layering of Graphics Page 1, resulting in semi-transparency.</text:p>
        </text:list-item>
      </text:list>
      <text:p text:style-name="First_20_paragraph"><text:span text:style-name="Strong_20_Emphasis">Figure 2-27</text:span> Semi-transparent Mode (3)</text:p>
      <text:p text:style-name="Text_20_body">[4] The functions of both [2] and [3] are activated.</text:p>
      <text:p text:style-name="Text_20_body">E82600H table: | D15 | D14 | D13 | D12 | D11 | D10 | D09 | D08 | |----|----|----|----|----|----|----|----| | X | 0 | 1 | 1 | 1 | 1 | 1 | 0 |</text:p>
      <text:p text:style-name="Text_20_body">(X denotes don't care)</text:p>
      <text:p text:style-name="Text_20_body">[5] This is the semi-transparent mode in superimpose mode. First, the [2] semi-transparency function works and then another semi-transparency is performed in the same region defined by the [2] semi-transparency region for TV or video signals.</text:p>
      <text:p text:style-name="Text_20_body">E82600H table: | D15 | D14 | D13 | D12 | D11 | D10 | D09 | D08 | |----|----|----|----|----|----|----|----| | X | 0 | 1 | 1 | 1 | 1 | 0 | 1 |</text:p>
      <text:p text:style-name="Text_20_body">(X denotes don't care)</text:p>
      <text:p text:style-name="Text_20_body">Illustrations:</text:p>
      <text:list text:style-name="List_20_1">
        <text:list-item>
          <text:p text:style-name="List_20_Bullet_20_Tight">Left: the TV (video) screen.</text:p>
        </text:list-item>
        <text:list-item>
          <text:p text:style-name="List_20_Bullet_20_Tight">Right: shows the outcome of the semi-transparency application with a dot matrix in the overlapping area.</text:p>
        </text:list-item>
      </text:list>
      <text:p text:style-name="First_20_paragraph"><text:span text:style-name="Strong_20_Emphasis">Figure 2-28</text:span> Semi-transparency Mode (4)</text:p>
      <text:p text:style-name="Text_20_body">Chapter 2: Screeng Control</text:p>
      <text:p text:style-name="Text_20_body">[6] This is the semi-transparent mode for superimposing. First, the function of [3] operates, and additionally, the semi-transparent function is performed in the same area as where the transparency function was already operating, with the TV and video signals.</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header-rows>
          <table:table-row>
            <table:table-cell table:style-name="TableHeaderRowCell" office:value-type="string">
              <text:p text:style-name="Table_20_Heading">D15</text:p>
            </table:table-cell>
            <table:table-cell table:style-name="TableHeaderRowCell" office:value-type="string">
              <text:p text:style-name="Table_20_Heading">D14</text:p>
            </table:table-cell>
            <table:table-cell table:style-name="TableHeaderRowCell" office:value-type="string">
              <text:p text:style-name="Table_20_Heading">D13</text:p>
            </table:table-cell>
            <table:table-cell table:style-name="TableHeaderRowCell" office:value-type="string">
              <text:p text:style-name="Table_20_Heading">D12</text:p>
            </table:table-cell>
            <table:table-cell table:style-name="TableHeaderRowCell" office:value-type="string">
              <text:p text:style-name="Table_20_Heading">D11</text:p>
            </table:table-cell>
            <table:table-cell table:style-name="TableHeaderRowCell" office:value-type="string">
              <text:p text:style-name="Table_20_Heading">D10</text:p>
            </table:table-cell>
            <table:table-cell table:style-name="TableHeaderRowCell" office:value-type="string">
              <text:p text:style-name="Table_20_Heading">D09</text:p>
            </table:table-cell>
            <table:table-cell table:style-name="TableHeaderRowCell" office:value-type="string">
              <text:p text:style-name="Table_20_Heading">D08</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row>
      </table:table>
      <text:p text:style-name="First_20_paragraph">(E82600H) (X: Arbitrary)</text:p>
      <text:p text:style-name="Text_20_body">(3) Screen</text:p>
      <text:p text:style-name="Text_20_body">TV (Video) Screen</text:p>
      <text:p text:style-name="Text_20_body">Figure 2-29 Semi-transparent Mode (5)</text:p>
      <text:p text:style-name="Text_20_body">[7] The functions of both [5] and [6] operate.</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header-rows>
          <table:table-row>
            <table:table-cell table:style-name="TableHeaderRowCell" office:value-type="string">
              <text:p text:style-name="Table_20_Heading">D15</text:p>
            </table:table-cell>
            <table:table-cell table:style-name="TableHeaderRowCell" office:value-type="string">
              <text:p text:style-name="Table_20_Heading">D14</text:p>
            </table:table-cell>
            <table:table-cell table:style-name="TableHeaderRowCell" office:value-type="string">
              <text:p text:style-name="Table_20_Heading">D13</text:p>
            </table:table-cell>
            <table:table-cell table:style-name="TableHeaderRowCell" office:value-type="string">
              <text:p text:style-name="Table_20_Heading">D12</text:p>
            </table:table-cell>
            <table:table-cell table:style-name="TableHeaderRowCell" office:value-type="string">
              <text:p text:style-name="Table_20_Heading">D11</text:p>
            </table:table-cell>
            <table:table-cell table:style-name="TableHeaderRowCell" office:value-type="string">
              <text:p text:style-name="Table_20_Heading">D10</text:p>
            </table:table-cell>
            <table:table-cell table:style-name="TableHeaderRowCell" office:value-type="string">
              <text:p text:style-name="Table_20_Heading">D09</text:p>
            </table:table-cell>
            <table:table-cell table:style-name="TableHeaderRowCell" office:value-type="string">
              <text:p text:style-name="Table_20_Heading">D08</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
      <text:p text:style-name="First_20_paragraph">(E82600H) (X: Arbitrary)</text:p>
      <text:p text:style-name="Text_20_body">Additionally, if both D08 and D09 are "0," the semi-transparent function does not work even if the area is specified. Therefore, when using the semi-transparent function, please use the initial setting values of D08 to D15 of register 3 as follows.</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header-rows>
          <table:table-row>
            <table:table-cell table:style-name="TableHeaderRowCell" office:value-type="string">
              <text:p text:style-name="Table_20_Heading">D15</text:p>
            </table:table-cell>
            <table:table-cell table:style-name="TableHeaderRowCell" office:value-type="string">
              <text:p text:style-name="Table_20_Heading">D14</text:p>
            </table:table-cell>
            <table:table-cell table:style-name="TableHeaderRowCell" office:value-type="string">
              <text:p text:style-name="Table_20_Heading">D13</text:p>
            </table:table-cell>
            <table:table-cell table:style-name="TableHeaderRowCell" office:value-type="string">
              <text:p text:style-name="Table_20_Heading">D12</text:p>
            </table:table-cell>
            <table:table-cell table:style-name="TableHeaderRowCell" office:value-type="string">
              <text:p text:style-name="Table_20_Heading">D11</text:p>
            </table:table-cell>
            <table:table-cell table:style-name="TableHeaderRowCell" office:value-type="string">
              <text:p text:style-name="Table_20_Heading">D10</text:p>
            </table:table-cell>
            <table:table-cell table:style-name="TableHeaderRowCell" office:value-type="string">
              <text:p text:style-name="Table_20_Heading">D09</text:p>
            </table:table-cell>
            <table:table-cell table:style-name="TableHeaderRowCell" office:value-type="string">
              <text:p text:style-name="Table_20_Heading">D08</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
      <text:p text:style-name="First_20_paragraph">(E82600H)</text:p>
      <text:p text:style-name="Text_20_body">Page 68</text:p>
      <text:h text:style-name="Heading_20_1" text:outline-level="1"><text:bookmark-start text:name="id_5-video-controller-1"/>5. Video Controller<text:bookmark-end text:name="id_5-video-controller-1"/></text:h>
      <text:p text:style-name="First_20_paragraph">(2) Special Priority Mode</text:p>
      <text:p text:style-name="Text_20_body">By setting bit D12 of register 3 of the video controller to "1" and D11 to "0", you enable the special priority mode.</text:p>
      <text:p text:style-name="Text_20_body">The special priority mode uses the memory data of a high graphics page to specify an area within the graphics screen shown. The parts of the area specified (special priority area screen) where the priority is higher than the text (sprite) screen will be displayed in front of the text (sprite) screen. Conversely, when the priority of the text (sprite) screen is higher, it will be displayed in front of the specified area (special priority area screen).</text:p>
      <text:p text:style-name="Preformatted_20_Text"><text:s text:c="5"/>D15 <text:s text:c="1"/>D14 <text:s text:c="1"/>D13 <text:s text:c="1"/>D12 <text:s text:c="1"/>D11 <text:s text:c="1"/>D10 <text:s text:c="1"/>D09 <text:s text:c="1"/>D08</text:p>
      <text:p text:style-name="First_20_paragraph">EB2600H X X X 1 0 X X X (* X is ignored)</text:p>
      <text:p text:style-name="Text_20_body">[Diagram labeling] Dotted line labeled special priority area Graphics screen page 1 Graphics screen page 0 Text (sprite) screen</text:p>
      <text:p text:style-name="Text_20_body">Figure 2-30 Special Priority Mode</text:p>
      <text:p text:style-name="Text_20_body">Chapter 2: Screen Control</text:p>
      <text:list text:style-name="List_20_1">
        <text:list-item>
          <text:p text:style-name="List_20_Bullet_20_Tight">Special priority function area specification (using D10, which specifies semi-transparent or special priority functions) and screen display page setting are set in the graphics VRAM memory data of the graphics screen pages with higher priority. (If setting the semi-transparent area specifies, "1", then using this function specifies. As for this, text and sprites can be used normally.)</text:p>
        </text:list-item>
      </text:list>
      <text:p text:style-name="First_20_paragraph">Using the graphics VRAM bit of the memory data (LSB) as an area specification (when D10="1")</text:p>
      <text:p text:style-name="Text_20_body">[Diagram]</text:p>
      <text:list text:style-name="List_20_1">
        <text:list-item>
          <text:p text:style-name="List_20_Bullet">Graphics Screen 0</text:p>
        </text:list-item>
        <text:list-item>
          <text:p text:style-name="List_20_Bullet">Sprite</text:p>
        </text:list-item>
        <text:list-item>
          <text:p text:style-name="List_20_Bullet">Text</text:p>
        </text:list-item>
        <text:list-item>
          <text:p text:style-name="List_20_Bullet">Graphics Screen 1</text:p>
        </text:list-item>
        <text:list-item>
          <text:p text:style-name="List_20_Bullet">G03 Page</text:p>
        </text:list-item>
        <text:list-item>
          <text:p text:style-name="List_20_Bullet">G02 Page</text:p>
        </text:list-item>
        <text:list-item>
          <text:p text:style-name="List_20_Bullet">G01 Page</text:p>
        </text:list-item>
        <text:list-item>
          <text:p text:style-name="List_20_Bullet">G00 Page</text:p>
        </text:list-item>
        <text:list-item>
          <text:p text:style-name="List_20_Bullet">Page graphics palette address</text:p>
        </text:list-item>
        <text:list-item>
          <text:p text:style-name="List_20_Bullet">Palette address</text:p>
        </text:list-item>
        <text:list-item>
          <text:p text:style-name="List_20_Bullet">Area specification bit</text:p>
        </text:list-item>
      </text:list>
      <text:p text:style-name="Preformatted_20_Text"><text:s text:c="4"/>- The above semi-transparent or special priority function area specification is displayed with higher priority graphics screen pages, and it is set in dot units within the graphics VRAM. </text:p>
      <text:p text:style-name="Preformatted_20_Text"><text:s text:c="3"/>- Use odd-numbered numbered half palettes in the graphics VRAM memory data LSB. (The palette address will be pseudo-addressed.)</text:p>
      <text:p text:style-name="First_20_paragraph">The dotted line indicates the effective range of the semi-transparent/special priority.</text:p>
      <text:p text:style-name="Text_20_body">Note: When specifying semi-transparency, other hits at LSB (semi-transparent area bit) must all be "0". Do not set anything to LSB (semi-transparent specified bit) to "1".</text:p>
      <text:p text:style-name="Text_20_body">Note: If area specification is performed at the LSB of graphics VRAM memory data (D12="1", D11="1", D10="1"), the diagram 2-32 shows the configuration for the graphics palette. In this mode, except numbers, set the value of the palette address to match with the same value of the palette address content. Be careful when performing semi-transparency on the graphics screen.</text:p>
      <text:p text:style-name="Text_20_body">Page 70</text:p>
      <text:list text:style-name="Numbering_20_1" text:start-value="5">
        <text:list-item>
          <text:p text:style-name="List_20_Number_20_Tight">Video Controller</text:p>
        </text:list-item>
      </text:list>
      <text:p text:style-name="First_20_paragraph">Graphical Face 1 (Even Palette) (Specified by transparent display)</text:p>
      <text:p text:style-name="Text_20_body">Graphical Face 2 (Odd Palette) (Transparent display masking)</text:p>
      <text:p text:style-name="Text_20_body">Figure 2-32 Structure of the graphical screen's palette</text:p>
      <text:p text:style-name="Text_20_body">(4) CMP-OUT (Ys) signal (Standard resolution superimposed pose)</text:p>
      <text:p text:style-name="Text_20_body">[1] D15="1"</text:p>
      <text:p text:style-name="Text_20_body">CRT screen</text:p>
      <text:p text:style-name="Text_20_body">Superimposed Pose</text:p>
      <text:p text:style-name="Text_20_body">Computer screen</text:p>
      <text:p text:style-name="Text_20_body">Black (transparent)</text:p>
      <text:p text:style-name="Text_20_body">Superimposed Pose</text:p>
      <text:p text:style-name="Text_20_body">[2] D15="0"</text:p>
      <text:p text:style-name="Text_20_body">CRT screen</text:p>
      <text:p text:style-name="Text_20_body">Superimposed Pose</text:p>
      <text:p text:style-name="Text_20_body">TV, Video screen</text:p>
      <text:p text:style-name="Text_20_body">(Dotted area represents the superimposed computer screen)</text:p>
      <text:p text:style-name="Text_20_body">Figure 2-33 CMP-OUT signals</text:p>
      <text:p text:style-name="Text_20_body">Page 71</text:p>
      <text:p text:style-name="Text_20_body">Chapter 2 Screen Control</text:p>
      <text:p text:style-name="Text_20_body">(5) Palette Address [1] Text (Sprite) Palette Address [READ/WRITE Availabl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header-rows>
          <table:table-row>
            <table:table-cell table:style-name="TableHeaderRowCell" office:value-type="string">
              <text:p text:style-name="Table_20_Heading">Palette Address</text:p>
            </table:table-cell>
            <table:table-cell table:style-name="TableHeaderRowCell" office:value-type="string">
              <text:p text:style-name="Table_20_Heading">Register Address</text:p>
            </table:table-cell>
            <table:table-cell table:style-name="TableHeaderRowCell" office:value-type="string">
              <text:p text:style-name="Table_20_Heading">D15-D11</text:p>
            </table:table-cell>
            <table:table-cell table:style-name="TableHeaderRowCell" office:value-type="string">
              <text:p text:style-name="Table_20_Heading">D10-D06</text:p>
            </table:table-cell>
            <table:table-cell table:style-name="TableHeaderRowCell" office:value-type="string">
              <text:p text:style-name="Table_20_Heading">D05-D01</text:p>
            </table:table-cell>
            <table:table-cell table:style-name="TableHeaderRowCell" office:value-type="string">
              <text:p text:style-name="Table_20_Heading">D0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0H</text:p>
          </table:table-cell>
          <table:table-cell table:style-name="TableRowCell" office:value-type="string">
            <text:p text:style-name="Table_20_Contents">E82200H</text:p>
          </table:table-cell>
          <table:table-cell table:style-name="TableRowCell" office:value-type="string">
            <text:p text:style-name="Table_20_Contents">Green</text:p>
          </table:table-cell>
          <table:table-cell table:style-name="TableRowCell" office:value-type="string">
            <text:p text:style-name="Table_20_Contents">Red</text:p>
          </table:table-cell>
          <table:table-cell table:style-name="TableRowCell" office:value-type="string">
            <text:p text:style-name="Table_20_Contents">Blue</text:p>
          </table:table-cell>
          <table:table-cell table:style-name="TableRowCell" office:value-type="string">
            <text:p text:style-name="Table_20_Contents">I</text:p>
          </table:table-cell>
          <table:table-cell table:style-name="TableRowCell" office:value-type="string">
    </table:table-cell>
        </table:table-row>
        <table:table-row>
          <table:table-cell table:style-name="TableRowCell" office:value-type="string">
            <text:p text:style-name="Table_20_Contents">01H</text:p>
          </table:table-cell>
          <table:table-cell table:style-name="TableRowCell" office:value-type="string">
            <text:p text:style-name="Table_20_Contents">E82202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2H</text:p>
          </table:table-cell>
          <table:table-cell table:style-name="TableRowCell" office:value-type="string">
            <text:p text:style-name="Table_20_Contents">E82204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FH</text:p>
          </table:table-cell>
          <table:table-cell table:style-name="TableRowCell" office:value-type="string">
            <text:p text:style-name="Table_20_Contents">E8221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H</text:p>
          </table:table-cell>
          <table:table-cell table:style-name="TableRowCell" office:value-type="string">
            <text:p text:style-name="Table_20_Contents">E8222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 Sprite</text:p>
          </table:table-cell>
        </table:table-row>
        <table:table-row>
          <table:table-cell table:style-name="TableRowCell" office:value-type="string">
            <text:p text:style-name="Table_20_Contents">1FH</text:p>
          </table:table-cell>
          <table:table-cell table:style-name="TableRowCell" office:value-type="string">
            <text:p text:style-name="Table_20_Contents">E8223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ommon Palett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prite Palette</text:p>
          </table:table-cell>
        </table:table-row>
        <table:table-row>
          <table:table-cell table:style-name="TableRowCell" office:value-type="string">
            <text:p text:style-name="Table_20_Contents">F0H</text:p>
          </table:table-cell>
          <table:table-cell table:style-name="TableRowCell" office:value-type="string">
            <text:p text:style-name="Table_20_Contents">E823E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FH</text:p>
          </table:table-cell>
          <table:table-cell table:style-name="TableRowCell" office:value-type="string">
            <text:p text:style-name="Table_20_Contents">E823F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able 2-22 Text (Sprite) Palette Address [2] Graphic Palette Address (16 Colors, 256 Color Mode) [READ/WRITE Available]</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header-rows>
          <table:table-row>
            <table:table-cell table:style-name="TableHeaderRowCell" office:value-type="string">
              <text:p text:style-name="Table_20_Heading">Palette Address/Graphic VRAM Data</text:p>
            </table:table-cell>
            <table:table-cell table:style-name="TableHeaderRowCell" office:value-type="string">
              <text:p text:style-name="Table_20_Heading">Register Address</text:p>
            </table:table-cell>
            <table:table-cell table:style-name="TableHeaderRowCell" office:value-type="string">
              <text:p text:style-name="Table_20_Heading">D15-D11</text:p>
            </table:table-cell>
            <table:table-cell table:style-name="TableHeaderRowCell" office:value-type="string">
              <text:p text:style-name="Table_20_Heading">D10-D06</text:p>
            </table:table-cell>
            <table:table-cell table:style-name="TableHeaderRowCell" office:value-type="string">
              <text:p text:style-name="Table_20_Heading">D05-D01</text:p>
            </table:table-cell>
            <table:table-cell table:style-name="TableHeaderRowCell" office:value-type="string">
              <text:p text:style-name="Table_20_Heading">D0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00H</text:p>
          </table:table-cell>
          <table:table-cell table:style-name="TableRowCell" office:value-type="string">
            <text:p text:style-name="Table_20_Contents">E82000H</text:p>
          </table:table-cell>
          <table:table-cell table:style-name="TableRowCell" office:value-type="string">
            <text:p text:style-name="Table_20_Contents">Green</text:p>
          </table:table-cell>
          <table:table-cell table:style-name="TableRowCell" office:value-type="string">
            <text:p text:style-name="Table_20_Contents">Red</text:p>
          </table:table-cell>
          <table:table-cell table:style-name="TableRowCell" office:value-type="string">
            <text:p text:style-name="Table_20_Contents">Blue</text:p>
          </table:table-cell>
          <table:table-cell table:style-name="TableRowCell" office:value-type="string">
            <text:p text:style-name="Table_20_Contents">I</text:p>
          </table:table-cell>
          <table:table-cell table:style-name="TableRowCell" office:value-type="string">
            <text:p text:style-name="Table_20_Contents">Graphic Palette</text:p>
          </table:table-cell>
        </table:table-row>
        <table:table-row>
          <table:table-cell table:style-name="TableRowCell" office:value-type="string">
            <text:p text:style-name="Table_20_Contents">01H</text:p>
          </table:table-cell>
          <table:table-cell table:style-name="TableRowCell" office:value-type="string">
            <text:p text:style-name="Table_20_Contents">E82002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6 or 256 colors)</text:p>
          </table:table-cell>
        </table:table-row>
        <table:table-row>
          <table:table-cell table:style-name="TableRowCell" office:value-type="string">
            <text:p text:style-name="Table_20_Contents">02H</text:p>
          </table:table-cell>
          <table:table-cell table:style-name="TableRowCell" office:value-type="string">
            <text:p text:style-name="Table_20_Contents">E82004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FH</text:p>
          </table:table-cell>
          <table:table-cell table:style-name="TableRowCell" office:value-type="string">
            <text:p text:style-name="Table_20_Contents">E8201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H</text:p>
          </table:table-cell>
          <table:table-cell table:style-name="TableRowCell" office:value-type="string">
            <text:p text:style-name="Table_20_Contents">E8202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FH</text:p>
          </table:table-cell>
          <table:table-cell table:style-name="TableRowCell" office:value-type="string">
            <text:p text:style-name="Table_20_Contents">E821F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Graphic Palette (256 colors)</text:p>
          </table:table-cell>
        </table:table-row>
      </table:table>
      <text:p text:style-name="First_20_paragraph">Table 2-23 Graphic Palette Address (1) (For the data of Palette Address 00H, please enter "0000H" as the initial value.)</text:p>
      <text:list text:style-name="Numbering_20_1" text:start-value="5">
        <text:list-item>
          <text:p text:style-name="List_20_Number_20_Tight">Video Controller</text:p>
        </text:list-item>
      </text:list>
      <text:p text:style-name="First_20_paragraph">[3] Graphic Palette Address (65536 Color Mode)</text:p>
      <text:p text:style-name="Text_20_body">[READ/WRITE OK]</text:p>
      <text:p text:style-name="Text_20_body">Table (lower byte): Palette Address / Graphic VRAM memory data, lower byte | Register Address | D15~D14 | D13~D09 | D08 | D07~D06 | D05~D01 | D00 | Remarks | | Red lower | Blue | I | Red lower | Blue | I | 00H 01H | E82000H | &lt;- 8 bits -&gt; | &lt;- 8 bits -&gt; | 65536 color mode palette. Selects the 8 bits 02H 03H | E82004H | | from either D15~D08 or D07~D00 and outputs 04H 05H | E82008H | | them as the lower 8 bits. : : | : | FCH FDH | E821F8H | FEH FFH | E821FCH |</text:p>
      <text:p text:style-name="Text_20_body">Table (upper byte): Palette Address / Graphic VRAM memory data, upper byte | Register Address | D15~D11 | D10~D08 | D07~D03 | D02~D00 | Remarks | | Green | Red upper | Green | Red upper | 00H 01H | E82002H | &lt;- 8 bits -&gt; | &lt;- 8 bits -&gt; | 65536 color mode palette. Selects the 8 bits 02H 03H | E82006H | | from either D15~D08 or D07~D00 and outputs 04H 05H | E8200AH | | them as the upper 8 bits. : : | : | FCH FDH | E821FAH | FEH FFH | E821FEH |</text:p>
      <text:p text:style-name="Text_20_body">Table 2-24 Graphic Palette Address (2)</text:p>
      <text:list text:style-name="List_20_1">
        <text:list-item>
          <text:p text:style-name="List_20_Bullet_20_Tight">As a rule, enter the palette address value into the data of each palette register address.</text:p>
        </text:list-item>
      </text:list>
      <text:p text:style-name="First_20_paragraph">Chapter 2: Screen Control</text:p>
      <text:list text:style-name="Numbering_20_1" text:start-value="6">
        <text:list-item>
          <text:p text:style-name="List_20_Number_20_Tight">CGROM</text:p>
        </text:list-item>
      </text:list>
      <text:p text:style-name="First_20_paragraph">6-1 Specifications of CGROM</text:p>
      <text:p text:style-name="Text_20_body">(1) Font Composition</text:p>
      <text:p text:style-name="Preformatted_20_Text"><text:s text:c="4"/>- 1/4 Width Characters (8x8, 12x12)</text:p>
      <text:p text:style-name="Preformatted_20_Text"><text:s text:c="4"/>- Half-Width Characters (8x16, 12x24)</text:p>
      <text:p text:style-name="Preformatted_20_Text"><text:s text:c="4"/>- Full-Width Characters (16x16, 24x24)</text:p>
      <text:p text:style-name="First_20_paragraph">(2) Character Face</text:p>
      <text:p text:style-name="Preformatted_20_Text"><text:s text:c="4"/>- 1/4 Width Characters (6x7, 10x10)</text:p>
      <text:p text:style-name="Preformatted_20_Text"><text:s text:c="4"/>- Half-Width Characters (7x13, 10x18)</text:p>
      <text:p text:style-name="Preformatted_20_Text"><text:s text:c="4"/>- Full-Width Characters (15x16, 24x24)</text:p>
      <text:p text:style-name="First_20_paragraph">(3) Number of Characters</text:p>
      <text:p text:style-name="Preformatted_20_Text"><text:s text:c="4"/>- 1/4 Width Characters: 256 characters</text:p>
      <text:p text:style-name="Preformatted_20_Text"><text:s text:c="4"/>- Half-Width Characters: 256 characters</text:p>
      <text:p text:style-name="Preformatted_20_Text"><text:s text:c="4"/>- Full-Width Characters: Non-Kanji...752 characters (JIS Code [Upper Address] 21H~28H, [Lower Address] 21H~7EH)</text:p>
      <text:p text:style-name="Preformatted_20_Text"><text:s text:c="10"/>First Level Kanji...3008 characters (JIS Code [Upper Address] 30H~4FH, [Lower Address] 21H~7EH)</text:p>
      <text:p text:style-name="Preformatted_20_Text"><text:s text:c="10"/>Second Level Kanji...3478 characters (JIS Code [Upper Address] 50H~74H, [Lower Address] 21H~7EH)</text:p>
      <text:p text:style-name="First_20_paragraph"><text:span text:style-name="Strong_20_Emphasis">6-2 CGROM Address Map</text:span></text:p>
      <text:p text:style-name="Text_20_body">MSB 16-bit LSB F00000H ────────────────────────────── 16x16 Font (Alphanumeric 752 characters) F05000H ──────────────────────────────</text:p>
      <text:p text:style-name="Preformatted_20_Text"><text:s text:c="13"/>16x16 Font</text:p>
      <text:p text:style-name="Preformatted_20_Text"><text:s text:c="13"/>(1st level kanji 3008 characters)</text:p>
      <text:p text:style-name="First_20_paragraph">F1D600H ──────────────────────────────</text:p>
      <text:p text:style-name="Preformatted_20_Text"><text:s text:c="13"/>16x16 Font</text:p>
      <text:p text:style-name="Preformatted_20_Text"><text:s text:c="13"/>(2nd level kanji 3478 characters)</text:p>
      <text:p text:style-name="First_20_paragraph">F398C0H ────────────────────────────── F3A0000H ───────────────────────────── 8x8 Font (256 characters) F3A8000H ───────────────────────────── 8x16 Font (256 characters) F3B800H ───────────────────────────── 12x12 Font (256 characters) F3D000H ───────────────────────────── 12x24 Font (256 characters) F40000H ───────────────────────────── 24x24 Font (Alphanumeric 752 characters) F4D3800H ─────────────────────────────</text:p>
      <text:p text:style-name="Preformatted_20_Text"><text:s text:c="13"/>24x24 Font</text:p>
      <text:p text:style-name="Preformatted_20_Text"><text:s text:c="13"/>(1st level kanji 3008 characters)</text:p>
      <text:p text:style-name="First_20_paragraph">F821800H ─────────────────────────────</text:p>
      <text:p text:style-name="Preformatted_20_Text"><text:s text:c="13"/>24x24 Font</text:p>
      <text:p text:style-name="Preformatted_20_Text"><text:s text:c="13"/>(2nd level kanji 3478 characters)</text:p>
      <text:p text:style-name="First_20_paragraph">FBF380H ───────────────────────────── FBFFEFH ─────────────────────────────</text:p>
      <text:p text:style-name="Text_20_body">Figure 2-34 CGROM Address Map</text:p>
      <text:p text:style-name="Text_20_body">Chapter 2: Screen Control</text:p>
      <text:p text:style-name="Text_20_body">6-3 Structure of CGROM Address</text:p>
      <text:p text:style-name="Text_20_body">(1) 8x8 Font</text:p>
      <text:p text:style-name="Preformatted_20_Text"><text:s text:c="8"/>MSB <text:s text:c="22"/>16 Bits <text:s text:c="24"/>LSB</text:p>
      <text:p text:style-name="Preformatted_20_Text"><text:s text:c="8"/>F3A000H <text:s text:c="2"/>0 <text:s text:c="4"/>1</text:p>
      <text:p text:style-name="Preformatted_20_Text"><text:s text:c="8"/>F3A002H <text:s text:c="2"/>2 <text:s text:c="4"/>3</text:p>
      <text:p text:style-name="Preformatted_20_Text"><text:s text:c="23"/>:</text:p>
      <text:p text:style-name="Preformatted_20_Text"><text:s text:c="8"/>F3A004H <text:s text:c="2"/>4 <text:s text:c="4"/>5</text:p>
      <text:p text:style-name="Preformatted_20_Text"><text:s text:c="23"/>:</text:p>
      <text:p text:style-name="Preformatted_20_Text"><text:s text:c="8"/>F3A006H <text:s text:c="2"/>6 <text:s text:c="4"/>7</text:p>
      <text:p text:style-name="Preformatted_20_Text"><text:s text:c="23"/>:</text:p>
      <text:p text:style-name="Preformatted_20_Text"><text:s text:c="8"/>F3A008H <text:s text:c="3"/>0 <text:s text:c="3"/>1</text:p>
      <text:p text:style-name="Preformatted_20_Text"><text:s text:c="23"/>:</text:p>
      <text:p text:style-name="Preformatted_20_Text"><text:s text:c="8"/>F3A00AH <text:s text:c="3"/>2 <text:s text:c="3"/>3</text:p>
      <text:p text:style-name="First_20_paragraph">ASCII Code 00H Font</text:p>
      <text:p text:style-name="Text_20_body">Fig. 2-35 CGROM Address (1)</text:p>
      <text:p text:style-name="Text_20_body">(2) 8x16 Font</text:p>
      <text:p text:style-name="Preformatted_20_Text"><text:s text:c="8"/>MSB <text:s text:c="22"/>16 Bits <text:s text:c="24"/>LSB</text:p>
      <text:p text:style-name="Preformatted_20_Text"><text:s text:c="8"/>F3A800H <text:s text:c="6"/>0 <text:s text:c="5"/>1</text:p>
      <text:p text:style-name="Preformatted_20_Text"><text:s text:c="8"/>F3A802H <text:s text:c="6"/>2 <text:s text:c="5"/>3</text:p>
      <text:p text:style-name="Preformatted_20_Text"><text:s text:c="23"/>:</text:p>
      <text:p text:style-name="Preformatted_20_Text"><text:s text:c="8"/>F3A804H <text:s text:c="6"/>4 <text:s text:c="5"/>5</text:p>
      <text:p text:style-name="Preformatted_20_Text"><text:s text:c="23"/>:</text:p>
      <text:p text:style-name="Preformatted_20_Text"><text:s text:c="8"/>F3A806H <text:s text:c="6"/>6 <text:s text:c="5"/>7</text:p>
      <text:p text:style-name="Preformatted_20_Text"><text:s text:c="23"/>:</text:p>
      <text:p text:style-name="Preformatted_20_Text"><text:s text:c="8"/>F3A808H <text:s text:c="6"/>8 <text:s text:c="5"/>9</text:p>
      <text:p text:style-name="Preformatted_20_Text"><text:s text:c="23"/>:</text:p>
      <text:p text:style-name="Preformatted_20_Text"><text:s text:c="8"/>F3A80AH <text:s text:c="2"/>10 <text:s text:c="3"/>11</text:p>
      <text:p text:style-name="Preformatted_20_Text"><text:s text:c="23"/>:</text:p>
      <text:p text:style-name="Preformatted_20_Text"><text:s text:c="8"/>F3A80CH <text:s text:c="2"/>12 <text:s text:c="3"/>13</text:p>
      <text:p text:style-name="Preformatted_20_Text"><text:s text:c="23"/>:</text:p>
      <text:p text:style-name="Preformatted_20_Text"><text:s text:c="8"/>F3A80EH <text:s text:c="2"/>14 <text:s text:c="3"/>15</text:p>
      <text:p text:style-name="Preformatted_20_Text"><text:s text:c="23"/>:</text:p>
      <text:p text:style-name="Preformatted_20_Text"><text:s text:c="8"/>F3A810H <text:s text:c="6"/>0 <text:s text:c="4"/>1</text:p>
      <text:p text:style-name="First_20_paragraph">ASCII Code 00H Font</text:p>
      <text:p text:style-name="Text_20_body">Fig. 2-36 CGROM Address (2)</text:p>
      <text:p text:style-name="Text_20_body">Page 76</text:p>
      <text:p text:style-name="Text_20_body">Top Left: "(3) 16x16 Font"</text:p>
      <text:p text:style-name="Text_20_body">Labels in the table on the left: "← 16-bit" "0 1" "2 3" "4 5" ... "26 27" "28 29" "30 31"</text:p>
      <text:p text:style-name="Text_20_body">Labels in the table on the right: "MSB 16-bit LSB" F00000H 0 1 F00002H 2 3 F00004H 4 5 F00006H 6 7 F00008H 8 9 F0000AH 10 11 F0000CH 12 13 F0000EH 14 15 F00010H 16 17 F00012H 18 19 F00014H 20 21 ... F0001AH 26 27 F0001CH 28 29 F0001EH 30 31</text:p>
      <text:p text:style-name="Text_20_body">Near the table on the right: "JIS Code 2121H font"</text:p>
      <text:p text:style-name="Text_20_body">Bottom: "Fig. 2-37 CGROM Address (3)"</text:p>
      <text:p text:style-name="Text_20_body">Chapter 2 Screen Control</text:p>
      <text:p text:style-name="Text_20_body">(4) 12x12 Font</text:p>
      <text:p text:style-name="Text_20_body">&lt;--12 Bits--&gt;</text:p>
      <text:p text:style-name="Preformatted_20_Text">0 <text:s text:c="2"/>1</text:p>
      <text:p text:style-name="Preformatted_20_Text">2 <text:s text:c="2"/>3</text:p>
      <text:p text:style-name="Preformatted_20_Text">4 <text:s text:c="2"/>5</text:p>
      <text:p text:style-name="First_20_paragraph">| |</text:p>
      <text:p text:style-name="Preformatted_20_Text">18 <text:s text:c="1"/>19</text:p>
      <text:p text:style-name="Preformatted_20_Text">20 <text:s text:c="1"/>21</text:p>
      <text:p text:style-name="Preformatted_20_Text">22 <text:s text:c="1"/>23</text:p>
      <text:p text:style-name="First_20_paragraph">MSB 16 Bits LSB</text:p>
      <text:p text:style-name="Text_20_body">F3B800H 0 1 0000 F3B802H 2 3 0000 F3B804H 4 5 0000 F3B806H 6 7 0000 F3B808H 8 9 0000 F3B80AH 10 11 0000 F3B80CH 12 13 0000 F3B80EH 14 15 0000</text:p>
      <text:p text:style-name="Text_20_body">F3B810H 16 17 0000 F3B812H 18 19 0000 F3B814H 20 21 0000 F3B816H 22 23 0000</text:p>
      <text:p text:style-name="Text_20_body">ASCII Code Font of 00H</text:p>
      <text:p text:style-name="Text_20_body">Figure 2-38 CGROM Address (4)</text:p>
      <text:p text:style-name="Text_20_body">Page 78</text:p>
      <text:list text:style-name="Numbering_20_1" text:start-value="6">
        <text:list-item>
          <text:p text:style-name="List_20_Number_20_Tight">CGROM</text:p>
        </text:list-item>
      </text:list>
      <text:p text:style-name="First_20_paragraph">(5) 12×24 Font</text:p>
      <text:p text:style-name="Text_20_body">MSB 16 Bits LSB<text:line-break/>[F3D000H] 0 : 1 0000<text:line-break/>[F3D002H] 2 : 3 0000<text:line-break/>[F3D004H] 4 : 5 0000<text:line-break/>...</text:p>
      <text:p text:style-name="Text_20_body">[F3D02AH] 42 : 43 0000<text:line-break/>[F3D02CH] 44 : 45 0000<text:line-break/>[F3D02EH] 46 : 47 0000<text:line-break/>...</text:p>
      <text:p text:style-name="Text_20_body">ASCII Code 00H Font</text:p>
      <text:p text:style-name="Text_20_body">Figure 2-39 CGROM Address (5)</text:p>
      <text:p text:style-name="Text_20_body">(6) 24×24 Font</text:p>
      <text:p text:style-name="Text_20_body">MSB 16 Bits LSB<text:line-break/>[F3D000H] 0 : 1 0000<text:line-break/>[F3D002H] 2 : 3 0000<text:line-break/>[F3D004H] 4 : 5 0000<text:line-break/>...</text:p>
      <text:p text:style-name="Text_20_body">[F3D02AH] 66 : 67 0000<text:line-break/>[F3D02CH] 68 : 69 0000<text:line-break/>[F3D02EH] 70 : 71 0000<text:line-break/>...</text:p>
      <text:p text:style-name="Text_20_body">JIS Code 2121H Font</text:p>
      <text:p text:style-name="Text_20_body">Figure 2-40 CGROM Address (6)</text:p>
      <text:p text:style-name="Text_20_body">This document seems to be describing the CGROM (Character Generator ROM) addresses for different font sizes and associated character codes.</text:p>
      <text:p text:style-name="Text_20_body">Chapter 2 Screen Control</text:p>
      <text:list text:style-name="Numbering_20_1" text:start-value="7">
        <text:list-item>
          <text:p text:style-name="List_20_Number_20_Tight">Superimpose and Overscan</text:p>
        </text:list-item>
      </text:list>
      <text:p text:style-name="First_20_paragraph">The X68000 supports the following computer screen display modes:</text:p>
      <text:p text:style-name="Text_20_body">(1) Standard Resolution Mode (Horizontal synchronization frequency 15.98 kHz, Vertical synchronization frequency 60.52 Hz)</text:p>
      <text:list text:style-name="List_20_1">
        <text:list-item>
          <text:p text:style-name="List_20_Bullet_20_Tight">As a display mode, the computer screen supports two modes: superimpose screen and computer screen (when connected to a dedicated display).</text:p>
        </text:list-item>
        <text:list-item>
          <text:p text:style-name="List_20_Bullet_20_Tight">In this mode, where you use the overscan method for the display on the computer screen, the size displayed on the actual display becomes smaller than the physical screen size (approximately 8% smaller horizontally and vertically).</text:p>
        </text:list-item>
      </text:list>
      <table:table table:name="Table29" table:style-name="Table29">
        <table:table-column table:style-name="Table29.A"/>
        <table:table-column table:style-name="Table29.B"/>
        <table:table-header-rows>
          <table:table-row>
            <table:table-cell table:style-name="TableHeaderRowCell" office:value-type="string">
              <text:p text:style-name="Table_20_Heading">Standard Resolution Mode Physical Screen Size</text:p>
            </table:table-cell>
            <table:table-cell table:style-name="TableHeaderRowCell" office:value-type="string">
              <text:p text:style-name="Table_20_Heading">Actual Displayed Screen Size</text:p>
            </table:table-cell>
          </table:table-row>
        </table:table-header-rows>
        <table:table-row>
          <table:table-cell table:style-name="TableRowCell" office:value-type="string">
            <text:p text:style-name="Table_20_Contents">512x256 (dot)</text:p>
          </table:table-cell>
          <table:table-cell table:style-name="TableRowCell" office:value-type="string">
            <text:p text:style-name="Table_20_Contents">Approx. 471x236 (dot)</text:p>
          </table:table-cell>
        </table:table-row>
        <table:table-row>
          <table:table-cell table:style-name="TableRowCell" office:value-type="string">
            <text:p text:style-name="Table_20_Contents">256x256</text:p>
          </table:table-cell>
          <table:table-cell table:style-name="TableRowCell" office:value-type="string">
            <text:p text:style-name="Table_20_Contents">Approx. 236x236</text:p>
          </table:table-cell>
        </table:table-row>
        <table:table-row>
          <table:table-cell table:style-name="TableRowCell" office:value-type="string">
            <text:p text:style-name="Table_20_Contents">512x512</text:p>
          </table:table-cell>
          <table:table-cell table:style-name="TableRowCell" office:value-type="string">
            <text:p text:style-name="Table_20_Contents">Approx. 471x471 (Interlace)</text:p>
          </table:table-cell>
        </table:table-row>
      </table:table>
      <text:p text:style-name="First_20_paragraph">Figure 2-25 Standard Resolution Mode</text:p>
      <text:p text:style-name="Text_20_body">[Overscan] [Normal Scan (usual display method)]</text:p>
      <text:p text:style-name="Text_20_body">(Note: Dotted lines indicate the area of the overscanned computer screen)</text:p>
      <text:p text:style-name="Text_20_body">CRT screen (display field) Computer screen Border</text:p>
      <text:p text:style-name="Text_20_body">Figure 2-41 Standard Resolution Mode</text:p>
      <text:list text:style-name="Numbering_20_1" text:start-value="7">
        <text:list-item>
          <text:p text:style-name="List_20_Number_20_Tight">Superimpose and Overscan</text:p>
        </text:list-item>
      </text:list>
      <text:p text:style-name="First_20_paragraph">In this mode, in addition to supporting the superimpose mode as in the conventional X1 and X1turbo series, it also supports the interlace method superimpose mode with enhanced resolution. Note that in either case it is overscan.</text:p>
      <text:p text:style-name="Text_20_body">Table 2-26 Superimpose Mode</text:p>
      <table:table table:name="Table30" table:style-name="Table30">
        <table:table-column table:style-name="Table30.A"/>
        <table:table-column table:style-name="Table30.B"/>
        <table:table-header-rows>
          <table:table-row>
            <table:table-cell table:style-name="TableHeaderRowCell" office:value-type="string">
              <text:p text:style-name="Table_20_Heading">Conventional Superimpose Mode</text:p>
            </table:table-cell>
            <table:table-cell table:style-name="TableHeaderRowCell" office:value-type="string">
      </table:table-cell>
          </table:table-row>
        </table:table-header-rows>
        <table:table-row>
          <table:table-cell table:style-name="TableRowCell" office:value-type="string">
            <text:p text:style-name="Table_20_Contents">512 x 256</text:p>
          </table:table-cell>
          <table:table-cell table:style-name="TableRowCell" office:value-type="string">
    </table:table-cell>
        </table:table-row>
        <table:table-row>
          <table:table-cell table:style-name="TableRowCell" office:value-type="string">
            <text:p text:style-name="Table_20_Contents">256 x 256</text:p>
          </table:table-cell>
          <table:table-cell table:style-name="TableRowCell" office:value-type="string">
    </table:table-cell>
        </table:table-row>
      </table:table>
      <table:table table:name="Table31" table:style-name="Table31">
        <table:table-column table:style-name="Table31.A"/>
        <table:table-column table:style-name="Table31.B"/>
        <table:table-header-rows>
          <table:table-row>
            <table:table-cell table:style-name="TableHeaderRowCell" office:value-type="string">
              <text:p text:style-name="Table_20_Heading">Suspected High Resolution Superimpose Mode</text:p>
            </table:table-cell>
            <table:table-cell table:style-name="TableHeaderRowCell" office:value-type="string">
              <text:p text:style-name="Table_20_Heading">(Interlace)</text:p>
            </table:table-cell>
          </table:table-row>
        </table:table-header-rows>
        <table:table-row>
          <table:table-cell table:style-name="TableRowCell" office:value-type="string">
            <text:p text:style-name="Table_20_Contents">512 x 512</text:p>
          </table:table-cell>
          <table:table-cell table:style-name="TableRowCell" office:value-type="string">
    </table:table-cell>
        </table:table-row>
      </table:table>
      <text:p text:style-name="First_20_paragraph">Figure 2-42 Superimpose Mode</text:p>
      <text:p text:style-name="Text_20_body">[Conventional Superimpose Mode] | [Suspected High Resolution Superimpose Mode]</text:p>
      <text:p text:style-name="Text_20_body">CRT Screen | CRT Screen (Display Example) | (Display Example) |<text:line-break/>Same memory byte access | Each differs Same memory byte access | Memory byte access Same memory byte access | Memory byte access Same memory byte access | Memory byte access Same memory byte access | Memory byte access Scanline of the above fields | Odd field scanline Scanline of the below fields | Even field scanline</text:p>
      <text:p text:style-name="Text_20_body">[Access the same memory data for both odd and even fields as with the TV monitor] (However, the dot pattern is a computer screen overscanned with points)</text:p>
      <text:p text:style-name="Text_20_body">[Access different memory data for both odd and even fields as with the TV monitor]</text:p>
      <text:p text:style-name="Text_20_body">Page 81</text:p>
      <text:p text:style-name="Text_20_body"><text:span text:style-name="Strong_20_Emphasis">Chapter 2: Screen Control</text:span></text:p>
      <text:p text:style-name="Text_20_body">(2) High-Resolution Mode (Horizontal synchronization frequency: 31.5 kHz, Vertical synchronization frequency: 55.46 Hz)</text:p>
      <text:list text:style-name="List_20_1">
        <text:list-item>
          <text:p text:style-name="List_20_Bullet_20_Tight">As a display mode, it only supports computer screen displays and does not support Super Impose screen displays.</text:p>
        </text:list-item>
        <text:list-item>
          <text:p text:style-name="List_20_Bullet_20_Tight">The computer screen only displays in normal scan (however, on dedicated display sides it also supports over-scan).</text:p>
        </text:list-item>
      </text:list>
      <text:p text:style-name="First_20_paragraph"><text:span text:style-name="Strong_20_Emphasis">Figure 2-43 High-Resolution Mode</text:span></text:p>
      <text:p text:style-name="Text_20_body">(Caption of the illustration) <text:span text:style-name="Strong_20_Emphasis">Normal Scan</text:span> CRT screen (display area) Computer Screen Border</text:p>
      <text:list text:style-name="List_20_1">
        <text:list-item>
          <text:p text:style-name="List_20_Bullet_20_Tight">The 512x256 and 256x256 2 display modes operate in the same way as the high-resolution 200 line mode of X1turbo (however, the horizontal/vertical synchronization frequency is different).</text:p>
        </text:list-item>
      </text:list>
      <text:p text:style-name="First_20_paragraph">(3) Determination of Super Impose by the main CPU By sending the vertical synchronization signal from external source to DMA on PCLO (pin 8), and checking this signal through the DMA register, it is possible to determine whether it is in Super Impose mode.</text:p>
      <text:p text:style-name="Text_20_body"> The PCLO mode can be determined by reading PCLO by setting DCRO (DMAC channel 0; register address E840004H) bit 0,1 (PCL) to 00. The content of PCLO is CSR (also DCRO channel 0; register address E840000H) bit 0 (PCS) read; "H" or "L".</text:p>
      <text:p text:style-name="Text_20_body">Page: 82</text:p>
      <text:p text:style-name="Text_20_body">Chapter 3 Sound Function</text:p>
      <text:p text:style-name="Text_20_body">In the X68000, the YM2151 is used as the FM sound-source LSI and the MSM6258 is used as the voice-synthesis LSI.</text:p>
      <text:p text:style-name="Text_20_body">Block diagram labels: Data Buffer Address Decoder Control</text:p>
      <text:p text:style-name="Text_20_body">Vcc1 Vss CLK (4 MHz) FM Sound Source (YM2151)</text:p>
      <text:p text:style-name="Text_20_body">Vcc1 Vss uPD8255 PC</text:p>
      <text:p text:style-name="Text_20_body">Vcc1 Vss CLK (4 MHz) ADPCM (MSM6258) PCM PAN</text:p>
      <text:p text:style-name="Text_20_body">Amp Internal Speaker Headphone Out L line Out R line Out R TV AUDIO L TV AUDIO line In</text:p>
      <text:p text:style-name="Text_20_body">Figure 3-1 Sound System Block Diagram</text:p>
      <text:p text:style-name="Text_20_body">Chapter 3: Sound Functions</text:p>
      <text:list text:style-name="Numbering_20_1">
        <text:list-item>
          <text:p text:style-name="List_20_Number_20_Tight">FM Sound Source</text:p>
        </text:list-item>
      </text:list>
      <text:p text:style-name="First_20_paragraph">The X68000 uses YM2151 as the FM sound source LSI.</text:p>
      <text:p text:style-name="Text_20_body">1-1 Features</text:p>
      <text:list text:style-name="List_20_1">
        <text:list-item>
          <text:p text:style-name="List_20_Bullet_20_Tight">It can produce sounds up to 8 notes. However, if limited to sine waves, it can produce up to 32 notes.</text:p>
        </text:list-item>
        <text:list-item>
          <text:p text:style-name="List_20_Bullet_20_Tight">It can produce noise.</text:p>
        </text:list-item>
        <text:list-item>
          <text:p text:style-name="List_20_Bullet_20_Tight">It can modulate the tone color over time.</text:p>
        </text:list-item>
        <text:list-item>
          <text:p text:style-name="List_20_Bullet_20_Tight">It is possible to significantly modify the harmonics of the basic waveform.</text:p>
        </text:list-item>
        <text:list-item>
          <text:p text:style-name="List_20_Bullet_20_Tight">It can perform octave-wide frequency modulation.</text:p>
        </text:list-item>
        <text:list-item>
          <text:p text:style-name="List_20_Bullet_20_Tight">Volume can be set in intervals of 1.6 cents.</text:p>
        </text:list-item>
        <text:list-item>
          <text:p text:style-name="List_20_Bullet_20_Tight">It supports vibrato and tremolo effects.</text:p>
        </text:list-item>
        <text:list-item>
          <text:p text:style-name="List_20_Bullet_20_Tight">By significantly altering the harmonics of the basic waveform, or by deeply applying vibrato and tremolo effects, it can produce various sounds.</text:p>
        </text:list-item>
        <text:list-item>
          <text:p text:style-name="List_20_Bullet_20_Tight">It incorporates two timers.</text:p>
        </text:list-item>
      </text:list>
      <text:p text:style-name="First_20_paragraph">1-2 FM Sound Source Block Diagram</text:p>
      <text:p text:style-name="Preformatted_20_Text"><text:s text:c="21"/>Each Slot Block Diagram</text:p>
      <text:p text:style-name="Preformatted_20_Text"><text:s text:c="29"/>+---------+</text:p>
      <text:p text:style-name="Preformatted_20_Text"><text:s text:c="29"/>| Sin <text:s text:c="4"/>|</text:p>
      <text:p text:style-name="Preformatted_20_Text"><text:s text:c="29"/>| Table <text:s text:c="2"/>|</text:p>
      <text:p text:style-name="Preformatted_20_Text"><text:s text:c="29"/>|(PG) <text:s text:c="4"/>|</text:p>
      <text:p text:style-name="Preformatted_20_Text"><text:s text:c="29"/>+---------+</text:p>
      <text:p text:style-name="Preformatted_20_Text"><text:s text:c="29"/>| EG <text:s text:c="5"/>|</text:p>
      <text:p text:style-name="Preformatted_20_Text"><text:s text:c="29"/>+---------+</text:p>
      <text:p text:style-name="Preformatted_20_Text"/>
      <text:p text:style-name="Preformatted_20_Text"><text:s text:c="29"/>+---------+</text:p>
      <text:p text:style-name="Preformatted_20_Text"><text:s text:c="29"/>| M1: Slot.1|</text:p>
      <text:p text:style-name="Preformatted_20_Text"><text:s text:c="29"/>| M2: Slot.9|</text:p>
      <text:p text:style-name="Preformatted_20_Text"><text:s text:c="29"/>| C1: Slot.17|</text:p>
      <text:p text:style-name="Preformatted_20_Text"><text:s text:c="29"/>| C2: Slot.25|</text:p>
      <text:p text:style-name="Preformatted_20_Text"><text:s text:c="29"/>+---------+</text:p>
      <text:p text:style-name="Preformatted_20_Text"><text:s text:c="29"/>| Operator|</text:p>
      <text:p text:style-name="Preformatted_20_Text"><text:s text:c="29"/>|(OP) <text:s text:c="4"/>|</text:p>
      <text:p text:style-name="Preformatted_20_Text"><text:s text:c="29"/>+---------+</text:p>
      <text:p text:style-name="Preformatted_20_Text"><text:s text:c="33"/>|</text:p>
      <text:p text:style-name="Preformatted_20_Text"><text:s text:c="33"/>|</text:p>
      <text:p text:style-name="First_20_paragraph">Ch. 1 +------------------------+</text:p>
      <text:p text:style-name="Preformatted_20_Text"><text:s text:c="29"/>+---------+</text:p>
      <text:p text:style-name="Preformatted_20_Text"><text:s text:c="29"/>| M1: Slot.2|</text:p>
      <text:p text:style-name="Preformatted_20_Text"><text:s text:c="29"/>| M2: Slot.10|</text:p>
      <text:p text:style-name="Preformatted_20_Text"><text:s text:c="29"/>| C1: Slot.18|</text:p>
      <text:p text:style-name="Preformatted_20_Text"><text:s text:c="29"/>| C2: Slot.26|</text:p>
      <text:p text:style-name="Preformatted_20_Text"><text:s text:c="29"/>+---------+</text:p>
      <text:p text:style-name="Preformatted_20_Text"><text:s text:c="29"/>| OP <text:s text:c="5"/>|</text:p>
      <text:p text:style-name="Preformatted_20_Text"><text:s text:c="29"/>+---------+</text:p>
      <text:p text:style-name="Preformatted_20_Text"><text:s text:c="33"/>|</text:p>
      <text:p text:style-name="Preformatted_20_Text"><text:s text:c="33"/>|</text:p>
      <text:p text:style-name="First_20_paragraph">Ch. 2 +------------------------+</text:p>
      <text:p text:style-name="Preformatted_20_Text"><text:s text:c="29"/>+---------+</text:p>
      <text:p text:style-name="Preformatted_20_Text"><text:s text:c="29"/>| M1: Slot.3|</text:p>
      <text:p text:style-name="Preformatted_20_Text"><text:s text:c="29"/>| M2: Slot.11|</text:p>
      <text:p text:style-name="Preformatted_20_Text"><text:s text:c="29"/>| C1: Slot.19|</text:p>
      <text:p text:style-name="Preformatted_20_Text"><text:s text:c="29"/>| C2: Slot.27|</text:p>
      <text:p text:style-name="Preformatted_20_Text"><text:s text:c="29"/>+---------+</text:p>
      <text:p text:style-name="Preformatted_20_Text"><text:s text:c="29"/>| OP <text:s text:c="5"/>|</text:p>
      <text:p text:style-name="Preformatted_20_Text"><text:s text:c="29"/>+---------+</text:p>
      <text:p text:style-name="Preformatted_20_Text"><text:s text:c="33"/>|</text:p>
      <text:p text:style-name="Preformatted_20_Text"><text:s text:c="33"/>|</text:p>
      <text:p text:style-name="First_20_paragraph">Ch. 3 +------------------------+</text:p>
      <text:p text:style-name="Preformatted_20_Text"><text:s text:c="29"/>+---------+</text:p>
      <text:p text:style-name="Preformatted_20_Text"><text:s text:c="29"/>| M1: Slot.4|</text:p>
      <text:p text:style-name="Preformatted_20_Text"><text:s text:c="29"/>| M2: Slot.12|</text:p>
      <text:p text:style-name="Preformatted_20_Text"><text:s text:c="29"/>| C1: Slot.20|</text:p>
      <text:p text:style-name="Preformatted_20_Text"><text:s text:c="29"/>| C2: Slot.28|</text:p>
      <text:p text:style-name="Preformatted_20_Text"><text:s text:c="29"/>+---------+</text:p>
      <text:p text:style-name="Preformatted_20_Text"><text:s text:c="29"/>| OP <text:s text:c="5"/>|</text:p>
      <text:p text:style-name="Preformatted_20_Text"><text:s text:c="29"/>+---------+</text:p>
      <text:p text:style-name="Preformatted_20_Text"><text:s text:c="33"/>|</text:p>
      <text:p text:style-name="Preformatted_20_Text"><text:s text:c="33"/>|</text:p>
      <text:p text:style-name="First_20_paragraph">Ch. 4 +------------------------+</text:p>
      <text:p text:style-name="Preformatted_20_Text"><text:s text:c="29"/>+---------+</text:p>
      <text:p text:style-name="Preformatted_20_Text"><text:s text:c="29"/>| M1: Slot.5|</text:p>
      <text:p text:style-name="Preformatted_20_Text"><text:s text:c="29"/>| M2: Slot.13|</text:p>
      <text:p text:style-name="Preformatted_20_Text"><text:s text:c="29"/>| C1: Slot.21|</text:p>
      <text:p text:style-name="Preformatted_20_Text"><text:s text:c="29"/>| C2: Slot.29|</text:p>
      <text:p text:style-name="Preformatted_20_Text"><text:s text:c="29"/>+---------+</text:p>
      <text:p text:style-name="Preformatted_20_Text"><text:s text:c="29"/>| OP <text:s text:c="5"/>|</text:p>
      <text:p text:style-name="Preformatted_20_Text"><text:s text:c="29"/>+---------+</text:p>
      <text:p text:style-name="Preformatted_20_Text"><text:s text:c="33"/>|</text:p>
      <text:p text:style-name="Preformatted_20_Text"><text:s text:c="33"/>|</text:p>
      <text:p text:style-name="First_20_paragraph">Ch. 5 +------------------------+</text:p>
      <text:p text:style-name="Preformatted_20_Text"><text:s text:c="29"/>+---------+</text:p>
      <text:p text:style-name="Preformatted_20_Text"><text:s text:c="29"/>| M1: Slot.6|</text:p>
      <text:p text:style-name="Preformatted_20_Text"><text:s text:c="29"/>| M2: Slot.14|</text:p>
      <text:p text:style-name="Preformatted_20_Text"><text:s text:c="29"/>| C1: Slot.22|</text:p>
      <text:p text:style-name="Preformatted_20_Text"><text:s text:c="29"/>| C2: Slot.30|</text:p>
      <text:p text:style-name="Preformatted_20_Text"><text:s text:c="29"/>+---------+</text:p>
      <text:p text:style-name="Preformatted_20_Text"><text:s text:c="29"/>| OP <text:s text:c="5"/>|</text:p>
      <text:p text:style-name="Preformatted_20_Text"><text:s text:c="29"/>+---------+</text:p>
      <text:p text:style-name="Preformatted_20_Text"><text:s text:c="33"/>|</text:p>
      <text:p text:style-name="Preformatted_20_Text"><text:s text:c="33"/>|</text:p>
      <text:p text:style-name="First_20_paragraph">Ch. 6 +------------------------+</text:p>
      <text:p text:style-name="Preformatted_20_Text"><text:s text:c="29"/>+---------+</text:p>
      <text:p text:style-name="Preformatted_20_Text"><text:s text:c="29"/>| M1: Slot.7|</text:p>
      <text:p text:style-name="Preformatted_20_Text"><text:s text:c="29"/>| M2: Slot.15|</text:p>
      <text:p text:style-name="Preformatted_20_Text"><text:s text:c="29"/>| C1: Slot.23|</text:p>
      <text:p text:style-name="Preformatted_20_Text"><text:s text:c="29"/>| C2: Slot.31|</text:p>
      <text:p text:style-name="Preformatted_20_Text"><text:s text:c="29"/>+---------+</text:p>
      <text:p text:style-name="Preformatted_20_Text"><text:s text:c="29"/>| OP <text:s text:c="5"/>|</text:p>
      <text:p text:style-name="Preformatted_20_Text"><text:s text:c="29"/>+---------+</text:p>
      <text:p text:style-name="Preformatted_20_Text"><text:s text:c="33"/>|</text:p>
      <text:p text:style-name="Preformatted_20_Text"><text:s text:c="33"/>|</text:p>
      <text:p text:style-name="First_20_paragraph">Ch. 7 +------------------------+</text:p>
      <text:p text:style-name="Preformatted_20_Text"><text:s text:c="29"/>+---------+</text:p>
      <text:p text:style-name="Preformatted_20_Text"><text:s text:c="29"/>| M1: Slot.8|</text:p>
      <text:p text:style-name="Preformatted_20_Text"><text:s text:c="29"/>| M2: Slot.16|</text:p>
      <text:p text:style-name="Preformatted_20_Text"><text:s text:c="29"/>| C1: Slot.24|</text:p>
      <text:p text:style-name="Preformatted_20_Text"><text:s text:c="29"/>| C2: Slot.32|</text:p>
      <text:p text:style-name="Preformatted_20_Text"><text:s text:c="29"/>+---------+</text:p>
      <text:p text:style-name="Preformatted_20_Text"><text:s text:c="29"/>| OP <text:s text:c="5"/>|</text:p>
      <text:p text:style-name="Preformatted_20_Text"><text:s text:c="29"/>+---------+</text:p>
      <text:p text:style-name="Preformatted_20_Text"><text:s text:c="33"/>|</text:p>
      <text:p text:style-name="Preformatted_20_Text"><text:s text:c="33"/>|</text:p>
      <text:p text:style-name="First_20_paragraph">Ch. 8 +------------------------+</text:p>
      <text:p text:style-name="Text_20_body">Noise Slot Common Use</text:p>
      <text:p text:style-name="Text_20_body">YM2151 +---------+ | LFO | |(OPM) | +---------+</text:p>
      <text:p text:style-name="Text_20_body">YM3012</text:p>
      <text:p text:style-name="Text_20_body">+---------+ | Phase | | Accm. | | Accumu- | | lator | |(ACC) | +---------+</text:p>
      <text:p text:style-name="Text_20_body">DAC (Digital to Analog Converter) +---------+ | L | +---------+ | R | +---------+</text:p>
      <text:p text:style-name="Text_20_body">LFO: Low-Frequency Oscillator OPM: Operator Module PG: Phase Generator EG: Envelope Generator OP: Operator (FM) ACC: Accumulator DAC: Digital-Analog Converter</text:p>
      <text:p text:style-name="Text_20_body">M1: Modulator 1 M2: Modulator 2 C1: Carrier 1 C2: Carrier 2</text:p>
      <text:p text:style-name="Text_20_body">Note: Each channel is controlled individually in two paths המשך כל הערוצים נשלטים בנפרד משני הנתיבים</text:p>
      <text:p text:style-name="Text_20_body">Diagram 3-2 FM Sound Source Block Diagram</text:p>
      <text:p text:style-name="Text_20_body">Chapter 3: Sound Functions</text:p>
      <text:p text:style-name="Text_20_body">1-3 Structure of FM Sound Source Registers</text:p>
      <table:table table:name="Table32" table:style-name="Table32">
        <table:table-column table:style-name="Table32.A"/>
        <table:table-column table:style-name="Table32.B"/>
        <table:table-column table:style-name="Table32.C"/>
        <table:table-header-rows>
          <table:table-row>
            <table:table-cell table:style-name="TableHeaderRowCell" office:value-type="string">
              <text:p text:style-name="Table_20_Heading">Item</text:p>
            </table:table-cell>
            <table:table-cell table:style-name="TableHeaderRowCell" office:value-type="string">
              <text:p text:style-name="Table_20_Heading">Register</text:p>
            </table:table-cell>
            <table:table-cell table:style-name="TableHeaderRowCell" office:value-type="string">
              <text:p text:style-name="Table_20_Heading">Function</text:p>
            </table:table-cell>
          </table:table-row>
        </table:table-header-rows>
        <table:table-row>
          <table:table-cell table:style-name="TableRowCell" office:value-type="string">
    </table:table-cell>
          <table:table-cell table:style-name="TableRowCell" office:value-type="string">
            <text:p text:style-name="Table_20_Contents">CT KON</text:p>
          </table:table-cell>
          <table:table-cell table:style-name="TableRowCell" office:value-type="string">
            <text:p text:style-name="Table_20_Contents">Corresponds to output terminals CT1, CT2, external control. Toggles the channel number on/off in key slots.</text:p>
          </table:table-cell>
        </table:table-row>
        <table:table-row>
          <table:table-cell table:style-name="TableRowCell" office:value-type="string">
            <text:p text:style-name="Table_20_Contents">Registers</text:p>
          </table:table-cell>
          <table:table-cell table:style-name="TableRowCell" office:value-type="string">
            <text:p text:style-name="Table_20_Contents">PG (PHASE GENERATOR)</text:p>
          </table:table-cell>
          <table:table-cell table:style-name="TableRowCell" office:value-type="string">
            <text:p text:style-name="Table_20_Contents">OCT (up to 8 octaves) and NOTE settings. Sets the pitch and frequency for 1.6 steps. Determines the effective range of F-number values.</text:p>
          </table:table-cell>
        </table:table-row>
        <table:table-row>
          <table:table-cell table:style-name="TableRowCell" office:value-type="string">
    </table:table-cell>
          <table:table-cell table:style-name="TableRowCell" office:value-type="string">
            <text:p text:style-name="Table_20_Contents">KC KF</text:p>
          </table:table-cell>
          <table:table-cell table:style-name="TableRowCell" office:value-type="string">
            <text:p text:style-name="Table_20_Contents">Determines the center and fine frequency values. Gives scaling by KC. Provides information of KC for scaling. Provides complex vibrato, tremolo effects to the sound.</text:p>
          </table:table-cell>
        </table:table-row>
        <table:table-row>
          <table:table-cell table:style-name="TableRowCell" office:value-type="string">
    </table:table-cell>
          <table:table-cell table:style-name="TableRowCell" office:value-type="string">
            <text:p text:style-name="Table_20_Contents">MUL DT1 DT2 PMS</text:p>
          </table:table-cell>
          <table:table-cell table:style-name="TableRowCell" office:value-type="string">
            <text:p text:style-name="Table_20_Contents">Gives modulation index values, provides delays by KC to set timing.</text:p>
          </table:table-cell>
        </table:table-row>
        <table:table-row>
          <table:table-cell table:style-name="TableRowCell" office:value-type="string">
            <text:p text:style-name="Table_20_Contents">Registers</text:p>
          </table:table-cell>
          <table:table-cell table:style-name="TableRowCell" office:value-type="string">
            <text:p text:style-name="Table_20_Contents">EG (ENVELOPE GENERATOR)</text:p>
          </table:table-cell>
          <table:table-cell table:style-name="TableRowCell" office:value-type="string">
            <text:p text:style-name="Table_20_Contents">Settings for Attack time (TA). Fast decay time (TDI) setting, variable KC scaling. Second decay time (TD2) setting, variable KC scaling. Release time (TR) setting, variable KC scaling. Controls AR, D1R, D2R, RR envelope levels. Settings for EG pause/drift, attack and decay time transition from the Sustain level. Adjusts the envelope levels according to the total level, AMS.</text:p>
          </table:table-cell>
        </table:table-row>
        <table:table-row>
          <table:table-cell table:style-name="TableRowCell" office:value-type="string">
    </table:table-cell>
          <table:table-cell table:style-name="TableRowCell" office:value-type="string">
            <text:p text:style-name="Table_20_Contents">AR D1R D2R RR KS D1L TL AMS</text:p>
          </table:table-cell>
          <table:table-cell table:style-name="TableRowCell" office:value-type="string">
            <text:p text:style-name="Table_20_Contents">Adjusts amplitudes and levels effectively to the music.</text:p>
          </table:table-cell>
        </table:table-row>
        <table:table-row>
          <table:table-cell table:style-name="TableRowCell" office:value-type="string">
            <text:p text:style-name="Table_20_Contents">Registers</text:p>
          </table:table-cell>
          <table:table-cell table:style-name="TableRowCell" office:value-type="string">
            <text:p text:style-name="Table_20_Contents">OP (FM OPERATOR)</text:p>
          </table:table-cell>
          <table:table-cell table:style-name="TableRowCell" office:value-type="string">
            <text:p text:style-name="Table_20_Contents">Settings for FM OP structure (8 types). Controls feedback level and shifts bit information.</text:p>
          </table:table-cell>
        </table:table-row>
        <table:table-row>
          <table:table-cell table:style-name="TableRowCell" office:value-type="string">
    </table:table-cell>
          <table:table-cell table:style-name="TableRowCell" office:value-type="string">
            <text:p text:style-name="Table_20_Contents">CON F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NOISE (NOISE GENERATOR)</text:p>
          </table:table-cell>
          <table:table-cell table:style-name="TableRowCell" office:value-type="string">
            <text:p text:style-name="Table_20_Contents">Noise settings. Frequently modulates noise.</text:p>
          </table:table-cell>
        </table:table-row>
        <table:table-row>
          <table:table-cell table:style-name="TableRowCell" office:value-type="string">
    </table:table-cell>
          <table:table-cell table:style-name="TableRowCell" office:value-type="string">
            <text:p text:style-name="Table_20_Contents">NE NFRQ</text:p>
          </table:table-cell>
          <table:table-cell table:style-name="TableRowCell" office:value-type="string">
    </table:table-cell>
        </table:table-row>
        <table:table-row>
          <table:table-cell table:style-name="TableRowCell" office:value-type="string">
            <text:p text:style-name="Table_20_Contents">Registers</text:p>
          </table:table-cell>
          <table:table-cell table:style-name="TableRowCell" office:value-type="string">
            <text:p text:style-name="Table_20_Contents">LFO (LOW FREQUENCY OSCILLATOR)</text:p>
          </table:table-cell>
          <table:table-cell table:style-name="TableRowCell" office:value-type="string">
            <text:p text:style-name="Table_20_Contents">Sets vibrato modulation frequency. Modulation (FM) and amplitude modulation (AM) modulation widths. Controls LFO signal output level.</text:p>
          </table:table-cell>
        </table:table-row>
        <table:table-row>
          <table:table-cell table:style-name="TableRowCell" office:value-type="string">
    </table:table-cell>
          <table:table-cell table:style-name="TableRowCell" office:value-type="string">
            <text:p text:style-name="Table_20_Contents">LFRQ W PMD AMD</text:p>
          </table:table-cell>
          <table:table-cell table:style-name="TableRowCell" office:value-type="string">
            <text:p text:style-name="Table_20_Contents">Controls frequency modulation output level. Adjust output according to frequency modulation (FM) and amplitude modulation (AM).</text:p>
          </table:table-cell>
        </table:table-row>
        <table:table-row>
          <table:table-cell table:style-name="TableRowCell" office:value-type="string">
            <text:p text:style-name="Table_20_Contents">Registers</text:p>
          </table:table-cell>
          <table:table-cell table:style-name="TableRowCell" office:value-type="string">
            <text:p text:style-name="Table_20_Contents">ACC</text:p>
          </table:table-cell>
          <table:table-cell table:style-name="TableRowCell" office:value-type="string">
            <text:p text:style-name="Table_20_Contents">LR</text:p>
          </table:table-cell>
        </table:table-row>
        <table:table-row>
          <table:table-cell table:style-name="TableRowCell" office:value-type="string">
            <text:p text:style-name="Table_20_Contents">Registers</text:p>
          </table:table-cell>
          <table:table-cell table:style-name="TableRowCell" office:value-type="string">
            <text:p text:style-name="Table_20_Contents">TIMER</text:p>
          </table:table-cell>
          <table:table-cell table:style-name="TableRowCell" office:value-type="string">
            <text:p text:style-name="Table_20_Contents">CLKA1 CLKA2 CLKB LOAD F RESET IRQEN CSM</text:p>
          </table:table-cell>
        </table:table-row>
        <table:table-row>
          <table:table-cell table:style-name="TableRowCell" office:value-type="string">
            <text:p text:style-name="Table_20_Contents">Plug Registers in READ MODE</text:p>
          </table:table-cell>
          <table:table-cell table:style-name="TableRowCell" office:value-type="string">
            <text:p text:style-name="Table_20_Contents">B IST</text:p>
          </table:table-cell>
          <table:table-cell table:style-name="TableRowCell" office:value-type="string">
            <text:p text:style-name="Table_20_Contents">Indicates register data under processing. Shows Timer A, B status.</text:p>
          </table:table-cell>
        </table:table-row>
      </table:table>
      <text:p text:style-name="First_20_paragraph">Table 3-1 FM Sound Source Registers</text:p>
      <text:p text:style-name="Text_20_body">1-4 FM Sound Source Register Address Map</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column table:style-name="Table33.H"/>
        <table:table-column table:style-name="Table33.I"/>
        <table:table-column table:style-name="Table33.J"/>
        <table:table-header-rows>
          <table:table-row>
            <table:table-cell table:style-name="TableHeaderRowCell" office:value-type="string">
              <text:p text:style-name="Table_20_Heading">Register 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E90001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FM Sound Source Register Address Port (WRITE)</text:p>
          </table:table-cell>
        </table:table-row>
        <table:table-row>
          <table:table-cell table:style-name="TableRowCell" office:value-type="string">
            <text:p text:style-name="Table_20_Contents">E90003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FM Sound Source Data Port (READ/WRITE)</text:p>
          </table:table-cell>
        </table:table-row>
      </table:table>
      <text:p text:style-name="First_20_paragraph">Table 3-2 FM Sound Source Register Address Map</text:p>
      <text:p text:style-name="Text_20_body">The internal structure of the FM sound source register is as shown in Table 3-3. To write data to these registers:</text:p>
      <text:list text:style-name="Numbering_20_1">
        <text:list-item>
          <text:p text:style-name="List_20_Number_20_Tight">First, write the internal register value (00H~FFH, refer to Table 3-3 for details) that you want to access by the register address E90001H.</text:p>
        </text:list-item>
        <text:list-item>
          <text:p text:style-name="List_20_Number_20_Tight">Next, write the data value you want to set to the register address E90003H.</text:p>
        </text:list-item>
      </text:list>
      <text:p text:style-name="First_20_paragraph">Additionally, if you read data from register address E90003H, the internal register value of the register address E90001H becomes undefined.</text:p>
      <text:p text:style-name="Text_20_body">Note: At reset, all data in each internal register becomes "0".</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column table:style-name="Table34.H"/>
        <table:table-column table:style-name="Table34.I"/>
        <table:table-column table:style-name="Table34.J"/>
        <table:table-header-rows>
          <table:table-row>
            <table:table-cell table:style-name="TableHeaderRowCell" office:value-type="string">
              <text:p text:style-name="Table_20_Heading">Address</text:p>
            </table:table-cell>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01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ST, D1 is LFO RESET</text:p>
          </table:table-cell>
        </table:table-row>
        <table:table-row>
          <table:table-cell table:style-name="TableRowCell" office:value-type="string">
            <text:p text:style-name="Table_20_Contents">08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KO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KON</text:p>
          </table:table-cell>
        </table:table-row>
        <table:table-row>
          <table:table-cell table:style-name="TableRowCell" office:value-type="string">
            <text:p text:style-name="Table_20_Contents">0FH</text:p>
          </table:table-cell>
          <table:table-cell table:style-name="TableRowCell" office:value-type="string">
            <text:p text:style-name="Table_20_Contents">N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NFRQ</text:p>
          </table:table-cell>
        </table:table-row>
        <table:table-row>
          <table:table-cell table:style-name="TableRowCell" office:value-type="string">
            <text:p text:style-name="Table_20_Contents">1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LK A1</text:p>
          </table:table-cell>
        </table:table-row>
        <table:table-row>
          <table:table-cell table:style-name="TableRowCell" office:value-type="string">
            <text:p text:style-name="Table_20_Contents">11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LK A2</text:p>
          </table:table-cell>
        </table:table-row>
        <table:table-row>
          <table:table-cell table:style-name="TableRowCell" office:value-type="string">
            <text:p text:style-name="Table_20_Contents">12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LK B</text:p>
          </table:table-cell>
        </table:table-row>
        <table:table-row>
          <table:table-cell table:style-name="TableRowCell" office:value-type="string">
            <text:p text:style-name="Table_20_Contents">14H</text:p>
          </table:table-cell>
          <table:table-cell table:style-name="TableRowCell" office:value-type="string">
            <text:p text:style-name="Table_20_Contents">CSM</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RESET</text:p>
          </table:table-cell>
          <table:table-cell table:style-name="TableRowCell" office:value-type="string">
            <text:p text:style-name="Table_20_Contents">TRQEN</text:p>
          </table:table-cell>
          <table:table-cell table:style-name="TableRowCell" office:value-type="string">
            <text:p text:style-name="Table_20_Contents">LOAD</text:p>
          </table:table-cell>
          <table:table-cell table:style-name="TableRowCell" office:value-type="string">
    </table:table-cell>
          <table:table-cell table:style-name="TableRowCell" office:value-type="string">
            <text:p text:style-name="Table_20_Contents">Notes: CSM, RESET, TRQEN, LOAD</text:p>
          </table:table-cell>
        </table:table-row>
        <table:table-row>
          <table:table-cell table:style-name="TableRowCell" office:value-type="string">
            <text:p text:style-name="Table_20_Contents">18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LFRQ</text:p>
          </table:table-cell>
        </table:table-row>
        <table:table-row>
          <table:table-cell table:style-name="TableRowCell" office:value-type="string">
            <text:p text:style-name="Table_20_Contents">19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PMD/AMD</text:p>
          </table:table-cell>
          <table:table-cell table:style-name="TableRowCell" office:value-type="string">
    </table:table-cell>
          <table:table-cell table:style-name="TableRowCell" office:value-type="string">
            <text:p text:style-name="Table_20_Contents">Notes: PMD/AMD</text:p>
          </table:table-cell>
        </table:table-row>
        <table:table-row>
          <table:table-cell table:style-name="TableRowCell" office:value-type="string">
            <text:p text:style-name="Table_20_Contents">1BH</text:p>
          </table:table-cell>
          <table:table-cell table:style-name="TableRowCell" office:value-type="string">
            <text:p text:style-name="Table_20_Contents">C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W</text:p>
          </table:table-cell>
          <table:table-cell table:style-name="TableRowCell" office:value-type="string">
    </table:table-cell>
          <table:table-cell table:style-name="TableRowCell" office:value-type="string">
            <text:p text:style-name="Table_20_Contents">Notes: CT, W</text:p>
          </table:table-cell>
        </table:table-row>
      </table:table>
      <text:p text:style-name="First_20_paragraph">Notes:</text:p>
      <text:list text:style-name="List_20_1">
        <text:list-item>
          <text:p text:style-name="List_20_Bullet_20_Tight">D3-D6 is slot number.</text:p>
        </text:list-item>
        <text:list-item>
          <text:p text:style-name="List_20_Bullet_20_Tight">D0-D2 is channel number.</text:p>
        </text:list-item>
      </text:list>
      <text:p text:style-name="First_20_paragraph">Chapter 3 Sound Function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column table:style-name="Table35.H"/>
        <table:table-column table:style-name="Table35.I"/>
        <table:table-column table:style-name="Table35.J"/>
        <table:table-header-rows>
          <table:table-row>
            <table:table-cell table:style-name="TableHeaderRowCell" office:value-type="string">
              <text:p text:style-name="Table_20_Heading">Ad</text:p>
            </table:table-cell>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20H</text:p>
          </table:table-cell>
          <table:table-cell table:style-name="TableRowCell" office:value-type="string">
            <text:p text:style-name="Table_20_Contents">LR</text:p>
          </table:table-cell>
          <table:table-cell table:style-name="TableRowCell" office:value-type="string">
            <text:p text:style-name="Table_20_Contents">FL</text:p>
          </table:table-cell>
          <table:table-cell table:style-name="TableRowCell" office:value-type="string">
            <text:p text:style-name="Table_20_Contents">CON</text:p>
          </table:table-cell>
          <table:table-cell table:style-name="TableRowCell" office:value-type="string">
    </table:table-cell>
          <table:table-cell table:style-name="TableRowCell" office:value-type="string">
            <text:p text:style-name="Table_20_Contents">Channel 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7H</text:p>
          </table:table-cell>
          <table:table-cell table:style-name="TableRowCell" office:value-type="string">
            <text:p text:style-name="Table_20_Contents">LR</text:p>
          </table:table-cell>
          <table:table-cell table:style-name="TableRowCell" office:value-type="string">
            <text:p text:style-name="Table_20_Contents">FL</text:p>
          </table:table-cell>
          <table:table-cell table:style-name="TableRowCell" office:value-type="string">
            <text:p text:style-name="Table_20_Contents">CON</text:p>
          </table:table-cell>
          <table:table-cell table:style-name="TableRowCell" office:value-type="string">
    </table:table-cell>
          <table:table-cell table:style-name="TableRowCell" office:value-type="string">
            <text:p text:style-name="Table_20_Contents">Channel 8</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8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KC</text:p>
          </table:table-cell>
          <table:table-cell table:style-name="TableRowCell" office:value-type="string">
    </table:table-cell>
          <table:table-cell table:style-name="TableRowCell" office:value-type="string">
    </table:table-cell>
          <table:table-cell table:style-name="TableRowCell" office:value-type="string">
            <text:p text:style-name="Table_20_Contents">Channel 1</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4-D6 is octave group, D0-D3 is NOT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hannel 8</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F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KC</text:p>
          </table:table-cell>
          <table:table-cell table:style-name="TableRowCell" office:value-type="string">
    </table:table-cell>
          <table:table-cell table:style-name="TableRowCell" office:value-type="string">
    </table:table-cell>
          <table:table-cell table:style-name="TableRowCell" office:value-type="string">
            <text:p text:style-name="Table_20_Contents">(D4-D6 is octave group, D0-D3 is NOTE)</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30H</text:p>
          </table:table-cell>
          <table:table-cell table:style-name="TableRowCell" office:value-type="string">
            <text:p text:style-name="Table_20_Contents">KF</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hannel 1</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7H</text:p>
          </table:table-cell>
          <table:table-cell table:style-name="TableRowCell" office:value-type="string">
            <text:p text:style-name="Table_20_Contents">KF</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hannel 8</text:p>
          </table:table-cell>
          <table:table-cell table:style-name="TableRowCell" office:value-type="string">
            <text:p text:style-name="Table_20_Contents">Channel unit</text:p>
          </table:table-cell>
          <table:table-cell table:style-name="TableRowCell" office:value-type="string">
    </table:table-cell>
        </table:table-row>
        <table:table-row>
          <table:table-cell table:style-name="TableRowCell" office:value-type="string">
            <text:p text:style-name="Table_20_Contents">38H</text:p>
          </table:table-cell>
          <table:table-cell table:style-name="TableRowCell" office:value-type="string">
            <text:p text:style-name="Table_20_Contents">PM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AMS</text:p>
          </table:table-cell>
          <table:table-cell table:style-name="TableRowCell" office:value-type="string">
    </table:table-cell>
          <table:table-cell table:style-name="TableRowCell" office:value-type="string">
            <text:p text:style-name="Table_20_Contents">Channel 1</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3FH</text:p>
          </table:table-cell>
          <table:table-cell table:style-name="TableRowCell" office:value-type="string">
            <text:p text:style-name="Table_20_Contents">PM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AMS</text:p>
          </table:table-cell>
          <table:table-cell table:style-name="TableRowCell" office:value-type="string">
    </table:table-cell>
          <table:table-cell table:style-name="TableRowCell" office:value-type="string">
            <text:p text:style-name="Table_20_Contents">Channel 8</text:p>
          </table:table-cell>
          <table:table-cell table:style-name="TableRowCell" office:value-type="string">
    </table:table-cell>
        </table:table-row>
        <table:table-row>
          <table:table-cell table:style-name="TableRowCell" office:value-type="string">
            <text:p text:style-name="Table_20_Contents">40H</text:p>
          </table:table-cell>
          <table:table-cell table:style-name="TableRowCell" office:value-type="string">
            <text:p text:style-name="Table_20_Contents">DT1</text:p>
          </table:table-cell>
          <table:table-cell table:style-name="TableRowCell" office:value-type="string">
    </table:table-cell>
          <table:table-cell table:style-name="TableRowCell" office:value-type="string">
            <text:p text:style-name="Table_20_Contents">MUL</text:p>
          </table:table-cell>
          <table:table-cell table:style-name="TableRowCell" office:value-type="string">
            <text:p text:style-name="Table_20_Contents">Slot 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FH</text:p>
          </table:table-cell>
          <table:table-cell table:style-name="TableRowCell" office:value-type="string">
            <text:p text:style-name="Table_20_Contents">DT1</text:p>
          </table:table-cell>
          <table:table-cell table:style-name="TableRowCell" office:value-type="string">
    </table:table-cell>
          <table:table-cell table:style-name="TableRowCell" office:value-type="string">
            <text:p text:style-name="Table_20_Contents">MUL</text:p>
          </table:table-cell>
          <table:table-cell table:style-name="TableRowCell" office:value-type="string">
            <text:p text:style-name="Table_20_Contents">Slot 3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0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L</text:p>
          </table:table-cell>
          <table:table-cell table:style-name="TableRowCell" office:value-type="string">
            <text:p text:style-name="Table_20_Contents">Slot 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F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L</text:p>
          </table:table-cell>
          <table:table-cell table:style-name="TableRowCell" office:value-type="string">
            <text:p text:style-name="Table_20_Contents">Slot 32</text:p>
          </table:table-cell>
          <table:table-cell table:style-name="TableRowCell" office:value-type="string">
            <text:p text:style-name="Table_20_Contents">Slot uni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0H</text:p>
          </table:table-cell>
          <table:table-cell table:style-name="TableRowCell" office:value-type="string">
            <text:p text:style-name="Table_20_Contents">KS</text:p>
          </table:table-cell>
          <table:table-cell table:style-name="TableRowCell" office:value-type="string">
    </table:table-cell>
          <table:table-cell table:style-name="TableRowCell" office:value-type="string">
            <text:p text:style-name="Table_20_Contents">AR</text:p>
          </table:table-cell>
          <table:table-cell table:style-name="TableRowCell" office:value-type="string">
            <text:p text:style-name="Table_20_Contents">Slot 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FH</text:p>
          </table:table-cell>
          <table:table-cell table:style-name="TableRowCell" office:value-type="string">
            <text:p text:style-name="Table_20_Contents">KS</text:p>
          </table:table-cell>
          <table:table-cell table:style-name="TableRowCell" office:value-type="string">
    </table:table-cell>
          <table:table-cell table:style-name="TableRowCell" office:value-type="string">
            <text:p text:style-name="Table_20_Contents">AR</text:p>
          </table:table-cell>
          <table:table-cell table:style-name="TableRowCell" office:value-type="string">
            <text:p text:style-name="Table_20_Contents">Slot 3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0H</text:p>
          </table:table-cell>
          <table:table-cell table:style-name="TableRowCell" office:value-type="string">
            <text:p text:style-name="Table_20_Contents">AM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DIR</text:p>
          </table:table-cell>
          <table:table-cell table:style-name="TableRowCell" office:value-type="string">
            <text:p text:style-name="Table_20_Contents">Slot 1 (D7 is AMS-E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FH</text:p>
          </table:table-cell>
          <table:table-cell table:style-name="TableRowCell" office:value-type="string">
            <text:p text:style-name="Table_20_Contents">AM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DIR</text:p>
          </table:table-cell>
          <table:table-cell table:style-name="TableRowCell" office:value-type="string">
            <text:p text:style-name="Table_20_Contents">Slot 32 (D7 is AMS-E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list text:style-name="Numbering_20_1">
        <text:list-item>
          <text:p text:style-name="List_20_Number_20_Tight">FM Sound Source</text:p>
        </text:list-item>
      </text:list>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column table:style-name="Table36.H"/>
        <table:table-column table:style-name="Table36.I"/>
        <table:table-column table:style-name="Table36.J"/>
        <table:table-header-rows>
          <table:table-row>
            <table:table-cell table:style-name="TableHeaderRowCell" office:value-type="string">
              <text:p text:style-name="Table_20_Heading">Address</text:p>
            </table:table-cell>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0H</text:p>
          </table:table-cell>
          <table:table-cell table:style-name="TableRowCell" office:value-type="string">
            <text:p text:style-name="Table_20_Contents">DT2</text:p>
          </table:table-cell>
          <table:table-cell table:style-name="TableRowCell" office:value-type="string">
    </table:table-cell>
          <table:table-cell table:style-name="TableRowCell" office:value-type="string">
            <text:p text:style-name="Table_20_Contents">D2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lot 1</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FH</text:p>
          </table:table-cell>
          <table:table-cell table:style-name="TableRowCell" office:value-type="string">
            <text:p text:style-name="Table_20_Contents">DT2</text:p>
          </table:table-cell>
          <table:table-cell table:style-name="TableRowCell" office:value-type="string">
            <text:p text:style-name="Table_20_Contents">x</text:p>
          </table:table-cell>
          <table:table-cell table:style-name="TableRowCell" office:value-type="string">
            <text:p text:style-name="Table_20_Contents">D2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lot 32</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0H</text:p>
          </table:table-cell>
          <table:table-cell table:style-name="TableRowCell" office:value-type="string">
            <text:p text:style-name="Table_20_Contents">D1L</text:p>
          </table:table-cell>
          <table:table-cell table:style-name="TableRowCell" office:value-type="string">
    </table:table-cell>
          <table:table-cell table:style-name="TableRowCell" office:value-type="string">
            <text:p text:style-name="Table_20_Contents">R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lot 1</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FH</text:p>
          </table:table-cell>
          <table:table-cell table:style-name="TableRowCell" office:value-type="string">
            <text:p text:style-name="Table_20_Contents">D1L</text:p>
          </table:table-cell>
          <table:table-cell table:style-name="TableRowCell" office:value-type="string">
    </table:table-cell>
          <table:table-cell table:style-name="TableRowCell" office:value-type="string">
            <text:p text:style-name="Table_20_Contents">R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Slot 32</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Emphasis">Table 3-3: FM Sound Source Internal Register Address Map: WRITE MODE</text:span></text:p>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column table:style-name="Table37.H"/>
        <table:table-column table:style-name="Table37.I"/>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B</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IST</text:p>
          </table:table-cell>
          <table:table-cell table:style-name="TableRowCell" office:value-type="string">
    </table:table-cell>
        </table:table-row>
      </table:table>
      <text:p text:style-name="First_20_paragraph"><text:span text:style-name="Emphasis">Table 3-4: FM Sound Source Internal Register Address Map: READ MODE</text:span></text:p>
      <text:p text:style-name="Text_20_body">1-5 Channel and Slot</text:p>
      <text:p text:style-name="Text_20_body">The YM2151 sound source circuit has two sets of FM modulation circuits, and they operate on a time-sharing basis. The cycle table is read four times, so a total of 8 sound generation is possible. The circuit is thus configured to operate on a time-sharing basis over 32 slots. The relationship between the sound generation channel and slot number is shown below.</text:p>
      <table:table table:name="Table38" table:style-name="Table38">
        <table:table-column table:style-name="Table38.A"/>
        <table:table-column table:style-name="Table38.B"/>
        <table:table-column table:style-name="Table38.C"/>
        <table:table-column table:style-name="Table38.D"/>
        <table:table-column table:style-name="Table38.E"/>
        <table:table-header-rows>
          <table:table-row>
            <table:table-cell table:style-name="TableHeaderRowCell" office:value-type="string">
              <text:p text:style-name="Table_20_Heading">FUNCTION</text:p>
            </table:table-cell>
            <table:table-cell table:style-name="TableHeaderRowCell" office:value-type="string">
              <text:p text:style-name="Table_20_Heading">M1</text:p>
            </table:table-cell>
            <table:table-cell table:style-name="TableHeaderRowCell" office:value-type="string">
              <text:p text:style-name="Table_20_Heading">M2</text:p>
            </table:table-cell>
            <table:table-cell table:style-name="TableHeaderRowCell" office:value-type="string">
              <text:p text:style-name="Table_20_Heading">C1</text:p>
            </table:table-cell>
            <table:table-cell table:style-name="TableHeaderRowCell" office:value-type="string">
              <text:p text:style-name="Table_20_Heading">C2</text:p>
            </table:table-cell>
          </table:table-row>
        </table:table-header-rows>
        <table:table-row>
          <table:table-cell table:style-name="TableRowCell" office:value-type="string">
    </table:table-cell>
          <table:table-cell table:style-name="TableRowCell" office:value-type="string">
            <text:p text:style-name="Table_20_Contents">Modulator 1</text:p>
          </table:table-cell>
          <table:table-cell table:style-name="TableRowCell" office:value-type="string">
            <text:p text:style-name="Table_20_Contents">Modulator 2</text:p>
          </table:table-cell>
          <table:table-cell table:style-name="TableRowCell" office:value-type="string">
            <text:p text:style-name="Table_20_Contents">Carrier 1</text:p>
          </table:table-cell>
          <table:table-cell table:style-name="TableRowCell" office:value-type="string">
            <text:p text:style-name="Table_20_Contents">Carrier 2</text:p>
          </table:table-cell>
        </table:table-row>
        <table:table-row>
          <table:table-cell table:style-name="TableRowCell" office:value-type="string">
            <text:p text:style-name="Table_20_Contents">Slot No.</text:p>
          </table:table-cell>
          <table:table-cell table:style-name="TableRowCell" office:value-type="string">
            <text:p text:style-name="Table_20_Contents">1 2 3 4 5 6 7 8</text:p>
          </table:table-cell>
          <table:table-cell table:style-name="TableRowCell" office:value-type="string">
            <text:p text:style-name="Table_20_Contents">9 10 11 12 13 14 15 16</text:p>
          </table:table-cell>
          <table:table-cell table:style-name="TableRowCell" office:value-type="string">
            <text:p text:style-name="Table_20_Contents">17 18 19 20 21 22 23 24</text:p>
          </table:table-cell>
          <table:table-cell table:style-name="TableRowCell" office:value-type="string">
            <text:p text:style-name="Table_20_Contents">25 26 27 28 29 30 31 32</text:p>
          </table:table-cell>
        </table:table-row>
        <table:table-row>
          <table:table-cell table:style-name="TableRowCell" office:value-type="string">
            <text:p text:style-name="Table_20_Contents">Channel No.</text:p>
          </table:table-cell>
          <table:table-cell table:style-name="TableRowCell" office:value-type="string">
            <text:p text:style-name="Table_20_Contents">1 2 3 4 5 6 7 8</text:p>
          </table:table-cell>
          <table:table-cell table:style-name="TableRowCell" office:value-type="string">
            <text:p text:style-name="Table_20_Contents">1 2 3 4 5 6 7 8</text:p>
          </table:table-cell>
          <table:table-cell table:style-name="TableRowCell" office:value-type="string">
            <text:p text:style-name="Table_20_Contents">1 2 3 4 5 6 7 8</text:p>
          </table:table-cell>
          <table:table-cell table:style-name="TableRowCell" office:value-type="string">
            <text:p text:style-name="Table_20_Contents">1 2 3 4 5 6 7 8</text:p>
          </table:table-cell>
        </table:table-row>
      </table:table>
      <text:p text:style-name="First_20_paragraph">This slot turns into a noise slot when Noise is ENABLE (NE=1).</text:p>
      <text:p text:style-name="Text_20_body"><text:span text:style-name="Emphasis">Table 3-5: Relationship between Channel and Slot</text:span></text:p>
      <text:p text:style-name="Text_20_body">Chapter 3 Sound Functions</text:p>
      <text:p text:style-name="Text_20_body">1-6 Details of FM Sound Registers</text:p>
      <text:p text:style-name="Text_20_body">&lt;KON: KEY ON&gt;</text:p>
      <text:p text:style-name="Text_20_body">| 08H | D7 | D6 | D5 | D4 | D3 | D2 | D1 | D0 | | | X | S | N | CH.No.|</text:p>
      <text:p text:style-name="Text_20_body">When a 3-bit channel number (CH.No) and a 4-bit slot number (SN) are given a key-on (key-off), the sound generation function starts (or the function ends).</text:p>
      <text:p text:style-name="Preformatted_20_Text">SN = "1" ...... Key-On <text:s text:c="1"/></text:p>
      <text:p text:style-name="Preformatted_20_Text">SN = "0" ...... Key-Off</text:p>
      <text:p text:style-name="First_20_paragraph">Refer to tables 3-5 for the channel numbers. For SN D3, D4, D5, and D6 bits, corresponding slot numbers for M1, M2, C1, and C2 are used, respectively.</text:p>
      <text:p text:style-name="Text_20_body">&lt;CT: CONTROL OUTPUT&gt;</text:p>
      <text:p text:style-name="Text_20_body">| 1BH | D7 | D6 | D5 | D4 | D3 | D2 | D1 | D0 | | | CT | X | X | X | X | X | X | W |</text:p>
      <text:p text:style-name="Text_20_body">CT1 (Sound Synthesis Block Switching Port)<text:line-break/>0: 8 MHz<text:line-break/>1: 4 MHz<text:line-break/>CT2 (FDC Forced READY Port)<text:line-break/>0: FDD Ready State (Normal Operation)<text:line-break/>1: Forced READY</text:p>
      <text:p text:style-name="Text_20_body">Bits D6 and D7 correspond to output terminals CT1 and CT2, which are output ports capable of external control.<text:line-break/>On the X68000, CT1 switches between 4 MHz and 8 MHz for the sound synthesis block standard development frequency. Writing "0" selects 8 MHz, writing "1" selects 4 MHz. Note that the reset state is "0", so 8 MHz is selected.</text:p>
      <text:p text:style-name="Text_20_body">CT2 is used to force the READY state of the FDC (Floppy Disk Controller) READY terminal, verifying the connection of the FDD (Floppy Disk Drive). Writing "1" forces the READY state. Normally (reset state), "0" is written, which allows the FDC to receive the FDD READY state.</text:p>
      <text:p text:style-name="Text_20_body">For details on sound synthesis, refer to this chapter, and for details on disks, refer to Chapter 4.</text:p>
      <text:list text:style-name="Numbering_20_1">
        <text:list-item>
          <text:p text:style-name="List_20_Number_20_Tight">FM Sound Source</text:p>
        </text:list-item>
      </text:list>
      <text:p text:style-name="First_20_paragraph">&lt;PG: PHASE GENERATOR&gt;</text:p>
      <text:p text:style-name="Text_20_body">From the registers described below, the KC, KF, MUL, DT1, DT2, and PMS data generate the phase information used to determine the carrier frequency and the modulator frequency. The vibrato effect and frequency modulation (effect sounds, etc.) produced by data from the LFO are also performed here.</text:p>
      <text:list text:style-name="List_20_1">
        <text:list-item>
          <text:p text:style-name="List_20_Bullet">KC: KEY CODE (OCT, NOTE)</text:p>
          <text:p text:style-name="Preformatted_20_Text"><text:s text:c="3"/>D7 D6 D5 D4 D3 D2 D1 D0</text:p>
        </text:list-item>
      </text:list>
      <text:p text:style-name="First_20_paragraph">28H/2FH x | OCT | NOTE |</text:p>
      <text:p text:style-name="Text_20_body">A key code is 1 data per note. One data consists of 7 bits: the upper 3 bits represent OCT (8 octaves) and the lower 4 bits represent NOTE. Refer to Table 3-6 for the relationship between OCT and NOTE.</text:p>
      <text:list text:style-name="List_20_1">
        <text:list-item>
          <text:p text:style-name="List_20_Bullet">KF: KEY FRACTION</text:p>
          <text:p text:style-name="Preformatted_20_Text"><text:s text:c="3"/>D7 D6 D5 D4 D3 D2 D1 D0</text:p>
        </text:list-item>
      </text:list>
      <text:p text:style-name="First_20_paragraph">30H/37H | KF | x x |</text:p>
      <text:p text:style-name="Text_20_body">There is 1 data per note, and one data consists of 6 bits. With this 6-bit data, the phase information for the difference of one semitone (100 cents) can be obtained in steps of about 1.6 cents (refer to Table 3-6).</text:p>
      <text:p text:style-name="Text_20_body">D approx. 36.7 Hz D approx. 4698.6 Hz</text:p>
      <text:p text:style-name="Text_20_body">D6~D4 | 0 1 2 3 4 5 6 7 OCT | 0 1 2 3 4 5 6 7</text:p>
      <text:p text:style-name="Text_20_body">D3~D0 | 0 1 2 4 5 6 8 9 10 12 13 14 NOTE | C# D# E F F# G G# A A# B C C# D</text:p>
      <text:p text:style-name="Text_20_body">D7~D2 | 0 1 ... 16 17 ... 32 33 ... 48 49 ... 63 0 KF(cent)| 0 ... ... ... ... 100 0</text:p>
      <text:p text:style-name="Text_20_body">Table 3-6 Relationship between OCT and NOTE (at 4 MHz clock)</text:p>
      <text:p text:style-name="Text_20_body">Chapter 3 Sound Functions</text:p>
      <text:p text:style-name="Text_20_body">• MUL: PHASE MULTIPLY</text:p>
      <text:p text:style-name="Text_20_body">40H<text:line-break/>5FH</text:p>
      <text:p text:style-name="Preformatted_20_Text"><text:s text:c="1"/>D7 D6 D5 D4 D3 D2 D1 D0 <text:s text:c="3"/></text:p>
      <text:p text:style-name="Preformatted_20_Text"><text:s text:c="1"/>X <text:s text:c="1"/>DT1 MUL</text:p>
      <text:p text:style-name="First_20_paragraph">1 Sound is set with 4 data bits, 4 bits long. For the positional information provided by KC and KF, the multiplication rate information indicated in Table 3-7 can be assumed.</text:p>
      <text:p text:style-name="Text_20_body">MUL=D3-D0 | 0 | 1 | 2 | 3 | 4 | 5 | 6 | 7 | 8 | 9 | 10 | 11 | 12 | 13 | 14 | 15 | MULTIPLY | 0.5 | 1 | 2 | 3 | 4 | 5 | 6 | 7 | 8 | 9 | 10 | 11 | 12 | 13 | 14 | 15 | Table 3-7 MUL Positional Information</text:p>
      <text:p text:style-name="Text_20_body">• DT1: DETUNE (1)</text:p>
      <text:p text:style-name="Text_20_body">40H<text:line-break/>5FH</text:p>
      <text:p text:style-name="Preformatted_20_Text"><text:s text:c="1"/>D7 D6 D5 D4 D3 D2 D1 D0 <text:s text:c="3"/></text:p>
      <text:p text:style-name="Preformatted_20_Text"><text:s text:c="4"/>DT1</text:p>
      <text:p text:style-name="First_20_paragraph">1 Set sound with 4 data bits, 3 bits long. For the positional information provided by KC and KF, the detuned positional information indicated in Table 3-8 can be assumed. Additionally, the detuned positional information given by this DT1 is scaled by the KEY CODE (the top 2 bits of OCT and NOTE).</text:p>
      <text:list text:style-name="Numbering_20_1">
        <text:list-item>
          <text:p text:style-name="List_20_Number_20_Tight">FM sound source</text:p>
        </text:list-item>
      </text:list>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column table:style-name="Table39.G"/>
        <table:table-column table:style-name="Table39.H"/>
        <table:table-column table:style-name="Table39.I"/>
        <table:table-column table:style-name="Table39.J"/>
        <table:table-header-rows>
          <table:table-row>
            <table:table-cell table:style-name="TableHeaderRowCell" office:value-type="string">
              <text:p text:style-name="Table_20_Heading">OCT</text:p>
            </table:table-cell>
            <table:table-cell table:style-name="TableHeaderRowCell" office:value-type="string">
              <text:p text:style-name="Table_20_Heading">NOTE</text:p>
            </table:table-cell>
            <table:table-cell table:style-name="TableHeaderRowCell" office:value-type="string">
              <text:p text:style-name="Table_20_Heading">FD=0 (D-CENT)</text:p>
            </table:table-cell>
            <table:table-cell table:style-name="TableHeaderRowCell" office:value-type="string">
              <text:p text:style-name="Table_20_Heading">FD=1</text:p>
            </table:table-cell>
            <table:table-cell table:style-name="TableHeaderRowCell" office:value-type="string">
              <text:p text:style-name="Table_20_Heading">FD=2</text:p>
            </table:table-cell>
            <table:table-cell table:style-name="TableHeaderRowCell" office:value-type="string">
              <text:p text:style-name="Table_20_Heading">FD=3</text:p>
            </table:table-cell>
            <table:table-cell table:style-name="TableHeaderRowCell" office:value-type="string">
              <text:p text:style-name="Table_20_Heading">FD=0 (D-FREQ) (HZ)</text:p>
            </table:table-cell>
            <table:table-cell table:style-name="TableHeaderRowCell" office:value-type="string">
              <text:p text:style-name="Table_20_Heading">FD=1</text:p>
            </table:table-cell>
            <table:table-cell table:style-name="TableHeaderRowCell" office:value-type="string">
              <text:p text:style-name="Table_20_Heading">FD=2</text:p>
            </table:table-cell>
            <table:table-cell table:style-name="TableHeaderRowCell" office:value-type="string">
              <text:p text:style-name="Table_20_Heading">FD=3</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5.025</text:p>
          </table:table-cell>
          <table:table-cell table:style-name="TableRowCell" office:value-type="string">
            <text:p text:style-name="Table_20_Contents">10.036</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0.053</text:p>
          </table:table-cell>
          <table:table-cell table:style-name="TableRowCell" office:value-type="string">
            <text:p text:style-name="Table_20_Contents">0.107</text:p>
          </table:table-cell>
        </table:table-row>
        <table:table-row>
          <table:table-cell table:style-name="TableRowCell" office:value-type="string">
            <text:p text:style-name="Table_20_Contents">0</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4.228</text:p>
          </table:table-cell>
          <table:table-cell table:style-name="TableRowCell" office:value-type="string">
            <text:p text:style-name="Table_20_Contents">8.445</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0.053</text:p>
          </table:table-cell>
          <table:table-cell table:style-name="TableRowCell" office:value-type="string">
            <text:p text:style-name="Table_20_Contents">0.107</text:p>
          </table:table-cell>
        </table:table-row>
        <table:table-row>
          <table:table-cell table:style-name="TableRowCell" office:value-type="string">
            <text:p text:style-name="Table_20_Contents">0</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3.559</text:p>
          </table:table-cell>
          <table:table-cell table:style-name="TableRowCell" office:value-type="string">
            <text:p text:style-name="Table_20_Contents">7.110</text:p>
          </table:table-cell>
          <table:table-cell table:style-name="TableRowCell" office:value-type="string">
            <text:p text:style-name="Table_20_Contents">0.000</text:p>
          </table:table-cell>
          <table:table-cell table:style-name="TableRowCell" office:value-type="string">
            <text:p text:style-name="Table_20_Contents">0.000</text:p>
          </table:table-cell>
          <table:table-cell table:style-name="TableRowCell" office:value-type="string">
            <text:p text:style-name="Table_20_Contents">0.053</text:p>
          </table:table-cell>
          <table:table-cell table:style-name="TableRowCell" office:value-type="string">
            <text:p text:style-name="Table_20_Contents">0.107</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2.515</text:p>
          </table:table-cell>
          <table:table-cell table:style-name="TableRowCell" office:value-type="string">
            <text:p text:style-name="Table_20_Contents">5.995</text:p>
          </table:table-cell>
          <table:table-cell table:style-name="TableRowCell" office:value-type="string">
            <text:p text:style-name="Table_20_Contents">11.988</text:p>
          </table:table-cell>
          <table:table-cell table:style-name="TableRowCell" office:value-type="string">
            <text:p text:style-name="Table_20_Contents">0.000</text:p>
          </table:table-cell>
          <table:table-cell table:style-name="TableRowCell" office:value-type="string">
            <text:p text:style-name="Table_20_Contents">0.053</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row>
        <table:table-row>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2.515</text:p>
          </table:table-cell>
          <table:table-cell table:style-name="TableRowCell" office:value-type="string">
            <text:p text:style-name="Table_20_Contents">5.025</text:p>
          </table:table-cell>
          <table:table-cell table:style-name="TableRowCell" office:value-type="string">
            <text:p text:style-name="Table_20_Contents">10.036</text:p>
          </table:table-cell>
          <table:table-cell table:style-name="TableRowCell" office:value-type="string">
            <text:p text:style-name="Table_20_Contents">0.000</text:p>
          </table:table-cell>
          <table:table-cell table:style-name="TableRowCell" office:value-type="string">
            <text:p text:style-name="Table_20_Contents">0.053</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row>
        <table:table-row>
          <table:table-cell table:style-name="TableRowCell" office:value-type="string">
            <text:p text:style-name="Table_20_Contents">1</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2.718</text:p>
          </table:table-cell>
          <table:table-cell table:style-name="TableRowCell" office:value-type="string">
            <text:p text:style-name="Table_20_Contents">4.228</text:p>
          </table:table-cell>
          <table:table-cell table:style-name="TableRowCell" office:value-type="string">
            <text:p text:style-name="Table_20_Contents">8.445</text:p>
          </table:table-cell>
          <table:table-cell table:style-name="TableRowCell" office:value-type="string">
            <text:p text:style-name="Table_20_Contents">0.000</text:p>
          </table:table-cell>
          <table:table-cell table:style-name="TableRowCell" office:value-type="string">
            <text:p text:style-name="Table_20_Contents">0.053</text:p>
          </table:table-cell>
          <table:table-cell table:style-name="TableRowCell" office:value-type="string">
            <text:p text:style-name="Table_20_Contents">0.107</text:p>
          </table:table-cell>
          <table:table-cell table:style-name="TableRowCell" office:value-type="string">
            <text:p text:style-name="Table_20_Contents">0.160</text:p>
          </table:table-cell>
        </table:table-row>
        <table:table-row>
          <table:table-cell table:style-name="TableRowCell" office:value-type="string">
            <text:p text:style-name="Table_20_Contents">1</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2.515</text:p>
          </table:table-cell>
          <table:table-cell table:style-name="TableRowCell" office:value-type="string">
            <text:p text:style-name="Table_20_Contents">3.559</text:p>
          </table:table-cell>
          <table:table-cell table:style-name="TableRowCell" office:value-type="string">
            <text:p text:style-name="Table_20_Contents">7.110</text:p>
          </table:table-cell>
          <table:table-cell table:style-name="TableRowCell" office:value-type="string">
            <text:p text:style-name="Table_20_Contents">0.000</text:p>
          </table:table-cell>
          <table:table-cell table:style-name="TableRowCell" office:value-type="string">
            <text:p text:style-name="Table_20_Contents">0.053</text:p>
          </table:table-cell>
          <table:table-cell table:style-name="TableRowCell" office:value-type="string">
            <text:p text:style-name="Table_20_Contents">0.107</text:p>
          </table:table-cell>
          <table:table-cell table:style-name="TableRowCell" office:value-type="string">
            <text:p text:style-name="Table_20_Contents">0.160</text:p>
          </table:table-cell>
        </table:table-row>
        <table:table-row>
          <table:table-cell table:style-name="TableRowCell" office:value-type="string">
            <text:p text:style-name="Table_20_Contents">2</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1.496</text:p>
          </table:table-cell>
          <table:table-cell table:style-name="TableRowCell" office:value-type="string">
            <text:p text:style-name="Table_20_Contents">5.995</text:p>
          </table:table-cell>
          <table:table-cell table:style-name="TableRowCell" office:value-type="string">
            <text:p text:style-name="Table_20_Contents">11.988</text:p>
          </table:table-cell>
          <table:table-cell table:style-name="TableRowCell" office:value-type="string">
            <text:p text:style-name="Table_20_Contents">0.000</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cell table:style-name="TableRowCell" office:value-type="string">
            <text:p text:style-name="Table_20_Contents">0.427</text:p>
          </table:table-cell>
        </table:table-row>
        <table:table-row>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1.258</text:p>
          </table:table-cell>
          <table:table-cell table:style-name="TableRowCell" office:value-type="string">
            <text:p text:style-name="Table_20_Contents">5.025</text:p>
          </table:table-cell>
          <table:table-cell table:style-name="TableRowCell" office:value-type="string">
            <text:p text:style-name="Table_20_Contents">10.036</text:p>
          </table:table-cell>
          <table:table-cell table:style-name="TableRowCell" office:value-type="string">
            <text:p text:style-name="Table_20_Contents">0.000</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cell table:style-name="TableRowCell" office:value-type="string">
            <text:p text:style-name="Table_20_Contents">0.427</text:p>
          </table:table-cell>
        </table:table-row>
        <table:table-row>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1.057</text:p>
          </table:table-cell>
          <table:table-cell table:style-name="TableRowCell" office:value-type="string">
            <text:p text:style-name="Table_20_Contents">4.228</text:p>
          </table:table-cell>
          <table:table-cell table:style-name="TableRowCell" office:value-type="string">
            <text:p text:style-name="Table_20_Contents">8.445</text:p>
          </table:table-cell>
          <table:table-cell table:style-name="TableRowCell" office:value-type="string">
            <text:p text:style-name="Table_20_Contents">0.000</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cell table:style-name="TableRowCell" office:value-type="string">
            <text:p text:style-name="Table_20_Contents">0.320</text:p>
          </table:table-cell>
        </table:table-row>
        <table:table-row>
          <table:table-cell table:style-name="TableRowCell" office:value-type="string">
            <text:p text:style-name="Table_20_Contents">2</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0.889</text:p>
          </table:table-cell>
          <table:table-cell table:style-name="TableRowCell" office:value-type="string">
            <text:p text:style-name="Table_20_Contents">3.617</text:p>
          </table:table-cell>
          <table:table-cell table:style-name="TableRowCell" office:value-type="string">
            <text:p text:style-name="Table_20_Contents">7.535</text:p>
          </table:table-cell>
          <table:table-cell table:style-name="TableRowCell" office:value-type="string">
            <text:p text:style-name="Table_20_Contents">0.000</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cell table:style-name="TableRowCell" office:value-type="string">
            <text:p text:style-name="Table_20_Contents">0.267</text:p>
          </table:table-cell>
        </table:table-row>
        <table:table-row>
          <table:table-cell table:style-name="TableRowCell" office:value-type="string">
            <text:p text:style-name="Table_20_Contents">3</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0.748</text:p>
          </table:table-cell>
          <table:table-cell table:style-name="TableRowCell" office:value-type="string">
            <text:p text:style-name="Table_20_Contents">2.647</text:p>
          </table:table-cell>
          <table:table-cell table:style-name="TableRowCell" office:value-type="string">
            <text:p text:style-name="Table_20_Contents">5.355</text:p>
          </table:table-cell>
          <table:table-cell table:style-name="TableRowCell" office:value-type="string">
            <text:p text:style-name="Table_20_Contents">0.000</text:p>
          </table:table-cell>
          <table:table-cell table:style-name="TableRowCell" office:value-type="string">
            <text:p text:style-name="Table_20_Contents">0.107</text:p>
          </table:table-cell>
          <table:table-cell table:style-name="TableRowCell" office:value-type="string">
            <text:p text:style-name="Table_20_Contents">0.160</text:p>
          </table:table-cell>
          <table:table-cell table:style-name="TableRowCell" office:value-type="string">
            <text:p text:style-name="Table_20_Contents">0.267</text:p>
          </table:table-cell>
        </table:table-row>
        <table:table-row>
          <table:table-cell table:style-name="TableRowCell" office:value-type="string">
            <text:p text:style-name="Table_20_Contents">3</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0.889</text:p>
          </table:table-cell>
          <table:table-cell table:style-name="TableRowCell" office:value-type="string">
            <text:p text:style-name="Table_20_Contents">1.778</text:p>
          </table:table-cell>
          <table:table-cell table:style-name="TableRowCell" office:value-type="string">
            <text:p text:style-name="Table_20_Contents">3.170</text:p>
          </table:table-cell>
          <table:table-cell table:style-name="TableRowCell" office:value-type="string">
            <text:p text:style-name="Table_20_Contents">0.000</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cell table:style-name="TableRowCell" office:value-type="string">
            <text:p text:style-name="Table_20_Contents">0.320</text:p>
          </table:table-cell>
        </table:table-row>
        <table:table-row>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0.748</text:p>
          </table:table-cell>
          <table:table-cell table:style-name="TableRowCell" office:value-type="string">
            <text:p text:style-name="Table_20_Contents">1.629</text:p>
          </table:table-cell>
          <table:table-cell table:style-name="TableRowCell" office:value-type="string">
            <text:p text:style-name="Table_20_Contents">2.615</text:p>
          </table:table-cell>
          <table:table-cell table:style-name="TableRowCell" office:value-type="string">
            <text:p text:style-name="Table_20_Contents">0.000</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cell table:style-name="TableRowCell" office:value-type="string">
            <text:p text:style-name="Table_20_Contents">0.320</text:p>
          </table:table-cell>
        </table:table-row>
        <table:table-row>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0.657</text:p>
          </table:table-cell>
          <table:table-cell table:style-name="TableRowCell" office:value-type="string">
            <text:p text:style-name="Table_20_Contents">1.514</text:p>
          </table:table-cell>
          <table:table-cell table:style-name="TableRowCell" office:value-type="string">
            <text:p text:style-name="Table_20_Contents">2.262</text:p>
          </table:table-cell>
          <table:table-cell table:style-name="TableRowCell" office:value-type="string">
            <text:p text:style-name="Table_20_Contents">0.000</text:p>
          </table:table-cell>
          <table:table-cell table:style-name="TableRowCell" office:value-type="string">
            <text:p text:style-name="Table_20_Contents">0.107</text:p>
          </table:table-cell>
          <table:table-cell table:style-name="TableRowCell" office:value-type="string">
            <text:p text:style-name="Table_20_Contents">0.213</text:p>
          </table:table-cell>
          <table:table-cell table:style-name="TableRowCell" office:value-type="string">
            <text:p text:style-name="Table_20_Contents">0.320</text:p>
          </table:table-cell>
        </table:table-row>
        <table:table-row>
          <table:table-cell table:style-name="TableRowCell" office:value-type="string">
            <text:p text:style-name="Table_20_Contents">4</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0.793</text:p>
          </table:table-cell>
          <table:table-cell table:style-name="TableRowCell" office:value-type="string">
            <text:p text:style-name="Table_20_Contents">1.586</text:p>
          </table:table-cell>
          <table:table-cell table:style-name="TableRowCell" office:value-type="string">
            <text:p text:style-name="Table_20_Contents">2.114</text:p>
          </table:table-cell>
          <table:table-cell table:style-name="TableRowCell" office:value-type="string">
            <text:p text:style-name="Table_20_Contents">0.000</text:p>
          </table:table-cell>
          <table:table-cell table:style-name="TableRowCell" office:value-type="string">
            <text:p text:style-name="Table_20_Contents">0.160</text:p>
          </table:table-cell>
          <table:table-cell table:style-name="TableRowCell" office:value-type="string">
            <text:p text:style-name="Table_20_Contents">0.213</text:p>
          </table:table-cell>
          <table:table-cell table:style-name="TableRowCell" office:value-type="string">
            <text:p text:style-name="Table_20_Contents">0.427</text:p>
          </table:table-cell>
        </table:table-row>
        <table:table-row>
          <table:table-cell table:style-name="TableRowCell" office:value-type="string">
            <text:p text:style-name="Table_20_Contents">4</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0.793</text:p>
          </table:table-cell>
          <table:table-cell table:style-name="TableRowCell" office:value-type="string">
            <text:p text:style-name="Table_20_Contents">1.587</text:p>
          </table:table-cell>
          <table:table-cell table:style-name="TableRowCell" office:value-type="string">
            <text:p text:style-name="Table_20_Contents">2.114</text:p>
          </table:table-cell>
          <table:table-cell table:style-name="TableRowCell" office:value-type="string">
            <text:p text:style-name="Table_20_Contents">0.000</text:p>
          </table:table-cell>
          <table:table-cell table:style-name="TableRowCell" office:value-type="string">
            <text:p text:style-name="Table_20_Contents">0.160</text:p>
          </table:table-cell>
          <table:table-cell table:style-name="TableRowCell" office:value-type="string">
            <text:p text:style-name="Table_20_Contents">0.213</text:p>
          </table:table-cell>
          <table:table-cell table:style-name="TableRowCell" office:value-type="string">
            <text:p text:style-name="Table_20_Contents">0.427</text:p>
          </table:table-cell>
        </table:table-row>
        <table:table-row>
          <table:table-cell table:style-name="TableRowCell" office:value-type="string">
            <text:p text:style-name="Table_20_Contents">4</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0.667</text:p>
          </table:table-cell>
          <table:table-cell table:style-name="TableRowCell" office:value-type="string">
            <text:p text:style-name="Table_20_Contents">1.334</text:p>
          </table:table-cell>
          <table:table-cell table:style-name="TableRowCell" office:value-type="string">
            <text:p text:style-name="Table_20_Contents">1.869</text:p>
          </table:table-cell>
          <table:table-cell table:style-name="TableRowCell" office:value-type="string">
            <text:p text:style-name="Table_20_Contents">0.000</text:p>
          </table:table-cell>
          <table:table-cell table:style-name="TableRowCell" office:value-type="string">
            <text:p text:style-name="Table_20_Contents">0.160</text:p>
          </table:table-cell>
          <table:table-cell table:style-name="TableRowCell" office:value-type="string">
            <text:p text:style-name="Table_20_Contents">0.320</text:p>
          </table:table-cell>
          <table:table-cell table:style-name="TableRowCell" office:value-type="string">
            <text:p text:style-name="Table_20_Contents">0.533</text:p>
          </table:table-cell>
        </table:table-row>
        <table:table-row>
          <table:table-cell table:style-name="TableRowCell" office:value-type="string">
            <text:p text:style-name="Table_20_Contents">4</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0.567</text:p>
          </table:table-cell>
          <table:table-cell table:style-name="TableRowCell" office:value-type="string">
            <text:p text:style-name="Table_20_Contents">1.308</text:p>
          </table:table-cell>
          <table:table-cell table:style-name="TableRowCell" office:value-type="string">
            <text:p text:style-name="Table_20_Contents">1.507</text:p>
          </table:table-cell>
          <table:table-cell table:style-name="TableRowCell" office:value-type="string">
            <text:p text:style-name="Table_20_Contents">0.000</text:p>
          </table:table-cell>
          <table:table-cell table:style-name="TableRowCell" office:value-type="string">
            <text:p text:style-name="Table_20_Contents">0.160</text:p>
          </table:table-cell>
          <table:table-cell table:style-name="TableRowCell" office:value-type="string">
            <text:p text:style-name="Table_20_Contents">0.320</text:p>
          </table:table-cell>
          <table:table-cell table:style-name="TableRowCell" office:value-type="string">
            <text:p text:style-name="Table_20_Contents">0.533</text:p>
          </table:table-cell>
        </table:table-row>
        <table:table-row>
          <table:table-cell table:style-name="TableRowCell" office:value-type="string">
            <text:p text:style-name="Table_20_Contents">5</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0.529</text:p>
          </table:table-cell>
          <table:table-cell table:style-name="TableRowCell" office:value-type="string">
            <text:p text:style-name="Table_20_Contents">1.057</text:p>
          </table:table-cell>
          <table:table-cell table:style-name="TableRowCell" office:value-type="string">
            <text:p text:style-name="Table_20_Contents">1.586</text:p>
          </table:table-cell>
          <table:table-cell table:style-name="TableRowCell" office:value-type="string">
            <text:p text:style-name="Table_20_Contents">0.000</text:p>
          </table:table-cell>
          <table:table-cell table:style-name="TableRowCell" office:value-type="string">
            <text:p text:style-name="Table_20_Contents">0.213</text:p>
          </table:table-cell>
          <table:table-cell table:style-name="TableRowCell" office:value-type="string">
            <text:p text:style-name="Table_20_Contents">0.427</text:p>
          </table:table-cell>
          <table:table-cell table:style-name="TableRowCell" office:value-type="string">
            <text:p text:style-name="Table_20_Contents">0.640</text:p>
          </table:table-cell>
        </table:table-row>
        <table:table-row>
          <table:table-cell table:style-name="TableRowCell" office:value-type="string">
            <text:p text:style-name="Table_20_Contents">5</text:p>
          </table:table-cell>
          <table:table-cell table:style-name="TableRowCell" office:value-type="string">
            <text:p text:style-name="Table_20_Contents">1</text:p>
          </table:table-cell>
          <table:table-cell table:style-name="TableRowCell" office:value-type="string">
            <text:p text:style-name="Table_20_Contents">0.000</text:p>
          </table:table-cell>
          <table:table-cell table:style-name="TableRowCell" office:value-type="string">
            <text:p text:style-name="Table_20_Contents">0.445</text:p>
          </table:table-cell>
          <table:table-cell table:style-name="TableRowCell" office:value-type="string">
            <text:p text:style-name="Table_20_Contents">1.014</text:p>
          </table:table-cell>
          <table:table-cell table:style-name="TableRowCell" office:value-type="string">
            <text:p text:style-name="Table_20_Contents">1.464</text:p>
          </table:table-cell>
          <table:table-cell table:style-name="TableRowCell" office:value-type="string">
            <text:p text:style-name="Table_20_Contents">0.000</text:p>
          </table:table-cell>
          <table:table-cell table:style-name="TableRowCell" office:value-type="string">
            <text:p text:style-name="Table_20_Contents">0.213</text:p>
          </table:table-cell>
          <table:table-cell table:style-name="TableRowCell" office:value-type="string">
            <text:p text:style-name="Table_20_Contents">0.427</text:p>
          </table:table-cell>
          <table:table-cell table:style-name="TableRowCell" office:value-type="string">
            <text:p text:style-name="Table_20_Contents">0.640</text:p>
          </table:table-cell>
        </table:table-row>
        <table:table-row>
          <table:table-cell table:style-name="TableRowCell" office:value-type="string">
            <text:p text:style-name="Table_20_Contents">5</text:p>
          </table:table-cell>
          <table:table-cell table:style-name="TableRowCell" office:value-type="string">
            <text:p text:style-name="Table_20_Contents">2</text:p>
          </table:table-cell>
          <table:table-cell table:style-name="TableRowCell" office:value-type="string">
            <text:p text:style-name="Table_20_Contents">0.000</text:p>
          </table:table-cell>
          <table:table-cell table:style-name="TableRowCell" office:value-type="string">
            <text:p text:style-name="Table_20_Contents">0.467</text:p>
          </table:table-cell>
          <table:table-cell table:style-name="TableRowCell" office:value-type="string">
            <text:p text:style-name="Table_20_Contents">1.308</text:p>
          </table:table-cell>
          <table:table-cell table:style-name="TableRowCell" office:value-type="string">
            <text:p text:style-name="Table_20_Contents">1.308</text:p>
          </table:table-cell>
          <table:table-cell table:style-name="TableRowCell" office:value-type="string">
            <text:p text:style-name="Table_20_Contents">0.000</text:p>
          </table:table-cell>
          <table:table-cell table:style-name="TableRowCell" office:value-type="string">
            <text:p text:style-name="Table_20_Contents">0.267</text:p>
          </table:table-cell>
          <table:table-cell table:style-name="TableRowCell" office:value-type="string">
            <text:p text:style-name="Table_20_Contents">0.533</text:p>
          </table:table-cell>
          <table:table-cell table:style-name="TableRowCell" office:value-type="string">
            <text:p text:style-name="Table_20_Contents">0.747</text:p>
          </table:table-cell>
        </table:table-row>
        <table:table-row>
          <table:table-cell table:style-name="TableRowCell" office:value-type="string">
            <text:p text:style-name="Table_20_Contents">5</text:p>
          </table:table-cell>
          <table:table-cell table:style-name="TableRowCell" office:value-type="string">
            <text:p text:style-name="Table_20_Contents">3</text:p>
          </table:table-cell>
          <table:table-cell table:style-name="TableRowCell" office:value-type="string">
            <text:p text:style-name="Table_20_Contents">0.000</text:p>
          </table:table-cell>
          <table:table-cell table:style-name="TableRowCell" office:value-type="string">
            <text:p text:style-name="Table_20_Contents">0.394</text:p>
          </table:table-cell>
          <table:table-cell table:style-name="TableRowCell" office:value-type="string">
            <text:p text:style-name="Table_20_Contents">1.234</text:p>
          </table:table-cell>
          <table:table-cell table:style-name="TableRowCell" office:value-type="string">
            <text:p text:style-name="Table_20_Contents">1.253</text:p>
          </table:table-cell>
          <table:table-cell table:style-name="TableRowCell" office:value-type="string">
            <text:p text:style-name="Table_20_Contents">0.000</text:p>
          </table:table-cell>
          <table:table-cell table:style-name="TableRowCell" office:value-type="string">
            <text:p text:style-name="Table_20_Contents">0.267</text:p>
          </table:table-cell>
          <table:table-cell table:style-name="TableRowCell" office:value-type="string">
            <text:p text:style-name="Table_20_Contents">0.533</text:p>
          </table:table-cell>
          <table:table-cell table:style-name="TableRowCell" office:value-type="string">
            <text:p text:style-name="Table_20_Contents">0.747</text:p>
          </table:table-cell>
        </table:table-row>
        <table:table-row>
          <table:table-cell table:style-name="TableRowCell" office:value-type="string">
            <text:p text:style-name="Table_20_Contents">6</text:p>
          </table:table-cell>
          <table:table-cell table:style-name="TableRowCell" office:value-type="string">
            <text:p text:style-name="Table_20_Contents">0</text:p>
          </table:table-cell>
          <table:table-cell table:style-name="TableRowCell" office:value-type="string">
            <text:p text:style-name="Table_20_Contents">0.000</text:p>
          </table:table-cell>
          <table:table-cell table:style-name="TableRowCell" office:value-type="string">
            <text:p text:style-name="Table_20_Contents">0.397</text:p>
          </table:table-cell>
          <table:table-cell table:style-name="TableRowCell" office:value-type="string">
            <text:p text:style-name="Table_20_Contents">1.03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Chapter 3 Sound Features</text:p>
      <text:p text:style-name="Text_20_body">• DT2: DETUNE (2)</text:p>
      <text:p text:style-name="Text_20_body">COH DFH | D7 D6 D5 D4 D3 D2 D1 D0 ------|------------------------ | DT2 × D2R</text:p>
      <text:p text:style-name="Text_20_body">1 piece of data for 4 tones is set, which consists of 2 bits. By setting the detune information in tables KC and KF, it's possible to obtain a very large detune as shown in table 3-9. This is effective in creating sound effects.</text:p>
      <text:p text:style-name="Text_20_body">| DT2 = D7~D6 | 0 | 1 | 2 | 3 | | (cent) | 0 | +600 | +781 | +950 | | DETUNE | 1 | +1.41 | +1.57 | +1.73 | Table 3-9 DETUNE (1) Quantization precision</text:p>
      <text:p text:style-name="Text_20_body">• PMS: PHASE MODULATION SENSITIVITY</text:p>
      <text:p text:style-name="Text_20_body">38H 3FH | D7 D6 D5 D4 D3 D2 D1 D0 -----|------------------- | × PMS × AMS</text:p>
      <text:p text:style-name="Text_20_body">1 piece of data for 1 tone is set, consisting of 3 bits. The subsequent LFO (Low-Frequency Oscillator) designation, expressed as modulation depth using 8 bits, is combined with the KC and KF settings, thereby obtaining effects similar to vibrato, tremolo, etc. This sensitivity can be controlled in 8 steps including 0, as shown in table 3-10. The values shown here are measured when the LFO output is at its maximum.</text:p>
      <text:p text:style-name="Text_20_body">| PMS=D6~D4 | 0 | 1 | 2 | 3 | 4 | 5 | 6 | 7 | | MOD.MAX (cent) | 0±5 | ±10 | ±20 | ±50 | ±100 | ±400 | ±700 | Table 3-10 PMS Sensitivity</text:p>
      <text:p text:style-name="Text_20_body">&lt;EG: ENVELOPE GENERATOR&gt;</text:p>
      <text:p text:style-name="Text_20_body">When the output of the EG is given a key-on, this EG changes as shown in the figure below. The envelope amount is represented by relative values. The attack part is exponential, and the decay part is all linear changes. The transition from TA to TD1 and from TD1 to TD2 is executed when the envelope amount is at 0 db, and at the fast decay level (D1L).</text:p>
      <text:list text:style-name="List_20_1">
        <text:list-item>
          <text:p text:style-name="List_20_Bullet_20_Tight">AR: ATTACK RATE</text:p>
        </text:list-item>
      </text:list>
      <text:p text:style-name="First_20_paragraph">Set 1 out of 16 data for each tone. One data consists of 5 bits. When a key-on is given to the EG, the envelope amount decreases, and after the TA time, the envelope amount reaches 0 db. This attack time (TA) can be set to 3-11, 3-12, etc., according to the AR. Additionally, AR is keyed by KEY CODE. Please refer to Figure 3-3 for scaling.</text:p>
      <text:list text:style-name="List_20_1">
        <text:list-item>
          <text:p text:style-name="List_20_Bullet_20_Tight">DIR: 1st DECAY RATE</text:p>
        </text:list-item>
      </text:list>
      <text:p text:style-name="First_20_paragraph">Set 1 out of 16 data for each tone. One data consists of 5 bits. When the EG's envelope amount is 0 db, it automatically reaches the fast decay level. This fast decay time (TD1) can be set according to the DIR to 3-11, 3-12, etc. Additionally, DIR is scaled by KEY CODE. Please refer to Figure 3-3.</text:p>
      <text:p text:style-name="Text_20_body">Chapter 3 Sound Functions</text:p>
      <text:p text:style-name="Text_20_body">• D2R: 2nd DECAY RATE</text:p>
      <text:p text:style-name="Text_20_body">1 Set the data to 4 for the sound, 1 Data will be 5 bits as shown above. When the EG shifts to the second decay while passing through the fast decay level, this state will continue until the EG turns off. This second decay time (TD2) can be set according to D2R in Table 3-11 and Table 3-12. Additionally, D2R is scaled by KEY CODE, so please refer to Figure 3-3.</text:p>
      <text:p text:style-name="Text_20_body">• RR: RELEASE RATE</text:p>
      <text:p text:style-name="Text_20_body">1 Set the data to 4 for the sound, 1 Data will be 4 bits as shown above. When the EG moves to release while the key is off, it decays towards the maximum attenuation level (96db). This release time (TR) can be set according to RR in Table 3-11 and Table 3-12. Additionally, RR is scaled by KEY CODE, so please refer to Figure 3-3. The RR has one less bit compared to D1R and D2R, so the resolution worsens.</text:p>
      <text:p text:style-name="Text_20_body">• KS: KEY SCALING</text:p>
      <text:p text:style-name="Text_20_body">1 Set the data to 4 for the sound, 1 Data will be 2 bits. This KS scales the AR, D1R, D2R, RR, and related rates according to the KEY CODE. The scaling level can be controlled in four stages as shown in Table 3-3. The attack, fast decay, and release times are determined by the respective rates after scaling.</text:p>
      <text:p text:style-name="Text_20_body">Page 96</text:p>
      <text:list text:style-name="Numbering_20_1">
        <text:list-item>
          <text:p text:style-name="List_20_Number_20_Tight">FM Sound Source</text:p>
        </text:list-item>
      </text:list>
      <text:p text:style-name="First_20_paragraph"><text:span text:style-name="Emphasis">The scaled rate after key scaling is obtained by adding the value (RKs) shown in the table below to twice the rate (R).</text:span> RATE = 2 × R + RKs R: Various rates AR, D1R, D2R are fixed rates written in the register, but RR is input as a value twice the value written in the register, and the rate calculation formula starts from RATE = 0. *When calculation exceeds 63, it is set to RATE = 63</text:p>
      <text:p text:style-name="Text_20_body">RKs: Values determined by KEY CODE and KS (left table). However, in this case, we discard the lower 2 bits of NOTE as shown in the figure below, and use KC.</text:p>
      <text:p text:style-name="Preformatted_20_Text"><text:s text:c="15"/>KC</text:p>
      <text:p text:style-name="Preformatted_20_Text"><text:s text:c="5"/>+---------+-------------+</text:p>
      <text:p text:style-name="Preformatted_20_Text"><text:s text:c="5"/>| D6 <text:s text:c="1"/>D5 <text:s text:c="1"/>D4 <text:s text:c="1"/>D3 <text:s text:c="1"/>D2 <text:s text:c="1"/>D1 <text:s text:c="1"/>D0 <text:s text:c="1"/>|</text:p>
      <text:p text:style-name="Preformatted_20_Text"><text:s text:c="5"/>+---------+-------------+</text:p>
      <text:p text:style-name="Preformatted_20_Text"><text:s text:c="9"/>OCT <text:s text:c="7"/>NOTE</text:p>
      <text:p text:style-name="First_20_paragraph">Figure 3-3 Key Scaling</text:p>
      <text:p text:style-name="Text_20_body">Tables 3-11 and 3-12 divide the 6-bit rate after key scaling determined by Figure 3-3 into the upper 4 bits and the lower 2 bits.</text:p>
      <text:p text:style-name="Text_20_body">Chapter 3 Sound Functions</text:p>
      <text:p text:style-name="Text_20_body">(10% -&gt; 90%) or (90% -&gt; 10%)</text:p>
      <text:p text:style-name="Text_20_body">※ Indicates the time taken for the level to transition from 10% to 90% or from 90% to 10%. ※ This table is calculated assuming an O of 4.0 MHz.</text:p>
      <text:list text:style-name="Numbering_20_1">
        <text:list-item>
          <text:p text:style-name="List_20_Number_20_Tight">FM Sound Source</text:p>
        </text:list-item>
      </text:list>
      <text:p text:style-name="First_20_paragraph">(96 dB -&gt; 0 dB) or (0 dB -&gt; 96 dB)</text:p>
      <text:list text:style-name="List_20_1">
        <text:list-item>
          <text:p text:style-name="List_20_Bullet_20_Tight">This indicates the time it takes for the level to go from 0% to 100% or from 100% to 0%.</text:p>
        </text:list-item>
        <text:list-item>
          <text:p text:style-name="List_20_Bullet_20_Tight">This table is calculated with CLOCK = 4.0 MHz.</text:p>
        </text:list-item>
      </text:list>
      <text:p text:style-name="First_20_paragraph">EG ATTACK TIME EG DECAY TIME RATE | msec (96dB-&gt;0dB) RATE | msec (0dB-&gt;96dB)</text:p>
      <text:p text:style-name="Preformatted_20_Text">15 3 | 0.00 <text:s text:c="19"/>15 3 | 6.02</text:p>
      <text:p text:style-name="Preformatted_20_Text">15 2 | 0.47 <text:s text:c="19"/>15 2 | 6.02</text:p>
      <text:p text:style-name="Preformatted_20_Text">15 1 | 0.47 <text:s text:c="19"/>15 1 | 6.02</text:p>
      <text:p text:style-name="Preformatted_20_Text">15 0 | 0.47 <text:s text:c="19"/>15 0 | 6.02</text:p>
      <text:p text:style-name="Preformatted_20_Text">14 3 | 0.94 <text:s text:c="19"/>14 3 | 6.02</text:p>
      <text:p text:style-name="Preformatted_20_Text">14 2 | 1.00 <text:s text:c="19"/>14 2 | 9.04</text:p>
      <text:p text:style-name="Preformatted_20_Text">14 1 | 1.00 <text:s text:c="19"/>14 1 | 9.04</text:p>
      <text:p text:style-name="Preformatted_20_Text">14 0 | 1.00 <text:s text:c="19"/>14 0 | 9.04</text:p>
      <text:p text:style-name="Preformatted_20_Text">13 3 | 1.53 <text:s text:c="19"/>13 3 | 12.76</text:p>
      <text:p text:style-name="Preformatted_20_Text">13 2 | 1.53 <text:s text:c="19"/>13 2 | 12.76</text:p>
      <text:p text:style-name="Preformatted_20_Text">13 1 | 1.99 <text:s text:c="19"/>13 1 | 19.27</text:p>
      <text:p text:style-name="Preformatted_20_Text">13 0 | 1.99 <text:s text:c="19"/>13 0 | 19.27</text:p>
      <text:p text:style-name="Preformatted_20_Text">12 3 | 2.78 <text:s text:c="19"/>12 3 | 27.52</text:p>
      <text:p text:style-name="Preformatted_20_Text">12 2 | 2.78 <text:s text:c="19"/>12 2 | 27.52</text:p>
      <text:p text:style-name="Preformatted_20_Text">12 1 | 4.18 <text:s text:c="19"/>12 1 | 38.53</text:p>
      <text:p text:style-name="Preformatted_20_Text">12 0 | 4.18 <text:s text:c="19"/>12 0 | 38.53</text:p>
      <text:p text:style-name="Preformatted_20_Text">11 3 | 6.97 <text:s text:c="19"/>11 3 | 55.04</text:p>
      <text:p text:style-name="Preformatted_20_Text">11 2 | 6.97 <text:s text:c="19"/>11 2 | 55.04</text:p>
      <text:p text:style-name="Preformatted_20_Text">11 1 | 9.29 <text:s text:c="19"/>11 1 | 96.33</text:p>
      <text:p text:style-name="Preformatted_20_Text">11 0 | 9.29 <text:s text:c="19"/>11 0 | 96.33</text:p>
      <text:p text:style-name="Preformatted_20_Text">10 3 | 11.15 <text:s text:c="18"/>10 3 | 110.09</text:p>
      <text:p text:style-name="Preformatted_20_Text">10 2 | 11.15 <text:s text:c="18"/>10 2 | 110.09</text:p>
      <text:p text:style-name="Preformatted_20_Text">10 1 | 13.94 <text:s text:c="18"/>10 1 | 128.43</text:p>
      <text:p text:style-name="Preformatted_20_Text">10 0 | 13.94 <text:s text:c="18"/>10 0 | 128.43</text:p>
      <text:p text:style-name="Preformatted_20_Text"><text:s text:c="1"/>9 3 | 15.93 <text:s text:c="19"/>9 3 | 154.12</text:p>
      <text:p text:style-name="Preformatted_20_Text"><text:s text:c="1"/>9 2 | 18.58 <text:s text:c="19"/>9 2 | 154.12</text:p>
      <text:p text:style-name="Preformatted_20_Text"><text:s text:c="1"/>9 1 | 22.30 <text:s text:c="19"/>9 1 | 192.65</text:p>
      <text:p text:style-name="Preformatted_20_Text"><text:s text:c="1"/>9 0 | 27.88 <text:s text:c="19"/>9 0 | 192.65</text:p>
      <text:p text:style-name="Preformatted_20_Text"><text:s text:c="1"/>8 3 | 27.88 <text:s text:c="19"/>8 3 | 220.17</text:p>
      <text:p text:style-name="Preformatted_20_Text"><text:s text:c="1"/>8 2 | 31.86 <text:s text:c="19"/>8 2 | 220.17</text:p>
      <text:p text:style-name="Preformatted_20_Text"><text:s text:c="1"/>8 1 | 41.53 <text:s text:c="19"/>8 1 | 308.25</text:p>
      <text:p text:style-name="Preformatted_20_Text"><text:s text:c="1"/>8 0 | 44.60 <text:s text:c="19"/>8 0 | 385.31</text:p>
      <text:p text:style-name="First_20_paragraph">Continued (right columns):</text:p>
      <text:p text:style-name="Preformatted_20_Text"><text:s text:c="1"/>7 3 | 63.72</text:p>
      <text:p text:style-name="Preformatted_20_Text"><text:s text:c="1"/>7 2 | 74.34</text:p>
      <text:p text:style-name="Preformatted_20_Text"><text:s text:c="1"/>7 1 | 89.20</text:p>
      <text:p text:style-name="Preformatted_20_Text"><text:s text:c="1"/>7 0 | 111.51</text:p>
      <text:p text:style-name="Preformatted_20_Text"><text:s text:c="1"/>6 3 | 148.43</text:p>
      <text:p text:style-name="Preformatted_20_Text"><text:s text:c="1"/>6 2 | 211.72</text:p>
      <text:p text:style-name="Preformatted_20_Text"><text:s text:c="1"/>6 1 | 223.01</text:p>
      <text:p text:style-name="Preformatted_20_Text"><text:s text:c="1"/>6 0 | 254.87</text:p>
      <text:p text:style-name="Preformatted_20_Text"><text:s text:c="1"/>5 3 | 297.35</text:p>
      <text:p text:style-name="Preformatted_20_Text"><text:s text:c="1"/>5 2 | 356.42</text:p>
      <text:p text:style-name="Preformatted_20_Text"><text:s text:c="1"/>5 1 | 396.47</text:p>
      <text:p text:style-name="Preformatted_20_Text"><text:s text:c="1"/>5 0 | 509.74</text:p>
      <text:p text:style-name="Preformatted_20_Text"><text:s text:c="1"/>4 3 | 713.63</text:p>
      <text:p text:style-name="Preformatted_20_Text"><text:s text:c="1"/>4 2 | 823.02</text:p>
      <text:p text:style-name="Preformatted_20_Text"><text:s text:c="1"/>4 1 | 941.18</text:p>
      <text:p text:style-name="Preformatted_20_Text"><text:s text:c="1"/>4 0 | 1189.53</text:p>
      <text:p text:style-name="Preformatted_20_Text"><text:s text:c="1"/>3 3 | 1784.08</text:p>
      <text:p text:style-name="Preformatted_20_Text"><text:s text:c="1"/>3 2 | 2038.95</text:p>
      <text:p text:style-name="Preformatted_20_Text"><text:s text:c="1"/>3 1 | 2378.78</text:p>
      <text:p text:style-name="Preformatted_20_Text"><text:s text:c="1"/>3 0 | 2854.53</text:p>
      <text:p text:style-name="Preformatted_20_Text"><text:s text:c="1"/>2 3 | 3568.16</text:p>
      <text:p text:style-name="Preformatted_20_Text"><text:s text:c="1"/>2 2 | 4077.90</text:p>
      <text:p text:style-name="Preformatted_20_Text"><text:s text:c="1"/>2 1 | 4757.55</text:p>
      <text:p text:style-name="Preformatted_20_Text"><text:s text:c="1"/>2 0 | 5709.66</text:p>
      <text:p text:style-name="Preformatted_20_Text"><text:s text:c="1"/>1 3 | 7136.33</text:p>
      <text:p text:style-name="Preformatted_20_Text"><text:s text:c="1"/>1 2 | infinity</text:p>
      <text:p text:style-name="Preformatted_20_Text"><text:s text:c="1"/>1 1 | infinity</text:p>
      <text:p text:style-name="Preformatted_20_Text"><text:s text:c="1"/>1 0 | infinity</text:p>
      <text:p text:style-name="Preformatted_20_Text"><text:s text:c="1"/>0 3 | infinity</text:p>
      <text:p text:style-name="Preformatted_20_Text"><text:s text:c="1"/>0 2 | infinity</text:p>
      <text:p text:style-name="Preformatted_20_Text"><text:s text:c="1"/>0 1 | infinity</text:p>
      <text:p text:style-name="Preformatted_20_Text"><text:s text:c="1"/>0 0 | infinity</text:p>
      <text:p text:style-name="First_20_paragraph">Note: "infinity" denotes an infinite time in msec.</text:p>
      <text:p text:style-name="Text_20_body">Table 3-12 ATTACK, DECAY TIME (2)</text:p>
      <text:p text:style-name="Text_20_body">Chapter 3 Sound Functions</text:p>
      <text:p text:style-name="Text_20_body">• D1L: 1st DECAY LEVEL</text:p>
      <text:p text:style-name="Text_20_body">| D7 D6 D5 D4 D3 D2 D1 D0 | | --- --- --- --- --- --- --- --- | | D1L | RR |</text:p>
      <text:p text:style-name="Text_20_body">Set 4 decays for 1 sound, and 1 data consists of 4 bits. EG moves from first decay to second decay through this level. With a resolution of 3 dB, each bit is weighted as in the table below.</text:p>
      <table:table table:name="Table40" table:style-name="Table40">
        <table:table-column table:style-name="Table40.A"/>
        <table:table-column table:style-name="Table40.B"/>
        <table:table-column table:style-name="Table40.C"/>
        <table:table-column table:style-name="Table40.D"/>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row>
        </table:table-header-rows>
        <table:table-row>
          <table:table-cell table:style-name="TableRowCell" office:value-type="string">
            <text:p text:style-name="Table_20_Contents">24</text:p>
          </table:table-cell>
          <table:table-cell table:style-name="TableRowCell" office:value-type="string">
            <text:p text:style-name="Table_20_Contents">12</text:p>
          </table:table-cell>
          <table:table-cell table:style-name="TableRowCell" office:value-type="string">
            <text:p text:style-name="Table_20_Contents">6</text:p>
          </table:table-cell>
          <table:table-cell table:style-name="TableRowCell" office:value-type="string">
            <text:p text:style-name="Table_20_Contents">3</text:p>
          </table:table-cell>
        </table:table-row>
      </table:table>
      <text:p text:style-name="First_20_paragraph">When all D7-D4 are "1" (-45 dB), the decay amount is further calculated as 48 dB.</text:p>
      <text:p text:style-name="Text_20_body">• TL: TOTAL LEVEL</text:p>
      <text:p text:style-name="Text_20_body">| D7 D6 D5 D4 D3 D2 D1 D0 | | --- --- --- --- --- --- --- --- | | TL | RR |</text:p>
      <text:p text:style-name="Text_20_body">Set 4 decays for 1 sound, and 1 data consists of 7 bits. The total level (expressed in attenuation amount) at each time calculated by the EG is added and output to the OP to control pitch (vibration adjustment) and volume. The minimum resolution is 0.75 dB, and each bit is weighted as in the table below.</text:p>
      <text:p text:style-name="Text_20_body">| 48 | 24 | 12 | 6 | 3 | 1.5 | 0.75 |</text:p>
      <text:p text:style-name="Text_20_body"><text:span text:style-name="Strong_20_Emphasis">AMS: AMPLITUDE MODULATION SENSITIVITY</text:span></text:p>
      <text:p text:style-name="Preformatted_20_Text"><text:s text:c="22"/>D7 <text:s text:c="1"/>D6 <text:s text:c="1"/>D5 <text:s text:c="1"/>D4 <text:s text:c="1"/>D3 <text:s text:c="1"/>D2 <text:s text:c="1"/>D1 <text:s text:c="1"/>D0</text:p>
      <text:p text:style-name="Preformatted_20_Text"><text:s text:c="19"/>38H <text:s text:c="20"/>X <text:s text:c="5"/>PMS <text:s text:c="2"/>X <text:s text:c="5"/>AMS</text:p>
      <text:p text:style-name="Preformatted_20_Text"><text:s text:c="19"/>3FH <text:s text:c="20"/>X <text:s text:c="17"/>EN <text:s text:c="2"/>DIR</text:p>
      <text:p text:style-name="Preformatted_20_Text"><text:s text:c="19"/>A0H <text:s text:c="12"/>AMS-EN Switch</text:p>
      <text:p text:style-name="Preformatted_20_Text"><text:s text:c="19"/>B0H <text:s text:c="12"/>1: AMS Enabled</text:p>
      <text:p text:style-name="Preformatted_20_Text"><text:s text:c="39"/>0: AMS Disabled</text:p>
      <text:p text:style-name="First_20_paragraph">Set the data to 1 for one sound, the data ranges from 2 bits. EG data can perform amplitude modulation control with 8-bit data from LFO to LFA. This amplitude modulation control is set as follows in terms of the maximum modulation rate. You can select whether to apply changes for each slot by the AMS-EN switch. The data of AMS is set for each channel.</text:p>
      <text:p text:style-name="Text_20_body">AMS | AM MOD (Max)</text:p>
      <text:p text:style-name="Preformatted_20_Text">0 <text:s text:c="11"/>| <text:s text:c="1"/>0 </text:p>
      <text:p text:style-name="Preformatted_20_Text">1 <text:s text:c="11"/>| <text:s text:c="1"/>23.90625 dB </text:p>
      <text:p text:style-name="Preformatted_20_Text">2 <text:s text:c="11"/>| <text:s text:c="1"/>47.8125 dB</text:p>
      <text:p text:style-name="Preformatted_20_Text">3 <text:s text:c="11"/>| <text:s text:c="1"/>95.625 dB</text:p>
      <text:p text:style-name="First_20_paragraph">Table 3-13 AMS max modulation rate</text:p>
      <text:p text:style-name="Text_20_body"><text:span text:style-name="Strong_20_Emphasis">OP: FM OPERATOR</text:span></text:p>
      <text:p text:style-name="Text_20_body">Reads the signal sample from the phase information of PG. The read signal will be calculated using envelope information from EG. Then, the switching of the continuous circuit configuration of FM-OP is performed, and if necessary, the control of the feedback amount according to the phase information of itself is carried out. The signal transformed by FM is sent to ACC here.</text:p>
      <text:p text:style-name="Text_20_body">(Page) 101</text:p>
      <text:p text:style-name="Text_20_body">Chapter 3: Sound Function</text:p>
      <text:p text:style-name="Text_20_body">• CON: CONNECTION</text:p>
      <text:p text:style-name="Text_20_body">20H</text:p>
      <text:p text:style-name="Preformatted_20_Text">D7 D6 D5 D4 D3 D2 D1 D0</text:p>
      <text:p text:style-name="Preformatted_20_Text"><text:s text:c="4"/>LR <text:s text:c="1"/>FL <text:s text:c="1"/>CON=(fs)</text:p>
      <text:p text:style-name="First_20_paragraph">27H</text:p>
      <text:p text:style-name="Text_20_body">1 By setting one data for each sound, it consists of the three bits as shown above. Due to this CON, it is possible to take the FM-OP circuit structure (refer to Fig. 3-4) of 8 sounds, and to produce 8 different tones respectively.</text:p>
      <text:p text:style-name="Text_20_body">[Diagram] Fig. 3-4 Configuration of FM-OP</text:p>
      <text:p text:style-name="Text_20_body">Page 102</text:p>
      <text:list text:style-name="Numbering_20_1">
        <text:list-item>
          <text:p text:style-name="List_20_Number_20_Tight">FM Sound Source</text:p>
        </text:list-item>
      </text:list>
      <text:p text:style-name="First_20_paragraph">◇FL: SELF FEED BACK LEVEL</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G"/>
        <table:table-column table:style-name="Table41.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20H</text:p>
          </table:table-cell>
          <table:table-cell table:style-name="TableRowCell" office:value-type="string">
            <text:p text:style-name="Table_20_Contents">LR</text:p>
          </table:table-cell>
          <table:table-cell table:style-name="TableRowCell" office:value-type="string">
            <text:p text:style-name="Table_20_Contents">FL</text:p>
          </table:table-cell>
          <table:table-cell table:style-name="TableRowCell" office:value-type="string">
            <text:p text:style-name="Table_20_Contents">CO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7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You set 1 sound to 1 data, using 3 bits. The FL level is as shown in Table 3-14, and can be controlled for each sound.</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column table:style-name="Table42.H"/>
        <table:table-column table:style-name="Table42.I"/>
        <table:table-header-rows>
          <table:table-row>
            <table:table-cell table:style-name="TableHeaderRowCell" office:value-type="string">
              <text:p text:style-name="Table_20_Heading">FL=(D5~D3)</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cell table:style-name="TableHeaderRowCell" office:value-type="string">
              <text:p text:style-name="Table_20_Heading">3</text:p>
            </table:table-cell>
            <table:table-cell table:style-name="TableHeaderRowCell" office:value-type="string">
              <text:p text:style-name="Table_20_Heading">4</text:p>
            </table:table-cell>
            <table:table-cell table:style-name="TableHeaderRowCell" office:value-type="string">
              <text:p text:style-name="Table_20_Heading">5</text:p>
            </table:table-cell>
            <table:table-cell table:style-name="TableHeaderRowCell" office:value-type="string">
              <text:p text:style-name="Table_20_Heading">6</text:p>
            </table:table-cell>
            <table:table-cell table:style-name="TableHeaderRowCell" office:value-type="string">
              <text:p text:style-name="Table_20_Heading">7</text:p>
            </table:table-cell>
          </table:table-row>
        </table:table-header-rows>
        <table:table-row>
          <table:table-cell table:style-name="TableRowCell" office:value-type="string">
            <text:p text:style-name="Table_20_Contents">LEVEL</text:p>
          </table:table-cell>
          <table:table-cell table:style-name="TableRowCell" office:value-type="string">
            <text:p text:style-name="Table_20_Contents">OFF</text:p>
          </table:table-cell>
          <table:table-cell table:style-name="TableRowCell" office:value-type="string">
            <text:p text:style-name="Table_20_Contents">π/16</text:p>
          </table:table-cell>
          <table:table-cell table:style-name="TableRowCell" office:value-type="string">
            <text:p text:style-name="Table_20_Contents">π/8</text:p>
          </table:table-cell>
          <table:table-cell table:style-name="TableRowCell" office:value-type="string">
            <text:p text:style-name="Table_20_Contents">π/4</text:p>
          </table:table-cell>
          <table:table-cell table:style-name="TableRowCell" office:value-type="string">
            <text:p text:style-name="Table_20_Contents">π/2</text:p>
          </table:table-cell>
          <table:table-cell table:style-name="TableRowCell" office:value-type="string">
            <text:p text:style-name="Table_20_Contents">π</text:p>
          </table:table-cell>
          <table:table-cell table:style-name="TableRowCell" office:value-type="string">
            <text:p text:style-name="Table_20_Contents">2π</text:p>
          </table:table-cell>
          <table:table-cell table:style-name="TableRowCell" office:value-type="string">
            <text:p text:style-name="Table_20_Contents">4π</text:p>
          </table:table-cell>
        </table:table-row>
      </table:table>
      <text:p text:style-name="First_20_paragraph">Table 3-14 FL Level</text:p>
      <text:p text:style-name="Text_20_body">◇NOISE: NOISE GENERATOR</text:p>
      <text:p text:style-name="Text_20_body">When NOISE is enabled, the 32nd slot changes to a NOISE slot. The value of the NOISE GENERATOR's slot can be controlled externally.</text:p>
      <text:p text:style-name="Text_20_body">In addition, the envelope uses the envelope function of the 32nd slot, but instead of this being a logarithmic transformation, the attack part is exponential, and the decay part changes linearly.</text:p>
      <text:p text:style-name="Text_20_body">◇NE: NOISE ENABLE</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column table:style-name="Table43.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OFF</text:p>
          </table:table-cell>
          <table:table-cell table:style-name="TableRowCell" office:value-type="string">
            <text:p text:style-name="Table_20_Contents">NE</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NFRQ</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When setting the NE bit (= D7) to "1", the 32nd slot becomes a NOISE slot.</text:p>
      <text:p text:style-name="Text_20_body">◇NFRQ: NOISE FREQUENCY</text:p>
      <text:p text:style-name="Text_20_body">The relationship between NFRQ and noise is</text:p>
      <text:p text:style-name="Text_20_body">fNoise = fM (kHz) / 32 * (NFRQ)</text:p>
      <text:p text:style-name="Text_20_body">Note: fM = 4000 kHz (YM2151 additional clock frequency).</text:p>
      <text:p text:style-name="Text_20_body">Chapter 3 Sound Functions</text:p>
      <text:p text:style-name="Text_20_body">In other words, it can be changed between approximately 4.0 kHz to 125 kHz. The noise period at this time is:</text:p>
      <text:p text:style-name="Text_20_body">[ T_{\text{noise}} = \frac{2^{17} - 1}{f_{\text{noise}}\ (\text{Hz})}\ (\text{sec}) ]</text:p>
      <text:p text:style-name="Text_20_body">Therefore, the value ranges from approximately 32.8 sec to approximately 1.05 sec.</text:p>
      <text:p text:style-name="Text_20_body">&lt;LFO: FREQUENCY OSC&gt;</text:p>
      <text:p text:style-name="Text_20_body">It is possible to control the oscillating frequency with a wide range from approximately 53 Hz to approximately 0.008 Hz. You can select one of the waveforms: sine wave, square wave, triangular wave, or noise, and perform frequency modulation of the sound source and amplitude modulation. At this time, the output level can be controlled separately for frequency modulation and amplitude modulation.</text:p>
      <text:list text:style-name="List_20_1">
        <text:list-item>
          <text:p text:style-name="List_20_Bullet_20_Tight">LFRQ: LOW FREQUENCY</text:p>
        </text:list-item>
      </text:list>
      <text:p text:style-name="Preformatted_20_Text"><text:s text:c="5"/>D7 <text:s text:c="2"/>D6 <text:s text:c="2"/>D5 <text:s text:c="3"/>D4 <text:s text:c="3"/>D3 <text:s text:c="3"/>D2 <text:s text:c="3"/>D1 <text:s text:c="3"/>D0</text:p>
      <text:p text:style-name="Preformatted_20_Text"><text:s text:c="5"/>18H <text:s text:c="1"/>LFRQ</text:p>
      <text:p text:style-name="First_20_paragraph">You can set the oscillating frequency with 8 bits. Please refer to Table 3-15 for the setting values.</text:p>
      <text:list text:style-name="List_20_1">
        <text:list-item>
          <text:p text:style-name="List_20_Bullet_20_Tight">W: WAVE FORM</text:p>
        </text:list-item>
      </text:list>
      <text:p text:style-name="Preformatted_20_Text"><text:s text:c="5"/>D7 <text:s text:c="2"/>D6 <text:s text:c="2"/>D5 <text:s text:c="3"/>D4 <text:s text:c="3"/>D3 <text:s text:c="3"/>D2 <text:s text:c="3"/>D1 <text:s text:c="3"/>D0</text:p>
      <text:p text:style-name="Preformatted_20_Text"><text:s text:c="5"/>18H <text:s text:c="1"/>CT <text:s text:c="2"/>x <text:s text:c="4"/>x <text:s text:c="4"/>x <text:s text:c="4"/>x <text:s text:c="4"/>x <text:s text:c="4"/>W</text:p>
      <text:p text:style-name="First_20_paragraph">Using the above 2 bits, four types are output for frequency modulation (FM) and amplitude modulation (AM). (See Figures 3-5)</text:p>
      <text:p text:style-name="Text_20_body">Page 104</text:p>
      <text:list text:style-name="Numbering_20_1">
        <text:list-item>
          <text:p text:style-name="List_20_Number_20_Tight">FM Sound Source</text:p>
        </text:list-item>
      </text:list>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column table:style-name="Table44.H"/>
        <table:table-column table:style-name="Table44.I"/>
        <table:table-column table:style-name="Table44.J"/>
        <table:table-column table:style-name="Table44.K"/>
        <table:table-column table:style-name="Table44.L"/>
        <table:table-header-rows>
          <table:table-row>
            <table:table-cell table:style-name="TableHeaderRowCell" office:value-type="string">
              <text:p text:style-name="Table_20_Heading">DATA (HEX)</text:p>
            </table:table-cell>
            <table:table-cell table:style-name="TableHeaderRowCell" office:value-type="string">
              <text:p text:style-name="Table_20_Heading">FREQ. (Hz)</text:p>
            </table:table-cell>
            <table:table-cell table:style-name="TableHeaderRowCell" office:value-type="string">
              <text:p text:style-name="Table_20_Heading">DATA (HEX)</text:p>
            </table:table-cell>
            <table:table-cell table:style-name="TableHeaderRowCell" office:value-type="string">
              <text:p text:style-name="Table_20_Heading">FREQ. (Hz)</text:p>
            </table:table-cell>
            <table:table-cell table:style-name="TableHeaderRowCell" office:value-type="string">
              <text:p text:style-name="Table_20_Heading">DATA (HEX)</text:p>
            </table:table-cell>
            <table:table-cell table:style-name="TableHeaderRowCell" office:value-type="string">
              <text:p text:style-name="Table_20_Heading">FREQ. (Hz)</text:p>
            </table:table-cell>
            <table:table-cell table:style-name="TableHeaderRowCell" office:value-type="string">
              <text:p text:style-name="Table_20_Heading">DATA (HEX)</text:p>
            </table:table-cell>
            <table:table-cell table:style-name="TableHeaderRowCell" office:value-type="string">
              <text:p text:style-name="Table_20_Heading">FREQ. (Hz)</text:p>
            </table:table-cell>
            <table:table-cell table:style-name="TableHeaderRowCell" office:value-type="string">
              <text:p text:style-name="Table_20_Heading">DATA (HEX)</text:p>
            </table:table-cell>
            <table:table-cell table:style-name="TableHeaderRowCell" office:value-type="string">
              <text:p text:style-name="Table_20_Heading">FREQ. (Hz)</text:p>
            </table:table-cell>
            <table:table-cell table:style-name="TableHeaderRowCell" office:value-type="string">
              <text:p text:style-name="Table_20_Heading">DATA (HEX)</text:p>
            </table:table-cell>
            <table:table-cell table:style-name="TableHeaderRowCell" office:value-type="string">
              <text:p text:style-name="Table_20_Heading">FREQ. (Hz)</text:p>
            </table:table-cell>
          </table:table-row>
        </table:table-header-rows>
        <table:table-row>
          <table:table-cell table:style-name="TableRowCell" office:value-type="string">
            <text:p text:style-name="Table_20_Contents">FF</text:p>
          </table:table-cell>
          <table:table-cell table:style-name="TableRowCell" office:value-type="string">
            <text:p text:style-name="Table_20_Contents">59.1278</text:p>
          </table:table-cell>
          <table:table-cell table:style-name="TableRowCell" office:value-type="string">
            <text:p text:style-name="Table_20_Contents">BF</text:p>
          </table:table-cell>
          <table:table-cell table:style-name="TableRowCell" office:value-type="string">
            <text:p text:style-name="Table_20_Contents">3.6955</text:p>
          </table:table-cell>
          <table:table-cell table:style-name="TableRowCell" office:value-type="string">
            <text:p text:style-name="Table_20_Contents">7F</text:p>
          </table:table-cell>
          <table:table-cell table:style-name="TableRowCell" office:value-type="string">
            <text:p text:style-name="Table_20_Contents">0.2310</text:p>
          </table:table-cell>
          <table:table-cell table:style-name="TableRowCell" office:value-type="string">
            <text:p text:style-name="Table_20_Contents">3F</text:p>
          </table:table-cell>
          <table:table-cell table:style-name="TableRowCell" office:value-type="string">
            <text:p text:style-name="Table_20_Contents">0.014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E</text:p>
          </table:table-cell>
          <table:table-cell table:style-name="TableRowCell" office:value-type="string">
            <text:p text:style-name="Table_20_Contents">57.2205</text:p>
          </table:table-cell>
          <table:table-cell table:style-name="TableRowCell" office:value-type="string">
            <text:p text:style-name="Table_20_Contents">BE</text:p>
          </table:table-cell>
          <table:table-cell table:style-name="TableRowCell" office:value-type="string">
            <text:p text:style-name="Table_20_Contents">3.5763</text:p>
          </table:table-cell>
          <table:table-cell table:style-name="TableRowCell" office:value-type="string">
            <text:p text:style-name="Table_20_Contents">7E</text:p>
          </table:table-cell>
          <table:table-cell table:style-name="TableRowCell" office:value-type="string">
            <text:p text:style-name="Table_20_Contents">0.2235</text:p>
          </table:table-cell>
          <table:table-cell table:style-name="TableRowCell" office:value-type="string">
            <text:p text:style-name="Table_20_Contents">3E</text:p>
          </table:table-cell>
          <table:table-cell table:style-name="TableRowCell" office:value-type="string">
            <text:p text:style-name="Table_20_Contents">0.014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D</text:p>
          </table:table-cell>
          <table:table-cell table:style-name="TableRowCell" office:value-type="string">
            <text:p text:style-name="Table_20_Contents">55.3131</text:p>
          </table:table-cell>
          <table:table-cell table:style-name="TableRowCell" office:value-type="string">
            <text:p text:style-name="Table_20_Contents">BD</text:p>
          </table:table-cell>
          <table:table-cell table:style-name="TableRowCell" office:value-type="string">
            <text:p text:style-name="Table_20_Contents">3.4571</text:p>
          </table:table-cell>
          <table:table-cell table:style-name="TableRowCell" office:value-type="string">
            <text:p text:style-name="Table_20_Contents">7D</text:p>
          </table:table-cell>
          <table:table-cell table:style-name="TableRowCell" office:value-type="string">
            <text:p text:style-name="Table_20_Contents">0.2161</text:p>
          </table:table-cell>
          <table:table-cell table:style-name="TableRowCell" office:value-type="string">
            <text:p text:style-name="Table_20_Contents">3D</text:p>
          </table:table-cell>
          <table:table-cell table:style-name="TableRowCell" office:value-type="string">
            <text:p text:style-name="Table_20_Contents">0.0136</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C</text:p>
          </table:table-cell>
          <table:table-cell table:style-name="TableRowCell" office:value-type="string">
            <text:p text:style-name="Table_20_Contents">53.4058</text:p>
          </table:table-cell>
          <table:table-cell table:style-name="TableRowCell" office:value-type="string">
            <text:p text:style-name="Table_20_Contents">BC</text:p>
          </table:table-cell>
          <table:table-cell table:style-name="TableRowCell" office:value-type="string">
            <text:p text:style-name="Table_20_Contents">3.3379</text:p>
          </table:table-cell>
          <table:table-cell table:style-name="TableRowCell" office:value-type="string">
            <text:p text:style-name="Table_20_Contents">7C</text:p>
          </table:table-cell>
          <table:table-cell table:style-name="TableRowCell" office:value-type="string">
            <text:p text:style-name="Table_20_Contents">0.2086</text:p>
          </table:table-cell>
          <table:table-cell table:style-name="TableRowCell" office:value-type="string">
            <text:p text:style-name="Table_20_Contents">3C</text:p>
          </table:table-cell>
          <table:table-cell table:style-name="TableRowCell" office:value-type="string">
            <text:p text:style-name="Table_20_Contents">0.013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B</text:p>
          </table:table-cell>
          <table:table-cell table:style-name="TableRowCell" office:value-type="string">
            <text:p text:style-name="Table_20_Contents">51.4948</text:p>
          </table:table-cell>
          <table:table-cell table:style-name="TableRowCell" office:value-type="string">
            <text:p text:style-name="Table_20_Contents">BB</text:p>
          </table:table-cell>
          <table:table-cell table:style-name="TableRowCell" office:value-type="string">
            <text:p text:style-name="Table_20_Contents">3.2187</text:p>
          </table:table-cell>
          <table:table-cell table:style-name="TableRowCell" office:value-type="string">
            <text:p text:style-name="Table_20_Contents">7B</text:p>
          </table:table-cell>
          <table:table-cell table:style-name="TableRowCell" office:value-type="string">
            <text:p text:style-name="Table_20_Contents">0.2012</text:p>
          </table:table-cell>
          <table:table-cell table:style-name="TableRowCell" office:value-type="string">
            <text:p text:style-name="Table_20_Contents">3B</text:p>
          </table:table-cell>
          <table:table-cell table:style-name="TableRowCell" office:value-type="string">
            <text:p text:style-name="Table_20_Contents">0.0126</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A</text:p>
          </table:table-cell>
          <table:table-cell table:style-name="TableRowCell" office:value-type="string">
            <text:p text:style-name="Table_20_Contents">49.5911</text:p>
          </table:table-cell>
          <table:table-cell table:style-name="TableRowCell" office:value-type="string">
            <text:p text:style-name="Table_20_Contents">BA</text:p>
          </table:table-cell>
          <table:table-cell table:style-name="TableRowCell" office:value-type="string">
            <text:p text:style-name="Table_20_Contents">3.0994</text:p>
          </table:table-cell>
          <table:table-cell table:style-name="TableRowCell" office:value-type="string">
            <text:p text:style-name="Table_20_Contents">7A</text:p>
          </table:table-cell>
          <table:table-cell table:style-name="TableRowCell" office:value-type="string">
            <text:p text:style-name="Table_20_Contents">0.1937</text:p>
          </table:table-cell>
          <table:table-cell table:style-name="TableRowCell" office:value-type="string">
            <text:p text:style-name="Table_20_Contents">3A</text:p>
          </table:table-cell>
          <table:table-cell table:style-name="TableRowCell" office:value-type="string">
            <text:p text:style-name="Table_20_Contents">0.012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9</text:p>
          </table:table-cell>
          <table:table-cell table:style-name="TableRowCell" office:value-type="string">
            <text:p text:style-name="Table_20_Contents">47.6837</text:p>
          </table:table-cell>
          <table:table-cell table:style-name="TableRowCell" office:value-type="string">
            <text:p text:style-name="Table_20_Contents">B9</text:p>
          </table:table-cell>
          <table:table-cell table:style-name="TableRowCell" office:value-type="string">
            <text:p text:style-name="Table_20_Contents">2.9802</text:p>
          </table:table-cell>
          <table:table-cell table:style-name="TableRowCell" office:value-type="string">
            <text:p text:style-name="Table_20_Contents">79</text:p>
          </table:table-cell>
          <table:table-cell table:style-name="TableRowCell" office:value-type="string">
            <text:p text:style-name="Table_20_Contents">0.1863</text:p>
          </table:table-cell>
          <table:table-cell table:style-name="TableRowCell" office:value-type="string">
            <text:p text:style-name="Table_20_Contents">39</text:p>
          </table:table-cell>
          <table:table-cell table:style-name="TableRowCell" office:value-type="string">
            <text:p text:style-name="Table_20_Contents">0.011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8</text:p>
          </table:table-cell>
          <table:table-cell table:style-name="TableRowCell" office:value-type="string">
            <text:p text:style-name="Table_20_Contents">45.7764</text:p>
          </table:table-cell>
          <table:table-cell table:style-name="TableRowCell" office:value-type="string">
            <text:p text:style-name="Table_20_Contents">B8</text:p>
          </table:table-cell>
          <table:table-cell table:style-name="TableRowCell" office:value-type="string">
            <text:p text:style-name="Table_20_Contents">2.8618</text:p>
          </table:table-cell>
          <table:table-cell table:style-name="TableRowCell" office:value-type="string">
            <text:p text:style-name="Table_20_Contents">78</text:p>
          </table:table-cell>
          <table:table-cell table:style-name="TableRowCell" office:value-type="string">
            <text:p text:style-name="Table_20_Contents">0.1788</text:p>
          </table:table-cell>
          <table:table-cell table:style-name="TableRowCell" office:value-type="string">
            <text:p text:style-name="Table_20_Contents">38</text:p>
          </table:table-cell>
          <table:table-cell table:style-name="TableRowCell" office:value-type="string">
            <text:p text:style-name="Table_20_Contents">0.011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7</text:p>
          </table:table-cell>
          <table:table-cell table:style-name="TableRowCell" office:value-type="string">
            <text:p text:style-name="Table_20_Contents">43.8690</text:p>
          </table:table-cell>
          <table:table-cell table:style-name="TableRowCell" office:value-type="string">
            <text:p text:style-name="Table_20_Contents">B7</text:p>
          </table:table-cell>
          <table:table-cell table:style-name="TableRowCell" office:value-type="string">
            <text:p text:style-name="Table_20_Contents">2.7418</text:p>
          </table:table-cell>
          <table:table-cell table:style-name="TableRowCell" office:value-type="string">
            <text:p text:style-name="Table_20_Contents">77</text:p>
          </table:table-cell>
          <table:table-cell table:style-name="TableRowCell" office:value-type="string">
            <text:p text:style-name="Table_20_Contents">0.1714</text:p>
          </table:table-cell>
          <table:table-cell table:style-name="TableRowCell" office:value-type="string">
            <text:p text:style-name="Table_20_Contents">37</text:p>
          </table:table-cell>
          <table:table-cell table:style-name="TableRowCell" office:value-type="string">
            <text:p text:style-name="Table_20_Contents">0.0107</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6</text:p>
          </table:table-cell>
          <table:table-cell table:style-name="TableRowCell" office:value-type="string">
            <text:p text:style-name="Table_20_Contents">41.9617</text:p>
          </table:table-cell>
          <table:table-cell table:style-name="TableRowCell" office:value-type="string">
            <text:p text:style-name="Table_20_Contents">B6</text:p>
          </table:table-cell>
          <table:table-cell table:style-name="TableRowCell" office:value-type="string">
            <text:p text:style-name="Table_20_Contents">2.6226</text:p>
          </table:table-cell>
          <table:table-cell table:style-name="TableRowCell" office:value-type="string">
            <text:p text:style-name="Table_20_Contents">76</text:p>
          </table:table-cell>
          <table:table-cell table:style-name="TableRowCell" office:value-type="string">
            <text:p text:style-name="Table_20_Contents">0.1639</text:p>
          </table:table-cell>
          <table:table-cell table:style-name="TableRowCell" office:value-type="string">
            <text:p text:style-name="Table_20_Contents">36</text:p>
          </table:table-cell>
          <table:table-cell table:style-name="TableRowCell" office:value-type="string">
            <text:p text:style-name="Table_20_Contents">0.010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5</text:p>
          </table:table-cell>
          <table:table-cell table:style-name="TableRowCell" office:value-type="string">
            <text:p text:style-name="Table_20_Contents">40.0543</text:p>
          </table:table-cell>
          <table:table-cell table:style-name="TableRowCell" office:value-type="string">
            <text:p text:style-name="Table_20_Contents">B5</text:p>
          </table:table-cell>
          <table:table-cell table:style-name="TableRowCell" office:value-type="string">
            <text:p text:style-name="Table_20_Contents">2.5034</text:p>
          </table:table-cell>
          <table:table-cell table:style-name="TableRowCell" office:value-type="string">
            <text:p text:style-name="Table_20_Contents">75</text:p>
          </table:table-cell>
          <table:table-cell table:style-name="TableRowCell" office:value-type="string">
            <text:p text:style-name="Table_20_Contents">0.1565</text:p>
          </table:table-cell>
          <table:table-cell table:style-name="TableRowCell" office:value-type="string">
            <text:p text:style-name="Table_20_Contents">35</text:p>
          </table:table-cell>
          <table:table-cell table:style-name="TableRowCell" office:value-type="string">
            <text:p text:style-name="Table_20_Contents">0.0098</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4</text:p>
          </table:table-cell>
          <table:table-cell table:style-name="TableRowCell" office:value-type="string">
            <text:p text:style-name="Table_20_Contents">38.1470</text:p>
          </table:table-cell>
          <table:table-cell table:style-name="TableRowCell" office:value-type="string">
            <text:p text:style-name="Table_20_Contents">B4</text:p>
          </table:table-cell>
          <table:table-cell table:style-name="TableRowCell" office:value-type="string">
            <text:p text:style-name="Table_20_Contents">2.3842</text:p>
          </table:table-cell>
          <table:table-cell table:style-name="TableRowCell" office:value-type="string">
            <text:p text:style-name="Table_20_Contents">74</text:p>
          </table:table-cell>
          <table:table-cell table:style-name="TableRowCell" office:value-type="string">
            <text:p text:style-name="Table_20_Contents">0.1490</text:p>
          </table:table-cell>
          <table:table-cell table:style-name="TableRowCell" office:value-type="string">
            <text:p text:style-name="Table_20_Contents">34</text:p>
          </table:table-cell>
          <table:table-cell table:style-name="TableRowCell" office:value-type="string">
            <text:p text:style-name="Table_20_Contents">0.009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3</text:p>
          </table:table-cell>
          <table:table-cell table:style-name="TableRowCell" office:value-type="string">
            <text:p text:style-name="Table_20_Contents">36.2396</text:p>
          </table:table-cell>
          <table:table-cell table:style-name="TableRowCell" office:value-type="string">
            <text:p text:style-name="Table_20_Contents">B3</text:p>
          </table:table-cell>
          <table:table-cell table:style-name="TableRowCell" office:value-type="string">
            <text:p text:style-name="Table_20_Contents">2.2649</text:p>
          </table:table-cell>
          <table:table-cell table:style-name="TableRowCell" office:value-type="string">
            <text:p text:style-name="Table_20_Contents">73</text:p>
          </table:table-cell>
          <table:table-cell table:style-name="TableRowCell" office:value-type="string">
            <text:p text:style-name="Table_20_Contents">0.1416</text:p>
          </table:table-cell>
          <table:table-cell table:style-name="TableRowCell" office:value-type="string">
            <text:p text:style-name="Table_20_Contents">33</text:p>
          </table:table-cell>
          <table:table-cell table:style-name="TableRowCell" office:value-type="string">
            <text:p text:style-name="Table_20_Contents">0.0088</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2</text:p>
          </table:table-cell>
          <table:table-cell table:style-name="TableRowCell" office:value-type="string">
            <text:p text:style-name="Table_20_Contents">34.3323</text:p>
          </table:table-cell>
          <table:table-cell table:style-name="TableRowCell" office:value-type="string">
            <text:p text:style-name="Table_20_Contents">B2</text:p>
          </table:table-cell>
          <table:table-cell table:style-name="TableRowCell" office:value-type="string">
            <text:p text:style-name="Table_20_Contents">2.1458</text:p>
          </table:table-cell>
          <table:table-cell table:style-name="TableRowCell" office:value-type="string">
            <text:p text:style-name="Table_20_Contents">72</text:p>
          </table:table-cell>
          <table:table-cell table:style-name="TableRowCell" office:value-type="string">
            <text:p text:style-name="Table_20_Contents">0.1342</text:p>
          </table:table-cell>
          <table:table-cell table:style-name="TableRowCell" office:value-type="string">
            <text:p text:style-name="Table_20_Contents">32</text:p>
          </table:table-cell>
          <table:table-cell table:style-name="TableRowCell" office:value-type="string">
            <text:p text:style-name="Table_20_Contents">0.008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1</text:p>
          </table:table-cell>
          <table:table-cell table:style-name="TableRowCell" office:value-type="string">
            <text:p text:style-name="Table_20_Contents">32.4249</text:p>
          </table:table-cell>
          <table:table-cell table:style-name="TableRowCell" office:value-type="string">
            <text:p text:style-name="Table_20_Contents">B1</text:p>
          </table:table-cell>
          <table:table-cell table:style-name="TableRowCell" office:value-type="string">
            <text:p text:style-name="Table_20_Contents">2.0266</text:p>
          </table:table-cell>
          <table:table-cell table:style-name="TableRowCell" office:value-type="string">
            <text:p text:style-name="Table_20_Contents">71</text:p>
          </table:table-cell>
          <table:table-cell table:style-name="TableRowCell" office:value-type="string">
            <text:p text:style-name="Table_20_Contents">0.1267</text:p>
          </table:table-cell>
          <table:table-cell table:style-name="TableRowCell" office:value-type="string">
            <text:p text:style-name="Table_20_Contents">31</text:p>
          </table:table-cell>
          <table:table-cell table:style-name="TableRowCell" office:value-type="string">
            <text:p text:style-name="Table_20_Contents">0.0079</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0</text:p>
          </table:table-cell>
          <table:table-cell table:style-name="TableRowCell" office:value-type="string">
            <text:p text:style-name="Table_20_Contents">30.5175</text:p>
          </table:table-cell>
          <table:table-cell table:style-name="TableRowCell" office:value-type="string">
            <text:p text:style-name="Table_20_Contents">B0</text:p>
          </table:table-cell>
          <table:table-cell table:style-name="TableRowCell" office:value-type="string">
            <text:p text:style-name="Table_20_Contents">1.9074</text:p>
          </table:table-cell>
          <table:table-cell table:style-name="TableRowCell" office:value-type="string">
            <text:p text:style-name="Table_20_Contents">70</text:p>
          </table:table-cell>
          <table:table-cell table:style-name="TableRowCell" office:value-type="string">
            <text:p text:style-name="Table_20_Contents">0.1193</text:p>
          </table:table-cell>
          <table:table-cell table:style-name="TableRowCell" office:value-type="string">
            <text:p text:style-name="Table_20_Contents">30</text:p>
          </table:table-cell>
          <table:table-cell table:style-name="TableRowCell" office:value-type="string">
            <text:p text:style-name="Table_20_Contents">0.007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F</text:p>
          </table:table-cell>
          <table:table-cell table:style-name="TableRowCell" office:value-type="string">
            <text:p text:style-name="Table_20_Contents">29.5639</text:p>
          </table:table-cell>
          <table:table-cell table:style-name="TableRowCell" office:value-type="string">
            <text:p text:style-name="Table_20_Contents">AF</text:p>
          </table:table-cell>
          <table:table-cell table:style-name="TableRowCell" office:value-type="string">
            <text:p text:style-name="Table_20_Contents">1.8477</text:p>
          </table:table-cell>
          <table:table-cell table:style-name="TableRowCell" office:value-type="string">
            <text:p text:style-name="Table_20_Contents">6F</text:p>
          </table:table-cell>
          <table:table-cell table:style-name="TableRowCell" office:value-type="string">
            <text:p text:style-name="Table_20_Contents">0.1155</text:p>
          </table:table-cell>
          <table:table-cell table:style-name="TableRowCell" office:value-type="string">
            <text:p text:style-name="Table_20_Contents">2F</text:p>
          </table:table-cell>
          <table:table-cell table:style-name="TableRowCell" office:value-type="string">
            <text:p text:style-name="Table_20_Contents">0.007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E</text:p>
          </table:table-cell>
          <table:table-cell table:style-name="TableRowCell" office:value-type="string">
            <text:p text:style-name="Table_20_Contents">28.6102</text:p>
          </table:table-cell>
          <table:table-cell table:style-name="TableRowCell" office:value-type="string">
            <text:p text:style-name="Table_20_Contents">AE</text:p>
          </table:table-cell>
          <table:table-cell table:style-name="TableRowCell" office:value-type="string">
            <text:p text:style-name="Table_20_Contents">1.7881</text:p>
          </table:table-cell>
          <table:table-cell table:style-name="TableRowCell" office:value-type="string">
            <text:p text:style-name="Table_20_Contents">6E</text:p>
          </table:table-cell>
          <table:table-cell table:style-name="TableRowCell" office:value-type="string">
            <text:p text:style-name="Table_20_Contents">0.1118</text:p>
          </table:table-cell>
          <table:table-cell table:style-name="TableRowCell" office:value-type="string">
            <text:p text:style-name="Table_20_Contents">2E</text:p>
          </table:table-cell>
          <table:table-cell table:style-name="TableRowCell" office:value-type="string">
            <text:p text:style-name="Table_20_Contents">0.007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D</text:p>
          </table:table-cell>
          <table:table-cell table:style-name="TableRowCell" office:value-type="string">
            <text:p text:style-name="Table_20_Contents">27.6566</text:p>
          </table:table-cell>
          <table:table-cell table:style-name="TableRowCell" office:value-type="string">
            <text:p text:style-name="Table_20_Contents">AD</text:p>
          </table:table-cell>
          <table:table-cell table:style-name="TableRowCell" office:value-type="string">
            <text:p text:style-name="Table_20_Contents">1.7285</text:p>
          </table:table-cell>
          <table:table-cell table:style-name="TableRowCell" office:value-type="string">
            <text:p text:style-name="Table_20_Contents">6D</text:p>
          </table:table-cell>
          <table:table-cell table:style-name="TableRowCell" office:value-type="string">
            <text:p text:style-name="Table_20_Contents">0.1081</text:p>
          </table:table-cell>
          <table:table-cell table:style-name="TableRowCell" office:value-type="string">
            <text:p text:style-name="Table_20_Contents">2D</text:p>
          </table:table-cell>
          <table:table-cell table:style-name="TableRowCell" office:value-type="string">
            <text:p text:style-name="Table_20_Contents">0.0066</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C</text:p>
          </table:table-cell>
          <table:table-cell table:style-name="TableRowCell" office:value-type="string">
            <text:p text:style-name="Table_20_Contents">26.7029</text:p>
          </table:table-cell>
          <table:table-cell table:style-name="TableRowCell" office:value-type="string">
            <text:p text:style-name="Table_20_Contents">AC</text:p>
          </table:table-cell>
          <table:table-cell table:style-name="TableRowCell" office:value-type="string">
            <text:p text:style-name="Table_20_Contents">1.6689</text:p>
          </table:table-cell>
          <table:table-cell table:style-name="TableRowCell" office:value-type="string">
            <text:p text:style-name="Table_20_Contents">6C</text:p>
          </table:table-cell>
          <table:table-cell table:style-name="TableRowCell" office:value-type="string">
            <text:p text:style-name="Table_20_Contents">0.1043</text:p>
          </table:table-cell>
          <table:table-cell table:style-name="TableRowCell" office:value-type="string">
            <text:p text:style-name="Table_20_Contents">2C</text:p>
          </table:table-cell>
          <table:table-cell table:style-name="TableRowCell" office:value-type="string">
            <text:p text:style-name="Table_20_Contents">0.006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B</text:p>
          </table:table-cell>
          <table:table-cell table:style-name="TableRowCell" office:value-type="string">
            <text:p text:style-name="Table_20_Contents">25.7492</text:p>
          </table:table-cell>
          <table:table-cell table:style-name="TableRowCell" office:value-type="string">
            <text:p text:style-name="Table_20_Contents">AB</text:p>
          </table:table-cell>
          <table:table-cell table:style-name="TableRowCell" office:value-type="string">
            <text:p text:style-name="Table_20_Contents">1.6093</text:p>
          </table:table-cell>
          <table:table-cell table:style-name="TableRowCell" office:value-type="string">
            <text:p text:style-name="Table_20_Contents">6B</text:p>
          </table:table-cell>
          <table:table-cell table:style-name="TableRowCell" office:value-type="string">
            <text:p text:style-name="Table_20_Contents">0.1006</text:p>
          </table:table-cell>
          <table:table-cell table:style-name="TableRowCell" office:value-type="string">
            <text:p text:style-name="Table_20_Contents">2B</text:p>
          </table:table-cell>
          <table:table-cell table:style-name="TableRowCell" office:value-type="string">
            <text:p text:style-name="Table_20_Contents">0.006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text:p>
          </table:table-cell>
          <table:table-cell table:style-name="TableRowCell" office:value-type="string">
            <text:p text:style-name="Table_20_Contents">24.7955</text:p>
          </table:table-cell>
          <table:table-cell table:style-name="TableRowCell" office:value-type="string">
            <text:p text:style-name="Table_20_Contents">AA</text:p>
          </table:table-cell>
          <table:table-cell table:style-name="TableRowCell" office:value-type="string">
            <text:p text:style-name="Table_20_Contents">1.5497</text:p>
          </table:table-cell>
          <table:table-cell table:style-name="TableRowCell" office:value-type="string">
            <text:p text:style-name="Table_20_Contents">6A</text:p>
          </table:table-cell>
          <table:table-cell table:style-name="TableRowCell" office:value-type="string">
            <text:p text:style-name="Table_20_Contents">0.0969</text:p>
          </table:table-cell>
          <table:table-cell table:style-name="TableRowCell" office:value-type="string">
            <text:p text:style-name="Table_20_Contents">2A</text:p>
          </table:table-cell>
          <table:table-cell table:style-name="TableRowCell" office:value-type="string">
            <text:p text:style-name="Table_20_Contents">0.0056</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text:p>
          </table:table-cell>
          <table:table-cell table:style-name="TableRowCell" office:value-type="string">
            <text:p text:style-name="Table_20_Contents">23.8419</text:p>
          </table:table-cell>
          <table:table-cell table:style-name="TableRowCell" office:value-type="string">
            <text:p text:style-name="Table_20_Contents">A9</text:p>
          </table:table-cell>
          <table:table-cell table:style-name="TableRowCell" office:value-type="string">
            <text:p text:style-name="Table_20_Contents">1.4901</text:p>
          </table:table-cell>
          <table:table-cell table:style-name="TableRowCell" office:value-type="string">
            <text:p text:style-name="Table_20_Contents">69</text:p>
          </table:table-cell>
          <table:table-cell table:style-name="TableRowCell" office:value-type="string">
            <text:p text:style-name="Table_20_Contents">0.0931</text:p>
          </table:table-cell>
          <table:table-cell table:style-name="TableRowCell" office:value-type="string">
            <text:p text:style-name="Table_20_Contents">29</text:p>
          </table:table-cell>
          <table:table-cell table:style-name="TableRowCell" office:value-type="string">
            <text:p text:style-name="Table_20_Contents">0.005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text:p>
          </table:table-cell>
          <table:table-cell table:style-name="TableRowCell" office:value-type="string">
            <text:p text:style-name="Table_20_Contents">22.8882</text:p>
          </table:table-cell>
          <table:table-cell table:style-name="TableRowCell" office:value-type="string">
            <text:p text:style-name="Table_20_Contents">A8</text:p>
          </table:table-cell>
          <table:table-cell table:style-name="TableRowCell" office:value-type="string">
            <text:p text:style-name="Table_20_Contents">1.4305</text:p>
          </table:table-cell>
          <table:table-cell table:style-name="TableRowCell" office:value-type="string">
            <text:p text:style-name="Table_20_Contents">68</text:p>
          </table:table-cell>
          <table:table-cell table:style-name="TableRowCell" office:value-type="string">
            <text:p text:style-name="Table_20_Contents">0.0894</text:p>
          </table:table-cell>
          <table:table-cell table:style-name="TableRowCell" office:value-type="string">
            <text:p text:style-name="Table_20_Contents">28</text:p>
          </table:table-cell>
          <table:table-cell table:style-name="TableRowCell" office:value-type="string">
            <text:p text:style-name="Table_20_Contents">0.005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7</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Chapter 3 Sound Function</text:p>
      <text:p text:style-name="Text_20_body">D4 | 9.5367 94 | 0.5950 54 | 0.0373 14 | 0.0023 D3 | 9.0598 93 | 0.5662 53 | 0.0354 13 | 0.0022 D2 | 8.5831 92 | 0.5364 52 | 0.0335 12 | 0.0021 D1 | 8.1062 91 | 0.5086 51 | 0.0317 11 | 0.0020 D0 | 7.6294 90 | 0.4768 50 | 0.0298 10 | 0.0019 CF | 7.3910 8F | 0.4619 4F | 0.0289 0F | 0.0018 CE | 7.1526 8E | 0.4470 4E | 0.0279 0E | 0.0017 CD | 6.9141 8D | 0.4321 4D | 0.0270 0D | 0.0017 CC | 6.8757 8C | 0.4172 4C | 0.0261 0C | 0.0016 CB | 6.4373 8B | 0.4023 4B | 0.0251 0B | 0.0016 CA | 6.1989 8A | 0.3874 4A | 0.0242 0A | 0.0015 C9 | 5.9605 89 | 0.3725 49 | 0.0233 09 | 0.0015 C8 | 5.7220 88 | 0.3576 48 | 0.0224 08 | 0.0014 C7 | 5.4836 87 | 0.3427 47 | 0.0214 07 | 0.0013 C6 | 5.2452 86 | 0.3278 46 | 0.0205 06 | 0.0013 C5 | 5.0068 85 | 0.3129 45 | 0.0196 05 | 0.0012 C4 | 4.7684 84 | 0.2980 44 | 0.0186 04 | 0.0012 C3 | 4.5300 83 | 0.2831 43 | 0.0177 03 | 0.0011 C2 | 4.2915 82 | 0.2682 42 | 0.0168 02 | 0.0010 C1 | 4.0531 81 | 0.2533 41 | 0.0158 01 | 0.0010 C0 | 3.8147 80 | 0.2384 40 | 0.0149 00 | 0.0009</text:p>
      <text:p text:style-name="Text_20_body">Table 3-15 LFO</text:p>
      <text:p text:style-name="Text_20_body">Waveform diagram labels: (W) (PM) (AM) 3 (NOISE) (NOISE)</text:p>
      <text:p text:style-name="Text_20_body">Figure 3-5 WAVE FORM</text:p>
      <text:list text:style-name="Numbering_20_1">
        <text:list-item>
          <text:p text:style-name="List_20_Number_20_Tight">FM Sound Source</text:p>
        </text:list-item>
      </text:list>
      <text:list text:style-name="List_20_1">
        <text:list-item>
          <text:p text:style-name="List_20_Bullet_20_Tight">PMD: PHASE MODULATION DEPTH</text:p>
        </text:list-item>
        <text:list-item>
          <text:p text:style-name="List_20_Bullet_20_Tight">AMD: AMPLITUDE MODULATION DEPTH</text:p>
        </text:list-item>
      </text:list>
      <text:p text:style-name="Preformatted_20_Text"><text:s text:c="10"/>D7 D6 D5 D4 D3 D2 D1 D0</text:p>
      <text:p text:style-name="Preformatted_20_Text"><text:s text:c="3"/>19H <text:s text:c="2"/>[ <text:s text:c="7"/>PMD/AMD]</text:p>
      <text:p text:style-name="Preformatted_20_Text"><text:s text:c="35"/>F=1 : PMD</text:p>
      <text:p text:style-name="Preformatted_20_Text"><text:s text:c="35"/>F=0 : AMD</text:p>
      <text:p text:style-name="First_20_paragraph">Each data has 7 bits, and the data is distinguished by assigning the highest bit to PMD or AMD. PMD/AMD controls the output level of phase modulation (or amplitude modulation) with a 1/128 resolution. The output controlled by PMD consists of 2's complement numbers, while the output controlled by AMD is in binary form.</text:p>
      <text:list text:style-name="List_20_1">
        <text:list-item>
          <text:p text:style-name="List_20_Bullet_20_Tight">TEST (LFO RESET)</text:p>
        </text:list-item>
      </text:list>
      <text:p text:style-name="Preformatted_20_Text"><text:s text:c="10"/>D7 D6 D5 D4 D3 D2 D1 D0</text:p>
      <text:p text:style-name="Preformatted_20_Text"><text:s text:c="3"/>01H <text:s text:c="2"/>[ <text:s text:c="8"/>TEST]</text:p>
      <text:p text:style-name="Preformatted_20_Text"><text:s text:c="30"/>LFO RESET</text:p>
      <text:p text:style-name="First_20_paragraph">TEST is a signal provided for testing purposes. Among these, when "1" is written once to the LFO RESET bit (D1) at key-on and "0" is written again, it resets the output waveform of the LFO, as shown in FIGs. 3 to 5, and restarts from the left-end part of the waveform. This allows synchronization of the timing at key-on for each modulation.</text:p>
      <text:list text:style-name="List_20_1">
        <text:list-item>
          <text:p text:style-name="List_20_Bullet_20_Tight">Caution: Since it is used for testing purposes, writing data with level "1" to any bit other than the specified bit (D1) will make the device enter test mode. Please be careful.</text:p>
        </text:list-item>
      </text:list>
      <text:p text:style-name="First_20_paragraph">&lt;ACC: ACCUMULATOR&gt;</text:p>
      <text:p text:style-name="Text_20_body">Receiving the L and R control signals from the register, the musical sound signal data from the OP is accumulated in the L series, R series, or both series simultaneously. The accumulated L and R signals are output as two-series signals alternately, with a mantissa part of 10 bits (including the sign bit) and an offset of the exponent part of 3 bits, in binary format, serially from the LSB.</text:p>
      <text:p text:style-name="Text_20_body">Chapter 3: Sound Functions</text:p>
      <text:list text:style-name="List_20_1">
        <text:list-item>
          <text:p text:style-name="List_20_Bullet_20_Tight">LR: LEFT CH. ENABLE/RIGHT CH. ENABLE</text:p>
        </text:list-item>
      </text:list>
      <text:p text:style-name="Preformatted_20_Text"><text:s text:c="3"/>D7 D6 D5 D4 D3 D2 D1 D0</text:p>
      <text:p text:style-name="Preformatted_20_Text"><text:s text:c="2"/>-------------------------</text:p>
      <text:p text:style-name="First_20_paragraph">20H | LR FL CON |</text:p>
      <text:p text:style-name="Preformatted_20_Text"><text:s text:c="2"/>-------------------------</text:p>
      <text:p text:style-name="Preformatted_20_Text"><text:s text:c="2"/>| LEFT CH. ENABLE 1: Enable</text:p>
      <text:p text:style-name="Preformatted_20_Text"><text:s text:c="2"/>| <text:s text:c="15"/>0: Disable</text:p>
      <text:p text:style-name="Preformatted_20_Text"><text:s text:c="2"/>| RIGHT CH. ENABLE <text:s text:c="1"/>1: Enable</text:p>
      <text:p text:style-name="Preformatted_20_Text"><text:s text:c="2"/>| <text:s text:c="15"/>0: Disable</text:p>
      <text:p text:style-name="First_20_paragraph">When there are signals from bit 2 and bit OP, they are divided into L series and R series, or both series are input to the accumulation rate simultaneously as control signals.</text:p>
      <text:p text:style-name="Text_20_body">Two timers: 10-bit timer A and 8-bit timer B (each can be preset). They have functions to start, stop, and set flags in the data bus during overflow and require interrupt requests to process these events. Timer A also has a function to generate interrupt requests during overflow within the device. This allows for stopping interrupt requests.</text:p>
      <text:list text:style-name="List_20_1">
        <text:list-item>
          <text:p text:style-name="List_20_Bullet_20_Tight">CLKA1/CLKA2</text:p>
        </text:list-item>
      </text:list>
      <text:p text:style-name="Preformatted_20_Text"><text:s text:c="3"/>D7 D6 D5 D4 D3 D2 D1 D0</text:p>
      <text:p text:style-name="Preformatted_20_Text"><text:s text:c="2"/>-------------------------</text:p>
      <text:p text:style-name="First_20_paragraph">10H | CLKA1 | X X X X 11H | CLKA2 | | NA |&lt;-------------------------&gt;| (As it is connected, combining CLKA1 and CLKA2 = 10 bits) | CLKA1 | | CLKA2 | (Clock frequencies added using 4000kHz YM2151) Combining the above two words into 10 bits forms Timer A, which generates an overflow at the period indicated by the following formula. NA is derived as shown in the diagram connecting CLKA1 and CLKA2.</text:p>
      <text:p text:style-name="Preformatted_20_Text"><text:s text:c="8"/>64 x (1024 - NA)</text:p>
      <text:p text:style-name="First_20_paragraph">TA (ms) = ----------------------</text:p>
      <text:p text:style-name="Preformatted_20_Text"><text:s text:c="20"/>fM (kHz)</text:p>
      <text:p text:style-name="Preformatted_20_Text"/>
      <text:p text:style-name="Preformatted_20_Text"><text:s text:c="1"/>* Note: fM (kHz) = 4000 kHz (added clock frequency for YM2151)</text:p>
      <text:p text:style-name="First_20_paragraph">Page 108</text:p>
      <text:list text:style-name="Numbering_20_1">
        <text:list-item>
          <text:p text:style-name="List_20_Number_20_Tight">FM Sound Source</text:p>
        </text:list-item>
      </text:list>
      <text:list text:style-name="List_20_1">
        <text:list-item>
          <text:p text:style-name="List_20_Bullet_20_Tight">CLKB</text:p>
        </text:list-item>
      </text:list>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column table:style-name="Table45.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12H</text:p>
          </table:table-cell>
          <table:table-cell table:style-name="TableRowCell" office:value-type="string">
            <text:p text:style-name="Table_20_Contents">CLK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Given 8 bits, Timer B overflows with the following period:</text:p>
      <text:p text:style-name="Text_20_body">[ TB (\text{ms}) = \frac{1024 \times (256 - \text{CLKB})}{fM (\text{kHz})} ]</text:p>
      <text:p text:style-name="Text_20_body">Note: ( fM (\text{kHz}) = 4000 \text{kHz (Clock frequency added to YM2151)} )</text:p>
      <text:list text:style-name="List_20_1">
        <text:list-item>
          <text:p text:style-name="List_20_Bullet_20_Tight">LOAD</text:p>
        </text:list-item>
      </text:list>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column table:style-name="Table46.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14H</text:p>
          </table:table-cell>
          <table:table-cell table:style-name="TableRowCell" office:value-type="string">
            <text:p text:style-name="Table_20_Contents">x</text:p>
          </table:table-cell>
          <table:table-cell table:style-name="TableRowCell" office:value-type="string">
            <text:p text:style-name="Table_20_Contents">LOA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Timer A Stop (0)</text:p>
          </table:table-cell>
          <table:table-cell table:style-name="TableRowCell" office:value-type="string">
            <text:p text:style-name="Table_20_Contents">Timer A Start (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Timer B Stop (0)</text:p>
          </table:table-cell>
          <table:table-cell table:style-name="TableRowCell" office:value-type="string">
            <text:p text:style-name="Table_20_Contents">Timer B Start (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Using 2 bits, controls the start/stop of Timers A and B. "1" to start, "0" to stop.</text:p>
      <text:list text:style-name="List_20_1">
        <text:list-item>
          <text:p text:style-name="List_20_Bullet_20_Tight">F RESET</text:p>
        </text:list-item>
      </text:list>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column table:style-name="Table47.G"/>
        <table:table-column table:style-name="Table47.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14H</text:p>
          </table:table-cell>
          <table:table-cell table:style-name="TableRowCell" office:value-type="string">
            <text:p text:style-name="Table_20_Contents">x</text:p>
          </table:table-cell>
          <table:table-cell table:style-name="TableRowCell" office:value-type="string">
            <text:p text:style-name="Table_20_Contents">F RESE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Timer A Flag Register Rese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Timer B Flag Register Rese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hese 2 bits reset the contents of the flag register indicating that each timer described above has overflowed (reset with "1").</text:p>
      <text:p text:style-name="Text_20_body">Chapter 3 Sound Functions</text:p>
      <text:list text:style-name="List_20_1">
        <text:list-item>
          <text:p text:style-name="List_20_Bullet_20_Tight">IRQEN</text:p>
        </text:list-item>
      </text:list>
      <text:p text:style-name="First_20_paragraph">14H: D7 D6 D5 D4 D3 D2 D1 D0 X IRQEN Timer A IRQEN Timer B IRQEN</text:p>
      <text:p text:style-name="Text_20_body">These 2 bits register overflow occurrence from the timers into the flag register. Interrupt requests can also be made.</text:p>
      <text:list text:style-name="List_20_1">
        <text:list-item>
          <text:p text:style-name="List_20_Bullet_20_Tight">CSM</text:p>
        </text:list-item>
      </text:list>
      <text:p text:style-name="First_20_paragraph">14H: D7 D6 D5 D4 D3 D2 D1 D0 CSM X Timer A</text:p>
      <text:p text:style-name="Text_20_body">By writing “1”, all sound slots are key-on when an overflow from timer A occurs.</text:p>
      <text:p text:style-name="Text_20_body">&lt;B: WRITE Busy FLAG (READ MODE)&gt;</text:p>
      <text:p text:style-name="Preformatted_20_Text">B:</text:p>
      <text:p text:style-name="Preformatted_20_Text">D7 D6 D5 D4 D3 D2 D1 D0</text:p>
      <text:p text:style-name="First_20_paragraph">X X X X X X X X</text:p>
      <text:p text:style-name="Text_20_body">This 1 bit is a flag indicating that it is in the middle of writing. The 68 bit time is needed from receiving the write command until the writing is completed. During this period, this flag becomes “1”. When writing data continuously, this flag must be read and confirmed to be “0” before writing the next data.</text:p>
      <text:p text:style-name="Text_20_body">Page 110</text:p>
      <text:p text:style-name="Text_20_body"><text:span text:style-name="Strong_20_Emphasis">&lt;IST (READ MODE)&gt;</text:span></text:p>
      <text:p text:style-name="Text_20_body"><text:span text:style-name="Strong_20_Emphasis">(Diagram depicting binary register)</text:span> | D7 | D6 | D5 | D4 | D3 | D2 | D1 | D0 | | X | X | X | X | X | |IST |</text:p>
      <text:p text:style-name="Text_20_body"><text:span text:style-name="Strong_20_Emphasis">IST Description:</text:span> Timer B Flag Timer A Flag</text:p>
      <text:p text:style-name="Text_20_body">These 2 bits indicate the status of the flag register. When the pin terminal IRQ is in a "0" state, it indicates that one of the two flag register bits is in a "1" state due to an overflow from Timer A or Timer B.</text:p>
      <text:p text:style-name="Text_20_body"><text:span text:style-name="Strong_20_Emphasis">1-7 Method of Compensation When the System Clock is 4 MHz</text:span> (For using YM2203 data in YM2151)</text:p>
      <text:p text:style-name="Text_20_body">The YM2151's tone scale is determined by the KC (KEY CODE; FM tone generator internal register 28H~2FH) and KP (KEY FRACTION; internal register 30H~37H), but when the YM2151 has a system clock of 3.579545 MHz, it stores data within the device such that the value of KF is zero. Therefore, when the system clock is 3.579545 MHz, the tone scale is determined by setting KC and changing the value.</text:p>
      <text:p text:style-name="Text_20_body"><text:span text:style-name="Strong_20_Emphasis">(Diagram depicting binary register</text:span> | D7 | D6 | D5 | D4 | D3 | D2 | D1 | D0 | | 28H| X | | OCT | NOTE | | 2FH| X | | (0~7) |</text:p>
      <text:p text:style-name="Text_20_body"><text:span text:style-name="Strong_20_Emphasis">Table 3-16 Relationship of KC and Tone Frequency when KF=0 (3.579545 MHz Clock)</text:span></text:p>
      <text:p text:style-name="Text_20_body">| NOTE | C# | D | D# | E | F | F# | G | G# | A | A# | B | C | | |-----|----|----|----|----|----|----|----|----|----|----|----|----| | 0 | 1 | 2 | 3 | 4 | 5 | 6 | 7 | 8 | 9 | 10 | 11| 12|</text:p>
      <text:p text:style-name="Text_20_body">However, if you change the system clock, the tone scale value indicated will deviate.</text:p>
      <text:p text:style-name="Text_20_body">Chapter 3: Sound Functions</text:p>
      <text:p text:style-name="Text_20_body">log (fMX/fM) × 1200 [cents]</text:p>
      <text:p text:style-name="Text_20_body">log (2) fMX: New system clock frequency</text:p>
      <text:p text:style-name="Preformatted_20_Text"><text:s text:c="19"/>4 MHz</text:p>
      <text:p text:style-name="Preformatted_20_Text"><text:s text:c="19"/>fM : 3.579545 MHz</text:p>
      <text:p text:style-name="First_20_paragraph">1 cent: 1/100 [semitone]</text:p>
      <text:p text:style-name="Text_20_body">Now, if fMX = 4 MHz,</text:p>
      <text:p text:style-name="Text_20_body">log (4/3.579545) × 1200 = 192.27 [cents] log 2</text:p>
      <text:p text:style-name="Text_20_body">That is, if the system clock frequency is changed from 3.579545 MHz to 4 MHz, the pitch will increase by approximately 192.27 cents.</text:p>
      <text:p text:style-name="Text_20_body">■Correction Method If the system clock frequency is changed from 3.759545 MHz to 4 MHz and KC and KF are not adjusted, there will be an automatic increase in pitch by approximately 192.27 cents. Therefore, by adjusting the value of KF to correct the pitch deviation to approximately 200 cents, the pitch level will be raised by 1 semitone, and the new pitch levels according to the KC NOTE table will be as shown below.</text:p>
      <text:p text:style-name="Text_20_body">KC's Frequency Frequency KC's NOTE 3.579545 MHz at 4 MHz Value</text:p>
      <text:p text:style-name="Preformatted_20_Text">0 <text:s text:c="13"/>C# <text:s text:c="15"/>D# <text:s text:c="14"/>6 <text:s text:c="7"/>200.56</text:p>
      <text:p text:style-name="Preformatted_20_Text">1 <text:s text:c="14"/>D <text:s text:c="16"/>E <text:s text:c="16"/>5 <text:s text:c="7"/>198.98</text:p>
      <text:p text:style-name="Preformatted_20_Text">2 <text:s text:c="13"/>D# <text:s text:c="15"/>F <text:s text:c="16"/>6 <text:s text:c="7"/>200.71</text:p>
      <text:p text:style-name="Preformatted_20_Text">4 <text:s text:c="14"/>E <text:s text:c="16"/>F# <text:s text:c="14"/>5 <text:s text:c="7"/>199.06</text:p>
      <text:p text:style-name="Preformatted_20_Text">5 <text:s text:c="14"/>F <text:s text:c="16"/>G <text:s text:c="16"/>5 <text:s text:c="7"/>199.79</text:p>
      <text:p text:style-name="Preformatted_20_Text">6 <text:s text:c="13"/>F# <text:s text:c="15"/>G# <text:s text:c="14"/>5 <text:s text:c="7"/>199.37</text:p>
      <text:p text:style-name="Preformatted_20_Text">8 <text:s text:c="14"/>G <text:s text:c="15"/>A <text:s text:c="16"/>5 <text:s text:c="7"/>199.81</text:p>
      <text:p text:style-name="Preformatted_20_Text">9 <text:s text:c="13"/>G# <text:s text:c="14"/>A# <text:s text:c="14"/>4 <text:s text:c="7"/>198.90</text:p>
      <text:p text:style-name="Preformatted_20_Text">10 <text:s text:c="13"/>A <text:s text:c="16"/>B <text:s text:c="16"/>5 <text:s text:c="7"/>199.73</text:p>
      <text:p text:style-name="Preformatted_20_Text">12 <text:s text:c="12"/>A# <text:s text:c="15"/>C <text:s text:c="16"/>6 <text:s text:c="7"/>200.02</text:p>
      <text:p text:style-name="Preformatted_20_Text">13 <text:s text:c="13"/>B <text:s text:c="16"/>C# <text:s text:c="14"/>5 <text:s text:c="7"/>199.19</text:p>
      <text:p text:style-name="Preformatted_20_Text">14 <text:s text:c="13"/>C <text:s text:c="16"/>D <text:s text:c="16"/>5 <text:s text:c="7"/>199.80</text:p>
      <text:p text:style-name="First_20_paragraph">Table 3-17 Differences in Pitch Due to Clock Frequency</text:p>
      <text:p text:style-name="Text_20_body">Therefore, at 4 MHz, the relationship between the KC value and pitch is as follows.</text:p>
      <text:p text:style-name="Text_20_body">![Diagram]</text:p>
      <text:p text:style-name="Preformatted_20_Text"><text:s text:c="10"/>D7 <text:s text:c="1"/>D6 D5 D4 D3 D2 D1 D0</text:p>
      <text:p text:style-name="First_20_paragraph">28H × OCT NOTE 2F(H) (0~7)</text:p>
      <text:p text:style-name="Text_20_body">NOTE D# E F F# G G# A A# B C C# D 0 1 2 3 4 5 6 7 8 9 10 11 12 13 14</text:p>
      <text:p text:style-name="Text_20_body">Table 3-18 Relationship between KC and pitch when KF = 0 (at 4 MHz clock)</text:p>
      <text:p text:style-name="Text_20_body">Also, due to changes in the system clock, the lowest pitch within the same octave becomes D#. Thereafter, E, F, F# ... become higher, and D becomes even higher. Therefore, the output frequency range shifts from D# of octave 0 to D of octave 1, and compared to the case of a system clock of 3.579545 MHz, one sound lower is produced instead of one sound.</text:p>
      <text:p text:style-name="Text_20_body">![Diagram]</text:p>
      <text:p text:style-name="Preformatted_20_Text"><text:s text:c="8"/>Octave 0 <text:s text:c="35"/>Octave 1</text:p>
      <text:p text:style-name="Preformatted_20_Text"><text:s text:c="7"/>D# <text:s text:c="44"/>D</text:p>
      <text:p text:style-name="First_20_paragraph">4 MHz frequency range C# 3.579545 MHz frequency range</text:p>
      <text:p text:style-name="Preformatted_20_Text"><text:s text:c="39"/>C</text:p>
      <text:p text:style-name="Preformatted_20_Text"><text:s text:c="16"/>1 tone <text:s text:c="21"/>1 tone</text:p>
      <text:p text:style-name="First_20_paragraph">Figure 3-6 Difference in frequency range due to clock frequency</text:p>
      <text:p text:style-name="Text_20_body">Chapter 3: Sound Functions</text:p>
      <text:list text:style-name="Numbering_20_1" text:start-value="2">
        <text:list-item>
          <text:p text:style-name="List_20_Number_20_Tight">Sound Synthesis</text:p>
        </text:list-item>
      </text:list>
      <text:p text:style-name="First_20_paragraph">The X68000 uses the MSM6258 in the ADPCM format as the sound synthesis LSI. In addition, PCM output control and sample rate switching are performed on port C of the 8255.</text:p>
      <text:p text:style-name="Text_20_body">This LSI performs operations such as sound synthesis using S&amp;H (Sampling &amp; Hold), AD converter to PCM (Pulse Code Modulation) code conversion using ADPCM (Adaptive Differential PCM), where signal differences in consecutive samples are quantized and encoded to compress the information.</text:p>
      <text:p text:style-name="Text_20_body">For synthesis, the reverse process is performed, restoring the original analog sound using a digital-to-analog converter (DAC).</text:p>
      <text:p text:style-name="Text_20_body">In the sound synthesis of the X68000, the audio signal input from the line-in terminal is first converted to A/D. This data is stored in memory, then converted back from memory to D/A converting the data to audio signal, and then outputted from the line-out terminal. If the sample rate is 7.8 kHz, an audio signal for 1 minute is converted into approximately 229 Kbytes of A/D conversion data.</text:p>
      <text:p text:style-name="Text_20_body">2-1 Features</text:p>
      <text:p text:style-name="Text_20_body">(1) Straight 4-bit ADPCM format (2) Built-in ADPCM recording/playback function (3) Built-in DRAM refresh, MPU interface circuit (4) Sampling frequencies: 3.9, 5.2, 7.8 kHz (5) Master clock frequency: 4 MHz (6) Built-in A/D converter: 8 bits (7) Built-in D/A converter: 10 bits (8) D/A output format: Class A (voltage type)</text:p>
      <text:p text:style-name="Text_20_body">Page 114</text:p>
      <text:p text:style-name="Text_20_body">2-2 Address Map of Sound Synthesis Registers</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column table:style-name="Table48.H"/>
        <table:table-column table:style-name="Table48.I"/>
        <table:table-column table:style-name="Table48.J"/>
        <table:table-header-rows>
          <table:table-row>
            <table:table-cell table:style-name="TableHeaderRowCell" office:value-type="string">
              <text:p text:style-name="Table_20_Heading">Register Address</text:p>
            </table:table-cell>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E92001H</text:p>
          </table:table-cell>
          <table:table-cell table:style-name="TableRowCell" office:value-type="string">
            <text:p text:style-name="Table_20_Contents">READ</text:p>
          </table:table-cell>
          <table:table-cell table:style-name="TableRowCell" office:value-type="string">
            <text:p text:style-name="Table_20_Contents">REC/</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ADPCM Status</text:p>
          </table:table-cell>
        </table:table-row>
        <table:table-row>
          <table:table-cell table:style-name="TableRowCell" office:value-type="string">
    </table:table-cell>
          <table:table-cell table:style-name="TableRowCell" office:value-type="string">
            <text:p text:style-name="Table_20_Contents">WRITE</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REC ST</text:p>
          </table:table-cell>
          <table:table-cell table:style-name="TableRowCell" office:value-type="string">
            <text:p text:style-name="Table_20_Contents">PLAY ST</text:p>
          </table:table-cell>
          <table:table-cell table:style-name="TableRowCell" office:value-type="string">
            <text:p text:style-name="Table_20_Contents">SP</text:p>
          </table:table-cell>
          <table:table-cell table:style-name="TableRowCell" office:value-type="string">
            <text:p text:style-name="Table_20_Contents">ADPCM Command</text:p>
          </table:table-cell>
          <table:table-cell table:style-name="TableRowCell" office:value-type="string">
    </table:table-cell>
        </table:table-row>
        <table:table-row>
          <table:table-cell table:style-name="TableRowCell" office:value-type="string">
            <text:p text:style-name="Table_20_Contents">E92003H</text:p>
          </table:table-cell>
          <table:table-cell table:style-name="TableRowCell" office:value-type="string">
            <text:p text:style-name="Table_20_Contents">READ</text:p>
          </table:table-cell>
          <table:table-cell table:style-name="TableRowCell" office:value-type="string">
            <text:p text:style-name="Table_20_Contents">B3</text:p>
          </table:table-cell>
          <table:table-cell table:style-name="TableRowCell" office:value-type="string">
            <text:p text:style-name="Table_20_Contents">B2</text:p>
          </table:table-cell>
          <table:table-cell table:style-name="TableRowCell" office:value-type="string">
            <text:p text:style-name="Table_20_Contents">B1</text:p>
          </table:table-cell>
          <table:table-cell table:style-name="TableRowCell" office:value-type="string">
            <text:p text:style-name="Table_20_Contents">B0</text:p>
          </table:table-cell>
          <table:table-cell table:style-name="TableRowCell" office:value-type="string">
            <text:p text:style-name="Table_20_Contents">B3</text:p>
          </table:table-cell>
          <table:table-cell table:style-name="TableRowCell" office:value-type="string">
            <text:p text:style-name="Table_20_Contents">B2</text:p>
          </table:table-cell>
          <table:table-cell table:style-name="TableRowCell" office:value-type="string">
            <text:p text:style-name="Table_20_Contents">B1</text:p>
          </table:table-cell>
          <table:table-cell table:style-name="TableRowCell" office:value-type="string">
            <text:p text:style-name="Table_20_Contents">Input Data</text:p>
          </table:table-cell>
        </table:table-row>
        <table:table-row>
          <table:table-cell table:style-name="TableRowCell" office:value-type="string">
    </table:table-cell>
          <table:table-cell table:style-name="TableRowCell" office:value-type="string">
            <text:p text:style-name="Table_20_Contents">WRITE</text:p>
          </table:table-cell>
          <table:table-cell table:style-name="TableRowCell" office:value-type="string">
            <text:p text:style-name="Table_20_Contents">Output Dat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A005H</text:p>
          </table:table-cell>
          <table:table-cell table:style-name="TableRowCell" office:value-type="string">
            <text:p text:style-name="Table_20_Contents">WRITE</text:p>
          </table:table-cell>
          <table:table-cell table:style-name="TableRowCell" office:value-type="string">
            <text:p text:style-name="Table_20_Contents">IOC7</text:p>
          </table:table-cell>
          <table:table-cell table:style-name="TableRowCell" office:value-type="string">
            <text:p text:style-name="Table_20_Contents">IOC6</text:p>
          </table:table-cell>
          <table:table-cell table:style-name="TableRowCell" office:value-type="string">
            <text:p text:style-name="Table_20_Contents">IOC5</text:p>
          </table:table-cell>
          <table:table-cell table:style-name="TableRowCell" office:value-type="string">
            <text:p text:style-name="Table_20_Contents">IOC4</text:p>
          </table:table-cell>
          <table:table-cell table:style-name="TableRowCell" office:value-type="string">
            <text:p text:style-name="Table_20_Contents">Sampling Rate</text:p>
          </table:table-cell>
          <table:table-cell table:style-name="TableRowCell" office:value-type="string">
            <text:p text:style-name="Table_20_Contents">PCM PAN</text:p>
          </table:table-cell>
          <table:table-cell table:style-name="TableRowCell" office:value-type="string">
            <text:p text:style-name="Table_20_Contents">ADPCM Output/Sampling Frequency Switching</text:p>
          </table:table-cell>
          <table:table-cell table:style-name="TableRowCell" office:value-type="string">
    </table:table-cell>
        </table:table-row>
        <table:table-row>
          <table:table-cell table:style-name="TableRowCell" office:value-type="string">
            <text:p text:style-name="Table_20_Contents">E92003H (E90001H = 1BH)</text:p>
          </table:table-cell>
          <table:table-cell table:style-name="TableRowCell" office:value-type="string">
            <text:p text:style-name="Table_20_Contents">WRITE</text:p>
          </table:table-cell>
          <table:table-cell table:style-name="TableRowCell" office:value-type="string">
            <text:p text:style-name="Table_20_Contents">CT2</text:p>
          </table:table-cell>
          <table:table-cell table:style-name="TableRowCell" office:value-type="string">
            <text:p text:style-name="Table_20_Contents">CT1</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WAVE FORM</text:p>
          </table:table-cell>
          <table:table-cell table:style-name="TableRowCell" office:value-type="string">
            <text:p text:style-name="Table_20_Contents">ADPCM Clock Switch (FM Sound Register Port)</text:p>
          </table:table-cell>
        </table:table-row>
      </table:table>
      <text:p text:style-name="First_20_paragraph">Table 3-19 Sound Synthesis Register Address Map</text:p>
      <text:p text:style-name="Text_20_body">2-3 Details of Sound Synthesis Registers</text:p>
      <text:p text:style-name="Text_20_body">(1) ADPCM Status (READ)</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column table:style-name="Table49.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
      <text:p text:style-name="First_20_paragraph">0: ADPCM PLAY in progress 1: ADPCM RECORD in progress</text:p>
      <text:p text:style-name="Text_20_body">(2) ADPCM Command (WRITE)</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0: ADPCM RECORD/PLAY stopped 1: ADPCM RECORD/PLAY completed 0: ADPCM PLAY not started 1: ADPCM PLAY started 0: ADPCM RECORD not started 1: ADPCM RECORD started</text:p>
      <text:p text:style-name="Text_20_body">Page 115</text:p>
      <text:p text:style-name="Text_20_body">Chapter 3 Sound Functions</text:p>
      <text:p text:style-name="Text_20_body">(3) ADPCM Sound Data (READ/WRITE) E92003H</text:p>
      <text:p text:style-name="Preformatted_20_Text">D7 <text:s text:c="2"/>D6 <text:s text:c="1"/>D5 <text:s text:c="1"/>D4 <text:s text:c="1"/>D3 <text:s text:c="1"/>D2 <text:s text:c="1"/>D1 <text:s text:c="1"/>D0</text:p>
      <text:p text:style-name="Preformatted_20_Text"><text:s text:c="1"/>B3 <text:s text:c="1"/>B2 <text:s text:c="1"/>B1 <text:s text:c="1"/>B0 </text:p>
      <text:p text:style-name="Preformatted_20_Text"><text:s text:c="1"/></text:p>
      <text:p text:style-name="Preformatted_20_Text"><text:s text:c="1"/>B3: Sign Bits</text:p>
      <text:p text:style-name="Preformatted_20_Text"><text:s text:c="1"/>B2: MSB</text:p>
      <text:p text:style-name="Preformatted_20_Text"><text:s text:c="1"/>B1: SSB</text:p>
      <text:p text:style-name="Preformatted_20_Text"><text:s text:c="1"/>B0: LSB</text:p>
      <text:p text:style-name="First_20_paragraph">(4) ADPCM Output (PLAY only) / Switching Sampling Frequency (WRITE)</text:p>
      <text:list text:style-name="List_20_1">
        <text:list-item>
          <text:p text:style-name="List_20_Bullet_20_Tight">In order to use this feature, set the 8255 control word register (E9A007H) to 92H in advance. E9A005H D7 D6 D5 D4 D3 D2 D1 D0</text:p>
        </text:list-item>
      </text:list>
      <text:p text:style-name="First_20_paragraph">0: ADPCM sound output cut 1: ADPCM sound output (Left) out 1: ADPCM sound output (Right) out 1: ADPCM sound output (Left &amp; Right) out</text:p>
      <text:p text:style-name="Text_20_body">0: ADPCM Sampling Frequency 3.9 kHz/7.8 kHz (4MHz/8MHz) 1: ADPCM Sampling Frequency 5.2kHz/10.4kHz 1: ADPCM Sampling Frequency 7.8kHz/15.6kHz 1: Do not use (disabled)</text:p>
      <text:p text:style-name="Text_20_body">0: Joystick No.1 Normal Operation 1: Option Function (Signal Number IC04)</text:p>
      <text:p text:style-name="Text_20_body">0: Joystick No.2 Normal Operation 1: Option Function (Signal Number IC05)</text:p>
      <text:p text:style-name="Text_20_body">0: Joystick No.1 Normal Operation 1: Option Function (Signal Number IC04)</text:p>
      <text:p text:style-name="Text_20_body">0: Joystick No.1 Normal Operation 1: Option Function (Signal Number IC06)</text:p>
      <text:p text:style-name="Text_20_body">However, the MSM6258 operates regardless of the data in D0 and D1. For details of the joystick, please refer to 3 of chapter 5.</text:p>
      <text:list text:style-name="Numbering_20_1" text:start-value="2">
        <text:list-item>
          <text:p text:style-name="List_20_Number_20_Tight">Sound Synthesis</text:p>
        </text:list-item>
      </text:list>
      <text:p text:style-name="First_20_paragraph">(5) FM sound source register data port (WRITE) *To use this function, be sure to set 1BH (internal register) to the FM sound source register address port of YM2151 (E90001H).</text:p>
      <text:p text:style-name="Text_20_body">D7 D6 D5 D4 D3 D2 D1 D0 E92003H x x W</text:p>
      <text:p text:style-name="Text_20_body">WAVE FORM CT1 ... Sound synthesis clock switching port (switching resolution frequency)</text:p>
      <text:p text:style-name="Preformatted_20_Text"><text:s text:c="2"/>0 : 8 MHz</text:p>
      <text:p text:style-name="Preformatted_20_Text"><text:s text:c="2"/>1 : 4 MHz</text:p>
      <text:p text:style-name="First_20_paragraph">CT2 ... FDC forced READY port</text:p>
      <text:p text:style-name="Preformatted_20_Text"><text:s text:c="2"/>0 : FDD's READY state (normal operation)</text:p>
      <text:p text:style-name="Preformatted_20_Text"><text:s text:c="2"/>1 : Forced READY</text:p>
      <text:p text:style-name="First_20_paragraph">For details, please refer to Chapters 1-6.</text:p>
      <text:p text:style-name="Text_20_body">2-4 Sound Synthesis Access</text:p>
      <text:p text:style-name="Text_20_body">The procedure for performing the sound synthesis is as follows.</text:p>
      <text:p text:style-name="Text_20_body">(1) Set port C (output) of 8255 to mode 0. Set the E9A007H to 92H.</text:p>
      <text:p text:style-name="Text_20_body">(2) Set the sampling frequency for ADPCM sound output (PLAY only). Set ADPCM sound output/sampling frequency data to E9A005H.</text:p>
      <text:p text:style-name="Text_20_body">(3) Set the registers for each channel of 63450 DMAC (set to dual address mode in external request cycle steal mode). To end operations like entering a normal vector interrupt in DMAC transfer, it is necessary to insert a program to terminate ADPCM operation (set 01H to E92001H).</text:p>
      <text:p text:style-name="Text_20_body">(4) Set the start of ADPCM PLAY (RECORD). For ADPCM PLAY start, set E92001H to 02H. Conversely, for ADPCM RECORD start, set E92001H to 04H.</text:p>
      <text:p text:style-name="Text_20_body">(5) When ADPCM PLAY (RECORD) is completed and a normal vector interrupt occurs in DMAC transfer, the ADPCM operation ends during that interrupt cycle.</text:p>
      <text:p text:style-name="Text_20_body">(blank or illegible page)</text:p>
      <text:p text:style-name="Text_20_body">Chapter 4 Peripheral LSI</text:p>
      <text:list text:style-name="Numbering_20_1">
        <text:list-item>
          <text:p text:style-name="List_20_Number_20_Tight">DMA Controller (Direct Memory Access Controller)</text:p>
        </text:list-item>
      </text:list>
      <text:p text:style-name="First_20_paragraph">The X68000 uses the 63450 as its DMAC. This features 4 independent DMA channels, allocated as shown in Table 4-1 for the X68000.</text:p>
      <table:table table:name="Table51" table:style-name="Table51">
        <table:table-column table:style-name="Table51.A"/>
        <table:table-column table:style-name="Table51.B"/>
        <table:table-column table:style-name="Table51.C"/>
        <table:table-column table:style-name="Table51.D"/>
        <table:table-header-rows>
          <table:table-row>
            <table:table-cell table:style-name="TableHeaderRowCell" office:value-type="string">
              <text:p text:style-name="Table_20_Heading">Channel Number</text:p>
            </table:table-cell>
            <table:table-cell table:style-name="TableHeaderRowCell" office:value-type="string">
              <text:p text:style-name="Table_20_Heading">Assignment</text:p>
            </table:table-cell>
            <table:table-cell table:style-name="TableHeaderRowCell" office:value-type="string">
              <text:p text:style-name="Table_20_Heading">Transfer Request</text:p>
            </table:table-cell>
            <table:table-cell table:style-name="TableHeaderRowCell" office:value-type="string">
              <text:p text:style-name="Table_20_Heading">Block Transfer</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Internal 2HD</text:p>
          </table:table-cell>
          <table:table-cell table:style-name="TableRowCell" office:value-type="string">
            <text:p text:style-name="Table_20_Contents">External transfer request cycle steal mode</text:p>
          </table:table-cell>
          <table:table-cell table:style-name="TableRowCell" office:value-type="string">
            <text:p text:style-name="Table_20_Contents">All channels, dual address mode</text:p>
          </table:table-cell>
        </table:table-row>
        <table:table-row>
          <table:table-cell table:style-name="TableRowCell" office:value-type="string">
            <text:p text:style-name="Table_20_Contents">1</text:p>
          </table:table-cell>
          <table:table-cell table:style-name="TableRowCell" office:value-type="string">
            <text:p text:style-name="Table_20_Contents">Hard Disk (Optional)</text:p>
          </table:table-cell>
          <table:table-cell table:style-name="TableRowCell" office:value-type="string">
            <text:p text:style-name="Table_20_Contents">Same as above</text:p>
          </table:table-cell>
          <table:table-cell table:style-name="TableRowCell" office:value-type="string">
            <text:p text:style-name="Table_20_Contents">All channels (programmable), contiguous mode, array chain mode, link array chain mode</text:p>
          </table:table-cell>
        </table:table-row>
        <table:table-row>
          <table:table-cell table:style-name="TableRowCell" office:value-type="string">
            <text:p text:style-name="Table_20_Contents">2</text:p>
          </table:table-cell>
          <table:table-cell table:style-name="TableRowCell" office:value-type="string">
            <text:p text:style-name="Table_20_Contents">Memory</text:p>
          </table:table-cell>
          <table:table-cell table:style-name="TableRowCell" office:value-type="string">
            <text:p text:style-name="Table_20_Contents">Auto request, related clock, maximum speed</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Sound Synthesis</text:p>
          </table:table-cell>
          <table:table-cell table:style-name="TableRowCell" office:value-type="string">
            <text:p text:style-name="Table_20_Contents">External transfer request cycle steal mode</text:p>
          </table:table-cell>
          <table:table-cell table:style-name="TableRowCell" office:value-type="string">
    </table:table-cell>
        </table:table-row>
      </table:table>
      <text:p text:style-name="First_20_paragraph">Table 4-1 DMAC Channel Assignment</text:p>
      <text:p text:style-name="Text_20_body">Diagram 4-1 DMAC Block Diagram</text:p>
      <text:list text:style-name="List_20_1">
        <text:list-item>
          <text:p text:style-name="List_20_Bullet_20_Tight">68000</text:p>
        </text:list-item>
      </text:list>
      <text:p text:style-name="Preformatted_20_Text"><text:s text:c="2"/>- Address Bus</text:p>
      <text:p text:style-name="Preformatted_20_Text"><text:s text:c="2"/>- Data Bus</text:p>
      <text:p text:style-name="Preformatted_20_Text"><text:s text:c="2"/>- Control Bus</text:p>
      <text:p text:style-name="Preformatted_20_Text"><text:s text:c="2"/>- CLK (10 MHz)</text:p>
      <text:p text:style-name="Preformatted_20_Text"><text:s text:c="2"/>- Vcc1</text:p>
      <text:p text:style-name="Preformatted_20_Text"><text:s text:c="2"/>- Vss</text:p>
      <text:list text:style-name="List_20_1">
        <text:list-item>
          <text:p text:style-name="List_20_Bullet_20_Tight">63450 DMAC</text:p>
        </text:list-item>
      </text:list>
      <text:p text:style-name="Preformatted_20_Text"><text:s text:c="2"/>- Ch 0: Internal 2HD</text:p>
      <text:p text:style-name="Preformatted_20_Text"><text:s text:c="2"/>- Ch 1: Hard Disk (Optional)</text:p>
      <text:p text:style-name="Preformatted_20_Text"><text:s text:c="2"/>- Ch 2: Memory</text:p>
      <text:p text:style-name="Preformatted_20_Text"><text:s text:c="2"/>- Ch 3: Sound Synthesis</text:p>
      <text:p text:style-name="First_20_paragraph">Chapter 4 Peripheral LSI</text:p>
      <text:h text:style-name="Heading_20_1" text:outline-level="1"><text:bookmark-start text:name="id_1-1-features"/>1-1 Features<text:bookmark-end text:name="id_1-1-features"/></text:h>
      <text:p text:style-name="First_20_paragraph">This DMAC has the following features. Additionally, Table 4-2 shows the DMAC transfer request methods, and Table 4-3 shows DMAC data block transfers.</text:p>
      <text:list text:style-name="Numbering_20_1">
        <text:list-item>
          <text:p text:style-name="List_20_Number_20_Tight">Equipped with 4 independent DMA channels (priority order is programmable)</text:p>
        </text:list-item>
        <text:list-item>
          <text:p text:style-name="List_20_Number_20_Tight">Transfer between memory, memory, and memory I/O devices</text:p>
        </text:list-item>
        <text:list-item>
          <text:p text:style-name="List_20_Number_20_Tight">Supports block transfer functions in continuous, array chain, and link array chain modes</text:p>
        </text:list-item>
        <text:list-item>
          <text:p text:style-name="List_20_Number_20_Tight">Programmable transfer using internal registers</text:p>
        </text:list-item>
        <text:list-item>
          <text:p text:style-name="List_20_Number_20_Tight">Supports data transfer functions with high reliability including error detection, error interrupt vectors, and exception handling</text:p>
        </text:list-item>
        <text:list-item>
          <text:p text:style-name="List_20_Number_20_Tight">Maximum 5M bytes/second (10 MHz)</text:p>
        </text:list-item>
        <text:list-item>
          <text:p text:style-name="List_20_Number_20_Tight">68000 bus compatible</text:p>
        </text:list-item>
      </text:list>
      <text:p text:style-name="First_20_paragraph"><text:span text:style-name="Strong_20_Emphasis">Table 4-2 DMAC Transfer Request Methods</text:span></text:p>
      <text:list text:style-name="List_20_1">
        <text:list-item>
          <text:p text:style-name="List_20_Bullet_20_Tight">External Transfer Request (using REQ pin)</text:p>
        </text:list-item>
      </text:list>
      <text:p text:style-name="Preformatted_20_Text"><text:s text:c="2"/>- Cycle Steal Mode: Transfers one bus round per transfer request.</text:p>
      <text:p text:style-name="Preformatted_20_Text"><text:s text:c="2"/>- Cycle Steal Burst-Hold Mode: Transfers one bus round per transfer request. However, the transfer period is limited.</text:p>
      <text:p text:style-name="Preformatted_20_Text"><text:s text:c="2"/>- Burst Mode: Transfers multiple bus rounds per transfer request.</text:p>
      <text:list text:style-name="List_20_1">
        <text:list-item>
          <text:p text:style-name="List_20_Bullet_20_Tight">Internal Transfer Request (not using REQ pin)</text:p>
        </text:list-item>
      </text:list>
      <text:p text:style-name="Preformatted_20_Text"><text:s text:c="2"/>- Limited Burst Mode: Transfers multiple bus rounds sequentially. However, it provides the bus periodically.</text:p>
      <text:p text:style-name="Preformatted_20_Text"><text:s text:c="2"/>- Maximum Burst Mode: Transfers multiple bus rounds sequentially. However, it interrupts and provides the bus only when necessary.</text:p>
      <text:p text:style-name="Preformatted_20_Text"><text:s text:c="2"/>- Auto Request (initial bus band transfer only): External transfer request (2nd and subsequent bus band transfers)</text:p>
      <text:p text:style-name="First_20_paragraph"><text:span text:style-name="Strong_20_Emphasis">Table 4-3 DMAC Data Block Transfer</text:span></text:p>
      <text:p text:style-name="Text_20_body">Single Data Block Transfer:</text:p>
      <text:list text:style-name="List_20_1">
        <text:list-item>
          <text:p text:style-name="List_20_Bullet_20_Tight">DMAC writes transfer address to internal register and initiates the transfer.</text:p>
        </text:list-item>
      </text:list>
      <text:p text:style-name="First_20_paragraph">Multiple Data Blocks Transfer:</text:p>
      <text:list text:style-name="List_20_1">
        <text:list-item>
          <text:p text:style-name="List_20_Bullet_20_Tight">Continuous Mode: DMAC writes the transfer address to internal register and initiates the transfer. Sets CNT bit to notify the presence of next data block.</text:p>
        </text:list-item>
        <text:list-item>
          <text:p text:style-name="List_20_Bullet_20_Tight">Array Chain Mode: Creates an array table in the main memory.</text:p>
        </text:list-item>
        <text:list-item>
          <text:p text:style-name="List_20_Bullet_20_Tight">Link Array Chain Mode: Creates a link array table in the main memory.</text:p>
        </text:list-item>
      </text:list>
      <text:list text:style-name="Numbering_20_1">
        <text:list-item>
          <text:p text:style-name="List_20_Number_20_Tight">DMA Controller (Direct Memory Access Controller)</text:p>
        </text:list-item>
      </text:list>
      <text:p text:style-name="First_20_paragraph">1-2 DMAC Register Address Map</text:p>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column table:style-name="Table52.G"/>
        <table:table-column table:style-name="Table52.H"/>
        <table:table-column table:style-name="Table52.I"/>
        <table:table-column table:style-name="Table52.J"/>
        <table:table-column table:style-name="Table52.K"/>
        <table:table-header-rows>
          <table:table-row>
            <table:table-cell table:style-name="TableHeaderRowCell" office:value-type="string">
              <text:p text:style-name="Table_20_Heading">Ch No.</text:p>
            </table:table-cell>
            <table:table-cell table:style-name="TableHeaderRowCell" office:value-type="string">
              <text:p text:style-name="Table_20_Heading">Register Address</text:p>
            </table:table-cell>
            <table:table-cell table:style-name="TableHeaderRowCell" office:value-type="string">
              <text:p text:style-name="Table_20_Heading">D07 (D15)</text:p>
            </table:table-cell>
            <table:table-cell table:style-name="TableHeaderRowCell" office:value-type="string">
              <text:p text:style-name="Table_20_Heading">D06 (D14)</text:p>
            </table:table-cell>
            <table:table-cell table:style-name="TableHeaderRowCell" office:value-type="string">
              <text:p text:style-name="Table_20_Heading">D05 (D13)</text:p>
            </table:table-cell>
            <table:table-cell table:style-name="TableHeaderRowCell" office:value-type="string">
              <text:p text:style-name="Table_20_Heading">D04 (D12)</text:p>
            </table:table-cell>
            <table:table-cell table:style-name="TableHeaderRowCell" office:value-type="string">
              <text:p text:style-name="Table_20_Heading">D03 (D11)</text:p>
            </table:table-cell>
            <table:table-cell table:style-name="TableHeaderRowCell" office:value-type="string">
              <text:p text:style-name="Table_20_Heading">D02 (D10)</text:p>
            </table:table-cell>
            <table:table-cell table:style-name="TableHeaderRowCell" office:value-type="string">
              <text:p text:style-name="Table_20_Heading">D01 (D09)</text:p>
            </table:table-cell>
            <table:table-cell table:style-name="TableHeaderRowCell" office:value-type="string">
              <text:p text:style-name="Table_20_Heading">D00 (D08)</text:p>
            </table:table-cell>
            <table:table-cell table:style-name="TableHeaderRowCell" office:value-type="string">
              <text:p text:style-name="Table_20_Heading">Remarks</text:p>
            </table:table-cell>
          </table:table-row>
        </table:table-header-rows>
        <table:table-row>
          <table:table-cell table:style-name="TableRowCell" office:value-type="string">
    </table:table-cell>
          <table:table-cell table:style-name="TableRowCell" office:value-type="string">
            <text:p text:style-name="Table_20_Contents">E84000H</text:p>
          </table:table-cell>
          <table:table-cell table:style-name="TableRowCell" office:value-type="string">
            <text:p text:style-name="Table_20_Contents">COC</text:p>
          </table:table-cell>
          <table:table-cell table:style-name="TableRowCell" office:value-type="string">
            <text:p text:style-name="Table_20_Contents">BTC</text:p>
          </table:table-cell>
          <table:table-cell table:style-name="TableRowCell" office:value-type="string">
            <text:p text:style-name="Table_20_Contents">NDT</text:p>
          </table:table-cell>
          <table:table-cell table:style-name="TableRowCell" office:value-type="string">
            <text:p text:style-name="Table_20_Contents">ERR</text:p>
          </table:table-cell>
          <table:table-cell table:style-name="TableRowCell" office:value-type="string">
            <text:p text:style-name="Table_20_Contents">ACT</text:p>
          </table:table-cell>
          <table:table-cell table:style-name="TableRowCell" office:value-type="string">
            <text:p text:style-name="Table_20_Contents">DIT</text:p>
          </table:table-cell>
          <table:table-cell table:style-name="TableRowCell" office:value-type="string">
            <text:p text:style-name="Table_20_Contents">PCT</text:p>
          </table:table-cell>
          <table:table-cell table:style-name="TableRowCell" office:value-type="string">
            <text:p text:style-name="Table_20_Contents">PCS</text:p>
          </table:table-cell>
          <table:table-cell table:style-name="TableRowCell" office:value-type="string">
            <text:p text:style-name="Table_20_Contents">CSRO (Channel Status Register)</text:p>
          </table:table-cell>
        </table:table-row>
        <table:table-row>
          <table:table-cell table:style-name="TableRowCell" office:value-type="string">
    </table:table-cell>
          <table:table-cell table:style-name="TableRowCell" office:value-type="string">
            <text:p text:style-name="Table_20_Contents">E84001H</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ERROR CODE</text:p>
          </table:table-cell>
          <table:table-cell table:style-name="TableRowCell" office:value-type="string">
            <text:p text:style-name="Table_20_Contents">CERO (Channel Error Regist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04H</text:p>
          </table:table-cell>
          <table:table-cell table:style-name="TableRowCell" office:value-type="string">
            <text:p text:style-name="Table_20_Contents">XRM</text:p>
          </table:table-cell>
          <table:table-cell table:style-name="TableRowCell" office:value-type="string">
            <text:p text:style-name="Table_20_Contents">DTYP</text:p>
          </table:table-cell>
          <table:table-cell table:style-name="TableRowCell" office:value-type="string">
            <text:p text:style-name="Table_20_Contents">DPS</text:p>
          </table:table-cell>
          <table:table-cell table:style-name="TableRowCell" office:value-type="string">
            <text:p text:style-name="Table_20_Contents">0</text:p>
          </table:table-cell>
          <table:table-cell table:style-name="TableRowCell" office:value-type="string">
            <text:p text:style-name="Table_20_Contents">PCL</text:p>
          </table:table-cell>
          <table:table-cell table:style-name="TableRowCell" office:value-type="string">
            <text:p text:style-name="Table_20_Contents">DCR0 (Device Control Regist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05H</text:p>
          </table:table-cell>
          <table:table-cell table:style-name="TableRowCell" office:value-type="string">
            <text:p text:style-name="Table_20_Contents">DIR</text:p>
          </table:table-cell>
          <table:table-cell table:style-name="TableRowCell" office:value-type="string">
            <text:p text:style-name="Table_20_Contents">BTD</text:p>
          </table:table-cell>
          <table:table-cell table:style-name="TableRowCell" office:value-type="string">
            <text:p text:style-name="Table_20_Contents">SIZE</text:p>
          </table:table-cell>
          <table:table-cell table:style-name="TableRowCell" office:value-type="string">
            <text:p text:style-name="Table_20_Contents">CHAIN</text:p>
          </table:table-cell>
          <table:table-cell table:style-name="TableRowCell" office:value-type="string">
            <text:p text:style-name="Table_20_Contents">REQG</text:p>
          </table:table-cell>
          <table:table-cell table:style-name="TableRowCell" office:value-type="string">
            <text:p text:style-name="Table_20_Contents">OCRD (Operation Control Regist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06H</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MAC</text:p>
          </table:table-cell>
          <table:table-cell table:style-name="TableRowCell" office:value-type="string">
            <text:p text:style-name="Table_20_Contents">DAC</text:p>
          </table:table-cell>
          <table:table-cell table:style-name="TableRowCell" office:value-type="string">
            <text:p text:style-name="Table_20_Contents">SCRO (Sequence Control Regist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07H</text:p>
          </table:table-cell>
          <table:table-cell table:style-name="TableRowCell" office:value-type="string">
            <text:p text:style-name="Table_20_Contents">STR</text:p>
          </table:table-cell>
          <table:table-cell table:style-name="TableRowCell" office:value-type="string">
            <text:p text:style-name="Table_20_Contents">CNT</text:p>
          </table:table-cell>
          <table:table-cell table:style-name="TableRowCell" office:value-type="string">
            <text:p text:style-name="Table_20_Contents">HLT</text:p>
          </table:table-cell>
          <table:table-cell table:style-name="TableRowCell" office:value-type="string">
            <text:p text:style-name="Table_20_Contents">SAB</text:p>
          </table:table-cell>
          <table:table-cell table:style-name="TableRowCell" office:value-type="string">
            <text:p text:style-name="Table_20_Contents">INT</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CCRO (Channel Control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0A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TCO (Memory Transfer Counter)</text:p>
          </table:table-cell>
        </table:table-row>
        <table:table-row>
          <table:table-cell table:style-name="TableRowCell" office:value-type="string">
    </table:table-cell>
          <table:table-cell table:style-name="TableRowCell" office:value-type="string">
            <text:p text:style-name="Table_20_Contents">E8400B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AR0 (Memory Address Register) (H)</text:p>
          </table:table-cell>
        </table:table-row>
        <table:table-row>
          <table:table-cell table:style-name="TableRowCell" office:value-type="string">
    </table:table-cell>
          <table:table-cell table:style-name="TableRowCell" office:value-type="string">
            <text:p text:style-name="Table_20_Contents">E8400C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AR0 (Memory Address Register) (L)</text:p>
          </table:table-cell>
        </table:table-row>
        <table:table-row>
          <table:table-cell table:style-name="TableRowCell" office:value-type="string">
    </table:table-cell>
          <table:table-cell table:style-name="TableRowCell" office:value-type="string">
            <text:p text:style-name="Table_20_Contents">E8400D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0E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 Ch</text:p>
          </table:table-cell>
          <table:table-cell table:style-name="TableRowCell" office:value-type="string">
            <text:p text:style-name="Table_20_Contents">E8400F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10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R0 (Device Address Register) (H)</text:p>
          </table:table-cell>
        </table:table-row>
        <table:table-row>
          <table:table-cell table:style-name="TableRowCell" office:value-type="string">
    </table:table-cell>
          <table:table-cell table:style-name="TableRowCell" office:value-type="string">
            <text:p text:style-name="Table_20_Contents">E84015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R0 (Device Address Register) (L)</text:p>
          </table:table-cell>
        </table:table-row>
        <table:table-row>
          <table:table-cell table:style-name="TableRowCell" office:value-type="string">
    </table:table-cell>
          <table:table-cell table:style-name="TableRowCell" office:value-type="string">
            <text:p text:style-name="Table_20_Contents">E84016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17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BTCO (Burst Transfer Counter)</text:p>
          </table:table-cell>
        </table:table-row>
        <table:table-row>
          <table:table-cell table:style-name="TableRowCell" office:value-type="string">
    </table:table-cell>
          <table:table-cell table:style-name="TableRowCell" office:value-type="string">
            <text:p text:style-name="Table_20_Contents">E8401A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BAR0 (Base Address Register) (H)</text:p>
          </table:table-cell>
        </table:table-row>
        <table:table-row>
          <table:table-cell table:style-name="TableRowCell" office:value-type="string">
    </table:table-cell>
          <table:table-cell table:style-name="TableRowCell" office:value-type="string">
            <text:p text:style-name="Table_20_Contents">E8401B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BAR0 (Base Address Register) (L)</text:p>
          </table:table-cell>
        </table:table-row>
        <table:table-row>
          <table:table-cell table:style-name="TableRowCell" office:value-type="string">
    </table:table-cell>
          <table:table-cell table:style-name="TableRowCell" office:value-type="string">
            <text:p text:style-name="Table_20_Contents">E8401C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401D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NIVO (Normal Interrupt Vector)</text:p>
          </table:table-cell>
        </table:table-row>
      </table:table>
      <text:p text:style-name="First_20_paragraph">Page 121</text:p>
      <text:p text:style-name="Text_20_body">Chapter 4 Peripheral LSI</text:p>
      <table:table table:name="Table53" table:style-name="Table53">
        <table:table-column table:style-name="Table53.A"/>
        <table:table-column table:style-name="Table53.B"/>
        <table:table-column table:style-name="Table53.C"/>
        <table:table-column table:style-name="Table53.D"/>
        <table:table-column table:style-name="Table53.E"/>
        <table:table-column table:style-name="Table53.F"/>
        <table:table-column table:style-name="Table53.G"/>
        <table:table-column table:style-name="Table53.H"/>
        <table:table-column table:style-name="Table53.I"/>
        <table:table-column table:style-name="Table53.J"/>
        <table:table-column table:style-name="Table53.K"/>
        <table:table-column table:style-name="Table53.L"/>
        <table:table-header-rows>
          <table:table-row>
            <table:table-cell table:style-name="TableHeaderRowCell" office:value-type="string">
              <text:p text:style-name="Table_20_Heading">Ch No.</text:p>
            </table:table-cell>
            <table:table-cell table:style-name="TableHeaderRowCell" office:value-type="string">
              <text:p text:style-name="Table_20_Heading">Register Address</text:p>
            </table:table-cell>
            <table:table-cell table:style-name="TableHeaderRowCell" office:value-type="string">
              <text:p text:style-name="Table_20_Heading">D07 (D15)</text:p>
            </table:table-cell>
            <table:table-cell table:style-name="TableHeaderRowCell" office:value-type="string">
              <text:p text:style-name="Table_20_Heading">D06 (D14)</text:p>
            </table:table-cell>
            <table:table-cell table:style-name="TableHeaderRowCell" office:value-type="string">
              <text:p text:style-name="Table_20_Heading">D05 (D13)</text:p>
            </table:table-cell>
            <table:table-cell table:style-name="TableHeaderRowCell" office:value-type="string">
              <text:p text:style-name="Table_20_Heading">D04 (D12)</text:p>
            </table:table-cell>
            <table:table-cell table:style-name="TableHeaderRowCell" office:value-type="string">
              <text:p text:style-name="Table_20_Heading">D03 (D11)</text:p>
            </table:table-cell>
            <table:table-cell table:style-name="TableHeaderRowCell" office:value-type="string">
              <text:p text:style-name="Table_20_Heading">D02 (D10)</text:p>
            </table:table-cell>
            <table:table-cell table:style-name="TableHeaderRowCell" office:value-type="string">
              <text:p text:style-name="Table_20_Heading">D01 (D09)</text:p>
            </table:table-cell>
            <table:table-cell table:style-name="TableHeaderRowCell" office:value-type="string">
              <text:p text:style-name="Table_20_Heading">D00 (D08)</text:p>
            </table:table-cell>
            <table:table-cell table:style-name="TableHeaderRowCell" office:value-type="string">
              <text:p text:style-name="Table_20_Heading">Notes</text:p>
            </table:table-cell>
            <table:table-cell table:style-name="TableHeaderRowCell" office:value-type="string">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 Ch</text:p>
          </table:table-cell>
          <table:table-cell table:style-name="TableRowCell" office:value-type="string">
            <text:p text:style-name="Table_20_Contents">E84027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EIV0</text:p>
          </table:table-cell>
          <table:table-cell table:style-name="TableRowCell" office:value-type="string">
            <text:p text:style-name="Table_20_Contents">(Error Interrupt Vector Register)</text:p>
          </table:table-cell>
        </table:table-row>
        <table:table-row>
          <table:table-cell table:style-name="TableRowCell" office:value-type="string">
    </table:table-cell>
          <table:table-cell table:style-name="TableRowCell" office:value-type="string">
            <text:p text:style-name="Table_20_Contents">E84029H</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FC2</text:p>
          </table:table-cell>
          <table:table-cell table:style-name="TableRowCell" office:value-type="string">
            <text:p text:style-name="Table_20_Contents">FC1</text:p>
          </table:table-cell>
          <table:table-cell table:style-name="TableRowCell" office:value-type="string">
            <text:p text:style-name="Table_20_Contents">FC0</text:p>
          </table:table-cell>
          <table:table-cell table:style-name="TableRowCell" office:value-type="string">
            <text:p text:style-name="Table_20_Contents">MEC0</text:p>
          </table:table-cell>
          <table:table-cell table:style-name="TableRowCell" office:value-type="string">
            <text:p text:style-name="Table_20_Contents">(Memory Function Code Register)</text:p>
          </table:table-cell>
        </table:table-row>
        <table:table-row>
          <table:table-cell table:style-name="TableRowCell" office:value-type="string">
    </table:table-cell>
          <table:table-cell table:style-name="TableRowCell" office:value-type="string">
            <text:p text:style-name="Table_20_Contents">E8402DH</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CP</text:p>
          </table:table-cell>
          <table:table-cell table:style-name="TableRowCell" office:value-type="string">
            <text:p text:style-name="Table_20_Contents">CPR0</text:p>
          </table:table-cell>
          <table:table-cell table:style-name="TableRowCell" office:value-type="string">
            <text:p text:style-name="Table_20_Contents">(Channel Priority Register)</text:p>
          </table:table-cell>
        </table:table-row>
        <table:table-row>
          <table:table-cell table:style-name="TableRowCell" office:value-type="string">
    </table:table-cell>
          <table:table-cell table:style-name="TableRowCell" office:value-type="string">
            <text:p text:style-name="Table_20_Contents">E84031H</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FC2</text:p>
          </table:table-cell>
          <table:table-cell table:style-name="TableRowCell" office:value-type="string">
            <text:p text:style-name="Table_20_Contents">FC1</text:p>
          </table:table-cell>
          <table:table-cell table:style-name="TableRowCell" office:value-type="string">
            <text:p text:style-name="Table_20_Contents">FC0</text:p>
          </table:table-cell>
          <table:table-cell table:style-name="TableRowCell" office:value-type="string">
    </table:table-cell>
          <table:table-cell table:style-name="TableRowCell" office:value-type="string">
            <text:p text:style-name="Table_20_Contents">DFCO</text:p>
          </table:table-cell>
          <table:table-cell table:style-name="TableRowCell" office:value-type="string">
            <text:p text:style-name="Table_20_Contents">(Device Function Code Register)</text:p>
          </table:table-cell>
        </table:table-row>
        <table:table-row>
          <table:table-cell table:style-name="TableRowCell" office:value-type="string">
    </table:table-cell>
          <table:table-cell table:style-name="TableRowCell" office:value-type="string">
            <text:p text:style-name="Table_20_Contents">E84039H</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FC2</text:p>
          </table:table-cell>
          <table:table-cell table:style-name="TableRowCell" office:value-type="string">
            <text:p text:style-name="Table_20_Contents">FC1</text:p>
          </table:table-cell>
          <table:table-cell table:style-name="TableRowCell" office:value-type="string">
            <text:p text:style-name="Table_20_Contents">FC0</text:p>
          </table:table-cell>
          <table:table-cell table:style-name="TableRowCell" office:value-type="string">
    </table:table-cell>
          <table:table-cell table:style-name="TableRowCell" office:value-type="string">
            <text:p text:style-name="Table_20_Contents">BFCO</text:p>
          </table:table-cell>
          <table:table-cell table:style-name="TableRowCell" office:value-type="string">
            <text:p text:style-name="Table_20_Contents">(Base Function Code Register)</text:p>
          </table:table-cell>
        </table:table-row>
      </table:table>
      <text:p text:style-name="First_20_paragraph">| 3 Ch | E840FFH | 0 | 0 | 0 | 0 | | BT | BR | | GCR | (General Control Register) |</text:p>
      <text:p text:style-name="Text_20_body">(Note 1) Channel No. 1 is Channel No. 0’s address + 40H</text:p>
      <text:p text:style-name="Preformatted_20_Text"><text:s text:c="9"/>Channel No. 2 <text:s text:c="14"/>" <text:s text:c="21"/>+ 80H</text:p>
      <text:p text:style-name="Preformatted_20_Text"><text:s text:c="9"/>Channel No. 3 <text:s text:c="14"/>" <text:s text:c="21"/>+ C0H</text:p>
      <text:list text:style-name="List_20_1">
        <text:list-item>
          <text:p text:style-name="List_20_Bullet_20_Tight">CER (Channel Error Register) is Read only. Other registers can read/write</text:p>
        </text:list-item>
      </text:list>
      <text:p text:style-name="First_20_paragraph">Table 4-4 DMAC Register Address Map</text:p>
      <text:p text:style-name="Text_20_body">1-3 Details of DMAC Registers For details of each register, please refer to the datasheet of the HD63450 series.</text:p>
      <text:list text:style-name="Numbering_20_1" text:start-value="2">
        <text:list-item>
          <text:p text:style-name="List_20_Number_20_Tight">MFP (Multi Function Peripheral)</text:p>
        </text:list-item>
      </text:list>
      <text:p text:style-name="First_20_paragraph">The X68000 uses the 68901, which belongs to the 68000 family, for data communication with the keyboard, various timer functions, and various interrupt controls.</text:p>
      <text:p text:style-name="Text_20_body">Caption under the diagram:</text:p>
      <text:p text:style-name="Text_20_body">Fig 4-2 MFP Block Diagram</text:p>
      <text:p text:style-name="Text_20_body">Chapter 4 Peripheral LSI</text:p>
      <text:p text:style-name="Text_20_body">2-1 Features</text:p>
      <text:p text:style-name="Text_20_body">This MFP has the following features: (1) Interrupt control for 16 channels (interrupts from different signals) (2) Built-in 4 timers (Display mode 3 channels, Event count mode 1 channel) (3) Built-in dual-channel USART for 1 channel (used for keyboard communication)</text:p>
      <text:p text:style-name="Text_20_body">Encoders for decoding:</text:p>
      <text:p text:style-name="Preformatted_20_Text"><text:s text:c="1"/>IPL0</text:p>
      <text:p text:style-name="Preformatted_20_Text"><text:s text:c="1"/>IPL1 <text:s text:c="5"/>&lt;Decoder&gt;</text:p>
      <text:p text:style-name="Preformatted_20_Text"><text:s text:c="1"/>IPL2</text:p>
      <text:p text:style-name="Preformatted_20_Text"/>
      <text:p text:style-name="Preformatted_20_Text"><text:s text:c="69"/>&lt;68901 MFP Interrupt, Priority Channels&gt;</text:p>
      <text:p text:style-name="First_20_paragraph">** Priority Level ** ** Interrupt Channel **</text:p>
      <text:p text:style-name="Preformatted_20_Text"><text:s text:c="26"/>High <text:s text:c="1"/>15 <text:s text:c="4"/>GPII7 (CRTC H-SYNC signal)</text:p>
      <text:p text:style-name="Preformatted_20_Text"><text:s text:c="36"/>14 <text:s text:c="4"/>GPII6 (CRTC IRQ signal)</text:p>
      <text:p text:style-name="Preformatted_20_Text"><text:s text:c="36"/>13 <text:s text:c="4"/>Timer A (CRTC V-DISP signal)</text:p>
      <text:p text:style-name="Preformatted_20_Text"><text:s text:c="36"/>12 <text:s text:c="4"/>Receive Buffer Full (Keyboard receive data)</text:p>
      <text:p text:style-name="Preformatted_20_Text"><text:s text:c="36"/>11 <text:s text:c="4"/>Receive Error (Keyboard receive data error)</text:p>
      <text:p text:style-name="Preformatted_20_Text"><text:s text:c="36"/>10 <text:s text:c="4"/>Transmit Buffer Empty (Keyboard transmit data)</text:p>
      <text:p text:style-name="Preformatted_20_Text"><text:s text:c="38"/>9 <text:s text:c="4"/>Transmit Error (Keyboard transmit data error)</text:p>
      <text:p text:style-name="Preformatted_20_Text"><text:s text:c="38"/>8 <text:s text:c="4"/>Timer B (USART serial clock)</text:p>
      <text:p text:style-name="Preformatted_20_Text"><text:s text:c="36"/>NC <text:s text:c="50"/>7 <text:s text:c="4"/>N/A</text:p>
      <text:p text:style-name="Preformatted_20_Text"><text:s text:c="36"/>6 <text:s text:c="6"/>GPIP4 (CRTC V-DISP signal)</text:p>
      <text:p text:style-name="Preformatted_20_Text"><text:s text:c="36"/>5 <text:s text:c="6"/>Timer C (8-bit customizable timer)</text:p>
      <text:p text:style-name="Preformatted_20_Text"><text:s text:c="36"/>4 <text:s text:c="6"/>Timer D (8-bit customizable timer)</text:p>
      <text:p text:style-name="Preformatted_20_Text"><text:s text:c="36"/>3 <text:s text:c="6"/>GPIP3 (FIRM main power ON signal)</text:p>
      <text:p text:style-name="Preformatted_20_Text"><text:s text:c="36"/>2 <text:s text:c="6"/>GPIP2 (POWER save mode ON/OFF signal)</text:p>
      <text:p text:style-name="Preformatted_20_Text"><text:s text:c="36"/>1 <text:s text:c="6"/>GPIP1 (Drive select/Motor ON EXPHON signal)</text:p>
      <text:p text:style-name="Preformatted_20_Text"><text:s text:c="26"/>Low <text:s text:c="3"/>0 <text:s text:c="7"/>GPIP0 (RTC ALARM signal ON/OFF output)</text:p>
      <text:p text:style-name="First_20_paragraph">Figure 4-3 MFP Interrupt Block Diagram</text:p>
      <text:list text:style-name="Numbering_20_1" text:start-value="2">
        <text:list-item>
          <text:p text:style-name="List_20_Number_20_Tight">MFP (Multi Function Peripheral)</text:p>
        </text:list-item>
      </text:list>
      <text:p text:style-name="First_20_paragraph">TAI (CRTC's V-DISP signal) 8-bit counter 1/2 TAO (NC) Event Count Mode TACR (08H)</text:p>
      <text:p text:style-name="Text_20_body">(4 MHz) TBCR (01H) Prescaler (1/4) 8-bit counter 1/2 TBO (USART serial clock) 38400 Hz</text:p>
      <text:p text:style-name="Text_20_body">TCDR 8-bit counter 1/2 TCO (NC)</text:p>
      <text:p text:style-name="Text_20_body">(4 MHz) TCDCR Prescaler TDDR 8-bit counter 1/2 TDO (NC)</text:p>
      <text:p text:style-name="Text_20_body">Figure 4-4 MFP Timer Block Diagram</text:p>
      <text:p text:style-name="Text_20_body">TBO TXD Pin USART (x16) SI (Keyboard Receive Data) SO (Keyboard Send Data) SR (Receive Data Status) TR (Send Data Status)</text:p>
      <text:p text:style-name="Text_20_body">Asynchronous Communication 2400 Baud Start bit 1, Data 8 bits, No Parity, Stop bit 1</text:p>
      <text:p text:style-name="Text_20_body">Figure 4-5 MFP USART Series Block Diagram</text:p>
      <text:p text:style-name="Text_20_body">Ch No.</text:p>
      <text:p text:style-name="Text_20_body">Functions Details Explanation</text:p>
      <text:p text:style-name="Text_20_body">GPIP7 CRTC's H-SYNC signal’s rising or falling edge triggers an interrupt (set "0" in the active edge register).</text:p>
      <text:p text:style-name="Text_20_body">GPIP6 If an interrupt occurs at the address set in CRTC's R09 (EB0012H), it triggers an interrupt due to the rising or falling edge of the IRQ signal (set "0" in the active edge register when CRTC IRQ signal's rising or falling edge triggers an interrupt).</text:p>
      <text:p text:style-name="Text_20_body">Timer A When V-DISP signal from the CRTC is input into Timer A (Event Count Mode), triggers an interrupt at pre-set counts (interrupts are generated either at the rising or falling edge of the input signal or rising and falling edges generate an interrupt and set a value to the down counter, decrease the 8-bit down counter from the set value and upon reaching 00H, an interrupt is generated).</text:p>
      <text:p text:style-name="Text_20_body">Receive Buffer Full When data is received from the keyboard, an interrupt occurs when the data is transferred from the receive register to the receive buffer and D07 of the receive buffer register becomes "1".</text:p>
      <text:h text:style-name="Heading_20_1" text:outline-level="1"><text:bookmark-start text:name="chapter-4-peripherals-lsi"/>Chapter 4 Peripherals LSI<text:bookmark-end text:name="chapter-4-peripherals-lsi"/></text:h>
      <table:table table:name="Table54" table:style-name="Table54">
        <table:table-column table:style-name="Table54.A"/>
        <table:table-column table:style-name="Table54.B"/>
        <table:table-column table:style-name="Table54.C"/>
        <table:table-header-rows>
          <table:table-row>
            <table:table-cell table:style-name="TableHeaderRowCell" office:value-type="string">
              <text:p text:style-name="Table_20_Heading">Channel No.</text:p>
            </table:table-cell>
            <table:table-cell table:style-name="TableHeaderRowCell" office:value-type="string">
              <text:p text:style-name="Table_20_Heading">Function</text:p>
            </table:table-cell>
            <table:table-cell table:style-name="TableHeaderRowCell" office:value-type="string">
              <text:p text:style-name="Table_20_Heading">Details</text:p>
            </table:table-cell>
          </table:table-row>
        </table:table-header-rows>
        <table:table-row>
          <table:table-cell table:style-name="TableRowCell" office:value-type="string">
            <text:p text:style-name="Table_20_Contents">Receive Error</text:p>
          </table:table-cell>
          <table:table-cell table:style-name="TableRowCell" office:value-type="string">
            <text:p text:style-name="Table_20_Contents">When data is received from the keyboard, an error (overrun error, parity error, synchronization error, pre-election error) occurs. (When receive data register D6, D5, D3 are 1).</text:p>
          </table:table-cell>
          <table:table-cell table:style-name="TableRowCell" office:value-type="string">
    </table:table-cell>
        </table:table-row>
        <table:table-row>
          <table:table-cell table:style-name="TableRowCell" office:value-type="string">
            <text:p text:style-name="Table_20_Contents">Transmit Buffer Empty</text:p>
          </table:table-cell>
          <table:table-cell table:style-name="TableRowCell" office:value-type="string">
            <text:p text:style-name="Table_20_Contents">When data is sent to the keyboard (when the send data is sent from the send buffer to the shift register and the send data register D7 becomes 1), an interrupt occurs.</text:p>
          </table:table-cell>
          <table:table-cell table:style-name="TableRowCell" office:value-type="string">
    </table:table-cell>
        </table:table-row>
        <table:table-row>
          <table:table-cell table:style-name="TableRowCell" office:value-type="string">
            <text:p text:style-name="Table_20_Contents">Transmit Error</text:p>
          </table:table-cell>
          <table:table-cell table:style-name="TableRowCell" office:value-type="string">
            <text:p text:style-name="Table_20_Contents">When keyboard data is sent and an error (overrun error or synchronization error) occurs, an interrupt occurs. (When send data register D6 or D4 is 1).</text:p>
          </table:table-cell>
          <table:table-cell table:style-name="TableRowCell" office:value-type="string">
    </table:table-cell>
        </table:table-row>
        <table:table-row>
          <table:table-cell table:style-name="TableRowCell" office:value-type="string">
            <text:p text:style-name="Table_20_Contents">Timer B</text:p>
          </table:table-cell>
          <table:table-cell table:style-name="TableRowCell" office:value-type="string">
            <text:p text:style-name="Table_20_Contents">Reservation lock (4 MHz). When a timer (delay mode) is assigned, an interrupt occurs when the count of the internal clock reaches 38,400 Hz. However, since it is used as a reservation lock for the keyboard, the interrupt will not occur.</text:p>
          </table:table-cell>
          <table:table-cell table:style-name="TableRowCell" office:value-type="string">
    </table:table-cell>
        </table:table-row>
        <table:table-row>
          <table:table-cell table:style-name="TableRowCell" office:value-type="string">
            <text:p text:style-name="Table_20_Contents">GPI4</text:p>
          </table:table-cell>
          <table:table-cell table:style-name="TableRowCell" office:value-type="string">
            <text:p text:style-name="Table_20_Contents">Reads the status of the V-DISP signal from CRTC. "1" indicates "H", and stops the motor while being cleared periodically. When "0", it continues to perform high-speed data transfer processing. (Interrupt not possible).</text:p>
          </table:table-cell>
          <table:table-cell table:style-name="TableRowCell" office:value-type="string">
    </table:table-cell>
        </table:table-row>
        <table:table-row>
          <table:table-cell table:style-name="TableRowCell" office:value-type="string">
            <text:p text:style-name="Table_20_Contents">Timer C</text:p>
          </table:table-cell>
          <table:table-cell table:style-name="TableRowCell" office:value-type="string">
            <text:p text:style-name="Table_20_Contents">Reservation lock (4 MHz). When a timer (delay mode) is assigned, it uses the low-speed mode scan clock. When the datum counter reaches 00H, it generates an interrupt.</text:p>
          </table:table-cell>
          <table:table-cell table:style-name="TableRowCell" office:value-type="string">
    </table:table-cell>
        </table:table-row>
        <table:table-row>
          <table:table-cell table:style-name="TableRowCell" office:value-type="string">
            <text:p text:style-name="Table_20_Contents">Timer D</text:p>
          </table:table-cell>
          <table:table-cell table:style-name="TableRowCell" office:value-type="string">
            <text:p text:style-name="Table_20_Contents">Reservation lock (4 MHz). When a timer (delay mode) is assigned, it uses the low-speed mode scan clock. When the datum counter reaches 00H, it generates an interrupt.</text:p>
          </table:table-cell>
          <table:table-cell table:style-name="TableRowCell" office:value-type="string">
    </table:table-cell>
        </table:table-row>
        <table:table-row>
          <table:table-cell table:style-name="TableRowCell" office:value-type="string">
            <text:p text:style-name="Table_20_Contents">GPI3</text:p>
          </table:table-cell>
          <table:table-cell table:style-name="TableRowCell" office:value-type="string">
            <text:p text:style-name="Table_20_Contents">Generates an interrupt at the falling edge of the FM reset IRQ signal.</text:p>
          </table:table-cell>
          <table:table-cell table:style-name="TableRowCell" office:value-type="string">
    </table:table-cell>
        </table:table-row>
        <table:table-row>
          <table:table-cell table:style-name="TableRowCell" office:value-type="string">
            <text:p text:style-name="Table_20_Contents">GPI2</text:p>
          </table:table-cell>
          <table:table-cell table:style-name="TableRowCell" office:value-type="string">
            <text:p text:style-name="Table_20_Contents">POWER switch (main computer power switch). Determines whether the computer's power supply (Vcc1) has been turned on. Normally, the POWER switch is "OFF" when "0" is read, and "ON" when "1" is read. However, in the case of the POWER switch, use the usual method of processing the signal to determine whether secondary power distribution is turned on or not.</text:p>
          </table:table-cell>
          <table:table-cell table:style-name="TableRowCell" office:value-type="string">
    </table:table-cell>
        </table:table-row>
        <table:table-row>
          <table:table-cell table:style-name="TableRowCell" office:value-type="string">
            <text:p text:style-name="Table_20_Contents">GPI1</text:p>
          </table:table-cell>
          <table:table-cell table:style-name="TableRowCell" office:value-type="string">
            <text:p text:style-name="Table_20_Contents">Reads the EXPON signal using expansion I/O slots to determine whether the computer's power supply (Vcc1) has been turned on. Normally, it is considered "OFF" when "0" is read, and "ON" when "1" is read. However, if the computer's main power supply is "OFF" or "0", it cannot enter "1". Normally, it becomes "0". If the MPU can read the GPI1 port, and the EXPON signal from the expansion I/O slot is read as "ON", it continues as normal.</text:p>
          </table:table-cell>
          <table:table-cell table:style-name="TableRowCell" office:value-type="string">
    </table:table-cell>
        </table:table-row>
        <table:table-row>
          <table:table-cell table:style-name="TableRowCell" office:value-type="string">
            <text:p text:style-name="Table_20_Contents">GPI0</text:p>
          </table:table-cell>
          <table:table-cell table:style-name="TableRowCell" office:value-type="string">
            <text:p text:style-name="Table_20_Contents">Generates an RTC ALARM signal to check whether an ALARM signal (alarm set in ON) is issued to the computer's power supply (Vcc1) or not. Normally, when "0" is read, it is "OFF", and when "1" is read, it is "ON" roughly every 16 seconds, even if the computer is turned off. If the ALARM signal has not been generated by the computer's main power supply, it cannot read "1". If the ALARM signal is "OFF", it renders the status.</text:p>
          </table:table-cell>
          <table:table-cell table:style-name="TableRowCell" office:value-type="string">
    </table:table-cell>
        </table:table-row>
      </table:table>
      <text:p text:style-name="First_20_paragraph"><text:span text:style-name="Strong_20_Emphasis">Table 4-5 Detailed MFP Channel Specifications</text:span></text:p>
      <text:p text:style-name="Text_20_body"><text:span text:style-name="Strong_20_Emphasis">2. MFP (Multi Function Peripheral)</text:span></text:p>
      <text:p text:style-name="Text_20_body"><text:span text:style-name="Strong_20_Emphasis">[Power ON/OFF and LED]</text:span></text:p>
      <text:p text:style-name="Text_20_body">Vcc1 turns ON</text:p>
      <text:p text:style-name="Text_20_body">Check the contents of SRAM and the validity of the timer</text:p>
      <text:p text:style-name="Text_20_body"><text:span text:style-name="Strong_20_Emphasis">Timer valid</text:span> <text:span text:style-name="Strong_20_Emphasis">Timer invalid</text:span></text:p>
      <text:p text:style-name="Text_20_body"><text:span text:style-name="Strong_20_Emphasis">TIMER LED turns ON</text:span> (RTC register address EA8001H (BANK 1; Main text 4 reference) write 00H)</text:p>
      <text:p text:style-name="Text_20_body"><text:span text:style-name="Strong_20_Emphasis">TIMER LED does not turn ON</text:span> (RTC register address EA8001H (BANK 1; Main text 4 reference) write 07H)</text:p>
      <text:p text:style-name="Text_20_body">Check MFP's GPIO2</text:p>
      <text:p text:style-name="Text_20_body"><text:span text:style-name="Strong_20_Emphasis">POWER Switch</text:span> turned ON Check MFP's GPIO1</text:p>
      <text:p text:style-name="Text_20_body"><text:span text:style-name="Strong_20_Emphasis">Timer valid</text:span> <text:span text:style-name="Strong_20_Emphasis">Timer invalid</text:span></text:p>
      <text:p text:style-name="Text_20_body"><text:span text:style-name="Strong_20_Emphasis">TIMER LED turns ON</text:span> (RTC register address EA8001H (BANK 1; Main text 4 reference) write 00H) <text:span text:style-name="Strong_20_Emphasis">TIMER LED does not turn ON</text:span> (RTC register address EA8001H (BANK 1; Main text 4 reference) write 07H)</text:p>
      <text:p text:style-name="Text_20_body">Check MFP's GPIO2</text:p>
      <text:p text:style-name="Text_20_body"><text:span text:style-name="Strong_20_Emphasis">"0"</text:span></text:p>
      <text:p text:style-name="Text_20_body">Turned ON by EXPWON signal from Extension I/O slot <text:span text:style-name="Strong_20_Emphasis">Check MFP's GPIO0</text:span></text:p>
      <text:p text:style-name="Text_20_body"><text:span text:style-name="Strong_20_Emphasis">"0"</text:span> <text:span text:style-name="Strong_20_Emphasis">"1"</text:span></text:p>
      <text:p text:style-name="Text_20_body">Jump to RTC’s ALARM timer, turned ON by ALARM signal</text:p>
      <text:p text:style-name="Text_20_body">If (1) is not met, use GPIO2, GPIO1, and GPIO0 to create and check the power control loop. Then, write the system port EB800FH with "0H" "0H" "FH" to POWER OFF</text:p>
      <text:p text:style-name="Text_20_body"><text:span text:style-name="Strong_20_Emphasis">Fig 4-6</text:span> Flowchart for checking power ON.</text:p>
      <text:p text:style-name="Text_20_body">Chapter 4 Peripheral LSI</text:p>
      <text:p text:style-name="Text_20_body">2-2 MFP Register Address Map</text:p>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column table:style-name="Table55.H"/>
        <table:table-column table:style-name="Table55.I"/>
        <table:table-column table:style-name="Table55.J"/>
        <table:table-header-rows>
          <table:table-row>
            <table:table-cell table:style-name="TableHeaderRowCell" office:value-type="string">
              <text:p text:style-name="Table_20_Heading">Register 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E88001H</text:p>
          </table:table-cell>
          <table:table-cell table:style-name="TableRowCell" office:value-type="string">
            <text:p text:style-name="Table_20_Contents">GPIP7</text:p>
          </table:table-cell>
          <table:table-cell table:style-name="TableRowCell" office:value-type="string">
            <text:p text:style-name="Table_20_Contents">GPIP6</text:p>
          </table:table-cell>
          <table:table-cell table:style-name="TableRowCell" office:value-type="string">
            <text:p text:style-name="Table_20_Contents">GPIP5</text:p>
          </table:table-cell>
          <table:table-cell table:style-name="TableRowCell" office:value-type="string">
            <text:p text:style-name="Table_20_Contents">GPIP4</text:p>
          </table:table-cell>
          <table:table-cell table:style-name="TableRowCell" office:value-type="string">
            <text:p text:style-name="Table_20_Contents">GPIP3</text:p>
          </table:table-cell>
          <table:table-cell table:style-name="TableRowCell" office:value-type="string">
            <text:p text:style-name="Table_20_Contents">GPIP2</text:p>
          </table:table-cell>
          <table:table-cell table:style-name="TableRowCell" office:value-type="string">
            <text:p text:style-name="Table_20_Contents">GPIP1</text:p>
          </table:table-cell>
          <table:table-cell table:style-name="TableRowCell" office:value-type="string">
            <text:p text:style-name="Table_20_Contents">GPIP0</text:p>
          </table:table-cell>
          <table:table-cell table:style-name="TableRowCell" office:value-type="string">
            <text:p text:style-name="Table_20_Contents">GPIP Data Register (Read only)</text:p>
          </table:table-cell>
        </table:table-row>
        <table:table-row>
          <table:table-cell table:style-name="TableRowCell" office:value-type="string">
            <text:p text:style-name="Table_20_Contents">E88003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Active Edge Register (AER)</text:p>
          </table:table-cell>
        </table:table-row>
        <table:table-row>
          <table:table-cell table:style-name="TableRowCell" office:value-type="string">
            <text:p text:style-name="Table_20_Contents">E88005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Data Direction Register (DDR)</text:p>
          </table:table-cell>
        </table:table-row>
        <table:table-row>
          <table:table-cell table:style-name="TableRowCell" office:value-type="string">
            <text:p text:style-name="Table_20_Contents">E88007H</text:p>
          </table:table-cell>
          <table:table-cell table:style-name="TableRowCell" office:value-type="string">
            <text:p text:style-name="Table_20_Contents">GPIP7</text:p>
          </table:table-cell>
          <table:table-cell table:style-name="TableRowCell" office:value-type="string">
            <text:p text:style-name="Table_20_Contents">GPIP6</text:p>
          </table:table-cell>
          <table:table-cell table:style-name="TableRowCell" office:value-type="string">
            <text:p text:style-name="Table_20_Contents">Timer Buffer A</text:p>
          </table:table-cell>
          <table:table-cell table:style-name="TableRowCell" office:value-type="string">
            <text:p text:style-name="Table_20_Contents">RCV Full</text:p>
          </table:table-cell>
          <table:table-cell table:style-name="TableRowCell" office:value-type="string">
            <text:p text:style-name="Table_20_Contents">Error</text:p>
          </table:table-cell>
          <table:table-cell table:style-name="TableRowCell" office:value-type="string">
            <text:p text:style-name="Table_20_Contents">Empty</text:p>
          </table:table-cell>
          <table:table-cell table:style-name="TableRowCell" office:value-type="string">
            <text:p text:style-name="Table_20_Contents">XMIT Buffer</text:p>
          </table:table-cell>
          <table:table-cell table:style-name="TableRowCell" office:value-type="string">
            <text:p text:style-name="Table_20_Contents">Timer B</text:p>
          </table:table-cell>
          <table:table-cell table:style-name="TableRowCell" office:value-type="string">
            <text:p text:style-name="Table_20_Contents">Interrupt A Enable Register A (IERA)</text:p>
          </table:table-cell>
        </table:table-row>
        <table:table-row>
          <table:table-cell table:style-name="TableRowCell" office:value-type="string">
            <text:p text:style-name="Table_20_Contents">E88009H</text:p>
          </table:table-cell>
          <table:table-cell table:style-name="TableRowCell" office:value-type="string">
            <text:p text:style-name="Table_20_Contents">GPIP5</text:p>
          </table:table-cell>
          <table:table-cell table:style-name="TableRowCell" office:value-type="string">
            <text:p text:style-name="Table_20_Contents">GPIP4</text:p>
          </table:table-cell>
          <table:table-cell table:style-name="TableRowCell" office:value-type="string">
            <text:p text:style-name="Table_20_Contents">Timer C</text:p>
          </table:table-cell>
          <table:table-cell table:style-name="TableRowCell" office:value-type="string">
            <text:p text:style-name="Table_20_Contents">Timer D</text:p>
          </table:table-cell>
          <table:table-cell table:style-name="TableRowCell" office:value-type="string">
            <text:p text:style-name="Table_20_Contents">GPIP3</text:p>
          </table:table-cell>
          <table:table-cell table:style-name="TableRowCell" office:value-type="string">
            <text:p text:style-name="Table_20_Contents">GPIP2</text:p>
          </table:table-cell>
          <table:table-cell table:style-name="TableRowCell" office:value-type="string">
            <text:p text:style-name="Table_20_Contents">GPIP1</text:p>
          </table:table-cell>
          <table:table-cell table:style-name="TableRowCell" office:value-type="string">
            <text:p text:style-name="Table_20_Contents">GPIP0</text:p>
          </table:table-cell>
          <table:table-cell table:style-name="TableRowCell" office:value-type="string">
            <text:p text:style-name="Table_20_Contents">Interrupt A Enable Register B (IERB)</text:p>
          </table:table-cell>
        </table:table-row>
        <table:table-row>
          <table:table-cell table:style-name="TableRowCell" office:value-type="string">
            <text:p text:style-name="Table_20_Contents">E8800BH</text:p>
          </table:table-cell>
          <table:table-cell table:style-name="TableRowCell" office:value-type="string">
            <text:p text:style-name="Table_20_Contents">RCV</text:p>
          </table:table-cell>
          <table:table-cell table:style-name="TableRowCell" office:value-type="string">
            <text:p text:style-name="Table_20_Contents">XMIT</text:p>
          </table:table-cell>
          <table:table-cell table:style-name="TableRowCell" office:value-type="string">
            <text:p text:style-name="Table_20_Contents">GPIP7</text:p>
          </table:table-cell>
          <table:table-cell table:style-name="TableRowCell" office:value-type="string">
            <text:p text:style-name="Table_20_Contents">GPIP6</text:p>
          </table:table-cell>
          <table:table-cell table:style-name="TableRowCell" office:value-type="string">
            <text:p text:style-name="Table_20_Contents">Timer Buffer A</text:p>
          </table:table-cell>
          <table:table-cell table:style-name="TableRowCell" office:value-type="string">
            <text:p text:style-name="Table_20_Contents">RCV Full</text:p>
          </table:table-cell>
          <table:table-cell table:style-name="TableRowCell" office:value-type="string">
            <text:p text:style-name="Table_20_Contents">Error</text:p>
          </table:table-cell>
          <table:table-cell table:style-name="TableRowCell" office:value-type="string">
            <text:p text:style-name="Table_20_Contents">Empty</text:p>
          </table:table-cell>
          <table:table-cell table:style-name="TableRowCell" office:value-type="string">
            <text:p text:style-name="Table_20_Contents">Interrupt Pending Register A (IPRA)</text:p>
          </table:table-cell>
        </table:table-row>
        <table:table-row>
          <table:table-cell table:style-name="TableRowCell" office:value-type="string">
            <text:p text:style-name="Table_20_Contents">E8800DH</text:p>
          </table:table-cell>
          <table:table-cell table:style-name="TableRowCell" office:value-type="string">
            <text:p text:style-name="Table_20_Contents">GPIP5</text:p>
          </table:table-cell>
          <table:table-cell table:style-name="TableRowCell" office:value-type="string">
            <text:p text:style-name="Table_20_Contents">GPIP4</text:p>
          </table:table-cell>
          <table:table-cell table:style-name="TableRowCell" office:value-type="string">
            <text:p text:style-name="Table_20_Contents">Timer C</text:p>
          </table:table-cell>
          <table:table-cell table:style-name="TableRowCell" office:value-type="string">
            <text:p text:style-name="Table_20_Contents">Timer D</text:p>
          </table:table-cell>
          <table:table-cell table:style-name="TableRowCell" office:value-type="string">
            <text:p text:style-name="Table_20_Contents">GPIP3</text:p>
          </table:table-cell>
          <table:table-cell table:style-name="TableRowCell" office:value-type="string">
            <text:p text:style-name="Table_20_Contents">GPIP2</text:p>
          </table:table-cell>
          <table:table-cell table:style-name="TableRowCell" office:value-type="string">
            <text:p text:style-name="Table_20_Contents">GPIP1</text:p>
          </table:table-cell>
          <table:table-cell table:style-name="TableRowCell" office:value-type="string">
            <text:p text:style-name="Table_20_Contents">GPIP0</text:p>
          </table:table-cell>
          <table:table-cell table:style-name="TableRowCell" office:value-type="string">
            <text:p text:style-name="Table_20_Contents">Interrupt Pending Register B (IPRB)</text:p>
          </table:table-cell>
        </table:table-row>
        <table:table-row>
          <table:table-cell table:style-name="TableRowCell" office:value-type="string">
            <text:p text:style-name="Table_20_Contents">E8800FH</text:p>
          </table:table-cell>
          <table:table-cell table:style-name="TableRowCell" office:value-type="string">
            <text:p text:style-name="Table_20_Contents">RCV</text:p>
          </table:table-cell>
          <table:table-cell table:style-name="TableRowCell" office:value-type="string">
            <text:p text:style-name="Table_20_Contents">XMIT</text:p>
          </table:table-cell>
          <table:table-cell table:style-name="TableRowCell" office:value-type="string">
            <text:p text:style-name="Table_20_Contents">GPIP7</text:p>
          </table:table-cell>
          <table:table-cell table:style-name="TableRowCell" office:value-type="string">
            <text:p text:style-name="Table_20_Contents">GPIP6</text:p>
          </table:table-cell>
          <table:table-cell table:style-name="TableRowCell" office:value-type="string">
            <text:p text:style-name="Table_20_Contents">Timer Buffer A</text:p>
          </table:table-cell>
          <table:table-cell table:style-name="TableRowCell" office:value-type="string">
            <text:p text:style-name="Table_20_Contents">RCV Full</text:p>
          </table:table-cell>
          <table:table-cell table:style-name="TableRowCell" office:value-type="string">
            <text:p text:style-name="Table_20_Contents">Error</text:p>
          </table:table-cell>
          <table:table-cell table:style-name="TableRowCell" office:value-type="string">
            <text:p text:style-name="Table_20_Contents">Empty</text:p>
          </table:table-cell>
          <table:table-cell table:style-name="TableRowCell" office:value-type="string">
            <text:p text:style-name="Table_20_Contents">Interrupt Service Register A (ISRA)</text:p>
          </table:table-cell>
        </table:table-row>
        <table:table-row>
          <table:table-cell table:style-name="TableRowCell" office:value-type="string">
            <text:p text:style-name="Table_20_Contents">E88011H</text:p>
          </table:table-cell>
          <table:table-cell table:style-name="TableRowCell" office:value-type="string">
            <text:p text:style-name="Table_20_Contents">GPIP5</text:p>
          </table:table-cell>
          <table:table-cell table:style-name="TableRowCell" office:value-type="string">
            <text:p text:style-name="Table_20_Contents">GPIP4</text:p>
          </table:table-cell>
          <table:table-cell table:style-name="TableRowCell" office:value-type="string">
            <text:p text:style-name="Table_20_Contents">Timer C</text:p>
          </table:table-cell>
          <table:table-cell table:style-name="TableRowCell" office:value-type="string">
            <text:p text:style-name="Table_20_Contents">Timer D</text:p>
          </table:table-cell>
          <table:table-cell table:style-name="TableRowCell" office:value-type="string">
            <text:p text:style-name="Table_20_Contents">GPIP3</text:p>
          </table:table-cell>
          <table:table-cell table:style-name="TableRowCell" office:value-type="string">
            <text:p text:style-name="Table_20_Contents">GPIP2</text:p>
          </table:table-cell>
          <table:table-cell table:style-name="TableRowCell" office:value-type="string">
            <text:p text:style-name="Table_20_Contents">GPIP1</text:p>
          </table:table-cell>
          <table:table-cell table:style-name="TableRowCell" office:value-type="string">
            <text:p text:style-name="Table_20_Contents">GPIP0</text:p>
          </table:table-cell>
          <table:table-cell table:style-name="TableRowCell" office:value-type="string">
            <text:p text:style-name="Table_20_Contents">Interrupt Service Register B (ISRB)</text:p>
          </table:table-cell>
        </table:table-row>
        <table:table-row>
          <table:table-cell table:style-name="TableRowCell" office:value-type="string">
            <text:p text:style-name="Table_20_Contents">E88013H</text:p>
          </table:table-cell>
          <table:table-cell table:style-name="TableRowCell" office:value-type="string">
            <text:p text:style-name="Table_20_Contents">RCV</text:p>
          </table:table-cell>
          <table:table-cell table:style-name="TableRowCell" office:value-type="string">
            <text:p text:style-name="Table_20_Contents">XMIT</text:p>
          </table:table-cell>
          <table:table-cell table:style-name="TableRowCell" office:value-type="string">
            <text:p text:style-name="Table_20_Contents">GPIP7</text:p>
          </table:table-cell>
          <table:table-cell table:style-name="TableRowCell" office:value-type="string">
            <text:p text:style-name="Table_20_Contents">GPIP6</text:p>
          </table:table-cell>
          <table:table-cell table:style-name="TableRowCell" office:value-type="string">
            <text:p text:style-name="Table_20_Contents">Timer Buffer A</text:p>
          </table:table-cell>
          <table:table-cell table:style-name="TableRowCell" office:value-type="string">
            <text:p text:style-name="Table_20_Contents">RCV Full</text:p>
          </table:table-cell>
          <table:table-cell table:style-name="TableRowCell" office:value-type="string">
            <text:p text:style-name="Table_20_Contents">Error</text:p>
          </table:table-cell>
          <table:table-cell table:style-name="TableRowCell" office:value-type="string">
            <text:p text:style-name="Table_20_Contents">Empty</text:p>
          </table:table-cell>
          <table:table-cell table:style-name="TableRowCell" office:value-type="string">
            <text:p text:style-name="Table_20_Contents">Interrupt Mask Register A (IMRA)</text:p>
          </table:table-cell>
        </table:table-row>
        <table:table-row>
          <table:table-cell table:style-name="TableRowCell" office:value-type="string">
            <text:p text:style-name="Table_20_Contents">E88015H</text:p>
          </table:table-cell>
          <table:table-cell table:style-name="TableRowCell" office:value-type="string">
            <text:p text:style-name="Table_20_Contents">GPIP5</text:p>
          </table:table-cell>
          <table:table-cell table:style-name="TableRowCell" office:value-type="string">
            <text:p text:style-name="Table_20_Contents">GPIP4</text:p>
          </table:table-cell>
          <table:table-cell table:style-name="TableRowCell" office:value-type="string">
            <text:p text:style-name="Table_20_Contents">Timer C</text:p>
          </table:table-cell>
          <table:table-cell table:style-name="TableRowCell" office:value-type="string">
            <text:p text:style-name="Table_20_Contents">Timer D</text:p>
          </table:table-cell>
          <table:table-cell table:style-name="TableRowCell" office:value-type="string">
            <text:p text:style-name="Table_20_Contents">GPIP3</text:p>
          </table:table-cell>
          <table:table-cell table:style-name="TableRowCell" office:value-type="string">
            <text:p text:style-name="Table_20_Contents">GPIP2</text:p>
          </table:table-cell>
          <table:table-cell table:style-name="TableRowCell" office:value-type="string">
            <text:p text:style-name="Table_20_Contents">GPIP1</text:p>
          </table:table-cell>
          <table:table-cell table:style-name="TableRowCell" office:value-type="string">
            <text:p text:style-name="Table_20_Contents">GPIP0</text:p>
          </table:table-cell>
          <table:table-cell table:style-name="TableRowCell" office:value-type="string">
            <text:p text:style-name="Table_20_Contents">Interrupt Mask Register B (IMRB)</text:p>
          </table:table-cell>
        </table:table-row>
        <table:table-row>
          <table:table-cell table:style-name="TableRowCell" office:value-type="string">
            <text:p text:style-name="Table_20_Contents">E88017H</text:p>
          </table:table-cell>
          <table:table-cell table:style-name="TableRowCell" office:value-type="string">
            <text:p text:style-name="Table_20_Contents">V7</text:p>
          </table:table-cell>
          <table:table-cell table:style-name="TableRowCell" office:value-type="string">
            <text:p text:style-name="Table_20_Contents">V6</text:p>
          </table:table-cell>
          <table:table-cell table:style-name="TableRowCell" office:value-type="string">
            <text:p text:style-name="Table_20_Contents">V5</text:p>
          </table:table-cell>
          <table:table-cell table:style-name="TableRowCell" office:value-type="string">
            <text:p text:style-name="Table_20_Contents">V4</text:p>
          </table:table-cell>
          <table:table-cell table:style-name="TableRowCell" office:value-type="string">
            <text:p text:style-name="Table_20_Contents">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Vector Register</text:p>
          </table:table-cell>
        </table:table-row>
        <table:table-row>
          <table:table-cell table:style-name="TableRowCell" office:value-type="string">
            <text:p text:style-name="Table_20_Contents">E88019H</text:p>
          </table:table-cell>
          <table:table-cell table:style-name="TableRowCell" office:value-type="string">
            <text:p text:style-name="Table_20_Contents">Reset</text:p>
          </table:table-cell>
          <table:table-cell table:style-name="TableRowCell" office:value-type="string">
            <text:p text:style-name="Table_20_Contents">AC3</text:p>
          </table:table-cell>
          <table:table-cell table:style-name="TableRowCell" office:value-type="string">
            <text:p text:style-name="Table_20_Contents">AC2</text:p>
          </table:table-cell>
          <table:table-cell table:style-name="TableRowCell" office:value-type="string">
            <text:p text:style-name="Table_20_Contents">AC1</text:p>
          </table:table-cell>
          <table:table-cell table:style-name="TableRowCell" office:value-type="string">
            <text:p text:style-name="Table_20_Contents">AC0</text:p>
          </table:table-cell>
          <table:table-cell table:style-name="TableRowCell" office:value-type="string">
            <text:p text:style-name="Table_20_Contents">TAO</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imer A Control Register (TACR)</text:p>
          </table:table-cell>
        </table:table-row>
        <table:table-row>
          <table:table-cell table:style-name="TableRowCell" office:value-type="string">
            <text:p text:style-name="Table_20_Contents">E8801BH</text:p>
          </table:table-cell>
          <table:table-cell table:style-name="TableRowCell" office:value-type="string">
            <text:p text:style-name="Table_20_Contents">Reset</text:p>
          </table:table-cell>
          <table:table-cell table:style-name="TableRowCell" office:value-type="string">
            <text:p text:style-name="Table_20_Contents">BC3</text:p>
          </table:table-cell>
          <table:table-cell table:style-name="TableRowCell" office:value-type="string">
            <text:p text:style-name="Table_20_Contents">BC2</text:p>
          </table:table-cell>
          <table:table-cell table:style-name="TableRowCell" office:value-type="string">
            <text:p text:style-name="Table_20_Contents">BC1</text:p>
          </table:table-cell>
          <table:table-cell table:style-name="TableRowCell" office:value-type="string">
            <text:p text:style-name="Table_20_Contents">BC0</text:p>
          </table:table-cell>
          <table:table-cell table:style-name="TableRowCell" office:value-type="string">
            <text:p text:style-name="Table_20_Contents">TAO</text:p>
          </table:table-cell>
          <table:table-cell table:style-name="TableRowCell" office:value-type="string">
            <text:p text:style-name="Table_20_Contents">BCO</text:p>
          </table:table-cell>
          <table:table-cell table:style-name="TableRowCell" office:value-type="string">
            <text:p text:style-name="Table_20_Contents">*</text:p>
          </table:table-cell>
          <table:table-cell table:style-name="TableRowCell" office:value-type="string">
            <text:p text:style-name="Table_20_Contents">Timer B Control Register (TBCR)</text:p>
          </table:table-cell>
        </table:table-row>
        <table:table-row>
          <table:table-cell table:style-name="TableRowCell" office:value-type="string">
            <text:p text:style-name="Table_20_Contents">E8801DH</text:p>
          </table:table-cell>
          <table:table-cell table:style-name="TableRowCell" office:value-type="string">
            <text:p text:style-name="Table_20_Contents">CC2</text:p>
          </table:table-cell>
          <table:table-cell table:style-name="TableRowCell" office:value-type="string">
            <text:p text:style-name="Table_20_Contents">CC1</text:p>
          </table:table-cell>
          <table:table-cell table:style-name="TableRowCell" office:value-type="string">
            <text:p text:style-name="Table_20_Contents">CC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DC2</text:p>
          </table:table-cell>
          <table:table-cell table:style-name="TableRowCell" office:value-type="string">
            <text:p text:style-name="Table_20_Contents">DC1</text:p>
          </table:table-cell>
          <table:table-cell table:style-name="TableRowCell" office:value-type="string">
            <text:p text:style-name="Table_20_Contents">DCO</text:p>
          </table:table-cell>
          <table:table-cell table:style-name="TableRowCell" office:value-type="string">
            <text:p text:style-name="Table_20_Contents">Timer C, D Control Register (TCDCR)</text:p>
          </table:table-cell>
        </table:table-row>
        <table:table-row>
          <table:table-cell table:style-name="TableRowCell" office:value-type="string">
            <text:p text:style-name="Table_20_Contents">E8801FH</text:p>
          </table:table-cell>
          <table:table-cell table:style-name="TableRowCell" office:value-type="string">
            <text:p text:style-name="Table_20_Contents">D7</text:p>
          </table:table-cell>
          <table:table-cell table:style-name="TableRowCell" office:value-type="string">
            <text:p text:style-name="Table_20_Contents">D6</text:p>
          </table:table-cell>
          <table:table-cell table:style-name="TableRowCell" office:value-type="string">
            <text:p text:style-name="Table_20_Contents">D5</text:p>
          </table:table-cell>
          <table:table-cell table:style-name="TableRowCell" office:value-type="string">
            <text:p text:style-name="Table_20_Contents">D4</text:p>
          </table:table-cell>
          <table:table-cell table:style-name="TableRowCell" office:value-type="string">
            <text:p text:style-name="Table_20_Contents">D3</text:p>
          </table:table-cell>
          <table:table-cell table:style-name="TableRowCell" office:value-type="string">
            <text:p text:style-name="Table_20_Contents">D2</text:p>
          </table:table-cell>
          <table:table-cell table:style-name="TableRowCell" office:value-type="string">
            <text:p text:style-name="Table_20_Contents">D1</text:p>
          </table:table-cell>
          <table:table-cell table:style-name="TableRowCell" office:value-type="string">
            <text:p text:style-name="Table_20_Contents">D0</text:p>
          </table:table-cell>
          <table:table-cell table:style-name="TableRowCell" office:value-type="string">
            <text:p text:style-name="Table_20_Contents">Timer A Data Register (TADR)</text:p>
          </table:table-cell>
        </table:table-row>
        <table:table-row>
          <table:table-cell table:style-name="TableRowCell" office:value-type="string">
            <text:p text:style-name="Table_20_Contents">E88021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imer B Data Register (TBDR)</text:p>
          </table:table-cell>
        </table:table-row>
        <table:table-row>
          <table:table-cell table:style-name="TableRowCell" office:value-type="string">
            <text:p text:style-name="Table_20_Contents">E88023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imer C Data Register (TCDR)</text:p>
          </table:table-cell>
        </table:table-row>
        <table:table-row>
          <table:table-cell table:style-name="TableRowCell" office:value-type="string">
            <text:p text:style-name="Table_20_Contents">E88025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imer D Data Register (TDDR)</text:p>
          </table:table-cell>
        </table:table-row>
      </table:table>
      <text:p text:style-name="First_20_paragraph">Page 128</text:p>
      <text:list text:style-name="Numbering_20_1" text:start-value="2">
        <text:list-item>
          <text:p text:style-name="List_20_Number_20_Tight">MFP (Multi Function Peripheral)</text:p>
        </text:list-item>
      </text:list>
      <text:p text:style-name="First_20_paragraph">Name | Description E88027H | Concurrent Character Register (Unused) E88029H | USART Control Register (UCR) E8802BH | Receiver Status Register (RSR) E8802DH | Transmitting Status Register (TSR) E8802FH | USART Data Register (UDR)</text:p>
      <text:p text:style-name="Text_20_body"><text:span text:style-name="Strong_20_Emphasis">Table 4-6 MFP Register Address Map</text:span></text:p>
      <text:p text:style-name="Text_20_body">Address | D07 | D06 | D05 | D04 | D03 | D02 | D01 | D00 | Description E88001H | GPIP Data Register (Read Only) E88003H | P | P | P | P | P | P | P | P | Active Edge Register (AER) E88005H | 0 | 0 | 0 | 0 | 0 | 0 | 1 | 0 | Data Direction Register (DDR) E88007H | P | P | P | P | P | P | P | 1 | Interrupt Enable Register A (IERA) E88009H | P | P | 1 | 0 | P | P | P | P | Interrupt Enable Register B (IERB) E8800BH | . | . | P | . | . | . | . | P | Active Pending Register A (IPRA) E8800DH | P | P | 1 | . | . | . | P | | Active Pending Register B (IPRB) E8800FH | 1 | P | P | P | . | . | . | P | In-Service Register A (ISRA) E88011H | . | . | 1 | . | P | . | P | 0 | In-Service Register B (ISRB) E88013H | P | 0 | P | P | 0 | 0 | 0 | | Mask Register A (IMRA) E88015H | 0 | 1 | P | 1 | 1 | 0 | 0 | 1 | Mask Register B (IMRB) E88017H | 1 | P | . | . | P | . | . | P | Interrupt Vector Register (IVR) E88019H | 0 | 0 | 0 | 1 | 0 | P | P | 0 | Timer Control Register A (TACR) E8801BH | 0 | P | 0 | 0 | 0 | 1 | 0 | 0 | Timer Control Register B (TBCR) E8801DH | P | 0 | 0 | 0 | 0 | P | 0 | 1 | Control Register for Timer A, C, D (TCDCR) E8801FH | 0 | 0 | 0 | 0 | 0 | 1 | 0 | 0 | Timer Data Register A (TADR) E88021H | P | P | P | P | . | P | P | P | Timer Data Register B (TBDR) E88023H | P | P | P | P | P | P | P | P | Timer Data Register C (TCDR) E88025H | 0 | P | 0 | P | 1 | 0 | 1 | 0 | Timer Data Register D (TDDR) E88027H | 0 | 0 | 0 | 0 | 0 | 0 | 0 | 0 | Concurrent Character Register (Unused) E88029H | 0 | 1 | 0 | 0 | 0 | 0 | 0 | 1 | USART Control Register (UCR) E8802BH | . | . | P | . | . | P | P | P | Receiver Status Register (RSR) E8802DH | . | . | . | P | . | P | 0 | P | Transmitting Status Register (TSR) E8802FH | P | . | . | P | 0 | P | 0 | 0 | USART Data Register (UDR)</text:p>
      <text:p text:style-name="Text_20_body">In the above, "P" denotes "programmable."</text:p>
      <text:p text:style-name="Text_20_body"><text:span text:style-name="Strong_20_Emphasis">Table 4-7 MFP Register Reset Values</text:span></text:p>
      <text:p text:style-name="Text_20_body">Chapter 4 Peripheral LSI</text:p>
      <text:p text:style-name="Text_20_body">2-3 Detailed Information on MFP Registers</text:p>
      <text:p text:style-name="Text_20_body">(1) GPIP Control</text:p>
      <text:p text:style-name="Text_20_body">· GPIP Data Register (E88001H) The MFP's GPIP port (8 bits) can be designated as a regular port or an interrupt port on a per-bit basis. In the X68000, GPIP0 and GPIP1 are used as read-only ports using timer A in event count mode, GPIP4 is also read-only using timer A, and GPIP2, GPIP6, and GPIP7 (GPIP0) can be used as interrupt ports (GPIP5 is not used). In any case, all bits are read-only. However, all bits will be 0 at reset.</text:p>
      <text:p text:style-name="Text_20_body">D7 | D6 | D5 | D4 | D3 | D2 | D1 | D0</text:p>
      <text:list text:style-name="List_20_1">
        <text:list-item>
          <text:p text:style-name="List_20_Bullet_20_Tight">| | | | | | | | (Not used)</text:p>
        </text:list-item>
      </text:list>
      <text:p text:style-name="First_20_paragraph">0: RTC or ALARM signal "L" (turns computer on by ALARM timer) 1: RTC or ALARM signal "H" 0: Expansion I/O slot EXPON signal "L" 1: Expansion I/O slot EXPON signal "H" 0: Front switch on computer "L" 1: Front switch on computer "H" 0: Front switch signal OFF "H" 1: Front switch signal ON "L" 0: CRTC C video interruption (frame initialization) "H" 1: CRTC C video interruption (frame initialization) "L" 0: CRTC D video non-display period "L" 1: CRTC D video non-display period "H" 0: CRTC C IRQ signal "H" 1: CRTC C IRQ signal "L" 0: CRTC D IRQ signal "H" 1: CRTC D IRQ signal "L" 0: CRTC D H-SYNC signal "H" 1: CRTC D H-SYNC signal "L"</text:p>
      <text:p text:style-name="Text_20_body">·Active Edge Register (E88003H)</text:p>
      <text:p text:style-name="Text_20_body">D7 | D6 | D5 | D4 | D3 | D2 | D1 | D0</text:p>
      <text:list text:style-name="List_20_1">
        <text:list-item>
          <text:p text:style-name="List_20_Bullet_20_Tight">| | | | | | | | (Not used)</text:p>
        </text:list-item>
      </text:list>
      <text:p text:style-name="First_20_paragraph">0: RTC or ALARM signal health, interrupt occurs with rising edge 1: RTC or ALARM signal health, interrupt occurs with falling edge 0: Expansion I/O slot EXPON signal health, interrupt occurs with rising edge 1: Expansion I/O slot EXPON signal health, interrupt occurs with falling edge 0: Power switch off condition "0", interrupt occurs at rising edge 1: Power switch off condition "1", interrupt occurs at falling edge 0: Image reply IRQ signal number 1 "1", interrupt occurs at rising edge 1: Image reply IRQ signal number 1 "1", interrupt occurs at falling edge 0: Timer (CRTC C V-DISP) signal issue when "1", interrupt occurs at rising edge 1: Timer (CRTC C V-DISP) signal issue when "0", interrupt occurs at falling edge 0: CRTC C IRQ signal "H", interrupt occurs at rising edge 1: CRTC C IRQ signal "L", interrupt occurs at falling edge 0: CRTC D IRQ signal "H", interrupt occurs at rising edge 1: CRTC D IRQ signal "L", interrupt occurs at falling edge 0: CRTC D H-SYNC signal "H", interrupt occurs at rising edge 1: CRTC D H-SYNC signal "L", interrupt occurs at falling edge</text:p>
      <text:p text:style-name="Text_20_body">However, all bits will be 0 at reset.</text:p>
      <text:p text:style-name="Text_20_body">Page 130</text:p>
      <text:list text:style-name="Numbering_20_1" text:start-value="2">
        <text:list-item>
          <text:p text:style-name="List_20_Number_20_Tight">MFP (Multi Function Peripheral)</text:p>
        </text:list-item>
      </text:list>
      <text:list text:style-name="List_20_1">
        <text:list-item>
          <text:p text:style-name="List_20_Bullet_20_Tight">Data Direction Register (E88005H) Specifies the input and output of the GPIP port. On the X68000, all 8 bits are used as input, so 00H is set in E88005H. However, all bits are reset to 0 initially.</text:p>
        </text:list-item>
      </text:list>
      <text:p text:style-name="First_20_paragraph">(2) Interrupt Control</text:p>
      <text:list text:style-name="List_20_1">
        <text:list-item>
          <text:p text:style-name="List_20_Bullet_20_Tight">Interrupt Enable Register A (E88007H) a. When the corresponding bit is set (1): To enable the interrupt, write 1.</text:p>
        </text:list-item>
      </text:list>
      <text:p text:style-name="First_20_paragraph">b. When the corresponding bit is cleared (0): To disable the interrupt, write 0 (the relevant bit in IPRA also becomes 0).</text:p>
      <text:p text:style-name="Preformatted_20_Text">Diagram:</text:p>
      <text:p text:style-name="Preformatted_20_Text">D7 <text:s text:c="3"/>D6 <text:s text:c="3"/>D5 <text:s text:c="3"/>D4 <text:s text:c="3"/>D3 <text:s text:c="3"/>D2 <text:s text:c="3"/>D1 <text:s text:c="3"/>D0</text:p>
      <text:p text:style-name="Preformatted_20_Text"><text:s text:c="2"/>↓ <text:s text:c="4"/>↓ <text:s text:c="4"/>↓ <text:s text:c="4"/>↓ <text:s text:c="4"/>↓ <text:s text:c="4"/>↓ <text:s text:c="4"/>↓ <text:s text:c="4"/>↓</text:p>
      <text:p text:style-name="Preformatted_20_Text">1 : TimerB Interrupt Enable <text:s text:c="2"/>0: TimerB Interrupt Disabled (Normal)</text:p>
      <text:p text:style-name="Preformatted_20_Text">1 : TimerA Interrupt Enable <text:s text:c="2"/>0: TimerA Interrupt Disabled (Normal)</text:p>
      <text:p text:style-name="Preformatted_20_Text">1 : Transmit Error Interrupt Enable/Disable</text:p>
      <text:p text:style-name="Preformatted_20_Text">1 : Transmit Buffer Empty Interrupt Enable/Disable</text:p>
      <text:p text:style-name="Preformatted_20_Text">1 : Receive Error Interrupt Enable/Disable</text:p>
      <text:p text:style-name="Preformatted_20_Text">1 : Receive Buffer Full Interrupt Enable/Disable</text:p>
      <text:p text:style-name="Preformatted_20_Text">1 : TimerA Interrupt Enable/Disable (Normal)</text:p>
      <text:p text:style-name="Preformatted_20_Text">1 : GPIP7 Interrupt Enable/Disable</text:p>
      <text:p text:style-name="Preformatted_20_Text">1 : GPIP6 Interrupt Enable/Disable</text:p>
      <text:p text:style-name="Preformatted_20_Text">1 : GPIP1 Interrupt Enable/Disable</text:p>
      <text:p text:style-name="Preformatted_20_Text">1 : GPIP0 Interrupt Enable/Disable</text:p>
      <text:p text:style-name="First_20_paragraph">Chapter 4 Peripheral LSI</text:p>
      <text:list text:style-name="List_20_1">
        <text:list-item>
          <text:p text:style-name="List_20_Bullet_20_Tight">Interrupt Enable Register B (E88009H)</text:p>
        </text:list-item>
      </text:list>
      <text:p text:style-name="Preformatted_20_Text"><text:s text:c="2"/>a. When the corresponding bit is set (1)</text:p>
      <text:p text:style-name="Preformatted_20_Text"><text:s text:c="4"/>* To make the interrupt channel enable, write 1.</text:p>
      <text:p text:style-name="Preformatted_20_Text"><text:s text:c="2"/>b. When the corresponding bit is cleared (0)</text:p>
      <text:p text:style-name="Preformatted_20_Text"><text:s text:c="4"/>* To make the interrupt channel disable, write 0 (the corresponding bit in IPRA will also become 0).</text:p>
      <text:p text:style-name="Preformatted_20_Text"><text:s text:c="4"/>* When reset.</text:p>
      <text:p text:style-name="Preformatted_20_Text"/>
      <text:p text:style-name="Preformatted_20_Text">D7 D6 D5 D4 D3 D2 D1 D0</text:p>
      <text:p text:style-name="Preformatted_20_Text"><text:s text:c="1"/>│ <text:s text:c="2"/>│ <text:s text:c="1"/>│ <text:s text:c="2"/>│ <text:s text:c="2"/>│ <text:s text:c="2"/>│ <text:s text:c="2"/>│ <text:s text:c="2"/>│</text:p>
      <text:p text:style-name="Preformatted_20_Text"><text:s text:c="1"/>├──┘ └──┬──┘ <text:s text:c="1"/>│ <text:s text:c="2"/>│ <text:s text:c="1"/>│ <text:s text:c="2"/>│ <text:s text:c="1"/></text:p>
      <text:p text:style-name="Preformatted_20_Text"><text:s text:c="1"/>│ <text:s text:c="7"/>│ <text:s text:c="2"/>│ <text:s text:c="2"/>│ <text:s text:c="2"/>│ <text:s text:c="2"/>│</text:p>
      <text:p text:style-name="Preformatted_20_Text"><text:s text:c="1"/>0: GPI0 Interrupt Enable (Normal)</text:p>
      <text:p text:style-name="Preformatted_20_Text"><text:s text:c="1"/>1: GPI0 Interrupt Disable</text:p>
      <text:p text:style-name="Preformatted_20_Text"><text:s text:c="1"/>0: GPI1 Interrupt Enable (Normal)</text:p>
      <text:p text:style-name="Preformatted_20_Text"><text:s text:c="1"/>1: GPI1 Interrupt Disable</text:p>
      <text:p text:style-name="Preformatted_20_Text"><text:s text:c="1"/>0: GPI2 Interrupt Enable (Normal)</text:p>
      <text:p text:style-name="Preformatted_20_Text"><text:s text:c="1"/>1: GPI2 Interrupt Disable</text:p>
      <text:p text:style-name="Preformatted_20_Text"><text:s text:c="1"/>0: GPI3 Interrupt Enable (Normal)</text:p>
      <text:p text:style-name="Preformatted_20_Text"><text:s text:c="1"/>1: GPI3 Interrupt Disable</text:p>
      <text:p text:style-name="Preformatted_20_Text"><text:s text:c="1"/>0: TimerB Interrupt Enable (Normal)</text:p>
      <text:p text:style-name="Preformatted_20_Text"><text:s text:c="1"/>1: TimerB Interrupt Disable</text:p>
      <text:p text:style-name="Preformatted_20_Text"><text:s text:c="1"/>0: TimerC Interrupt Enable (Normal)</text:p>
      <text:p text:style-name="Preformatted_20_Text"><text:s text:c="1"/>1: TimerC Interrupt Disable</text:p>
      <text:p text:style-name="Preformatted_20_Text"><text:s text:c="1"/>0: GPI4 Interrupt Enable (Normal)</text:p>
      <text:p text:style-name="Preformatted_20_Text"><text:s text:c="1"/>1: GPI4 Interrupt Disable</text:p>
      <text:p text:style-name="Preformatted_20_Text"><text:s text:c="1"/>0: GPI5 Interrupt Enable (Normal)</text:p>
      <text:p text:style-name="Preformatted_20_Text"><text:s text:c="1"/>1: GPI5 Interrupt Disable</text:p>
      <text:list text:style-name="List_20_1">
        <text:list-item>
          <text:p text:style-name="List_20_Bullet_20_Tight">Interrupt Pending Register A (E88008H), B (E8800DH)</text:p>
        </text:list-item>
      </text:list>
      <text:p text:style-name="Preformatted_20_Text"><text:s text:c="2"/>This register cannot be cleared (0) or set (1) by the MPU. The corresponding bits for interrupt channels are also the same as IERA and IERB.</text:p>
      <text:p text:style-name="Preformatted_20_Text"><text:s text:c="2"/>a. When the corresponding bit is set (1)</text:p>
      <text:p text:style-name="Preformatted_20_Text"><text:s text:c="4"/>* When the corresponding bit of IERA (IERB) is 1 (enable) and interrupts the channel.</text:p>
      <text:p text:style-name="Preformatted_20_Text"><text:s text:c="5"/>However, in this state, if the corresponding bit of IMRA (IMRB) is 0 (masked), the corresponding bit of IPRA (IPRB) is set (1).</text:p>
      <text:p text:style-name="Preformatted_20_Text"><text:s text:c="2"/>b. When the corresponding bit is cleared (0)</text:p>
      <text:p text:style-name="Preformatted_20_Text"><text:s text:c="4"/>* When writing 0 (disable) to the corresponding bit of IERA (IERB).</text:p>
      <text:p text:style-name="Preformatted_20_Text"><text:s text:c="4"/>* The pending interrupt is passed to the MPU, and the interrupt vector passed to the MPU during the IACK cycle.</text:p>
      <text:p text:style-name="Preformatted_20_Text"><text:s text:c="4"/>* Writing 0 to the corresponding bit, and writing 1 to all bits other than the corresponding bit.</text:p>
      <text:p text:style-name="Preformatted_20_Text"><text:s text:c="4"/>* When reset.</text:p>
      <text:list text:style-name="Numbering_20_1" text:start-value="2">
        <text:list-item>
          <text:p text:style-name="List_20_Number_20_Tight">MFP (Multi Function Peripheral)</text:p>
        </text:list-item>
      </text:list>
      <text:list text:style-name="List_20_1">
        <text:list-item>
          <text:p text:style-name="List_20_Bullet_20_Tight">Interrupt Service Register A (E8800FHD), B (E88011HD) This register can be set (1) but cannot be cleared (0) by the MPU. The assignment of the interrupt channel to each bit is the same as IERA and IERB. a. When the corresponding bit is set (1),</text:p>
        </text:list-item>
      </text:list>
      <text:list text:style-name="List_20_1">
        <text:list-item>
          <text:p text:style-name="List_20_Bullet_20_Tight">When the corresponding bit is set, the interrupt vector is sent to MPU during the IACK cycle and the MPU starts interrupt processing. After that, when the D03 bit of the interrupt vector register becomes 0 during automatic interruption of all channels (meaning the automatic interruption has finished), the corresponding bit is forcibly set to 0 after the interrupt processing is completed by MPU. In automatic end mode for all channels, at the time of receiving some channel interrupt requests, during interrupt processing at the highest priority within MPU, MFP cannot receive such interrupt requests. When the interrupt is masked in such a condition that the interrupt enable register of the corresponding channel is set (1) and the interrupt pending register of the corresponding bit is set (1) while MFP is performing other interrupt processing or after completing automatic processing at the end of NMI, MFP won't receive such interrupt requests. When the interrupt mask register of the corresponding channel has been set to (1), the lower priority interrupts will not be received during interrupt processing at the resolution mode at such stage of interrupt request reception. Similarly, the interrupt vector register also has been set (1) and waits for interrupt services.</text:p>
        </text:list-item>
      </text:list>
      <text:p text:style-name="First_20_paragraph">By the same, if the bit of the interrupt vector register D03 bit becomes 1 during the automatic termination mode for all-channel software interrupts, at last just like the mode stated above, the interruption processing ends and the associated bit is forcedly set to 0 if the MPU ends current interrupt and software processing. In this way, the registered bit remains set (1). The interrupt processing does not end until the software ends the interrupt process by setting the corresponding bit manually to 0. For the interrupt requests of high priority which are waiting for the acceptance among other interrupt requests, the corresponding channels' interrupt enabling register is set (1) while NMI executes the ongoing interrupt process, the higher priority's interrupt's pending register set (1) and further interrupt processing will proceed for subsequent requests till it completes at the software end accordingly.</text:p>
      <text:p text:style-name="Text_20_body">Chapter 4 Peripheral LSI</text:p>
      <text:p text:style-name="Text_20_body">If a channel Mi requests the MPU, and the request is accepted, the interrupt processing is executed. If however, there is no "1" in the bit of the interrupt service system for the corresponding interrupt, other interrupts are not accepted.</text:p>
      <text:p text:style-name="Text_20_body">b. When the corresponding bit is cleared (0) When the D03 bit of the interrupt vector register DO is 0 (All-channel auto interrupt completion mode), interrupt processing begins in the MPU and finishes when the processing is completed. When the interrupt vector register is set to 0, write a "1" to all bits except the corresponding bit. When it is reset.</text:p>
      <text:list text:style-name="List_20_1">
        <text:list-item>
          <text:p text:style-name="List_20_Bullet_20_Tight">Interrupt Mask Register A (E88013H), B (E88015H) For the assignment of each interrupt channel to each bit, as with IERA and IERB.</text:p>
        </text:list-item>
      </text:list>
      <text:p text:style-name="First_20_paragraph">a. When the corresponding bit is set (1) To clear the interrupt mask, write a 1.</text:p>
      <text:p text:style-name="Text_20_body">b. When the corresponding bit is cleared (0) To mask the interrupt, write a 0 again. However, if the corresponding bit of IERA (IERB) is "1" (enabled) and masked, and the interrupt goes through, a "1" is written in the corresponding bit of IPRA (IPRB). When it is reset.</text:p>
      <text:list text:style-name="List_20_1">
        <text:list-item>
          <text:p text:style-name="List_20_Bullet_20_Tight">Interrupt Vector Register (E88017H)</text:p>
        </text:list-item>
      </text:list>
      <text:p text:style-name="First_20_paragraph">0: All-channel auto interrupt completion mode 1: All-channel software interrupt completion mode (ISRA, ISRB enabled) The interrupt vector is 7 bits. (The bottom 4 bits correspond automatically to the MEP (0-16) for each interrupt channel number)</text:p>
      <text:p text:style-name="Text_20_body">However, when reset all bits are set to 0.</text:p>
      <text:list text:style-name="Numbering_20_1" text:start-value="2">
        <text:list-item>
          <text:p text:style-name="List_20_Number_20_Tight">MFP (Multi Function Peripheral)</text:p>
        </text:list-item>
      </text:list>
      <text:p text:style-name="First_20_paragraph">(3) Timer</text:p>
      <text:list text:style-name="List_20_1">
        <text:list-item>
          <text:p text:style-name="List_20_Bullet_20_Tight">Timer A Control Register (E88019H) D7 D6 D5 D4 D3 D2 D1 D0 0 0 0 1 0 0 0 0 Timer A Event Count Mode 0: Do not reset TAO signal 1: Reset TAO signal</text:p>
        </text:list-item>
      </text:list>
      <text:p text:style-name="First_20_paragraph">However, when resetting, all bits will be 0.</text:p>
      <text:list text:style-name="List_20_1">
        <text:list-item>
          <text:p text:style-name="List_20_Bullet_20_Tight">Timer B Control Register (E8801BH) D7 D6 D5 D4 D3 D2 D1 D0 0 0 0 0 1 0 0 1 Timer B Delay Mode (1/4 Prescaler) 0: Do not reset TBO signal 1: Reset TBO signal</text:p>
        </text:list-item>
      </text:list>
      <text:p text:style-name="First_20_paragraph">However, when resetting, all bits will be 0.</text:p>
      <text:list text:style-name="List_20_1">
        <text:list-item>
          <text:p text:style-name="List_20_Bullet_20_Tight">Timer C, D Control Register (E8801DH) D7 D6 D5 D4 D3 D2 D1 D0 0 0 00: Timer D Stop (Count Prohibited) 01: Timer D Delay Mode (1/4 Prescaler) 02: Timer D Delay Mode (1/10 Prescaler) 03: Timer D Delay Mode (1/16 Prescaler) 04: Timer D Delay Mode (1/50 Prescaler) 05: Timer D Delay Mode (1/64 Prescaler) 06: Timer D Delay Mode (1/100 Prescaler) 07: Timer D Delay Mode (1/200 Prescaler)</text:p>
        </text:list-item>
      </text:list>
      <text:p text:style-name="First_20_paragraph">However, when resetting, all bits will be 0.</text:p>
      <text:p text:style-name="Text_20_body">Page 135</text:p>
      <text:p text:style-name="Text_20_body">Chapter 4 Peripheral LSI</text:p>
      <text:list text:style-name="List_20_1">
        <text:list-item>
          <text:p text:style-name="List_20_Bullet">Timer A Data Register (E8801FH): Set the down-counter value to generate an interrupt in Timer A (interrupt level 13). When an interrupt occurs, the register will be set to 00H.</text:p>
        </text:list-item>
        <text:list-item>
          <text:p text:style-name="List_20_Bullet">Timer B Data Register (E88021H): Please set 0DH (cannot be interrupted as it generates a keyboard serial clock).</text:p>
        </text:list-item>
        <text:list-item>
          <text:p text:style-name="List_20_Bullet">Timer C Data Register (E88023H): Set the down-counter value to generate an interrupt in Timer C (interrupt level 5). When an interrupt occurs, the register will be set to 00H.</text:p>
        </text:list-item>
        <text:list-item>
          <text:p text:style-name="List_20_Bullet">Timer D Data Register (E88025H): Set the down-counter value to generate an interrupt in Timer D (interrupt level 4). When an interrupt occurs, the register will be set to 00H.</text:p>
        </text:list-item>
      </text:list>
      <text:p text:style-name="First_20_paragraph">(4) USART (Serial Communication with Keyboard)</text:p>
      <text:list text:style-name="List_20_1">
        <text:list-item>
          <text:p text:style-name="List_20_Bullet_20_Tight">USART Control Register (E88029H) In X68000, asynchronous communication using the USART function of MFP is used for communication with the sub-CPU 80C51 in the keyboard, and for keyboard data input. This asynchronous communication is conducted in the following sequence.</text:p>
        </text:list-item>
      </text:list>
      <text:list text:style-name="Numbering_20_1">
        <text:list-item>
          <text:p text:style-name="List_20_Number_20_Tight">Input a clock 16 times larger to the MFP RC, TC terminal.</text:p>
        </text:list-item>
        <text:list-item>
          <text:p text:style-name="List_20_Number_20_Tight">Set the baud rate to 2400.</text:p>
        </text:list-item>
        <text:list-item>
          <text:p text:style-name="List_20_Number_20_Tight">Set 1 start bit, data 8 bits, no parity, and 1 stop bit.</text:p>
        </text:list-item>
      </text:list>
      <text:p text:style-name="First_20_paragraph">(* Invalid during WRITE, during READ only [0] can be read)</text:p>
      <text:p text:style-name="Text_20_body">However, upon reset, all bits will be set to 0.</text:p>
      <text:list text:style-name="Numbering_20_1" text:start-value="2">
        <text:list-item>
          <text:p text:style-name="List_20_Number_20_Tight">MFP (Multi Function Peripheral)</text:p>
        </text:list-item>
      </text:list>
      <text:list text:style-name="List_20_1">
        <text:list-item>
          <text:p text:style-name="List_20_Bullet_20_Tight">Receive Status Register (E8802BH)</text:p>
        </text:list-item>
      </text:list>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column table:style-name="Table56.G"/>
        <table:table-column table:style-name="Table56.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0</text:p>
          </table:table-cell>
        </table:table-row>
      </table:table>
      <text:p text:style-name="First_20_paragraph">When "0" is written, all flags are cleared, and the register becomes readable. When "1" is written, this register is in the "4F" readable state.</text:p>
      <table:table table:name="Table57" table:style-name="Table57">
        <table:table-column table:style-name="Table57.A"/>
        <table:table-column table:style-name="Table57.B"/>
        <table:table-header-rows>
          <table:table-row>
            <table:table-cell table:style-name="TableHeaderRowCell" office:value-type="string">
              <text:p text:style-name="Table_20_Heading">Flag</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D0</text:p>
          </table:table-cell>
          <table:table-cell table:style-name="TableRowCell" office:value-type="string">
            <text:p text:style-name="Table_20_Contents">1: Start bit received</text:p>
          </table:table-cell>
        </table:table-row>
        <table:table-row>
          <table:table-cell table:style-name="TableRowCell" office:value-type="string">
            <text:p text:style-name="Table_20_Contents">D1</text:p>
          </table:table-cell>
          <table:table-cell table:style-name="TableRowCell" office:value-type="string">
            <text:p text:style-name="Table_20_Contents">1: Frame error detection (unable to detect stop bit)</text:p>
          </table:table-cell>
        </table:table-row>
        <table:table-row>
          <table:table-cell table:style-name="TableRowCell" office:value-type="string">
            <text:p text:style-name="Table_20_Contents">D2</text:p>
          </table:table-cell>
          <table:table-cell table:style-name="TableRowCell" office:value-type="string">
            <text:p text:style-name="Table_20_Contents">1: Receive frame error (unable to detect stop bit)</text:p>
          </table:table-cell>
        </table:table-row>
        <table:table-row>
          <table:table-cell table:style-name="TableRowCell" office:value-type="string">
            <text:p text:style-name="Table_20_Contents">D3</text:p>
          </table:table-cell>
          <table:table-cell table:style-name="TableRowCell" office:value-type="string">
            <text:p text:style-name="Table_20_Contents">1: Break Detection (hardware detects Break condition)</text:p>
          </table:table-cell>
        </table:table-row>
        <table:table-row>
          <table:table-cell table:style-name="TableRowCell" office:value-type="string">
            <text:p text:style-name="Table_20_Contents">D4</text:p>
          </table:table-cell>
          <table:table-cell table:style-name="TableRowCell" office:value-type="string">
            <text:p text:style-name="Table_20_Contents">1: Overrun error</text:p>
          </table:table-cell>
        </table:table-row>
        <table:table-row>
          <table:table-cell table:style-name="TableRowCell" office:value-type="string">
            <text:p text:style-name="Table_20_Contents">D5</text:p>
          </table:table-cell>
          <table:table-cell table:style-name="TableRowCell" office:value-type="string">
            <text:p text:style-name="Table_20_Contents">1: Parity error</text:p>
          </table:table-cell>
        </table:table-row>
        <table:table-row>
          <table:table-cell table:style-name="TableRowCell" office:value-type="string">
            <text:p text:style-name="Table_20_Contents">D6</text:p>
          </table:table-cell>
          <table:table-cell table:style-name="TableRowCell" office:value-type="string">
            <text:p text:style-name="Table_20_Contents">1: Overrun error</text:p>
          </table:table-cell>
        </table:table-row>
        <table:table-row>
          <table:table-cell table:style-name="TableRowCell" office:value-type="string">
            <text:p text:style-name="Table_20_Contents">D7</text:p>
          </table:table-cell>
          <table:table-cell table:style-name="TableRowCell" office:value-type="string">
            <text:p text:style-name="Table_20_Contents">1: Receive buffer full</text:p>
          </table:table-cell>
        </table:table-row>
      </table:table>
      <text:p text:style-name="First_20_paragraph">Note that when D7 = "1" (buffer full), D6 = "1" (overrun error), or D5 = "1" (parity error), D3 = "1" (break detect) occurs, a Receive Error (MFP level 11 interrupt) occurs. Also, even if the receive error interrupt is disabled, the full receive buffer interrupt will still occur. However, all bits will be reset to 0 during reset.</text:p>
      <text:p text:style-name="Text_20_body">Chapter 4 Peripheral LSI</text:p>
      <text:list text:style-name="List_20_1">
        <text:list-item>
          <text:p text:style-name="List_20_Bullet_20_Tight">Transmission Status Register (E8802DH)</text:p>
        </text:list-item>
      </text:list>
      <text:p text:style-name="Preformatted_20_Text"><text:s text:c="2"/>| D7 | D6 | D5 | D4 | D3 | D2 | D1 | D0 |</text:p>
      <text:p text:style-name="Preformatted_20_Text"/>
      <text:p text:style-name="Preformatted_20_Text"><text:s text:c="2"/>- When "0" is set and D6="0", D4="1", the transmitter becomes disabled.</text:p>
      <text:p text:style-name="Preformatted_20_Text"><text:s text:c="2"/>- When "1" is set, it becomes a transmit signal enable. At this time, 1 bit is added before the data transmission starts.</text:p>
      <text:p text:style-name="Preformatted_20_Text"><text:s text:c="2"/>- Normal transmission operation:</text:p>
      <text:p text:style-name="Preformatted_20_Text"><text:s text:c="2"/>1. Send a break character (character of all 8 bits 0 with stop bits).</text:p>
      <text:p text:style-name="Preformatted_20_Text"><text:s text:c="6"/>Note: At this time, since D7 is not set, please be careful.</text:p>
      <text:p text:style-name="Preformatted_20_Text"><text:s text:c="2"/>2. When D0=1 (transmit disable flag), the character to be transmitted immediately follows the transmission.</text:p>
      <text:p text:style-name="Preformatted_20_Text"><text:s text:c="2"/>3. When D0=0 (transmit disable flag) is set (in case the data byte sending with sending data is ongoing).</text:p>
      <text:p text:style-name="Preformatted_20_Text"><text:s text:c="2"/>4. When D0=0 (transmit disable flag), normal transmission state:</text:p>
      <text:p text:style-name="Preformatted_20_Text"><text:s text:c="5"/>- When "1" is set, bit "1" at this time becomes the transmit disable flag and a break character is transmitted.</text:p>
      <text:p text:style-name="Preformatted_20_Text"><text:s text:c="5"/>- After the transmission is completed, it automatically becomes a signal line mark (RNS D0=0).</text:p>
      <text:p text:style-name="Preformatted_20_Text"><text:s text:c="2"/>5. When the Transmission Shift Register (TSR) is empty and the transmitter becomes disabled (D0=0).</text:p>
      <text:p text:style-name="Preformatted_20_Text"><text:s text:c="2"/>6. Transmission error occurrence (occurred at MFP 9 level when D0 (L=L) is reached):</text:p>
      <text:p text:style-name="Preformatted_20_Text"><text:s text:c="5"/>1. When a transmit error is detected within the Transmission Shift Register (TSR), data transmission is suspended.</text:p>
      <text:p text:style-name="Preformatted_20_Text"><text:s text:c="5"/>2. Transmit data (RNR RRN RDN EXC) transmission character stream when a transmit data character error frame was detected.</text:p>
      <text:p text:style-name="Preformatted_20_Text"><text:s text:c="2"/>7. Transmission Buffer (TBU) is empty or an error is detected in the transmission data character stream.</text:p>
      <text:p text:style-name="Preformatted_20_Text"/>
      <text:p text:style-name="Preformatted_20_Text"><text:s text:c="2"/>Note: When D7="1" (buffer empty), a Transmit Buffer Empty (MFP 10 level interrupt) occurs, and when D6="1" (under-run error) or D4="1" (transmission end state), a Transmit Error (MFP 9 level interrupt) occurs. However, at the time of reset, all bits become 0.</text:p>
      <text:list text:style-name="List_20_1">
        <text:list-item>
          <text:p text:style-name="List_20_Bullet_20_Tight">USART Data Register (E8802FH) It is an 8-bit input/output data register of USART.</text:p>
        </text:list-item>
      </text:list>
      <text:list text:style-name="Numbering_20_1" text:start-value="3">
        <text:list-item>
          <text:p text:style-name="List_20_Number_20_Tight">SCC (Serial Communication Controller)</text:p>
        </text:list-item>
      </text:list>
      <text:p text:style-name="First_20_paragraph">The X68000 uses the Z8530 SCC of the Z8000 family as the serial communication controller to support the RS-232C mouse. Also, Figure 4-7 shows the block diagram.</text:p>
      <text:p text:style-name="Text_20_body">3-1 Features</text:p>
      <text:p text:style-name="Text_20_body">This SCC has two independent double channels, each with 14 write registers, seven read registers, and baud rate generators.</text:p>
      <text:p text:style-name="Text_20_body">(1) Channel A (RS-232C) ● Asynchronous Mode</text:p>
      <text:list text:style-name="List_20_1">
        <text:list-item>
          <text:p text:style-name="List_20_Bullet_20_Tight">5, 6, 7, 8 bits/character</text:p>
        </text:list-item>
        <text:list-item>
          <text:p text:style-name="List_20_Bullet_20_Tight">1, 1.5, 2 stop bits/character</text:p>
        </text:list-item>
        <text:list-item>
          <text:p text:style-name="List_20_Bullet_20_Tight">Odd parity, even parity, no parity</text:p>
        </text:list-item>
        <text:list-item>
          <text:p text:style-name="List_20_Bullet_20_Tight">x1, x16, x32, x64 clock mode</text:p>
        </text:list-item>
        <text:list-item>
          <text:p text:style-name="List_20_Bullet_20_Tight">Detection of break and loss</text:p>
        </text:list-item>
        <text:list-item>
          <text:p text:style-name="List_20_Bullet_20_Tight">Detection of parity, overrun, framing errors</text:p>
        </text:list-item>
      </text:list>
      <text:p text:style-name="First_20_paragraph">● Synchronous Mode</text:p>
      <text:list text:style-name="List_20_1">
        <text:list-item>
          <text:p text:style-name="List_20_Bullet_20_Tight">Byte-synchronous mode: Character synchronization can be either internal or external</text:p>
        </text:list-item>
      </text:list>
      <text:p text:style-name="Preformatted_20_Text"><text:s text:c="2"/>1 or 2 synchronous characters</text:p>
      <text:p text:style-name="Preformatted_20_Text"><text:s text:c="2"/>6 or 8-bit synchronous character support</text:p>
      <text:p text:style-name="Preformatted_20_Text"><text:s text:c="2"/>Deletion of appended synchronized characters</text:p>
      <text:p text:style-name="Preformatted_20_Text"><text:s text:c="2"/>Generation and checking of CRC</text:p>
      <text:list text:style-name="List_20_1">
        <text:list-item>
          <text:p text:style-name="List_20_Bullet_20_Tight">SDLC/HDLC Mode: Generation and detection of abort sequence</text:p>
        </text:list-item>
      </text:list>
      <text:p text:style-name="Preformatted_20_Text"><text:s text:c="2"/>Automated insertion and deletion of zeros</text:p>
      <text:p text:style-name="Preformatted_20_Text"><text:s text:c="2"/>Automated flag insertion in message field</text:p>
      <text:p text:style-name="Preformatted_20_Text"><text:s text:c="2"/>Detection of address field</text:p>
      <text:p text:style-name="Preformatted_20_Text"><text:s text:c="2"/>Information field bits processing</text:p>
      <text:p text:style-name="Preformatted_20_Text"><text:s text:c="2"/>Generation and checking of CRC</text:p>
      <text:p text:style-name="Preformatted_20_Text"><text:s text:c="2"/>Escape and detection for EOP check in SDLC loop mode (On-line)</text:p>
      <text:list text:style-name="List_20_1">
        <text:list-item>
          <text:p text:style-name="List_20_Bullet_20_Tight">Data transfer rate:</text:p>
        </text:list-item>
      </text:list>
      <text:p text:style-name="Preformatted_20_Text"><text:s text:c="2"/>Maximum 1.5 Mbps (asynchronous, NRZ)</text:p>
      <text:p text:style-name="Preformatted_20_Text"><text:s text:c="2"/>Maximum 375 Kbps (FM character mode, DPLL) </text:p>
      <text:p text:style-name="Preformatted_20_Text"><text:s text:c="2"/>Maximum 187 Kbps (NRZI character mode, DPLL)</text:p>
      <text:p text:style-name="First_20_paragraph">Chapter 4 Peripheral LSI</text:p>
      <text:p text:style-name="Text_20_body">(2) Channel B (Mouse) ● Asynchronous Communication</text:p>
      <text:list text:style-name="List_20_1">
        <text:list-item>
          <text:p text:style-name="List_20_Bullet_20_Tight">Baud Rate ............. 4800 Baud</text:p>
        </text:list-item>
        <text:list-item>
          <text:p text:style-name="List_20_Bullet_20_Tight">Start Bit ............. 1 Bit</text:p>
        </text:list-item>
        <text:list-item>
          <text:p text:style-name="List_20_Bullet_20_Tight">Data Bit .............. 8 Bits</text:p>
        </text:list-item>
        <text:list-item>
          <text:p text:style-name="List_20_Bullet_20_Tight">Parity .................... None</text:p>
        </text:list-item>
        <text:list-item>
          <text:p text:style-name="List_20_Bullet_20_Tight">Stop Bits ........... 2 Bits</text:p>
        </text:list-item>
        <text:list-item>
          <text:p text:style-name="List_20_Bullet_20_Tight">Data Bus ................. RxDB</text:p>
        </text:list-item>
        <text:list-item>
          <text:p text:style-name="List_20_Bullet_20_Tight">Control Bus ....... RTSB</text:p>
        </text:list-item>
      </text:list>
      <text:p text:style-name="First_20_paragraph">Mouse Connector Jack Mouse Keyboard RS-232C</text:p>
      <text:p text:style-name="Text_20_body">Fig. 4-7 SCC Block Diagram</text:p>
      <text:p text:style-name="Text_20_body">Page 140</text:p>
      <text:list text:style-name="Numbering_20_1" text:start-value="3">
        <text:list-item>
          <text:p text:style-name="List_20_Number_20_Tight">SCC (Serial Communication Controller)</text:p>
        </text:list-item>
      </text:list>
      <text:p text:style-name="First_20_paragraph">3-2 SCC Register Address Map</text:p>
      <text:p text:style-name="Text_20_body">(All registers are READ/WRITE)</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column table:style-name="Table58.H"/>
        <table:table-column table:style-name="Table58.I"/>
        <table:table-column table:style-name="Table58.J"/>
        <table:table-column table:style-name="Table58.K"/>
        <table:table-header-rows>
          <table:table-row>
            <table:table-cell table:style-name="TableHeaderRowCell" office:value-type="string">
              <text:p text:style-name="P7">Ch. No.</text:p>
            </table:table-cell>
            <table:table-cell table:style-name="TableHeaderRowCell" office:value-type="string">
              <text:p text:style-name="P8">Register Address</text:p>
            </table:table-cell>
            <table:table-cell table:style-name="TableHeaderRowCell" office:value-type="string">
              <text:p text:style-name="P9">D07</text:p>
            </table:table-cell>
            <table:table-cell table:style-name="TableHeaderRowCell" office:value-type="string">
              <text:p text:style-name="P10">D06</text:p>
            </table:table-cell>
            <table:table-cell table:style-name="TableHeaderRowCell" office:value-type="string">
              <text:p text:style-name="P11">D05</text:p>
            </table:table-cell>
            <table:table-cell table:style-name="TableHeaderRowCell" office:value-type="string">
              <text:p text:style-name="P12">D04</text:p>
            </table:table-cell>
            <table:table-cell table:style-name="TableHeaderRowCell" office:value-type="string">
              <text:p text:style-name="P13">D03</text:p>
            </table:table-cell>
            <table:table-cell table:style-name="TableHeaderRowCell" office:value-type="string">
              <text:p text:style-name="P14">D02</text:p>
            </table:table-cell>
            <table:table-cell table:style-name="TableHeaderRowCell" office:value-type="string">
              <text:p text:style-name="P15">D01</text:p>
            </table:table-cell>
            <table:table-cell table:style-name="TableHeaderRowCell" office:value-type="string">
              <text:p text:style-name="P16">D00</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P17">B</text:p>
          </table:table-cell>
          <table:table-cell table:style-name="TableRowCell" office:value-type="string">
            <text:p text:style-name="P18">E98001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ommand Port</text:p>
          </table:table-cell>
        </table:table-row>
        <table:table-row>
          <table:table-cell table:style-name="TableRowCell" office:value-type="string">
            <text:p text:style-name="P17">B</text:p>
          </table:table-cell>
          <table:table-cell table:style-name="TableRowCell" office:value-type="string">
            <text:p text:style-name="P18">E98003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 Port</text:p>
          </table:table-cell>
        </table:table-row>
        <table:table-row>
          <table:table-cell table:style-name="TableRowCell" office:value-type="string">
            <text:p text:style-name="P17">A</text:p>
          </table:table-cell>
          <table:table-cell table:style-name="TableRowCell" office:value-type="string">
            <text:p text:style-name="P18">E98005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ommand Port</text:p>
          </table:table-cell>
        </table:table-row>
        <table:table-row>
          <table:table-cell table:style-name="TableRowCell" office:value-type="string">
            <text:p text:style-name="P17">A</text:p>
          </table:table-cell>
          <table:table-cell table:style-name="TableRowCell" office:value-type="string">
            <text:p text:style-name="P18">E98007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ta Port</text:p>
          </table:table-cell>
        </table:table-row>
      </table:table>
      <text:p text:style-name="First_20_paragraph">Table 4-8 SCC Register Address Map</text:p>
      <text:p text:style-name="Text_20_body">3-3 SCC Register Details</text:p>
      <text:p text:style-name="Text_20_body">For details of each register, please refer to materials such as the Z8530 SCC data sheet. Table 4-9 shows the clock counts for each baud rate in the Baud Rate Generator.</text:p>
      <table:table table:name="Table59" table:style-name="Table59">
        <table:table-column table:style-name="Table59.A"/>
        <table:table-column table:style-name="Table59.B"/>
        <table:table-column table:style-name="Table59.C"/>
        <table:table-header-rows>
          <table:table-row>
            <table:table-cell table:style-name="TableHeaderRowCell" office:value-type="string">
              <text:p text:style-name="P27">Baud Rate</text:p>
            </table:table-cell>
            <table:table-cell table:style-name="TableHeaderRowCell" office:value-type="string">
              <text:p text:style-name="P28">Clock Count at 5 MHz</text:p>
            </table:table-cell>
            <table:table-cell table:style-name="TableHeaderRowCell" office:value-type="string">
              <text:p text:style-name="P29">Notes</text:p>
            </table:table-cell>
          </table:table-row>
        </table:table-header-rows>
        <table:table-row>
          <table:table-cell table:style-name="TableRowCell" office:value-type="string">
            <text:p text:style-name="P30">9600</text:p>
          </table:table-cell>
          <table:table-cell table:style-name="TableRowCell" office:value-type="string">
            <text:p text:style-name="P31">14 (000EH)</text:p>
          </table:table-cell>
          <table:table-cell table:style-name="TableRowCell" office:value-type="string">
            <text:p text:style-name="P32">5×10^6</text:p>
          </table:table-cell>
        </table:table-row>
        <table:table-row>
          <table:table-cell table:style-name="TableRowCell" office:value-type="string">
            <text:p text:style-name="P30">4800</text:p>
          </table:table-cell>
          <table:table-cell table:style-name="TableRowCell" office:value-type="string">
            <text:p text:style-name="P31">31 (001FH)</text:p>
          </table:table-cell>
          <table:table-cell table:style-name="TableRowCell" office:value-type="string">
            <text:p text:style-name="P32">Clock Count = 2× (Baud Rate ×16) - 2</text:p>
          </table:table-cell>
        </table:table-row>
        <table:table-row>
          <table:table-cell table:style-name="TableRowCell" office:value-type="string">
            <text:p text:style-name="P30">2400</text:p>
          </table:table-cell>
          <table:table-cell table:style-name="TableRowCell" office:value-type="string">
            <text:p text:style-name="P31">63 (003FH)</text:p>
          </table:table-cell>
          <table:table-cell table:style-name="TableRowCell" office:value-type="string">
    </table:table-cell>
        </table:table-row>
        <table:table-row>
          <table:table-cell table:style-name="TableRowCell" office:value-type="string">
            <text:p text:style-name="P30">1200</text:p>
          </table:table-cell>
          <table:table-cell table:style-name="TableRowCell" office:value-type="string">
            <text:p text:style-name="P31">128 (0080H)</text:p>
          </table:table-cell>
          <table:table-cell table:style-name="TableRowCell" office:value-type="string">
    </table:table-cell>
        </table:table-row>
        <table:table-row>
          <table:table-cell table:style-name="TableRowCell" office:value-type="string">
            <text:p text:style-name="P30">600</text:p>
          </table:table-cell>
          <table:table-cell table:style-name="TableRowCell" office:value-type="string">
            <text:p text:style-name="P31">258 (0102H)</text:p>
          </table:table-cell>
          <table:table-cell table:style-name="TableRowCell" office:value-type="string">
    </table:table-cell>
        </table:table-row>
        <table:table-row>
          <table:table-cell table:style-name="TableRowCell" office:value-type="string">
            <text:p text:style-name="P30">300</text:p>
          </table:table-cell>
          <table:table-cell table:style-name="TableRowCell" office:value-type="string">
            <text:p text:style-name="P31">519 (0207H)</text:p>
          </table:table-cell>
          <table:table-cell table:style-name="TableRowCell" office:value-type="string">
    </table:table-cell>
        </table:table-row>
        <table:table-row>
          <table:table-cell table:style-name="TableRowCell" office:value-type="string">
            <text:p text:style-name="P30">150</text:p>
          </table:table-cell>
          <table:table-cell table:style-name="TableRowCell" office:value-type="string">
            <text:p text:style-name="P31">1040 (0410H)</text:p>
          </table:table-cell>
          <table:table-cell table:style-name="TableRowCell" office:value-type="string">
            <text:p text:style-name="P32">However, assuming input clock (PCLK) is 5 MHz</text:p>
          </table:table-cell>
        </table:table-row>
        <table:table-row>
          <table:table-cell table:style-name="TableRowCell" office:value-type="string">
            <text:p text:style-name="P30">75</text:p>
          </table:table-cell>
          <table:table-cell table:style-name="TableRowCell" office:value-type="string">
            <text:p text:style-name="P31">2081 (0821H)</text:p>
          </table:table-cell>
          <table:table-cell table:style-name="TableRowCell" office:value-type="string">
            <text:p text:style-name="P32">and the data rate is 16 times, the correct clock is used.</text:p>
          </table:table-cell>
        </table:table-row>
      </table:table>
      <text:p text:style-name="First_20_paragraph">Table 4-9 Clock Counts for Baud Rate Generator</text:p>
      <text:p text:style-name="Text_20_body">(Note) Access to each write/read register (excluding write-only register WR8 and read-only register RR8) is performed as follows:</text:p>
      <text:list text:style-name="Numbering_20_1">
        <text:list-item>
          <text:p text:style-name="List_20_Number_20_Tight">Using the command port, set the bit data of D02 to D00 in the addressable write register WR0. This designates the register to be accessed.</text:p>
        </text:list-item>
      </text:list>
      <text:p text:style-name="First_20_paragraph">Chapter 4: Peripheral LSI</text:p>
      <text:list text:style-name="Numbering_20_1" text:start-value="2">
        <text:list-item>
          <text:p text:style-name="List_20_Number">Next, if you write control data to the command port, read it out, or access the various registers, it will function. Additionally, by accessing the data port regarding write register WR8 and read register RR8, you can write data or read it out.</text:p>
        </text:list-item>
        <text:list-item>
          <text:p text:style-name="List_20_Number">RTC (Real Time Clock)</text:p>
        </text:list-item>
      </text:list>
      <text:p text:style-name="First_20_paragraph">In X68000, the RP5C15 is used as the real-time clock.</text:p>
      <text:p text:style-name="Text_20_body">[Diagram]</text:p>
      <text:p text:style-name="Text_20_body">Figure 4-8 RTC Block Diagram</text:p>
      <text:p text:style-name="Text_20_body">4-1 Features</text:p>
      <text:p text:style-name="Text_20_body">The RP5C15 is a real-time clock that can be read/written in the same way as memory, and allows setting and reading out the time. It has the following features:</text:p>
      <text:list text:style-name="Numbering_20_1">
        <text:list-item>
          <text:p text:style-name="List_20_Number">Direct connection to a 16-bit CPU enables high-speed access.</text:p>
        </text:list-item>
        <text:list-item>
          <text:p text:style-name="List_20_Number">4-bit bidirectional data bus (D0D~D03).</text:p>
        </text:list-item>
        <text:list-item>
          <text:p text:style-name="List_20_Number">4-bit address input.</text:p>
        </text:list-item>
        <text:list-item>
          <text:p text:style-name="List_20_Number">Built-in count for time (hours, minutes, seconds) and calendar (leap year, year, month, day, day of the week).</text:p>
        </text:list-item>
        <text:list-item>
          <text:p text:style-name="List_20_Number">Alarm function included.</text:p>
        </text:list-item>
        <text:list-item>
          <text:p text:style-name="List_20_Number">All time data is represented in BCD code.</text:p>
        </text:list-item>
        <text:list-item>
          <text:p text:style-name="List_20_Number">30-second adjustment function included.</text:p>
        </text:list-item>
        <text:list-item>
          <text:p text:style-name="List_20_Number">Battery backup is possible (minimum of 2.0V).</text:p>
        </text:list-item>
        <text:list-item>
          <text:p text:style-name="List_20_Number">Outputs a 16 Hz or 1 Hz timing pulse for alarm usage.</text:p>
        </text:list-item>
        <text:list-item>
          <text:p text:style-name="List_20_Number">Outputs a 1 Hz clock.</text:p>
        </text:list-item>
        <text:list-item>
          <text:p text:style-name="List_20_Number">RTC (Real-Time Clock)</text:p>
        </text:list-item>
      </text:list>
      <text:p text:style-name="First_20_paragraph">In particular, on the X68000, the alarm function and clock output of the RP5C15 are used as follows:</text:p>
      <text:list text:style-name="List_20_1">
        <text:list-item>
          <text:p text:style-name="List_20_Bullet">Alarm Function (Alarm Timer) This is used to set the reservation time for turning on the computer's power (Vcc1 ON). When the set date and time match the internal clock of the computer, the computer's power turns on and the alarm terminal outputs an alarm signal (signal that is output every 16 Hz or 1 Hz from the clock). This signal is read and input into a terminal such as MFP or GPIO5 (Level Interrupt Input). Once input, software processing can select the output signal from the alarm terminal, and it may be input to the MFP as an interrupt signal. Also, when setting the alarm timer, in addition to writing 00H into E8A001H for TIMER LED OFF (BANK1), system reset E8B00DH should write 31H and make the SRAM writable. After that, information that SRAM TIMER LED OFF (E8A001H bit information) is set, finally resetting the system should write 00H into E8B00DH and make the SRAM read-only. (This processing is necessary due to the write protection until Vcc2 is directly connected in the MFP.)</text:p>
        </text:list-item>
        <text:list-item>
          <text:p text:style-name="List_20_Bullet">Clock Output 1 Hz clock is output from the CLOCKOUT terminal and it is input into MFP or GPIO5 (Level Interrupt Input) terminals. This signal can also be input as an interrupt signal to the MFP. In addition, this 1 Hz signal is used for lighting and turning off the main body front panel's POWER LED and TIMER LED. For details on the LEDs, please refer to Chapter 5-3. Furthermore, for RP5C15 backup purposes, the normal battery for Vcc2 is connected, so if using the timer, do not turn off the rear power switch.</text:p>
        </text:list-item>
      </text:list>
      <text:p text:style-name="First_20_paragraph">Chapter 4 Peripheral LSI</text:p>
      <text:p text:style-name="Text_20_body">4-2 Address Map of the RTC Registers</text:p>
      <text:p text:style-name="Text_20_body">Tables 4-10 and 4-11 show the register address map of the RTC. Note that * indicates that the bit is invalid on WRITE and always reads as 0 on READ. However, E8A001H of BANK 1 is used to set the TIMER LED, so be careful of the bit states when writing to it.</text:p>
      <text:p text:style-name="Text_20_body">&lt;BANK 0&gt;</text:p>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column table:style-name="Table60.H"/>
        <table:table-column table:style-name="Table60.I"/>
        <table:table-column table:style-name="Table60.J"/>
        <table:table-header-rows>
          <table:table-row>
            <table:table-cell table:style-name="TableHeaderRowCell" office:value-type="string">
              <text:p text:style-name="Table_20_Heading">Register 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E8A001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second counter (READ/WRITE)</text:p>
          </table:table-cell>
        </table:table-row>
        <table:table-row>
          <table:table-cell table:style-name="TableRowCell" office:value-type="string">
            <text:p text:style-name="Table_20_Contents">E8A003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second counter (READ/WRITE)</text:p>
          </table:table-cell>
        </table:table-row>
        <table:table-row>
          <table:table-cell table:style-name="TableRowCell" office:value-type="string">
            <text:p text:style-name="Table_20_Contents">E8A005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minute counter (READ/WRITE)</text:p>
          </table:table-cell>
        </table:table-row>
        <table:table-row>
          <table:table-cell table:style-name="TableRowCell" office:value-type="string">
            <text:p text:style-name="Table_20_Contents">E8A007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minute counter (READ/WRITE)</text:p>
          </table:table-cell>
        </table:table-row>
        <table:table-row>
          <table:table-cell table:style-name="TableRowCell" office:value-type="string">
            <text:p text:style-name="Table_20_Contents">E8A009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hour counter (READ/WRITE)</text:p>
          </table:table-cell>
        </table:table-row>
        <table:table-row>
          <table:table-cell table:style-name="TableRowCell" office:value-type="string">
            <text:p text:style-name="Table_20_Contents">E8A00B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hour counter (READ/WRITE)</text:p>
          </table:table-cell>
        </table:table-row>
        <table:table-row>
          <table:table-cell table:style-name="TableRowCell" office:value-type="string">
            <text:p text:style-name="Table_20_Contents">E8A00D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ay-of-week counter (READ/WRITE)</text:p>
          </table:table-cell>
        </table:table-row>
        <table:table-row>
          <table:table-cell table:style-name="TableRowCell" office:value-type="string">
            <text:p text:style-name="Table_20_Contents">E8A00F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day counter (READ/WRITE)</text:p>
          </table:table-cell>
        </table:table-row>
        <table:table-row>
          <table:table-cell table:style-name="TableRowCell" office:value-type="string">
            <text:p text:style-name="Table_20_Contents">E8A011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day counter (READ/WRITE)</text:p>
          </table:table-cell>
        </table:table-row>
        <table:table-row>
          <table:table-cell table:style-name="TableRowCell" office:value-type="string">
            <text:p text:style-name="Table_20_Contents">E8A013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month counter (READ/WRITE)</text:p>
          </table:table-cell>
        </table:table-row>
        <table:table-row>
          <table:table-cell table:style-name="TableRowCell" office:value-type="string">
            <text:p text:style-name="Table_20_Contents">E8A015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month counter (READ/WRITE)</text:p>
          </table:table-cell>
        </table:table-row>
        <table:table-row>
          <table:table-cell table:style-name="TableRowCell" office:value-type="string">
            <text:p text:style-name="Table_20_Contents">E8A017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year counter (READ/WRITE)</text:p>
          </table:table-cell>
        </table:table-row>
        <table:table-row>
          <table:table-cell table:style-name="TableRowCell" office:value-type="string">
            <text:p text:style-name="Table_20_Contents">E8A019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0-year counter (READ/WRITE)</text:p>
          </table:table-cell>
        </table:table-row>
        <table:table-row>
          <table:table-cell table:style-name="TableRowCell" office:value-type="string">
            <text:p text:style-name="Table_20_Contents">E8A01B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ODE register (READ/WRITE)</text:p>
          </table:table-cell>
        </table:table-row>
        <table:table-row>
          <table:table-cell table:style-name="TableRowCell" office:value-type="string">
            <text:p text:style-name="Table_20_Contents">E8A01D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TEST register (WRITE)</text:p>
          </table:table-cell>
        </table:table-row>
        <table:table-row>
          <table:table-cell table:style-name="TableRowCell" office:value-type="string">
            <text:p text:style-name="Table_20_Contents">E8A01F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RESET control, etc. (WRITE)</text:p>
          </table:table-cell>
        </table:table-row>
      </table:table>
      <text:p text:style-name="First_20_paragraph">Table 4-10 RTC Register Address Map (1)</text:p>
      <text:list text:style-name="Numbering_20_1" text:start-value="4">
        <text:list-item>
          <text:p text:style-name="List_20_Number_20_Tight">RTC (Real Time Clock)</text:p>
        </text:list-item>
      </text:list>
      <text:p text:style-name="First_20_paragraph">&lt;BANK 1&gt; | Register Address | D07 | D06 | D05 | D04 | D03 | D02 | D01 | D00 | Remarks | |-----------------|-----|-----|-----|-----|-----|-----|-----|-----|---------| | E8A001H | * | * | * | * | 1 | 0 | 0 | 1 | CLKOUT Register (READ/WRITE) 1 Hz signal output (rising edge counts up the clock, duty 50%) | | E8A003H | * | * | * | * | * | * | * | * | Adjust (READ/WRITE) | | E8A005H | * | * | * | * | * | * | * | * | Alarm 1-minute Register (READ/WRITE) | | E8A007H | * | * | * | * | * | * | * | * | Alarm 10-minute Register (READ/WRITE) | | E8A009H | * | * | * | * | * | * | * | * | Alarm 1-hour Register (READ/WRITE) | | E8A00BH | * | * | * | * | * | * | * | * | Alarm 10-hour Register (READ/WRITE) | | E8A00DH | * | * | * | * | * | * | * | * | Alarm day-of-week Register (READ/WRITE) | | E8A00FH | * | * | * | * | * | * | * | * | Alarm 1-day Register (READ/WRITE) | | E8A011H | * | * | * | * | * | * | * | * | Alarm 10-day Register (READ/WRITE) | | E8A013H | * | * | * | * | * | * | * | * | (unused) | | E8A015H | * | * | * | * | * | * | * | * | 12-hour / 24-hour Selector (READ/WRITE) | | E8A017H | * | * | * | * | * | * | * | * | Leap-year Counter (READ/WRITE) | | E8A019H | * | * | * | * | * | * | * | * | (unused) | | E8A01BH | * | * | * | * | * | * | * | * | MODE Register (READ/WRITE) | | E8A01DH | * | * | * | 0 | 0 | 0 | 0 | 0 | TEST Register (WRITE) | | E8A01FH | * | * | * | * | * | * | * | * | RESET Controller etc. (WRITE) |</text:p>
      <text:p text:style-name="Text_20_body">Table 4-11 RTC Register Address Map (2)</text:p>
      <text:p text:style-name="Text_20_body">Page 145</text:p>
      <text:p text:style-name="Text_20_body">Chapter 4 Peripheral LSI</text:p>
      <text:p text:style-name="Text_20_body">4-3 Details of RTC Registers</text:p>
      <text:list text:style-name="List_20_1">
        <text:list-item>
          <text:p text:style-name="List_20_Bullet">When 00H is written to BANK 1 at E8A001H, the TIMER LED will light up (turn on). When 07H is written, the TIMER LED will turn off (WRITE only).</text:p>
        </text:list-item>
        <text:list-item>
          <text:p text:style-name="List_20_Bullet">Registers from E8A001H to E8A019H in BANK 0 are used for date and time settings (BCD code).</text:p>
        </text:list-item>
        <text:list-item>
          <text:p text:style-name="List_20_Bullet">Registers from E8A005H to E8A011H in BANK 1 are used for alarm date and time settings (BCD code).</text:p>
        </text:list-item>
        <text:list-item>
          <text:p text:style-name="List_20_Bullet">BANK 1 E8A003H</text:p>
        </text:list-item>
      </text:list>
      <text:p text:style-name="First_20_paragraph">D7 D6 D5 D4 D3 D2 D1 D0</text:p>
      <text:list text:style-name="List_20_1">
        <text:list-item>
          <text:list text:style-name="List_20_1">
            <text:list-item>
              <text:list text:style-name="List_20_1">
                <text:list-item>
                  <text:list text:style-name="List_20_1">
                    <text:list-item>
                      <text:list text:style-name="List_20_1">
                        <text:list-item>
                          <text:list text:style-name="List_20_1">
                            <text:list-item>
                              <text:list text:style-name="List_20_1">
                                <text:list-item>
                                  <text:p text:style-name="List_20_Bullet_20_Tight">0: Adjust OFF 1: Adjust ON (if adjusted within 0 to 29 seconds of counter counting seconds, seconds become 0. If adjusted within 30 to 59 seconds, seconds become 0 and minutes are incremented by 1).</text:p>
                                </text:list-item>
                              </text:list>
                            </text:list-item>
                          </text:list>
                        </text:list-item>
                      </text:list>
                    </text:list-item>
                  </text:list>
                </text:list-item>
              </text:list>
            </text:list-item>
          </text:list>
        </text:list-item>
      </text:list>
      <text:list text:style-name="List_20_1">
        <text:list-item>
          <text:p text:style-name="List_20_Bullet_20_Tight">BANK 1 E8A015H</text:p>
        </text:list-item>
      </text:list>
      <text:p text:style-name="First_20_paragraph">D7 D6 D5 D4 D3 D2 D1 D0</text:p>
      <text:list text:style-name="List_20_1">
        <text:list-item>
          <text:list text:style-name="List_20_1">
            <text:list-item>
              <text:list text:style-name="List_20_1">
                <text:list-item>
                  <text:list text:style-name="List_20_1">
                    <text:list-item>
                      <text:list text:style-name="List_20_1">
                        <text:list-item>
                          <text:list text:style-name="List_20_1">
                            <text:list-item>
                              <text:list text:style-name="List_20_1">
                                <text:list-item>
                                  <text:p text:style-name="List_20_Bullet_20_Tight">0: 12-hour format (select PM with E8A00BH bit D1=1, select AM with D1=0) 1: 24-hour format</text:p>
                                </text:list-item>
                              </text:list>
                            </text:list-item>
                          </text:list>
                        </text:list-item>
                      </text:list>
                    </text:list-item>
                  </text:list>
                </text:list-item>
              </text:list>
            </text:list-item>
          </text:list>
        </text:list-item>
      </text:list>
      <text:list text:style-name="List_20_1">
        <text:list-item>
          <text:p text:style-name="List_20_Bullet_20_Tight">BANK 1 E8A017H</text:p>
        </text:list-item>
      </text:list>
      <text:p text:style-name="First_20_paragraph">D7 D6 D5 D4 D3 D2 D1 D0</text:p>
      <text:list text:style-name="List_20_1">
        <text:list-item>
          <text:list text:style-name="List_20_1">
            <text:list-item>
              <text:list text:style-name="List_20_1">
                <text:list-item>
                  <text:list text:style-name="List_20_1">
                    <text:list-item>
                      <text:list text:style-name="List_20_1">
                        <text:list-item>
                          <text:p text:style-name="List_20_Bullet_20_Tight">0 0 0: This year is a leap year</text:p>
                        </text:list-item>
                      </text:list>
                    </text:list-item>
                  </text:list>
                </text:list-item>
              </text:list>
            </text:list-item>
          </text:list>
        </text:list-item>
      </text:list>
      <text:p text:style-name="Preformatted_20_Text"><text:s text:c="23"/>1: 1 year after the last leap year</text:p>
      <text:p text:style-name="Preformatted_20_Text"><text:s text:c="23"/>2: 2 years after the last leap year</text:p>
      <text:p text:style-name="Preformatted_20_Text"><text:s text:c="23"/>3: 3 years after the last leap year (next year is a leap year) (Auto-increment occurs every 4 years unless correctly initialized, battery is replaced and year count does not stop. Auto-increment occurs until 2099).</text:p>
      <text:list text:style-name="Numbering_20_1" text:start-value="4">
        <text:list-item>
          <text:p text:style-name="List_20_Number_20_Tight">RTC (Real Time Clock)</text:p>
        </text:list-item>
      </text:list>
      <text:p text:style-name="First_20_paragraph">• E8A01BH</text:p>
      <text:p text:style-name="Text_20_body">D7 | D6 | D5 | D4 | D3 | D2 | D1 | D0 • | • | • | • | • | | | 0: BANK 0 Select 1: BANK 1 Select 0: Alarm Output Disable (except 16 Hz and 1 Hz signals) 1: Alarm Output Enable 0: Stopwatch Counter Stop 1: Stopwatch Start</text:p>
      <text:p text:style-name="Text_20_body">• E8A01DH</text:p>
      <text:p text:style-name="Text_20_body">When all bits D3 to D0 are "0", normal clock operation is possible.</text:p>
      <text:p text:style-name="Text_20_body">• E8A01FH</text:p>
      <text:p text:style-name="Text_20_body">D7 | D6 | D5 | D4 | D3 | D2 | D1 | D0 • | • | • | • | | | | 0: Alarm Register Reset OFF 1: Alarm Register Reset ON 0: Stopwatch Time Limit Reset OFF 1: Stopwatch Time Limit Reset ON 0: Alarm Terminal 16 Hz Clock Pulse Output ON 1: Alarm Terminal 16 Hz Clock Pulse Output OFF 0: Alarm Terminal 1 Hz Clock Pulse Output ON 1: Alarm Terminal 1 Hz Clock Pulse Output OFF</text:p>
      <text:h text:style-name="Heading_20_1" text:outline-level="1"><text:bookmark-start text:name="id_5-fdc-floppy-disk-controller"/>5. FDC (Floppy Disk Controller)<text:bookmark-end text:name="id_5-fdc-floppy-disk-controller"/></text:h>
      <text:p text:style-name="First_20_paragraph">The X68000 is equipped with two 5" 2HD (double-sided high-density) type FDDs (floppy disk drives). The FDC (Floppy Disk Controller) controlling these FDDs uses the µPD72065. The FDD peripheral block diagram is shown in Figure 4-9.</text:p>
      <text:p text:style-name="Text_20_body"><text:span text:style-name="Strong_20_Emphasis">X68000 Disk Specifications (1.28 MB formatted)</text:span></text:p>
      <text:list text:style-name="List_20_1">
        <text:list-item>
          <text:p text:style-name="List_20_Bullet_20_Tight">128, 256, 512, 1024 bytes/sector</text:p>
        </text:list-item>
        <text:list-item>
          <text:p text:style-name="List_20_Bullet_20_Tight">26, 16, 8 sectors/track</text:p>
        </text:list-item>
        <text:list-item>
          <text:p text:style-name="List_20_Bullet_20_Tight">77 tracks/side</text:p>
        </text:list-item>
        <text:list-item>
          <text:p text:style-name="List_20_Bullet_20_Tight">154 tracks/disk</text:p>
        </text:list-item>
      </text:list>
      <text:p text:style-name="First_20_paragraph"><text:span text:style-name="Strong_20_Emphasis">FDC Input Clock</text:span></text:p>
      <text:list text:style-name="List_20_1">
        <text:list-item>
          <text:p text:style-name="List_20_Bullet_20_Tight">2HD (8 MHz), 2DD/2D (4 MHz) switchable</text:p>
          <text:list text:style-name="List_20_1">
            <text:list-item>
              <text:p text:style-name="List_20_Bullet_20_Tight">If connecting the 2DD/2D type FDD, please use the expansion floppy disk connector. When connecting a 2D/2DD type FDD for X1 or X1turbo, make sure pins 20 to 29 of the connection cable are N.C. (not connected) (optional for X68000).</text:p>
            </text:list-item>
          </text:list>
        </text:list-item>
      </text:list>
      <text:p text:style-name="First_20_paragraph"><text:span text:style-name="Strong_20_Emphasis">Transfer Method</text:span></text:p>
      <text:list text:style-name="List_20_1">
        <text:list-item>
          <text:p text:style-name="List_20_Bullet_20_Tight">MFM and FM switchable</text:p>
        </text:list-item>
      </text:list>
      <text:h text:style-name="Heading_20_1" text:outline-level="1"><text:bookmark-start text:name="id_5-1-disk-drive-features-and-specifications"/>5-1 Disk Drive Features and Specifications<text:bookmark-end text:name="id_5-1-disk-drive-features-and-specifications"/></text:h>
      <text:p text:style-name="First_20_paragraph">The X68000 FDD is equipped with the following unique features:</text:p>
      <text:list text:style-name="Numbering_20_1">
        <text:list-item>
          <text:p text:style-name="List_20_Number">Eject Function</text:p>
          <text:list text:style-name="List_20_1">
            <text:list-item>
              <text:p text:style-name="List_20_Bullet_20_Tight">Automatic ejection mechanism for media inserted into the specified drive</text:p>
            </text:list-item>
          </text:list>
        </text:list-item>
        <text:list-item>
          <text:p text:style-name="List_20_Number">Activity LED Indicator (2-color LED)</text:p>
        </text:list-item>
      </text:list>
      <text:p text:style-name="Preformatted_20_Text"><text:s text:c="3"/>- LED indication feature for the specified drive’s activity</text:p>
      <text:p text:style-name="Preformatted_20_Text"><text:s text:c="3"/>- Green: Indicates media inserted into the specified drive</text:p>
      <text:p text:style-name="Preformatted_20_Text"><text:s text:c="3"/>- Red: Lights up when the drive is selected, and when ready to ON</text:p>
      <text:p text:style-name="First_20_paragraph">Page 148</text:p>
      <text:list text:style-name="Numbering_20_1" text:start-value="5">
        <text:list-item>
          <text:p text:style-name="List_20_Number_20_Tight">FDC (Floppy Disk Controller)</text:p>
        </text:list-item>
      </text:list>
      <table:table table:name="Table61" table:style-name="Table61">
        <table:table-column table:style-name="Table61.A"/>
        <table:table-column table:style-name="Table61.B"/>
        <table:table-column table:style-name="Table61.C"/>
        <table:table-header-rows>
          <table:table-row>
            <table:table-cell table:style-name="TableHeaderRowCell" office:value-type="string">
              <text:p text:style-name="Table_20_Heading">Power SW on the main unit</text:p>
            </table:table-cell>
            <table:table-cell table:style-name="TableHeaderRowCell" office:value-type="string">
              <text:p text:style-name="Table_20_Heading">Activity LED</text:p>
            </table:table-cell>
            <table:table-cell table:style-name="TableHeaderRowCell" office:value-type="string">
              <text:p text:style-name="Table_20_Heading">Eject LED</text:p>
            </table:table-cell>
          </table:table-row>
        </table:table-header-rows>
        <table:table-row>
          <table:table-cell table:style-name="TableRowCell" office:value-type="string">
            <text:p text:style-name="Table_20_Contents">ON State</text:p>
          </table:table-cell>
          <table:table-cell table:style-name="TableRowCell" office:value-type="string">
            <text:p text:style-name="Table_20_Contents">If media is in the FDD</text:p>
          </table:table-cell>
          <table:table-cell table:style-name="TableRowCell" office:value-type="string">
            <text:p text:style-name="Table_20_Contents">- Normal lighting</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Eject switch masking function OFF: Normal lighting or off</text:p>
          </table:table-cell>
        </table:table-row>
        <table:table-row>
          <table:table-cell table:style-name="TableRowCell" office:value-type="string">
    </table:table-cell>
          <table:table-cell table:style-name="TableRowCell" office:value-type="string">
            <text:p text:style-name="Table_20_Contents">If media is not in the FDD and LED normal lighting is ON: Normal lighting</text:p>
          </table:table-cell>
          <table:table-cell table:style-name="TableRowCell" office:value-type="string">
            <text:p text:style-name="Table_20_Contents">If media is not in the FDD and eject switch masking function is OFF: Normal lighting or off</text:p>
          </table:table-cell>
        </table:table-row>
        <table:table-row>
          <table:table-cell table:style-name="TableRowCell" office:value-type="string">
    </table:table-cell>
          <table:table-cell table:style-name="TableRowCell" office:value-type="string">
            <text:p text:style-name="Table_20_Contents">If media is not in the FDD and LED normal lighting is OFF: Off</text:p>
          </table:table-cell>
          <table:table-cell table:style-name="TableRowCell" office:value-type="string">
            <text:p text:style-name="Table_20_Contents">OFF: Off /Blown</text:p>
          </table:table-cell>
        </table:table-row>
        <table:table-row>
          <table:table-cell table:style-name="TableRowCell" office:value-type="string">
    </table:table-cell>
          <table:table-cell table:style-name="TableRowCell" office:value-type="string">
            <text:p text:style-name="Table_20_Contents">FDD re-read/write (track select ON, LED ON)</text:p>
          </table:table-cell>
          <table:table-cell table:style-name="TableRowCell" office:value-type="string">
            <text:p text:style-name="Table_20_Contents">-Normal lighting: Switch to colored in normal state</text:p>
          </table:table-cell>
        </table:table-row>
        <table:table-row>
          <table:table-cell table:style-name="TableRowCell" office:value-type="string">
            <text:p text:style-name="Table_20_Contents">OFF State</text:p>
          </table:table-cell>
          <table:table-cell table:style-name="TableRowCell" office:value-type="string">
            <text:p text:style-name="Table_20_Contents">Media is in FDD:</text:p>
          </table:table-cell>
          <table:table-cell table:style-name="TableRowCell" office:value-type="string">
            <text:p text:style-name="Table_20_Contents">- Normal lighting</text:p>
          </table:table-cell>
        </table:table-row>
        <table:table-row>
          <table:table-cell table:style-name="TableRowCell" office:value-type="string">
    </table:table-cell>
          <table:table-cell table:style-name="TableRowCell" office:value-type="string">
            <text:p text:style-name="Table_20_Contents">Media is not in FDD: ~ OFF: Off</text:p>
          </table:table-cell>
          <table:table-cell table:style-name="TableRowCell" office:value-type="string">
    </table:table-cell>
        </table:table-row>
      </table:table>
      <table:table table:name="Table62" table:style-name="Table62">
        <table:table-column table:style-name="Table62.A"/>
        <table:table-header-rows>
          <table:table-row>
            <table:table-cell table:style-name="TableHeaderRowCell" office:value-type="string">
              <text:p text:style-name="Table_20_Heading">Table 4-12 Meanings of Disk Drive LEDs</text:p>
            </table:table-cell>
          </table:table-row>
        </table:table-header-rows>
      </table:table>
      <text:p text:style-name="First_20_paragraph">(3) Eject switch masking function</text:p>
      <text:p text:style-name="Text_20_body">A function to mask the eject operation so that ejects cannot be performed during access</text:p>
      <text:p text:style-name="Text_20_body">(4) Media search function</text:p>
      <text:p text:style-name="Text_20_body">A function to monitor the insertion and non-insertion state constantly across all drives</text:p>
      <text:p text:style-name="Text_20_body">(5) Media mis-insertion detection function</text:p>
      <text:p text:style-name="Text_20_body">A function to detect media mis-insertion for each drive</text:p>
      <text:p text:style-name="Text_20_body">(6) Interrupt Function</text:p>
      <text:p text:style-name="Text_20_body">An interrupt notification function during media insertion and ejection</text:p>
      <text:p text:style-name="Text_20_body">Chapter 4 Peripheral LSI</text:p>
      <text:list text:style-name="List_20_1">
        <text:list-item>
          <text:p text:style-name="List_20_Bullet">I/O Controller</text:p>
        </text:list-item>
        <text:list-item>
          <text:p text:style-name="List_20_Bullet">Hard Disk Control</text:p>
        </text:list-item>
        <text:list-item>
          <text:p text:style-name="List_20_Bullet">Hard Disk Data Bus</text:p>
        </text:list-item>
        <text:list-item>
          <text:p text:style-name="List_20_Bullet">HD (Hard Disk)</text:p>
        </text:list-item>
        <text:list-item>
          <text:p text:style-name="List_20_Bullet">FD (Floppy Disk)</text:p>
        </text:list-item>
        <text:list-item>
          <text:p text:style-name="List_20_Bullet">FDD Option Control</text:p>
        </text:list-item>
        <text:list-item>
          <text:p text:style-name="List_20_Bullet">Control Bus</text:p>
        </text:list-item>
        <text:list-item>
          <text:p text:style-name="List_20_Bullet">Address Bus</text:p>
        </text:list-item>
        <text:list-item>
          <text:p text:style-name="List_20_Bullet">Data Bus</text:p>
        </text:list-item>
        <text:list-item>
          <text:p text:style-name="List_20_Bullet">2HD/2DD/2D Switching</text:p>
        </text:list-item>
        <text:list-item>
          <text:p text:style-name="List_20_Bullet">FDC (µPD72065)</text:p>
        </text:list-item>
        <text:list-item>
          <text:p text:style-name="List_20_Bullet">VFO Circuit (SED9420AC)</text:p>
        </text:list-item>
        <text:list-item>
          <text:p text:style-name="List_20_Bullet">ACK</text:p>
        </text:list-item>
        <text:list-item>
          <text:p text:style-name="List_20_Bullet">SEL</text:p>
        </text:list-item>
        <text:list-item>
          <text:p text:style-name="List_20_Bullet">RESET</text:p>
        </text:list-item>
        <text:list-item>
          <text:p text:style-name="List_20_Bullet">REQ</text:p>
        </text:list-item>
        <text:list-item>
          <text:p text:style-name="List_20_Bullet">BUSY</text:p>
        </text:list-item>
        <text:list-item>
          <text:p text:style-name="List_20_Bullet">I/O</text:p>
        </text:list-item>
        <text:list-item>
          <text:p text:style-name="List_20_Bullet">C/O</text:p>
        </text:list-item>
        <text:list-item>
          <text:p text:style-name="List_20_Bullet">MSG</text:p>
        </text:list-item>
        <text:list-item>
          <text:p text:style-name="List_20_Bullet">D0-D7</text:p>
        </text:list-item>
        <text:list-item>
          <text:p text:style-name="List_20_Bullet">OPTION SELECT 0~3</text:p>
        </text:list-item>
        <text:list-item>
          <text:p text:style-name="List_20_Bullet">EJECT</text:p>
        </text:list-item>
        <text:list-item>
          <text:p text:style-name="List_20_Bullet">EJECT MASK</text:p>
        </text:list-item>
        <text:list-item>
          <text:p text:style-name="List_20_Bullet">LED BLINK</text:p>
        </text:list-item>
        <text:list-item>
          <text:p text:style-name="List_20_Bullet">FHD IN</text:p>
        </text:list-item>
        <text:list-item>
          <text:p text:style-name="List_20_Bullet">FDD IN</text:p>
        </text:list-item>
        <text:list-item>
          <text:p text:style-name="List_20_Bullet">DISK IN</text:p>
        </text:list-item>
        <text:list-item>
          <text:p text:style-name="List_20_Bullet">TRK 00</text:p>
        </text:list-item>
        <text:list-item>
          <text:p text:style-name="List_20_Bullet">WRITE PROTECT</text:p>
        </text:list-item>
        <text:list-item>
          <text:p text:style-name="List_20_Bullet">DRIVE SELECT 0~3</text:p>
        </text:list-item>
        <text:list-item>
          <text:p text:style-name="List_20_Bullet">READY</text:p>
        </text:list-item>
        <text:list-item>
          <text:p text:style-name="List_20_Bullet">INDEX</text:p>
        </text:list-item>
        <text:list-item>
          <text:p text:style-name="List_20_Bullet">DISK TYPE SELECT</text:p>
        </text:list-item>
        <text:list-item>
          <text:p text:style-name="List_20_Bullet">DIRECTION</text:p>
        </text:list-item>
        <text:list-item>
          <text:p text:style-name="List_20_Bullet">STEP</text:p>
        </text:list-item>
        <text:list-item>
          <text:p text:style-name="List_20_Bullet">WRITE GATE</text:p>
        </text:list-item>
        <text:list-item>
          <text:p text:style-name="List_20_Bullet">WRITE DATA</text:p>
        </text:list-item>
        <text:list-item>
          <text:p text:style-name="List_20_Bullet">SIDE SELECT</text:p>
        </text:list-item>
        <text:list-item>
          <text:p text:style-name="List_20_Bullet">MOTOR ON</text:p>
        </text:list-item>
        <text:list-item>
          <text:p text:style-name="List_20_Bullet">READ DATA</text:p>
        </text:list-item>
        <text:list-item>
          <text:p text:style-name="List_20_Bullet">Fig. 4-9 FDD Peripheral Block Diagram</text:p>
        </text:list-item>
        <text:list-item>
          <text:p text:style-name="List_20_Bullet">MIN/STD</text:p>
        </text:list-item>
        <text:list-item>
          <text:p text:style-name="List_20_Bullet">Vcc1</text:p>
        </text:list-item>
        <text:list-item>
          <text:p text:style-name="List_20_Bullet">Vss</text:p>
        </text:list-item>
        <text:list-item>
          <text:p text:style-name="List_20_Bullet">16 MHz</text:p>
        </text:list-item>
      </text:list>
      <text:p text:style-name="First_20_paragraph">Page 150</text:p>
      <text:list text:style-name="Numbering_20_1" text:start-value="5">
        <text:list-item>
          <text:p text:style-name="List_20_Number">FDC (Floppy Disk Controller)</text:p>
          <text:p text:style-name="Preformatted_20_Text"><text:s text:c="20"/>Unformatted <text:s text:c="13"/>1667</text:p>
        </text:list-item>
      </text:list>
      <text:p text:style-name="First_20_paragraph">Capacity</text:p>
      <text:p text:style-name="Preformatted_20_Text"><text:s text:c="2"/>Formatted <text:s text:c="18"/>1065 <text:s text:c="11"/>IBM standard 26 sectors</text:p>
      <text:p text:style-name="Preformatted_20_Text"><text:s text:c="2"/>(K bytes) <text:s text:c="41"/>256 bytes / high density mode</text:p>
      <text:p text:style-name="Preformatted_20_Text"><text:s text:c="2"/>Number of tracks <text:s text:c="11"/>10.42</text:p>
      <text:p text:style-name="First_20_paragraph">Data transfer rate 500 (K bits/s) Access time 3</text:p>
      <text:p text:style-name="Preformatted_20_Text"><text:s text:c="2"/>Track-to-track seek time</text:p>
      <text:p text:style-name="Preformatted_20_Text"><text:s text:c="2"/>(msec) <text:s text:c="21"/>15 <text:s text:c="13"/>Cylinder wait time = <text:s text:c="2"/></text:p>
      <text:p text:style-name="Preformatted_20_Text"><text:s text:c="42"/>Track-to-track seek time</text:p>
      <text:p text:style-name="Preformatted_20_Text"><text:s text:c="2"/>Average seek time <text:s text:c="10"/>95 <text:s text:c="13"/>Average access time = <text:s text:c="1"/></text:p>
      <text:p text:style-name="Preformatted_20_Text"><text:s text:c="45"/>Cylinder seek time</text:p>
      <text:p text:style-name="First_20_paragraph">Media rotation speed 360 (rpm) Spindle motor 0.5 startup time (sec) Recording density 9870 (BPI) Number of tracks</text:p>
      <text:p text:style-name="Preformatted_20_Text"><text:s text:c="2"/>TRACK/SIDE <text:s text:c="17"/>77</text:p>
      <text:p text:style-name="Preformatted_20_Text"><text:s text:c="2"/>TRACK/DISK <text:s text:c="16"/>154</text:p>
      <text:p text:style-name="First_20_paragraph">Tracks density 96 (TPI) Number of heads 2 Recording method MFM FM method available External dimensions 27.0 (H) x 148.0 (W) x (mm) 198.0 (D) Weight 900 g Other Auto clamp eject mechanism, auto retract plate function, VFO (SED9420AC)</text:p>
      <text:p text:style-name="Text_20_body">Table 4-13 Specifications of built-in FDD</text:p>
      <text:p text:style-name="Text_20_body">Chapter 4 Peripheral LSI</text:p>
      <text:p text:style-name="Text_20_body">5-2 Characteristics of the FDC</text:p>
      <text:p text:style-name="Text_20_body">In the X68000, the µPD72065 is used as the FDC to control the two installed FDDs. The following points differ when compared to the FDC MB8877A that was used in the conventional X1, X1turbo series.</text:p>
      <text:p text:style-name="Text_20_body">µPD72065</text:p>
      <text:list text:style-name="List_20_1">
        <text:list-item>
          <text:p text:style-name="List_20_Bullet_20_Tight">The execution result (status) check of read/write systems can be performed in advance via an interrupt.</text:p>
        </text:list-item>
        <text:list-item>
          <text:p text:style-name="List_20_Bullet_20_Tight">The output terminal for drive select and head select is abolished, and these are unnecessary as I/O ports.</text:p>
        </text:list-item>
        <text:list-item>
          <text:p text:style-name="List_20_Bullet_20_Tight">The current head position on each drive is retained in the FDC, simplifying the program.</text:p>
        </text:list-item>
        <text:list-item>
          <text:p text:style-name="List_20_Bullet_20_Tight">Video data can be given to the FDC without the need for formatting (coding).</text:p>
        </text:list-item>
        <text:list-item>
          <text:p text:style-name="List_20_Bullet_20_Tight">If an error is detected, the command is terminated immediately without retries. (e.g., during a read/write, when a media defect is detected, but the head does not stop.)</text:p>
        </text:list-item>
      </text:list>
      <text:p text:style-name="First_20_paragraph">MB8877A</text:p>
      <text:list text:style-name="List_20_1">
        <text:list-item>
          <text:p text:style-name="List_20_Bullet_20_Tight">The execution result (status) check of read/write systems can be performed via polling in advance.</text:p>
        </text:list-item>
        <text:list-item>
          <text:p text:style-name="List_20_Bullet_20_Tight">The output terminals for drive select and head select are required as I/O ports.</text:p>
        </text:list-item>
        <text:list-item>
          <text:p text:style-name="List_20_Bullet_20_Tight">It is necessary to retain track numbers that store the current head position of each drive on the main RAM, complicating the program.</text:p>
        </text:list-item>
        <text:list-item>
          <text:p text:style-name="List_20_Bullet_20_Tight">It requires formatting (coding) for one track (approximately 6KB - 8KB capacity). Then, the program gets complicated.</text:p>
        </text:list-item>
        <text:list-item>
          <text:p text:style-name="List_20_Bullet_20_Tight">Sometimes, if there is no response to an error, the command continues. (e.g., during a read/write, when a media defect is detected, and sometimes the head keeps spinning without stopping.)</text:p>
        </text:list-item>
      </text:list>
      <text:p text:style-name="First_20_paragraph">Table 4-14 Comparison points between µPD72065 and MB8877A</text:p>
      <text:h text:style-name="Heading_20_1" text:outline-level="1"><text:bookmark-start text:name="id_5-fdc-floppy-disk-controller-1"/>5. FDC (Floppy Disk Controller)<text:bookmark-end text:name="id_5-fdc-floppy-disk-controller-1"/></text:h>
      <text:h text:style-name="Heading_20_1" text:outline-level="1"><text:bookmark-start text:name="id_5-3-fdc-register-address-map"/>5-3 FDC Register Address Map<text:bookmark-end text:name="id_5-3-fdc-register-address-map"/></text:h>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G"/>
        <table:table-column table:style-name="Table63.H"/>
        <table:table-column table:style-name="Table63.I"/>
        <table:table-column table:style-name="Table63.J"/>
        <table:table-column table:style-name="Table63.K"/>
        <table:table-column table:style-name="Table63.L"/>
        <table:table-header-rows>
          <table:table-row>
            <table:table-cell table:style-name="TableHeaderRowCell" office:value-type="string">
              <text:p text:style-name="Table_20_Heading">I/O</text:p>
            </table:table-cell>
            <table:table-cell table:style-name="TableHeaderRowCell" office:value-type="string">
              <text:p text:style-name="Table_20_Heading">Register 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cell table:style-name="TableHeaderRowCell" office:value-type="string">
              <text:p text:style-name="Table_20_Heading">Note</text:p>
            </table:table-cell>
            <table:table-cell table:style-name="TableHeaderRowCell" office:value-type="string">
      </table:table-cell>
          </table:table-row>
        </table:table-header-rows>
        <table:table-row>
          <table:table-cell table:style-name="TableRowCell" office:value-type="string">
            <text:p text:style-name="Table_20_Contents">In</text:p>
          </table:table-cell>
          <table:table-cell table:style-name="TableRowCell" office:value-type="string">
            <text:p text:style-name="Table_20_Contents">Rea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001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FDC Status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003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FDC Data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005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Drive Status (optional signa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001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Interrupt vector status</text:p>
          </table:table-cell>
          <table:table-cell table:style-name="TableRowCell" office:value-type="string">
    </table:table-cell>
        </table:table-row>
        <table:table-row>
          <table:table-cell table:style-name="TableRowCell" office:value-type="string">
            <text:p text:style-name="Table_20_Contents">Out</text:p>
          </table:table-cell>
          <table:table-cell table:style-name="TableRowCell" office:value-type="string">
            <text:p text:style-name="Table_20_Contents">Writ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003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FDC Data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005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Drive Control (optional signa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007H</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Access drive select, 2HD/2DD, 2D switch</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001H</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Interrupt vector mask</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003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Interrupt vector number</text:p>
          </table:table-cell>
          <table:table-cell table:style-name="TableRowCell" office:value-type="string">
    </table:table-cell>
        </table:table-row>
      </table:table>
      <text:p text:style-name="First_20_paragraph">Table 4-15: FDC Register Address Map</text:p>
      <text:h text:style-name="Heading_20_1" text:outline-level="1"><text:bookmark-start text:name="id_5-4-details-of-the-fdc-registers"/>5-4 Details of the FDC Registers<text:bookmark-end text:name="id_5-4-details-of-the-fdc-registers"/></text:h>
      <text:list text:style-name="Numbering_20_1">
        <text:list-item>
          <text:p text:style-name="List_20_Number">Regarding FDC Status Register (E94001H) and FDC Data Register (E94003H), please refer to the µPD72065 data sheet for further details.</text:p>
        </text:list-item>
        <text:list-item>
          <text:p text:style-name="List_20_Number">Drive Status (In) - optional signal:</text:p>
        </text:list-item>
      </text:list>
      <text:p text:style-name="Preformatted_20_Text"><text:s text:c="4"/>- E94005H</text:p>
      <text:p text:style-name="Preformatted_20_Text"><text:s text:c="2"/></text:p>
      <text:p text:style-name="Preformatted_20_Text"><text:s text:c="2"/>| D7 | D6 | D5 | D4 | D3 | D2 | D1 | D0 |</text:p>
      <text:p text:style-name="Preformatted_20_Text"><text:s text:c="2"/>|----|----|----|----|----|----|----|----|</text:p>
      <text:p text:style-name="Preformatted_20_Text"><text:s text:c="2"/>| <text:s text:c="1"/>0 | <text:s text:c="1"/>0 | <text:s text:c="1"/>0 | <text:s text:c="1"/>0 | <text:s text:c="1"/>0 | <text:s text:c="1"/>0 |--|--|</text:p>
      <text:p text:style-name="Preformatted_20_Text"><text:s text:c="1"/></text:p>
      <text:p text:style-name="Preformatted_20_Text"><text:s text:c="2"/>- Description:</text:p>
      <text:p text:style-name="Preformatted_20_Text"><text:s text:c="5"/>- Media Absent or Other: 0</text:p>
      <text:p text:style-name="Preformatted_20_Text"><text:s text:c="5"/>- Media Present: 1</text:p>
      <text:p text:style-name="First_20_paragraph">Page 153</text:p>
      <text:p text:style-name="Text_20_body">Chapter 4 Peripheral LSI</text:p>
      <text:p text:style-name="Text_20_body">(3) Drive Control (Out) ... Option Signals</text:p>
      <text:list text:style-name="List_20_1">
        <text:list-item>
          <text:p text:style-name="List_20_Bullet_20_Tight">E94005H</text:p>
        </text:list-item>
      </text:list>
      <text:p text:style-name="First_20_paragraph">D7 | D6 | D5 | D4 | D3 | D2 | D1 | D0</text:p>
      <text:p text:style-name="Text_20_body">1: Option signal for Drive 0 enabled 0: Option signal for Drive 0 disabled 1: Option signal for Drive 1 enabled 0: Option signal for Drive 1 disabled 1: Option signal for Drive 2 enabled 0: Option signal for Drive 2 disabled 1: Option signal for Drive 3 enabled 0: Option signal for Drive 3 disabled 1: Ejection enabled 0: Ejection disabled 1: Injection switch mask enabled 0: Injection switch mask disabled 1: LED lighting (ON, OFF effective when no media is inserted) 0: LED lighting OFF</text:p>
      <text:p text:style-name="Text_20_body">(4) Access Drive Select, 2HD / 2DD • 2D Switching (Out)</text:p>
      <text:list text:style-name="List_20_1">
        <text:list-item>
          <text:p text:style-name="List_20_Bullet_20_Tight">E94007H</text:p>
        </text:list-item>
      </text:list>
      <text:p text:style-name="First_20_paragraph">D7 | D6 | D5 | D4 | D3 | D2 | D1 | D0</text:p>
      <text:p text:style-name="Text_20_body">0: Access Drive 0 selected 1: Access Drive 1 selected 0: Access Drive 2 selected 1: Access Drive 3 selected 0: 2HD (1.6M type) 1: 2DD or 2D (1M or 500K type) 0: Drive select disable, motor OFF 1: Drive select enable, motor ON</text:p>
      <text:p text:style-name="Text_20_body">Page 154</text:p>
      <text:list text:style-name="Numbering_20_1" text:start-value="5">
        <text:list-item>
          <text:p text:style-name="List_20_Number_20_Tight">FDC (Floppy Disk Controller)</text:p>
        </text:list-item>
      </text:list>
      <text:p text:style-name="First_20_paragraph">(5) Interrupt Signal Status (In) • E9C001H</text:p>
      <text:p text:style-name="Preformatted_20_Text">D7 D6 D5 D4 D3 D2 D1 D0</text:p>
      <text:p text:style-name="Preformatted_20_Text"><text:s text:c="2"/>1 <text:s text:c="1"/>0 <text:s text:c="1"/>0 <text:s text:c="1"/>1 <text:s text:c="1"/>1 <text:s text:c="1"/>0 <text:s text:c="1"/>1 <text:s text:c="1"/>0</text:p>
      <text:p text:style-name="Preformatted_20_Text"/>
      <text:p text:style-name="Preformatted_20_Text">D7:</text:p>
      <text:p text:style-name="Preformatted_20_Text"><text:s text:c="2"/>0: Printer interrupt mask set</text:p>
      <text:p text:style-name="Preformatted_20_Text"><text:s text:c="2"/>1: Printer interrupt mask cleared</text:p>
      <text:p text:style-name="Preformatted_20_Text"/>
      <text:p text:style-name="Preformatted_20_Text">D6:</text:p>
      <text:p text:style-name="Preformatted_20_Text"><text:s text:c="2"/>0: FDD interrupt mask set</text:p>
      <text:p text:style-name="Preformatted_20_Text"><text:s text:c="2"/>1: FDD interrupt mask cleared</text:p>
      <text:p text:style-name="Preformatted_20_Text"/>
      <text:p text:style-name="Preformatted_20_Text">D5:</text:p>
      <text:p text:style-name="Preformatted_20_Text"><text:s text:c="2"/>0: FDC interrupt mask set</text:p>
      <text:p text:style-name="Preformatted_20_Text"><text:s text:c="2"/>1: FDC interrupt mask cleared</text:p>
      <text:p text:style-name="Preformatted_20_Text"/>
      <text:p text:style-name="Preformatted_20_Text">D4:</text:p>
      <text:p text:style-name="Preformatted_20_Text"><text:s text:c="2"/>0: Hard disk interrupt mask set</text:p>
      <text:p text:style-name="Preformatted_20_Text"><text:s text:c="2"/>1: Hard disk interrupt mask cleared</text:p>
      <text:p text:style-name="Preformatted_20_Text"/>
      <text:p text:style-name="Preformatted_20_Text">D3:</text:p>
      <text:p text:style-name="Preformatted_20_Text"><text:s text:c="2"/>0: Printer interrupt</text:p>
      <text:p text:style-name="Preformatted_20_Text"><text:s text:c="2"/>1: Printer interrupt (BUSY=1) - data not sent to printer</text:p>
      <text:p text:style-name="Preformatted_20_Text"/>
      <text:p text:style-name="Preformatted_20_Text">D2:</text:p>
      <text:p text:style-name="Preformatted_20_Text"><text:s text:c="2"/>0: FDD interrupt</text:p>
      <text:p text:style-name="Preformatted_20_Text"><text:s text:c="2"/>1: FDD interrupt - Media insert (media not ready or reject, or media eject time out), recalibration complete</text:p>
      <text:p text:style-name="Preformatted_20_Text"/>
      <text:p text:style-name="Preformatted_20_Text">D1:</text:p>
      <text:p text:style-name="Preformatted_20_Text"><text:s text:c="2"/>0: FDC interrupt</text:p>
      <text:p text:style-name="Preformatted_20_Text"><text:s text:c="2"/>1: FDC interrupt - Light/Phase down by resulting status data reading request, SEEK, RECALIBRATE command's E-PH WITH ASE command, SENSE INTERRUPT STATUS command's end, or SENSE INTERRUPT STATUS command's timeout request</text:p>
      <text:p text:style-name="Preformatted_20_Text"/>
      <text:p text:style-name="Preformatted_20_Text">D0:</text:p>
      <text:p text:style-name="Preformatted_20_Text"><text:s text:c="2"/>0: FDC interrupt mask set</text:p>
      <text:p text:style-name="Preformatted_20_Text"><text:s text:c="2"/>1: FDC interrupt mask cleared</text:p>
      <text:p text:style-name="First_20_paragraph">(6) Interrupt Signal Mask (Out) • E9C001H</text:p>
      <text:p text:style-name="Preformatted_20_Text">D7 D6 D5 D4 D3 D2 D1 D0</text:p>
      <text:p text:style-name="Preformatted_20_Text"><text:s text:c="2"/>0 <text:s text:c="1"/>0 <text:s text:c="1"/>0 <text:s text:c="1"/>0 <text:s text:c="1"/>0 <text:s text:c="1"/>0 <text:s text:c="1"/>0 <text:s text:c="1"/>0</text:p>
      <text:p text:style-name="Preformatted_20_Text"/>
      <text:p text:style-name="Preformatted_20_Text">D7:</text:p>
      <text:p text:style-name="Preformatted_20_Text"><text:s text:c="2"/>0: Printer interrupt mask</text:p>
      <text:p text:style-name="Preformatted_20_Text"><text:s text:c="2"/>1: Clear printer interrupt mask</text:p>
      <text:p text:style-name="Preformatted_20_Text"/>
      <text:p text:style-name="Preformatted_20_Text">D6:</text:p>
      <text:p text:style-name="Preformatted_20_Text"><text:s text:c="2"/>0: FDD interrupt mask</text:p>
      <text:p text:style-name="Preformatted_20_Text"><text:s text:c="2"/>1: Clear FDD interrupt mask</text:p>
      <text:p text:style-name="Preformatted_20_Text"/>
      <text:p text:style-name="Preformatted_20_Text">D5:</text:p>
      <text:p text:style-name="Preformatted_20_Text"><text:s text:c="2"/>0: FDC interrupt mask</text:p>
      <text:p text:style-name="Preformatted_20_Text"><text:s text:c="2"/>1: Clear FDC interrupt mask</text:p>
      <text:p text:style-name="Preformatted_20_Text"/>
      <text:p text:style-name="Preformatted_20_Text">D4:</text:p>
      <text:p text:style-name="Preformatted_20_Text"><text:s text:c="2"/>0: Hard disk interrupt mask</text:p>
      <text:p text:style-name="Preformatted_20_Text"><text:s text:c="2"/>1: Clear hard disk interrupt mask</text:p>
      <text:p text:style-name="First_20_paragraph">Page 155</text:p>
      <text:p text:style-name="Text_20_body">Chapter 4 Peripheral LSI</text:p>
      <text:p text:style-name="Text_20_body">(7) Interrupt Vector Numbers (Out)</text:p>
      <text:list text:style-name="List_20_1">
        <text:list-item>
          <text:p text:style-name="List_20_Bullet_20_Tight">E9C003H</text:p>
        </text:list-item>
      </text:list>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5-5 FDC Access</text:p>
      <text:p text:style-name="Text_20_body">(1) Usage of auto eject, LED indication, and eject switch mask function Among the functions of the drive controller (E9400H) that you want to operate, set the desired function bit (D5~D7) to "1" and OUT it to specify the drive to operate the option signal with D0~D3.</text:p>
      <text:p text:style-name="Text_20_body">(2) Media insertion, media removal, media presence detection, media insertion detection, media insertion eject, and removal interrupt function usage First, an interrupt occurs when media is inserted or removed. Next, in the interrupt processing routine, specify the drive to output the option signal at D0~D3 and OUT it. However, at this time, D5~D7 records the previous state of each drive, and this will be OUT. Next, read the E9400H, check bits D6 and D7, and determine according to Table 4-16.</text:p>
      <table:table table:name="Table65" table:style-name="Table65">
        <table:table-column table:style-name="Table65.A"/>
        <table:table-column table:style-name="Table65.B"/>
        <table:table-column table:style-name="Table65.C"/>
        <table:table-header-rows>
          <table:table-row>
            <table:table-cell table:style-name="TableHeaderRowCell" office:value-type="string">
              <text:p text:style-name="Table_20_Heading">D7 (DISK IN)</text:p>
            </table:table-cell>
            <table:table-cell table:style-name="TableHeaderRowCell" office:value-type="string">
              <text:p text:style-name="Table_20_Heading">D6 (ERROR DISK)</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Media detected (In this case, an interrupt occurs with media insert or eject)</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Media inserted</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Media not inserted</text:p>
          </table:table-cell>
        </table:table-row>
      </table:table>
      <text:p text:style-name="First_20_paragraph">Table 4-16 Media Insertion Determination</text:p>
      <text:p text:style-name="Text_20_body">Page 156</text:p>
      <text:list text:style-name="Numbering_20_1" text:start-value="5">
        <text:list-item>
          <text:p text:style-name="List_20_Number_20_Tight">FDC (Floppy Disk Controller)</text:p>
        </text:list-item>
      </text:list>
      <text:p text:style-name="Preformatted_20_Text"><text:s text:c="4"/>When a media is inserted, the media interrupt starts by initially setting D7 to "0". If media is automatically set in the media insertion process, it will eventually be set to "1" and E90405H will be output. Other bits are processed the same as the first OUT.</text:p>
      <text:p text:style-name="Preformatted_20_Text"/>
      <text:p text:style-name="Preformatted_20_Text"><text:s text:c="4"/>This series of operations takes place for drives 0 through 3, and the host side grasps the state of each drive.</text:p>
      <text:p text:style-name="First_20_paragraph">(3) Utilizing the Forced Ready Function</text:p>
      <text:p text:style-name="Preformatted_20_Text"><text:s text:c="4"/>The YM2151 (FM sound source) CT2 port is used to check the connection to the FDD.</text:p>
      <text:p text:style-name="Preformatted_20_Text"/>
      <text:p text:style-name="Preformatted_20_Text"><text:s text:c="4"/>The CT2 port is used to forcibly set the FDC READY terminal to a READY state, and the following procedure is used to determine whether the FDD's power is on and whether the FDD is connected.</text:p>
      <text:p text:style-name="First_20_paragraph">■ Determination method</text:p>
      <text:p text:style-name="Preformatted_20_Text"><text:s text:c="2"/>1. Write "1" to CT2 port of YM2151 (forced READY).</text:p>
      <text:p text:style-name="Preformatted_20_Text"><text:s text:c="2"/></text:p>
      <text:p text:style-name="Preformatted_20_Text"><text:s text:c="2"/>2. Send the "RECALIBRATE" command to the FDC (to FDD#1-4, to four drives).</text:p>
      <text:p text:style-name="Preformatted_20_Text"><text:s text:c="2"/></text:p>
      <text:p text:style-name="Preformatted_20_Text"><text:s text:c="2"/>3. Send the "SENSE INTERRUPT STATUS" command to the FDC.</text:p>
      <text:p text:style-name="Preformatted_20_Text"><text:s text:c="2"/></text:p>
      <text:p text:style-name="Preformatted_20_Text"><text:s text:c="2"/>4. Check the D4 bit (EC) of the Result Status (ST0).</text:p>
      <text:p text:style-name="Preformatted_20_Text"/>
      <text:p text:style-name="Preformatted_20_Text"><text:s text:c="5"/>- EC="0": Connection OK</text:p>
      <text:p text:style-name="Preformatted_20_Text"><text:s text:c="5"/>- EC="1": Not connected (or power not on)</text:p>
      <text:p text:style-name="Preformatted_20_Text"><text:s text:c="2"/></text:p>
      <text:p text:style-name="Preformatted_20_Text"><text:s text:c="2"/>5. Write "0" to CT2 port of YM2151 (normal operation).</text:p>
      <text:p text:style-name="Preformatted_20_Text"/>
      <text:p text:style-name="Preformatted_20_Text"><text:s text:c="4"/>Note: The READY terminal of the FDC means the power is on, media is inserted, the clamp is executed, and the motor is turned on after execution. When the motor reaches constant rotation, it becomes "H".</text:p>
      <text:p text:style-name="Preformatted_20_Text"/>
      <text:p text:style-name="Preformatted_20_Text"><text:s text:c="4"/>Refer to Chapters 1-6 of Chapter 3 for details on the FM sound source (CT2 port).</text:p>
      <text:p text:style-name="First_20_paragraph"><text:span text:style-name="Emphasis">(This page is too faint in the original to transcribe.)</text:span></text:p>
      <text:p text:style-name="Text_20_body"><text:span text:style-name="Strong_20_Emphasis">Chapter 5</text:span></text:p>
      <text:p text:style-name="Text_20_body"><text:span text:style-name="Strong_20_Emphasis">Other Hardware</text:span></text:p>
      <text:list text:style-name="Numbering_20_1">
        <text:list-item>
          <text:p text:style-name="List_20_Number_20_Tight"><text:span text:style-name="Strong_20_Emphasis">Keyboard</text:span></text:p>
        </text:list-item>
      </text:list>
      <text:p text:style-name="First_20_paragraph">The X68000 uses the keyboard and mouse in the block structure as shown in Figure 5-1.</text:p>
      <text:p text:style-name="Text_20_body"><text:span text:style-name="Strong_20_Emphasis">[Main Unit]</text:span></text:p>
      <text:p text:style-name="Text_20_body"><text:span text:style-name="Strong_20_Emphasis">[Keyboard]</text:span></text:p>
      <text:p text:style-name="Text_20_body">Figure 5-1: Keyboard and Mouse Block Diagram</text:p>
      <text:p text:style-name="Text_20_body">Chapter 5: Other Hardware</text:p>
      <text:p text:style-name="Text_20_body">Regarding mouse and TV control, please use either the main unit control or the keyboard control exclusively.</text:p>
      <text:p text:style-name="Text_20_body">1-1 Sub CPU</text:p>
      <text:p text:style-name="Text_20_body">The keyboard of the X68000 uses a sub CPU as 80C51, which performs the roles shown in Table 5-1.</text:p>
      <table:table table:name="Table66" table:style-name="Table66">
        <table:table-column table:style-name="Table66.A"/>
        <table:table-header-rows>
          <table:table-row>
            <table:table-cell table:style-name="TableHeaderRowCell" office:value-type="string">
              <text:p text:style-name="Table_20_Heading">Data Transmission Format for Keyboard</text:p>
            </table:table-cell>
          </table:table-row>
        </table:table-header-rows>
        <table:table-row>
          <table:table-cell table:style-name="TableRowCell" office:value-type="string">
            <text:p text:style-name="Table_20_Contents">Baud Rate</text:p>
          </table:table-cell>
        </table:table-row>
        <table:table-row>
          <table:table-cell table:style-name="TableRowCell" office:value-type="string">
            <text:p text:style-name="Table_20_Contents">Start Bit</text:p>
          </table:table-cell>
        </table:table-row>
        <table:table-row>
          <table:table-cell table:style-name="TableRowCell" office:value-type="string">
            <text:p text:style-name="Table_20_Contents">Data Length</text:p>
          </table:table-cell>
        </table:table-row>
        <table:table-row>
          <table:table-cell table:style-name="TableRowCell" office:value-type="string">
            <text:p text:style-name="Table_20_Contents">Parity (None)</text:p>
          </table:table-cell>
        </table:table-row>
        <table:table-row>
          <table:table-cell table:style-name="TableRowCell" office:value-type="string">
            <text:p text:style-name="Table_20_Contents">Stop Bit</text:p>
          </table:table-cell>
        </table:table-row>
      </table:table>
      <text:p text:style-name="First_20_paragraph">Table 5-1: Keyboard Data Transmission Format</text:p>
      <text:p text:style-name="Text_20_body">(1) The key code obtained by key scan is sent to MFP (refer to Table 5-3, Figure 5-3). Unlike the X1 and X1turbo series, in the case of the X68000 keyboard, the key scan code is converted to ASCII code and stored in the corresponding key code, and information whether the key is pressed or released is sent as a 1-byte serial data.</text:p>
      <text:p text:style-name="Text_20_body">Additionally, regarding repeat, you can control the delay time before entering repeat and the interval time until the next repeat (Speed). After this the delay time, while the repeat function operates, the pressed signal (MSB) is sent. Note that the repeat is effective for all keys (refer to Figure 5-12).</text:p>
      <text:p text:style-name="Text_20_body">(2) TV control remote signal output (refer to Table 5-3, Figure 5-5) In the X1 and X1turbo series, the remote control signal was output from the main unit's 80C49 on P27 (pin 38), but in the X68000, the same signal is output from the keyboard's 80C51 T1 terminal. In the X68000, the method of outputting this TV control remote signal uses key operations on the keyboard (such as the SHIFT key) to send the 1-byte data to the MFP via the main unit or 80C51. Thus, depending on whether the main unit or the keyboard control is enabled, it allows you to send or invalidate the TV control code (refer to Figure 5-13).</text:p>
      <text:p text:style-name="Text_20_body">Page 160</text:p>
      <text:p text:style-name="Quotations">6 reference). Also, TV control by OPT.2 keys and CFG on keys can be enabled or disabled in the same way (Figure 5-13 reference).</text:p>
      <text:p text:style-name="Quotations">Additionally, if the keyboard is not connected to the main unit's connector, TV control will be possible even if a remote control signal is sent with software-based timing management while using the system port E8E003H D03 as "0". Conversely, if the keyboard is connected to the main unit, TV control is possible only when the system port E8E003H D03 is set to "0". For normal use, please set it to "0" (Figure 5-2 reference). The only available functions when entering TV control from the keyboard with a repeat enabled are volume up, volume down, channel up, and channel down.</text:p>
      <text:p text:style-name="Quotations">(3) Keyboard LED control (Figure 5-8 reference)</text:p>
      <text:p text:style-name="Quotations">You can control the LEDs - 7 LEDs for kana, romaji, code input, CAPS, INS, kana input, full corner - on the keyboard via software. In other words, when the LED key is pressed, the keyboard side detects it and sends 1 byte of data from the MFP on the main unit to the 80C51, allowing any LED to be turned on or off.</text:p>
      <text:p text:style-name="Quotations">Also, when the keyboard is reset (either when the AC adapter is plugged in or when the keyboard power is turned on), a request code is sent from the 80C51 on the keyboard to the MFP to set the LED state to off. The brightness can be configured using the following operations when pressing the key:</text:p>
      <text:list text:style-name="List_20_1">
        <text:list-item>
          <text:p text:style-name="List_20_Bullet_20_Tight">If no key is pressed: Bright</text:p>
        </text:list-item>
        <text:list-item>
          <text:p text:style-name="List_20_Bullet_20_Tight">Reset while pressing XF3: Slightly bright</text:p>
        </text:list-item>
        <text:list-item>
          <text:p text:style-name="List_20_Bullet_20_Tight">Reset while pressing XF4: Slightly dim</text:p>
        </text:list-item>
        <text:list-item>
          <text:p text:style-name="List_20_Bullet_20_Tight">Reset while pressing XF5: Dim</text:p>
        </text:list-item>
      </text:list>
      <text:p text:style-name="First_20_paragraph">Chapter 5 Other Hardware</text:p>
      <text:p text:style-name="Text_20_body">(4) Mouse Control Signal Control (Refer to Fig. 5-9) By sending 1 byte of data from the main unit’s MFP to the 80C51, it is possible to make the MSCTRL signal "H" or "L". However, this is valid only when the keyboard’s mouse socket is used. For details on the mouse, refer to Section 2 of this chapter.</text:p>
      <text:p text:style-name="Text_20_body">(5) Keyboard Send/Receive Code (Refer to Fig. 5-10) Normally, the main loop scans the keys and outputs the key data, but if the main unit’s MFP settings are not performed and the RDY (MFP’s RR pin level) signal is fixed to "L" or when the system port E8E007H D01 is "0", the DMAC will transfer busily, and the 80C51 will neither send key data nor halt key scanning, resulting in a stop state. Naturally, in such a state, TV control and other operations cannot be performed. However, in the case of the X68000, by sending 1 byte of data to the main unit’s MFP with this data send/receive code, the 80C51 prevents the data from being unsendable and ensures that the key scan will not be halted (RDY signal "H" or system port E8E007H D01 “1” enables key sending).</text:p>
      <text:p text:style-name="Text_20_body">(6) Special Control Keys in Compact TV Mode (Refer to Fig. 5-11) As shown in Table 5-2, 1 byte of data is sent from the MFP to the 80C51 regarding the control keys to use as TV controller keys on the X1 Compact.</text:p>
      <table:table table:name="Table67" table:style-name="Table67">
        <table:table-column table:style-name="Table67.A"/>
        <table:table-column table:style-name="Table67.B"/>
        <table:table-column table:style-name="Table67.C"/>
        <table:table-header-rows>
          <table:table-row>
            <table:table-cell table:style-name="TableHeaderRowCell" office:value-type="string">
              <text:p text:style-name="Table_20_Heading">Operation Key</text:p>
            </table:table-cell>
            <table:table-cell table:style-name="TableHeaderRowCell" office:value-type="string">
              <text:p text:style-name="Table_20_Heading">X68000</text:p>
            </table:table-cell>
            <table:table-cell table:style-name="TableHeaderRowCell" office:value-type="string">
              <text:p text:style-name="Table_20_Heading">X1 Compact Mode</text:p>
            </table:table-cell>
          </table:table-row>
        </table:table-header-rows>
        <table:table-row>
          <table:table-cell table:style-name="TableRowCell" office:value-type="string">
            <text:p text:style-name="Table_20_Contents">SHIFT +</text:p>
          </table:table-cell>
          <table:table-cell table:style-name="TableRowCell" office:value-type="string">
            <text:p text:style-name="Table_20_Contents">Superimpose/Superimpose Release Toggle Key</text:p>
          </table:table-cell>
          <table:table-cell table:style-name="TableRowCell" office:value-type="string">
            <text:p text:style-name="Table_20_Contents">Superimpose</text:p>
          </table:table-cell>
        </table:table-row>
        <table:table-row>
          <table:table-cell table:style-name="TableRowCell" office:value-type="string">
            <text:p text:style-name="Table_20_Contents">SHIFT =</text:p>
          </table:table-cell>
          <table:table-cell table:style-name="TableRowCell" office:value-type="string">
            <text:p text:style-name="Table_20_Contents">TV/External Input Toggle Key</text:p>
          </table:table-cell>
          <table:table-cell table:style-name="TableRowCell" office:value-type="string">
            <text:p text:style-name="Table_20_Contents">TV</text:p>
          </table:table-cell>
        </table:table-row>
        <table:table-row>
          <table:table-cell table:style-name="TableRowCell" office:value-type="string">
            <text:p text:style-name="Table_20_Contents">SHIFT .</text:p>
          </table:table-cell>
          <table:table-cell table:style-name="TableRowCell" office:value-type="string">
            <text:p text:style-name="Table_20_Contents">TV/Computer Screen Toggle Key</text:p>
          </table:table-cell>
          <table:table-cell table:style-name="TableRowCell" office:value-type="string">
            <text:p text:style-name="Table_20_Contents">Computer</text:p>
          </table:table-cell>
        </table:table-row>
      </table:table>
      <text:p text:style-name="First_20_paragraph">Table 5-2 X1 Compact TV Controller Code</text:p>
      <text:p text:style-name="Text_20_body">(Page 162)</text:p>
      <text:list text:style-name="Numbering_20_1">
        <text:list-item>
          <text:p text:style-name="List_20_Number_20_Tight">Keyboard</text:p>
        </text:list-item>
      </text:list>
      <text:p text:style-name="First_20_paragraph">From 8051 to MFP, 1 byte data The key correspondence code is as shown in Figure 5-4</text:p>
      <text:p text:style-name="Text_20_body">Key Correspondence Code 0: Key is pressed 1: Key is released</text:p>
      <text:p text:style-name="Text_20_body">Figure 5-3 Key Scan Data Format The key code is a 16-bit number</text:p>
      <text:p text:style-name="Text_20_body">BREAK COPY ESC F1 F2 F3 F4 F5 F6 F7 F8 F9 F10 BS TAB Q W E R T Y U I O P RETURN CTRL A S D F G H J K L ; : " SHIFT Z X C V B N M , . / SHIFT CAPS KANA CAPS ROMAJI HELP LOCK SYSTEM SYSTEM HELP ROLL UP ROLL DOWN</text:p>
      <text:p text:style-name="Text_20_body">INSTANT DELETE CLEAR 7 8 9 + UNDO 4 5 6 -</text:p>
      <text:p text:style-name="Preformatted_20_Text">1 2 3 *</text:p>
      <text:p text:style-name="Preformatted_20_Text">0 . ENTER</text:p>
      <text:p text:style-name="First_20_paragraph">OPTION 1 OPTION 2</text:p>
      <text:p text:style-name="Text_20_body">Figure 5-4 Key Code List</text:p>
      <text:p text:style-name="Text_20_body">Chapter 5 Other Hardware</text:p>
      <text:list text:style-name="List_20_1">
        <text:list-item>
          <text:p text:style-name="List_20_Bullet_20_Tight">From MFP to 8051, 1-byte data is sent.</text:p>
        </text:list-item>
      </text:list>
      <text:p text:style-name="Preformatted_20_Text"><text:s text:c="2"/>- If `SHIFT` is available, or by using `OPT. 2` key, TV control is performed.</text:p>
      <text:p text:style-name="Preformatted_20_Text"><text:s text:c="2"/>- Each code corresponds to the following list.</text:p>
      <text:p text:style-name="First_20_paragraph">TV Control Code</text:p>
      <text:p text:style-name="Preformatted_20_Text">D7 D6 D5 D4 D3 D2 D1 D0</text:p>
      <text:p text:style-name="Preformatted_20_Text"><text:s text:c="1"/>0 <text:s text:c="1"/>0 <text:s text:c="15"/>| <text:s text:c="18"/>SHIFT <text:s text:c="1"/>^ <text:s text:c="24"/>OPT. 2</text:p>
      <text:p text:style-name="First_20_paragraph">|--------------------| TV Control Code Table</text:p>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column table:style-name="Table68.H"/>
        <table:table-column table:style-name="Table68.I"/>
        <table:table-header-rows>
          <table:table-row>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cell table:style-name="TableHeaderRowCell" office:value-type="string">
              <text:p text:style-name="Table_20_Heading">Corresponding Key</text:p>
            </table:table-cell>
            <table:table-cell table:style-name="TableHeaderRowCell" office:value-type="string">
              <text:p text:style-name="Table_20_Heading">Command</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Vol. up</text:p>
          </table:table-cell>
          <table:table-cell table:style-name="TableRowCell" office:value-type="string">
            <text:p text:style-name="Table_20_Contents">Volume Up (repeatable)</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text:p>
          </table:table-cell>
          <table:table-cell table:style-name="TableRowCell" office:value-type="string">
            <text:p text:style-name="Table_20_Contents">Vol. down</text:p>
          </table:table-cell>
          <table:table-cell table:style-name="TableRowCell" office:value-type="string">
            <text:p text:style-name="Table_20_Contents">Volume Down (repeatable)</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text:p>
          </table:table-cell>
          <table:table-cell table:style-name="TableRowCell" office:value-type="string">
            <text:p text:style-name="Table_20_Contents">Vol. normal</text:p>
          </table:table-cell>
          <table:table-cell table:style-name="TableRowCell" office:value-type="string">
            <text:p text:style-name="Table_20_Contents">Volume Normal</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CLR</text:p>
          </table:table-cell>
          <table:table-cell table:style-name="TableRowCell" office:value-type="string">
            <text:p text:style-name="Table_20_Contents">Call</text:p>
          </table:table-cell>
          <table:table-cell table:style-name="TableRowCell" office:value-type="string">
            <text:p text:style-name="Table_20_Contents">Channel call</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CS down</text:p>
          </table:table-cell>
          <table:table-cell table:style-name="TableRowCell" office:value-type="string">
            <text:p text:style-name="Table_20_Contents">TV initial screen (reset)</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text:p>
          </table:table-cell>
          <table:table-cell table:style-name="TableRowCell" office:value-type="string">
            <text:p text:style-name="Table_20_Contents">Mute</text:p>
          </table:table-cell>
          <table:table-cell table:style-name="TableRowCell" office:value-type="string">
            <text:p text:style-name="Table_20_Contents">Sound mute</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text:p>
          </table:table-cell>
          <table:table-cell table:style-name="TableRowCell" office:value-type="string">
            <text:p text:style-name="Table_20_Contents">CH16</text:p>
          </table:table-cell>
          <table:table-cell table:style-name="TableRowCell" office:value-type="string">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text:p>
          </table:table-cell>
          <table:table-cell table:style-name="TableRowCell" office:value-type="string">
            <text:p text:style-name="Table_20_Contents">BR up</text:p>
          </table:table-cell>
          <table:table-cell table:style-name="TableRowCell" office:value-type="string">
            <text:p text:style-name="Table_20_Contents">TV/Computer Screen Switch - Toggle control</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text:p>
          </table:table-cell>
          <table:table-cell table:style-name="TableRowCell" office:value-type="string">
            <text:p text:style-name="Table_20_Contents">BR down</text:p>
          </table:table-cell>
          <table:table-cell table:style-name="TableRowCell" office:value-type="string">
            <text:p text:style-name="Table_20_Contents">TV input &amp; Computer/Normal - High-speed Skipping</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ext:p text:style-name="Table_20_Contents">BR 1/2</text:p>
          </table:table-cell>
          <table:table-cell table:style-name="TableRowCell" office:value-type="string">
            <text:p text:style-name="Table_20_Contents">Brightness 1/2</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CH up</text:p>
          </table:table-cell>
          <table:table-cell table:style-name="TableRowCell" office:value-type="string">
            <text:p text:style-name="Table_20_Contents">Channel Up (repeatable)</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text:p>
          </table:table-cell>
          <table:table-cell table:style-name="TableRowCell" office:value-type="string">
            <text:p text:style-name="Table_20_Contents">CH down</text:p>
          </table:table-cell>
          <table:table-cell table:style-name="TableRowCell" office:value-type="string">
            <text:p text:style-name="Table_20_Contents">Channel Down (repeatable)</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Power ON/OFF</text:p>
          </table:table-cell>
          <table:table-cell table:style-name="TableRowCell" office:value-type="string">
            <text:p text:style-name="Table_20_Contents">TV Power ON/OFF</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CS 1/2</text:p>
          </table:table-cell>
          <table:table-cell table:style-name="TableRowCell" office:value-type="string">
            <text:p text:style-name="Table_20_Contents">Super-1 (contrast down) and removal toggle</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ext:p text:style-name="First_20_paragraph">| 1 | 0 | 0 | 0 | 0 | 0 | Ten Key 1 | CH 1 | Channel 1 | | 1 | 0 | 0 | 0 | 0 | 1 | | CH 2 | Channel 2 | | 1 | 0 | 0 | 0 | 1 | 0 | | CH 3 | Channel 3 | | 1 | 0 | 0 | 0 | 1 | 1 | | CH 4 | Channel 4 | | 1 | 0 | 0 | 1 | 0 | 0 | | CH 5 | Channel 5 | | 1 | 0 | 0 | 1 | 0 | 1 | | CH 6 | Channel 6 | | 1 | 0 | 0 | 1 | 1 | 0 | | CH 7 | Channel 7 | | 1 | 0 | 0 | 1 | 1 | 1 | | CH 8 | Channel 8 | | 1 | 0 | 1 | 0 | 0 | 0 | | CH 9 | Channel 9 | | 1 | 0 | 1 | 0 | 0 | 1 | | CH 10 | Channel 10 | | 1 | 0 | 1 | 0 | 1 | 0 | | CH 11 | Channel 11 | | 1 | 0 | 1 | 0 | 1 | 1 | | CH 12 | Channel 12 | |</text:p>
      <text:list text:style-name="Numbering_20_1">
        <text:list-item>
          <text:p text:style-name="List_20_Number_20_Tight">Keyboard</text:p>
        </text:list-item>
      </text:list>
      <text:p text:style-name="First_20_paragraph">(TV control and remote signal transmission) (Transmission of remote signals "0" and "1")</text:p>
      <text:p text:style-name="Text_20_body">Formal signal Reverse signal 48msec 48msec</text:p>
      <text:p text:style-name="Text_20_body">250 µs 250 µs</text:p>
      <text:p text:style-name="Preformatted_20_Text"><text:s text:c="4"/>|------|------|</text:p>
      <text:p text:style-name="Preformatted_20_Text"><text:s text:c="4"/>| <text:s text:c="3"/>1msec <text:s text:c="3"/>|</text:p>
      <text:p text:style-name="Preformatted_20_Text"/>
      <text:p text:style-name="Preformatted_20_Text"><text:s text:c="4"/>"0"</text:p>
      <text:p text:style-name="First_20_paragraph">250 µs 250 µs</text:p>
      <text:p text:style-name="Preformatted_20_Text"><text:s text:c="4"/>|------|------|</text:p>
      <text:p text:style-name="Preformatted_20_Text"><text:s text:c="4"/>| <text:s text:c="3"/>2msec <text:s text:c="3"/>|</text:p>
      <text:p text:style-name="Preformatted_20_Text"/>
      <text:p text:style-name="Preformatted_20_Text"><text:s text:c="4"/>"1"</text:p>
      <text:p text:style-name="First_20_paragraph">(Formal signal)</text:p>
      <text:p text:style-name="Preformatted_20_Text">C1 <text:s text:c="1"/>C2 <text:s text:c="1"/>C3 <text:s text:c="1"/>C4 <text:s text:c="1"/>C5 <text:s text:c="1"/>C6 <text:s text:c="1"/>C7 <text:s text:c="1"/>C8 <text:s text:c="1"/>C9 <text:s text:c="1"/>C10 <text:s text:c="1"/>C11 <text:s text:c="1"/>K</text:p>
      <text:p text:style-name="Preformatted_20_Text"><text:s text:c="1"/>0 <text:s text:c="3"/>0 <text:s text:c="3"/>0 <text:s text:c="3"/>1 <text:s text:c="3"/>0 <text:s text:c="3"/>0 <text:s text:c="3"/>0 <text:s text:c="3"/>0 <text:s text:c="3"/>0 <text:s text:c="5"/>1 <text:s text:c="5"/>0 <text:s text:c="4"/>0</text:p>
      <text:p text:style-name="Preformatted_20_Text">D0 <text:s text:c="2"/>D1 <text:s text:c="2"/>D2 <text:s text:c="2"/>D3 <text:s text:c="2"/>D4</text:p>
      <text:p text:style-name="Preformatted_20_Text"><text:s text:c="1"/>0 <text:s text:c="3"/>0 <text:s text:c="4"/>0 <text:s text:c="3"/>1 <text:s text:c="2"/>0</text:p>
      <text:p text:style-name="First_20_paragraph">Example (0 0 0 1 0) ← TV control code (Table 5-3 reference)</text:p>
      <text:p text:style-name="Text_20_body">(Reverse signal)</text:p>
      <text:p text:style-name="Preformatted_20_Text">C1 <text:s text:c="1"/>C2 <text:s text:c="1"/>C3 <text:s text:c="1"/>C4 <text:s text:c="1"/>C5 <text:s text:c="1"/>C6 <text:s text:c="1"/>C7 <text:s text:c="1"/>C8 <text:s text:c="1"/>C9 <text:s text:c="1"/>C10 <text:s text:c="1"/>C11 <text:s text:c="1"/>K</text:p>
      <text:p text:style-name="Preformatted_20_Text"><text:s text:c="1"/>1 <text:s text:c="3"/>1 <text:s text:c="3"/>1 <text:s text:c="3"/>0 <text:s text:c="3"/>1 <text:s text:c="3"/>1 <text:s text:c="3"/>1 <text:s text:c="3"/>1 <text:s text:c="3"/>1 <text:s text:c="5"/>0 <text:s text:c="5"/>1 <text:s text:c="4"/>1</text:p>
      <text:p text:style-name="First_20_paragraph">Reverse signal data example (1 1 1 0 1)</text:p>
      <text:p text:style-name="Text_20_body">Figure 5-5 TV control and remote signal</text:p>
      <text:p text:style-name="Preformatted_20_Text">D7 <text:s text:c="2"/>D6 <text:s text:c="2"/>D5 <text:s text:c="2"/>D4 <text:s text:c="2"/>D3 <text:s text:c="2"/>D2 <text:s text:c="2"/>D1 <text:s text:c="2"/>D0</text:p>
      <text:p text:style-name="Preformatted_20_Text"><text:s text:c="1"/>0 <text:s text:c="5"/>1 <text:s text:c="5"/>0 <text:s text:c="4"/>1 <text:s text:c="5"/>1 <text:s text:c="5"/>1 <text:s text:c="5"/>* <text:s text:c="5"/>*</text:p>
      <text:list text:style-name="List_20_1">
        <text:list-item>
          <text:p text:style-name="List_20_Bullet_20_Tight">Data from MFP to 8051: 1 byte</text:p>
        </text:list-item>
        <text:list-item>
          <text:p text:style-name="List_20_Bullet_20_Tight">Effective by key operation TV control-code related effect* *Effective at reset</text:p>
        </text:list-item>
      </text:list>
      <text:p text:style-name="First_20_paragraph">0: Invalid 1: Valid</text:p>
      <text:p text:style-name="Text_20_body">Figure 5-6 TV control code control code format from this book</text:p>
      <text:p text:style-name="Text_20_body">Chapter 5: Other Hardware</text:p>
      <text:p text:style-name="Text_20_body">MFP to 8051 1-byte data All flags are cleared upon reset, and the LED lighting request code FFH is sent from 8051 to MFP.</text:p>
      <text:p text:style-name="Text_20_body">0: Off (Kana) 1: On (Kana) 0: Off (Roman characters) 1: On (Roman characters) 0: Off (Ten-key input) 1: On (Ten-key input) 0: Off (CAPS) 1: On (CAPS) 0: Off (INS) 1: On (INS) 0: Off (Hiragana) 1: On (Hiragana) 0: Off (Fullwidth) 1: On (Fullwidth)</text:p>
      <text:p text:style-name="Text_20_body">Figure 5-7 LED Lighting Control Code Format</text:p>
      <text:p text:style-name="Text_20_body">D7 D6 D5 D4 D3 D2 D1 D0 0 1 0 1 0 1 * *</text:p>
      <text:p text:style-name="Text_20_body">0: Bright 1: Slightly Bright 0: Slightly Dark 1: Dark</text:p>
      <text:p text:style-name="Text_20_body">Figure 5-8 LED Key Brightness Adjustment Format</text:p>
      <text:p text:style-name="Text_20_body">MFP to 8051 1-byte data</text:p>
      <text:list text:style-name="List_20_1">
        <text:list-item>
          <text:p text:style-name="List_20_Bullet_20_Tight">is invalid "R" upon reset</text:p>
        </text:list-item>
      </text:list>
      <text:p text:style-name="First_20_paragraph">0: Set mouse control (MSCTRL) to "L" 1: Set mouse control (MSCTRL) to "H"</text:p>
      <text:p text:style-name="Text_20_body">Figure 5-9 Mouse Control Code Format</text:p>
      <text:list text:style-name="Numbering_20_1">
        <text:list-item>
          <text:p text:style-name="List_20_Number_20_Tight">Keyboard</text:p>
        </text:list-item>
      </text:list>
      <text:p text:style-name="First_20_paragraph">![Diagram]</text:p>
      <text:list text:style-name="List_20_1">
        <text:list-item>
          <text:p text:style-name="List_20_Bullet_20_Tight">1 byte data from MFP to 80C51 *: Invalid.</text:p>
        </text:list-item>
        <text:list-item>
          <text:p text:style-name="List_20_Bullet_20_Tight">During reset, transmission is prohibited.</text:p>
        </text:list-item>
      </text:list>
      <text:p text:style-name="First_20_paragraph">D1: Key data transmission prohibition 1: Key data transmission permitted</text:p>
      <text:p text:style-name="Text_20_body">Fig 5-10 Key data transmission prohibition code format</text:p>
      <text:p text:style-name="Text_20_body">![Diagram]</text:p>
      <text:list text:style-name="List_20_1">
        <text:list-item>
          <text:p text:style-name="List_20_Bullet_20_Tight">1 byte data from MFP to 80C51 *: Invalid.</text:p>
        </text:list-item>
        <text:list-item>
          <text:p text:style-name="List_20_Bullet_20_Tight">During reset, X1 compact cancellation</text:p>
        </text:list-item>
      </text:list>
      <text:p text:style-name="First_20_paragraph">D1: X1 Compact 1: X1 Compact Cancellation</text:p>
      <text:p text:style-name="Text_20_body">Fig 5-11 X1 compact cancellation code format for a specific TV control key</text:p>
      <text:p text:style-name="Text_20_body">(Setting of delay time before repeat)</text:p>
      <text:p text:style-name="Text_20_body">![Diagram]</text:p>
      <text:list text:style-name="List_20_1">
        <text:list-item>
          <text:p text:style-name="List_20_Bullet_20_Tight">1 byte data from MFP to 80C51</text:p>
        </text:list-item>
        <text:list-item>
          <text:p text:style-name="List_20_Bullet_20_Tight">Repeat start delay time (msec) = 200 msec + (N * 100 msec) (at least 200 msec - at most 1700 msec)</text:p>
        </text:list-item>
        <text:list-item>
          <text:p text:style-name="List_20_Bullet_20_Tight">During reset, 500 msec</text:p>
        </text:list-item>
      </text:list>
      <text:p text:style-name="First_20_paragraph">N (Note: set integer value from 0 to 15)</text:p>
      <text:p text:style-name="Text_20_body">(Setting of repeat interval time)</text:p>
      <text:p text:style-name="Text_20_body">![Diagram]</text:p>
      <text:list text:style-name="List_20_1">
        <text:list-item>
          <text:p text:style-name="List_20_Bullet_20_Tight">Repeat interval time (msec) = 30 msec + (N * 25 msec) (at least 30 msec - at most 1155 msec)</text:p>
        </text:list-item>
        <text:list-item>
          <text:p text:style-name="List_20_Bullet_20_Tight">During reset, 110 msec</text:p>
        </text:list-item>
      </text:list>
      <text:p text:style-name="First_20_paragraph">N (Note: set integer value from 0 to 15)</text:p>
      <text:p text:style-name="Text_20_body">Fig 5-12 Repeat start delay time and setting code format for repeat interval time</text:p>
      <text:p text:style-name="Text_20_body">![Diagram]</text:p>
      <text:list text:style-name="List_20_1">
        <text:list-item>
          <text:p text:style-name="List_20_Bullet_20_Tight">1 byte data from MFP to 80C51 *: Invalid.</text:p>
        </text:list-item>
        <text:list-item>
          <text:p text:style-name="List_20_Bullet_20_Tight">During reset, valid.</text:p>
        </text:list-item>
      </text:list>
      <text:p text:style-name="First_20_paragraph">D1: Valid (Used as TV control key) 1: Invalid</text:p>
      <text:p text:style-name="Text_20_body">Fig 5-13 OPT. TV control code format by 2 key and 2 signals</text:p>
      <text:p text:style-name="Text_20_body">Chapter 5 Other Hardware</text:p>
      <text:p text:style-name="Text_20_body">1-2 Key Data Processing Procedure</text:p>
      <text:p text:style-name="Text_20_body">(1) Initial Setting for Key Data Processing (Common for Input/Output)</text:p>
      <text:p text:style-name="Text_20_body">[MFP]</text:p>
      <text:list text:style-name="Numbering_20_1">
        <text:list-item>
          <text:p text:style-name="List_20_Number_20_Tight">Set 0 to each of the Allocation Enable Registers A (E88007H) for D04, D03, D02, D01, and D00.</text:p>
        </text:list-item>
        <text:list-item>
          <text:p text:style-name="List_20_Number_20_Tight">Set the allocation vector to the Allocation Vector Register (E88017H) (Automatic allocation stops at mode D03="0").</text:p>
        </text:list-item>
        <text:list-item>
          <text:p text:style-name="List_20_Number_20_Tight">Set 01H to Timer B Control Register (E8801BH).</text:p>
        </text:list-item>
        <text:list-item>
          <text:p text:style-name="List_20_Number_20_Tight">Set 0DH to Timer B Data Register (E88021H).</text:p>
        </text:list-item>
        <text:list-item>
          <text:p text:style-name="List_20_Number_20_Tight">Set 88H to USART Control Register (E88029H).</text:p>
        </text:list-item>
        <text:list-item>
          <text:p text:style-name="List_20_Number_20_Tight">Set 00H to Receive Status Register (E8802BH).</text:p>
        </text:list-item>
        <text:list-item>
          <text:p text:style-name="List_20_Number_20_Tight">Set 04H to Send Status Register (E8802DH).</text:p>
        </text:list-item>
        <text:list-item>
          <text:p text:style-name="List_20_Number_20_Tight">Set 0 to D03 in System Port (E88007H).</text:p>
        </text:list-item>
      </text:list>
      <text:p text:style-name="First_20_paragraph">(2) Enable various allocation for MFP.</text:p>
      <text:list text:style-name="Numbering_20_1">
        <text:list-item>
          <text:p text:style-name="List_20_Number_20_Tight">Set 1 to each of the Allocation Enable Registers A (E88007H) for D04, D03, and D01; set 0 to D02 and D00.</text:p>
        </text:list-item>
        <text:list-item>
          <text:p text:style-name="List_20_Number_20_Tight">Set 1 to each of the Allocation Enable Registers B (E88013H) for D04, D03, and D01; set 0 to D02 and D00.</text:p>
        </text:list-item>
        <text:list-item>
          <text:p text:style-name="List_20_Number_20_Tight">Set 01H to the Receive Data Register (E8802BH).</text:p>
        </text:list-item>
        <text:list-item>
          <text:p text:style-name="List_20_Number_20_Tight">Set 1 to D03 in System Port (E88007H).</text:p>
        </text:list-item>
      </text:list>
      <text:p text:style-name="First_20_paragraph">(3) Key input interrupt (MFP’s 12-level interrupt) occurs, and key data is retrieved.</text:p>
      <text:p text:style-name="Text_20_body">[Input] In the initial setting described in (1), when key data is received and transferred from the receive register to the receive buffer, the interrupt for Receive Buffer Full occurs. In cases of overrun error, parity error, or break detection, the Receive Error interrupt occurs. Especially in the interrupt handler for Receive Buffer Full, please pay attention to the following:</text:p>
      <text:p text:style-name="Text_20_body">a. If the key data is a valid key code, a control signal from the key is determined as follows: 01H–06H, 70H–77H: Key code (or 81H–ECH, F0H–F7H, or 78H–7FH: control signal (or F8H–FFH))</text:p>
      <text:p text:style-name="Text_20_body">b. If it is key code: If the key is pressed and released, the determination is made by the MSB flag of the key code.</text:p>
      <text:p text:style-name="Text_20_body">Some keys may be pressed —</text:p>
      <text:list text:style-name="Numbering_20_1">
        <text:list-item>
          <text:p text:style-name="List_20_Number_20_Tight">Keyboard</text:p>
        </text:list-item>
      </text:list>
      <text:p text:style-name="First_20_paragraph">When pressed, the key code is sent. At this time, the MSB is 0, and the remaining 7 bits are the key code. Also, as long as this key is kept pressed, the same code (MSB = 0) continues to be input at the set delay time intervals. When this key is released, the MSB becomes 1, and the corresponding code with the lower 7 bits as the key code is sent.</text:p>
      <text:p text:style-name="Text_20_body">c. In the case of control signals</text:p>
      <text:p text:style-name="Text_20_body">A control signal FFH indicates a request for LED data from the keyboard. Regarding the request for LED data: The LED data is in the off state when the power is turned on. However, when the keyboard is reset (when the power switch is turned on, or the inserted keyboard is removed), a signal is sent from the keyboard's 8C51 to request the LED status settings. This signal indicates that the keyboard has been reset.</text:p>
      <text:p text:style-name="Text_20_body">[Output]</text:p>
      <text:list text:style-name="Numbering_20_1">
        <text:list-item>
          <text:p text:style-name="List_20_Number_20_Tight">Set the transmission status register (E8802HD) to 05H</text:p>
        </text:list-item>
        <text:list-item>
          <text:p text:style-name="List_20_Number_20_Tight">Read the transmission status register (E8802HD)</text:p>
        </text:list-item>
        <text:list-item>
          <text:p text:style-name="List_20_Number_20_Tight">Check D0=1 (buffer empty) (loop until D0 becomes 1)</text:p>
        </text:list-item>
        <text:list-item>
          <text:p text:style-name="List_20_Number_20_Tight">Set the USART data register (E8802FH) with the control code for output to the keyboard</text:p>
        </text:list-item>
        <text:list-item>
          <text:p text:style-name="List_20_Number_20_Tight">Read the transmission status register (E8802HD)</text:p>
        </text:list-item>
        <text:list-item>
          <text:p text:style-name="List_20_Number_20_Tight">Check D0=1 (buffer empty) (loop until D0 becomes 1)</text:p>
        </text:list-item>
        <text:list-item>
          <text:p text:style-name="List_20_Number_20_Tight">Set the transmission status register (E8802HD) to 04H</text:p>
        </text:list-item>
        <text:list-item>
          <text:p text:style-name="List_20_Number_20_Tight">Error handling: In the event of a control code output error or abnormal insertion error detection, a transmit error interrupt will occur if the transmitted signal is swamped.</text:p>
        </text:list-item>
      </text:list>
      <text:p text:style-name="First_20_paragraph">Additionally, the output commands from the main unit MFP to the keyboard might include the following:</text:p>
      <text:list text:style-name="List_20_1">
        <text:list-item>
          <text:p text:style-name="List_20_Bullet_20_Tight">TV control code for TV Control Code*</text:p>
        </text:list-item>
        <text:list-item>
          <text:p text:style-name="List_20_Bullet_20_Tight">Control code to request LED key lighting status</text:p>
        </text:list-item>
        <text:list-item>
          <text:p text:style-name="List_20_Bullet_20_Tight">Mouse control signal (MSCTRL) control code</text:p>
        </text:list-item>
        <text:list-item>
          <text:p text:style-name="List_20_Bullet_20_Tight">Modem commands</text:p>
        </text:list-item>
        <text:list-item>
          <text:p text:style-name="List_20_Bullet_20_Tight">TV control mode-specific X1 composite control code</text:p>
        </text:list-item>
        <text:list-item>
          <text:p text:style-name="List_20_Bullet_20_Tight">Setting the delay and speed for repeat start time and subsequent repeat intervals</text:p>
        </text:list-item>
        <text:list-item>
          <text:p text:style-name="List_20_Bullet_20_Tight">TV control mode and mouse control mode control codes</text:p>
        </text:list-item>
      </text:list>
      <text:p text:style-name="First_20_paragraph">Chapter 5: Other Hardware</text:p>
      <text:p text:style-name="Text_20_body">Next, the following is a flowchart of each interrupt routine. Please refer to Chapter 4, Section 2 for MFP.</text:p>
      <text:p text:style-name="Text_20_body">Flowchart:</text:p>
      <text:list text:style-name="Numbering_20_1">
        <text:list-item>
          <text:p text:style-name="List_20_Number_20_Tight">Read Receiver Status Register (E8802BH)</text:p>
        </text:list-item>
        <text:list-item>
          <text:p text:style-name="List_20_Number_20_Tight">Check D04</text:p>
        </text:list-item>
      </text:list>
      <text:p text:style-name="Preformatted_20_Text"><text:s text:c="3"/>- If "1":</text:p>
      <text:p text:style-name="Preformatted_20_Text"><text:s text:c="5"/>- Read USART Data Register (E8802FH)</text:p>
      <text:p text:style-name="Preformatted_20_Text"><text:s text:c="3"/>- If "0":</text:p>
      <text:p text:style-name="Preformatted_20_Text"><text:s text:c="5"/>- Handle frame error</text:p>
      <text:p text:style-name="Preformatted_20_Text"><text:s text:c="5"/>- Return</text:p>
      <text:list text:style-name="Numbering_20_1" text:start-value="3">
        <text:list-item>
          <text:p text:style-name="List_20_Number_20_Tight">Read USART Data Register (E8802FH)</text:p>
        </text:list-item>
        <text:list-item>
          <text:p text:style-name="List_20_Number_20_Tight">Check Key Code</text:p>
        </text:list-item>
      </text:list>
      <text:p text:style-name="Preformatted_20_Text"><text:s text:c="3"/>- If "Y":</text:p>
      <text:p text:style-name="Preformatted_20_Text"><text:s text:c="5"/>- Key Code Check</text:p>
      <text:p text:style-name="Preformatted_20_Text"><text:s text:c="7"/>- [01H–6CH (81H–ECH), 70H–77H (F0H–F7H)]</text:p>
      <text:list text:style-name="Numbering_20_1" text:start-value="5">
        <text:list-item>
          <text:p text:style-name="List_20_Number_20_Tight">If Key Code is not "Y":</text:p>
        </text:list-item>
      </text:list>
      <text:p text:style-name="Preformatted_20_Text"><text:s text:c="3"/>- Check FFH</text:p>
      <text:p text:style-name="Preformatted_20_Text"><text:s text:c="7"/>- If "N":</text:p>
      <text:p text:style-name="Preformatted_20_Text"><text:s text:c="9"/>- Handle Error</text:p>
      <text:p text:style-name="Preformatted_20_Text"><text:s text:c="9"/>- Return</text:p>
      <text:list text:style-name="Numbering_20_1" text:start-value="6">
        <text:list-item>
          <text:p text:style-name="List_20_Number_20_Tight">Otherwise:</text:p>
        </text:list-item>
      </text:list>
      <text:p text:style-name="Preformatted_20_Text"><text:s text:c="3"/>- Set 05H in Transmitter Status Register (E8802DH)</text:p>
      <text:p text:style-name="Preformatted_20_Text"><text:s text:c="3"/>- Read Transmitter Status Register (E8802DH)</text:p>
      <text:p text:style-name="Preformatted_20_Text"><text:s text:c="3"/>- Check D07</text:p>
      <text:p text:style-name="Preformatted_20_Text"><text:s text:c="7"/>- If "0":</text:p>
      <text:p text:style-name="Preformatted_20_Text"><text:s text:c="9"/>- Return</text:p>
      <text:p text:style-name="First_20_paragraph">Note: Key Code Processing Routine (Buffering)</text:p>
      <text:list text:style-name="Numbering_20_1">
        <text:list-item>
          <text:p text:style-name="List_20_Number_20_Tight">Keyboard</text:p>
        </text:list-item>
      </text:list>
      <text:p text:style-name="First_20_paragraph">USART Data Register (E8802FH) Set to LED Control Codes</text:p>
      <text:p text:style-name="Text_20_body">Read Communication Status Register (E8802DH)</text:p>
      <text:p text:style-name="Text_20_body">Check D07</text:p>
      <text:p text:style-name="Text_20_body">Set Communication Status Register (E8802DH) to 04H</text:p>
      <text:p text:style-name="Text_20_body">Return</text:p>
      <text:p text:style-name="Text_20_body">Figure 5-14 Receive Buffer Full Interrupt Routine Flowchart</text:p>
      <text:p text:style-name="Text_20_body">Page: 171</text:p>
      <text:p text:style-name="Text_20_body">Chapter 3 Sound Functions</text:p>
      <text:p text:style-name="Text_20_body">Receive Status Register (E8802BH) Read</text:p>
      <text:p text:style-name="Text_20_body">D05 Check "1"</text:p>
      <text:p text:style-name="Text_20_body">USART Data Register (E8802FH) Read Parity Error Handling Return</text:p>
      <text:p text:style-name="Text_20_body">"O"</text:p>
      <text:p text:style-name="Text_20_body">USART Data Register (E8802FH) Read</text:p>
      <text:p text:style-name="Text_20_body">00H ? "Y"</text:p>
      <text:p text:style-name="Text_20_body">"N" Overrun Error Handling</text:p>
      <text:p text:style-name="Text_20_body">Return</text:p>
      <text:p text:style-name="Text_20_body">D02 Check "1"</text:p>
      <text:p text:style-name="Text_20_body">"O" Stop Bit Detection</text:p>
      <text:p text:style-name="Text_20_body">Error Handling</text:p>
      <text:p text:style-name="Text_20_body">Return</text:p>
      <text:p text:style-name="Text_20_body">Start Bit Detection Brake Error Handling</text:p>
      <text:p text:style-name="Text_20_body">Return</text:p>
      <text:p text:style-name="Text_20_body">Figure 5-15 Receive Error Interrupt Routine Flowchart</text:p>
      <text:p text:style-name="Text_20_body">Note:</text:p>
      <text:list text:style-name="Numbering_20_1">
        <text:list-item>
          <text:p text:style-name="List_20_Number_20_Tight">Keyboard</text:p>
        </text:list-item>
      </text:list>
      <text:p text:style-name="First_20_paragraph">Transmit status register (E8802DH) read</text:p>
      <text:p text:style-name="Text_20_body">D04 Check</text:p>
      <text:p text:style-name="Text_20_body">"1" "0"</text:p>
      <text:p text:style-name="Text_20_body">Transmit disabled detected Transmit enabled detected</text:p>
      <text:p text:style-name="Preformatted_20_Text"><text:s text:c="6"/>Return <text:s text:c="22"/>Return</text:p>
      <text:p text:style-name="First_20_paragraph">Under-run error processing (Return to the main routine for retransmission)</text:p>
      <text:p text:style-name="Preformatted_20_Text"><text:s text:c="6"/>Return</text:p>
      <text:p text:style-name="First_20_paragraph">Figure 5-16 Transmit Error Interrupt Routine Flow Chart</text:p>
      <text:p text:style-name="Text_20_body">Chapter 5: Other Hardware</text:p>
      <text:list text:style-name="Numbering_20_1" text:start-value="2">
        <text:list-item>
          <text:p text:style-name="List_20_Number_20_Tight">Mouse</text:p>
        </text:list-item>
      </text:list>
      <text:p text:style-name="First_20_paragraph">In the X68000, both the main unit and the keyboard have their own mouse connectors, which can send coordinate data when requested from the main unit. Therefore, control signals from the main unit and data lines from the mouse are synchronized with two procedures.</text:p>
      <text:p text:style-name="Text_20_body">As shown in the block diagram of figure 1, in the case of the main unit connector, the mouse control (MSCTRL) is controlled by the SCC B channel RTSB signal, and in the case of the keyboard connector, it is controlled by the 80C51. In either connector, mouse data (MSDATA) is connected to the RXDB terminal of SCC B channel.</text:p>
      <text:p text:style-name="Text_20_body">(Note: This might refer to the Sharp X68000, a personal computer sold in Japan.)</text:p>
      <text:p text:style-name="Text_20_body">[Diagram of the mouse's external appearance]</text:p>
      <text:p text:style-name="Text_20_body">The main unit can slide 90°.</text:p>
      <text:p text:style-name="Text_20_body">Switch 2</text:p>
      <text:p text:style-name="Text_20_body">Switch 1 Indicates the Y direction.</text:p>
      <text:p text:style-name="Text_20_body">Trackball</text:p>
      <text:p text:style-name="Text_20_body">Y (+) Y (-) X (+) X (-)</text:p>
      <text:p text:style-name="Text_20_body">[Table showing mouse data communication standards and data transmission procedures]</text:p>
      <text:p text:style-name="Text_20_body">Communication mode: Asynchronous communication Baud rate: 4800 baud</text:p>
      <text:p text:style-name="Text_20_body">Mouse data format: Start bit: 1 Data length: 8 bits Stop bit: 2</text:p>
      <text:p text:style-name="Text_20_body">(Mouse data structure) Start bit D0 D1 D2 D3 D4 D5 D6 D7 Stop bit</text:p>
      <text:p text:style-name="Text_20_body">[Diagram of mouse connector]</text:p>
      <text:p text:style-name="Text_20_body">Mouse connector</text:p>
      <text:p text:style-name="Text_20_body">Pin numbers | Signal name</text:p>
      <text:p text:style-name="Preformatted_20_Text">1 | Vcc</text:p>
      <text:p text:style-name="Preformatted_20_Text">2 | MSCTRL</text:p>
      <text:p text:style-name="Preformatted_20_Text">3 | MSDATA</text:p>
      <text:p text:style-name="Preformatted_20_Text">4 | GND</text:p>
      <text:p text:style-name="Preformatted_20_Text">5 | GND</text:p>
      <text:p text:style-name="First_20_paragraph">Table 5-4: Mouse data communication standards and data transmission procedures</text:p>
      <text:p text:style-name="Text_20_body">Page 174</text:p>
      <text:p text:style-name="Text_20_body">2-1 Mouse Data Transfer Sequence</text:p>
      <text:p text:style-name="Text_20_body">(1) When the main unit requests data from the mouse, the mouse control (MSCTRL) is set from "H" to "L". The mouse detects this signal change and transmits one block (3 bytes) of data to the main unit. Note that if there is no change in the mouse control (MSCTRL: "L"), the mouse will not output anything.</text:p>
      <text:p text:style-name="Text_20_body">Figure 5-18 Mouse data transfer</text:p>
      <text:p text:style-name="Text_20_body">Tc1 &gt; 500 µs Tc &gt; 500 µs Td &lt; 750 µs</text:p>
      <text:p text:style-name="Text_20_body">Data A denotes relative data, where TA is designated relative X or Y mouse movement value. Data B denotes relative data, where TB is designated relative X or Y mouse movement value.</text:p>
      <text:p text:style-name="Text_20_body">(2) The mouse sends 3 bytes of data. The data structure is as follows:</text:p>
      <text:list text:style-name="List_20_1">
        <text:list-item>
          <text:p text:style-name="List_20_Bullet_20_Tight">Switch information (status data)</text:p>
        </text:list-item>
        <text:list-item>
          <text:p text:style-name="List_20_Bullet_20_Tight">X coordinate (right is positive, left is negative) -128 (80H) to -1 (FFH), 0 (00H), +1 (01H) to +127 (7FH)</text:p>
        </text:list-item>
        <text:list-item>
          <text:p text:style-name="List_20_Bullet_20_Tight">Y coordinate (down is positive, up is negative) -128 (80H) to -1 (FFH), 0 (00H), +1 (01H) to +127 (7FH)</text:p>
        </text:list-item>
      </text:list>
      <text:p text:style-name="First_20_paragraph">Note: For both X and Y coordinates, -129 or below means underflow (status data bit D7 or D5 is set to "1"), and +128 or above means overflow (status data bit D6 or D4 is set to "1").</text:p>
      <text:p text:style-name="Text_20_body">Chapter 5 Other Hardware</text:p>
      <text:p text:style-name="Text_20_body">Mouse Data (MSDATA) 1st Byte: Status Data</text:p>
      <text:p text:style-name="Text_20_body">2nd Byte: X-Axis Data -128~127</text:p>
      <text:p text:style-name="Text_20_body">3rd Byte: Y-Axis Data -128~127</text:p>
      <text:p text:style-name="Text_20_body">(Status Data)</text:p>
      <text:p text:style-name="Preformatted_20_Text">D7 D6 D5 D4 D3 D2 D1 D0</text:p>
      <text:p text:style-name="Preformatted_20_Text"><text:s text:c="3"/>0 <text:s text:c="2"/>0</text:p>
      <text:p text:style-name="First_20_paragraph">0: Switch 1 (Right) OFF 1: Switch 1 (Right) ON 0: Switch 2 (Left) OFF 1: Switch 2 (Left) ON 1: 1~127 - Overflow on X-Axis 1: X=-128 - Overflow on X-Axis 1: 1~127 - Overflow on Y-Axis 1: Y=-128 - Overflow on Y-Axis</text:p>
      <text:p text:style-name="Text_20_body">Table 5-5 Mouse Data Format</text:p>
      <text:p text:style-name="Text_20_body">2-2 Mouse Access</text:p>
      <text:p text:style-name="Text_20_body">(1) Initial Settings</text:p>
      <text:list text:style-name="List_20_1">
        <text:list-item>
          <text:p text:style-name="List_20_Bullet_20_Tight">Set the respective registers listed in SCC’s Channel B (Set the interrupt vector).</text:p>
        </text:list-item>
      </text:list>
      <text:list text:style-name="Numbering_20_1">
        <text:list-item>
          <text:p text:style-name="List_20_Number_20_Tight">Set Write Register WR9 to 0CH</text:p>
        </text:list-item>
        <text:list-item>
          <text:p text:style-name="List_20_Number_20_Tight">Set Write Register WR4 to 4CH</text:p>
        </text:list-item>
        <text:list-item>
          <text:p text:style-name="List_20_Number_20_Tight">Set Write Register WR1 to 00H</text:p>
        </text:list-item>
        <text:list-item>
          <text:p text:style-name="List_20_Number_20_Tight">Set the interrupt vector to Write Register WR2</text:p>
        </text:list-item>
        <text:list-item>
          <text:p text:style-name="List_20_Number_20_Tight">Set Write Register WR3 to 0DH</text:p>
        </text:list-item>
        <text:list-item>
          <text:p text:style-name="List_20_Number_20_Tight">Set Write Register WR5 to 62H</text:p>
        </text:list-item>
        <text:list-item>
          <text:p text:style-name="List_20_Number_20_Tight">Set Write Register WR9 to 01H</text:p>
        </text:list-item>
        <text:list-item>
          <text:p text:style-name="List_20_Number_20_Tight">Set Write Register WR10 to 00H</text:p>
        </text:list-item>
        <text:list-item>
          <text:p text:style-name="List_20_Number_20_Tight">Set Write Register WR11 to 56H</text:p>
        </text:list-item>
        <text:list-item>
          <text:p text:style-name="List_20_Number_20_Tight">Set Write Register WR12 to 1FH</text:p>
        </text:list-item>
        <text:list-item>
          <text:p text:style-name="List_20_Number_20_Tight">Set Write Register WR13 to 00H</text:p>
        </text:list-item>
        <text:list-item>
          <text:p text:style-name="List_20_Number_20_Tight">Set Write Register WR14 to 02H</text:p>
        </text:list-item>
      </text:list>
      <text:p text:style-name="First_20_paragraph">Page 176</text:p>
      <text:list text:style-name="Numbering_20_1">
        <text:list-item>
          <text:p text:style-name="List_20_Number_20_Tight">Timer Interrupts</text:p>
        </text:list-item>
      </text:list>
      <text:p text:style-name="Preformatted_20_Text"><text:s text:c="4"/>- Timer Interrupts (Mouse Control): Set the registers for Timer C or Timer D in MFP for timer interrupt intervals (For reference: The timer interrupt interval for the mouse in XTturbo is 16 msec).</text:p>
      <text:p text:style-name="Preformatted_20_Text"><text:s text:c="8"/>1. Set the interrupt enable register B (E88009H) for Timer C or Timer D to interrupt enable.</text:p>
      <text:p text:style-name="Preformatted_20_Text"><text:s text:c="8"/>2. Set the interrupt vector register (E88017H) to the interrupt vector (Specify interrupt completion mode).</text:p>
      <text:p text:style-name="Preformatted_20_Text"><text:s text:c="8"/>3. Set the prescale value in the Timer C and Timer D control registers (E8801DH) for the timer.</text:p>
      <text:p text:style-name="Preformatted_20_Text"><text:s text:c="8"/>4. Set the down-counter value in the Timer C data register (E88023H) and Timer D data register (E88025H).</text:p>
      <text:p text:style-name="First_20_paragraph">(2) SCC transmission and reception enable interrupts, and enabling MFP timer interrupts.</text:p>
      <text:p text:style-name="Preformatted_20_Text"><text:s text:c="4"/>1. Set write control register WR3 to 1CH.</text:p>
      <text:p text:style-name="Preformatted_20_Text"><text:s text:c="4"/>2. Set write control register WR6 to 6AH.</text:p>
      <text:p text:style-name="Preformatted_20_Text"><text:s text:c="4"/>3. Set write control register WR0 to 80H.</text:p>
      <text:p text:style-name="Preformatted_20_Text"><text:s text:c="4"/>4. Set write control register WR14 to 03H.</text:p>
      <text:p text:style-name="Preformatted_20_Text"><text:s text:c="4"/>5. Set write control register WR15 to 00H.</text:p>
      <text:p text:style-name="Preformatted_20_Text"><text:s text:c="4"/>6. Set write control register WR1 to 10H.</text:p>
      <text:p text:style-name="Preformatted_20_Text"><text:s text:c="4"/>7. Set write control register WR0 to 10H.</text:p>
      <text:p text:style-name="Preformatted_20_Text"><text:s text:c="4"/>8. Set write control register WR1 to 10H.</text:p>
      <text:p text:style-name="Preformatted_20_Text"><text:s text:c="4"/>9. Set write control register WR9 to 09H.</text:p>
      <text:p text:style-name="Preformatted_20_Text"><text:s text:c="4"/>10. Set interrupt enable register B (E88009H) for Timer C and Timer D in MFP to interrupt enable.</text:p>
      <text:p text:style-name="Preformatted_20_Text"><text:s text:c="4"/>11. Set interrupt mask register B (E88015H) for Timer C and Timer D in MFP to interrupt mask enable.</text:p>
      <text:p text:style-name="First_20_paragraph">(3) Timer Interrupt (MFP Interrupt)</text:p>
      <text:p text:style-name="Preformatted_20_Text"><text:s text:c="4"/>By Timer Interrupt (MFP Interrupt), the mouse control (MSCTRL) changes from "H" to "L".</text:p>
      <text:p text:style-name="Preformatted_20_Text"><text:s text:c="4"/>Note: The timer interrupt loop serves to control the mouse control (MSCTRL), so please execute this program. At this time, it is unclear if both the keyboard and mouse are connected, so please set both mouse controls to "H" and then to "L" as follows.</text:p>
      <text:p text:style-name="First_20_paragraph">Chapter 5 Other Hardware</text:p>
      <text:p text:style-name="Text_20_body">[When using the main unit (SCC) mouse connector] Set SCC channel D write register WR5 to 60H, output to 500 µs or longer later, set 62H. [When using the keyboard (80C51) mouse connector] First output MFP to 80C51 41H, 500 µs or longer, output 40H. (4) Interrupt triggered by data reception from the mouse (SCC interrupt) receives 3-byte data. In the previous (1) initialization setting, an interrupt is triggered when valid mouse data is received or a special reception condition (such as overrun error, framing error) occurs. The interrupt vector at this time is as follows:</text:p>
      <text:list text:style-name="List_20_1">
        <text:list-item>
          <text:p text:style-name="List_20_Bullet_20_Tight">When valid mouse data is received D7 D6 D5 D4 D3 D2 D1 D0 V7 V6 V5 0 1 0 1 0</text:p>
        </text:list-item>
      </text:list>
      <text:p text:style-name="First_20_paragraph">In this interrupt routine, 3-byte data from the mouse is processed, and then SCC channel D write register WR5 is set to 60H, MFP outputs 41H to 80C51 setting 41H.</text:p>
      <text:list text:style-name="List_20_1">
        <text:list-item>
          <text:p text:style-name="List_20_Bullet_20_Tight">When a special reception condition occurs D7 D6 D5 D4 D3 D2 D1 D0 V7 V6 V5 0 1 1 1 0</text:p>
        </text:list-item>
      </text:list>
      <text:p text:style-name="First_20_paragraph">In this interrupt routine, first, determine whether a special reception condition (such as overrun error, framing error) occurred in the SCC channel D read register RR1, handle the corresponding error, then set SCC channel D write register WR5 to 60H, output 41H from MFP to 80C51, and finally perform error reset (set SCC channel D write register WR0 to 30H). For MFP, refer to Set 2, Chapter 4, and for SCC, refer to Set 3, Chapter 4.</text:p>
      <text:p text:style-name="Text_20_body">&lt;Page 178&gt;</text:p>
      <text:list text:style-name="Numbering_20_1" text:start-value="3">
        <text:list-item>
          <text:p text:style-name="List_20_Number_20_Tight">Joystick</text:p>
        </text:list-item>
      </text:list>
      <text:p text:style-name="First_20_paragraph">In the X1 and X1turbo series, accessing joysticks involved using PSG registers 14 and 15, but on the X68000, it leverages two ports of the 8255 to use two joysticks. Note that when using these two joysticks (input), you must set 92H to E9A007H.</text:p>
      <text:p text:style-name="Text_20_body">Address Data Control</text:p>
      <text:p text:style-name="Text_20_body">µPD8255 Port A: Joystick No.1 Port B: Joystick No.2 Port C: Sound synthesis PCM control</text:p>
      <text:p text:style-name="Text_20_body">Figure 5-19 Joystick Block Diagram</text:p>
      <text:p text:style-name="Text_20_body">3-1 Address Map of Joystick Register</text:p>
      <text:p text:style-name="Text_20_body">Register Address D07 D06 D05 D04 D03 D02 D01 D00 E9A001H -&gt; Joystick No.1 -&gt; E9A003H &lt;- Joystick No.1 &lt;- E9A005H IOC7 IOC6 IOC5 IOC4 S.R. PCM PAN</text:p>
      <text:p text:style-name="Text_20_body">Table 5-6 Joystick Register Address Map</text:p>
      <text:p text:style-name="Text_20_body">(S.R. = Sampling Rate)</text:p>
      <text:p text:style-name="Text_20_body">Chapter 5: Other Hardware</text:p>
      <text:p text:style-name="Text_20_body">3-2 Details of the Joystick Register</text:p>
      <text:p text:style-name="Text_20_body">(1) Joystick No.1 (READ)</text:p>
      <text:p text:style-name="Text_20_body">D7 D6 D5 D4 D3 D2 D1 D0</text:p>
      <text:p text:style-name="Text_20_body">E9A001H</text:p>
      <text:p text:style-name="Text_20_body">(all bits negative logic)</text:p>
      <text:p text:style-name="Text_20_body">IOA0 (FORWARD) IOA1 (BACK) IOA2 (LEFT) IOA3 (RIGHT) IOA5 (TRIGGER A) IOA6 (TRIGGER B)</text:p>
      <text:p text:style-name="Text_20_body">(2) Joystick No.2 (READ)</text:p>
      <text:p text:style-name="Text_20_body">D7 D6 D5 D4 D3 D2 D1 D0</text:p>
      <text:p text:style-name="Text_20_body">E9A003H</text:p>
      <text:p text:style-name="Text_20_body">(all bits negative logic)</text:p>
      <text:p text:style-name="Text_20_body">IOB0 (FORWARD) IOB1 (BACK) IOB2 (LEFT) IOB3 (RIGHT) IOB5 (TRIGGER A) IOB6 (TRIGGER B)</text:p>
      <text:p text:style-name="Text_20_body">(3) Joystick Control</text:p>
      <text:p text:style-name="Text_20_body">D7 D6 D5 D4 D3 D2 D1 D0</text:p>
      <text:p text:style-name="Text_20_body">E9A005H</text:p>
      <text:p text:style-name="Text_20_body">(all bits negative logic)</text:p>
      <text:p text:style-name="Text_20_body">PCN PAN (sound balance switch) Sampling Rate (sound synthesis sampling rate switch) IOC4 (Joystick No.1 strobe)</text:p>
      <text:p text:style-name="Preformatted_20_Text"><text:s text:c="1"/>0: normal operation</text:p>
      <text:p text:style-name="Preformatted_20_Text"><text:s text:c="1"/>1: disable Joystick No.1</text:p>
      <text:p text:style-name="First_20_paragraph">IOC5 (Joystick No.2 strobe)</text:p>
      <text:p text:style-name="Preformatted_20_Text"><text:s text:c="1"/>0: normal operation</text:p>
      <text:p text:style-name="Preformatted_20_Text"><text:s text:c="1"/>1: disable Joystick No.2</text:p>
      <text:p text:style-name="First_20_paragraph">IOC6 (Joystick No.1 Option A)</text:p>
      <text:p text:style-name="Preformatted_20_Text"><text:s text:c="1"/>0: normal operation</text:p>
      <text:p text:style-name="Preformatted_20_Text"><text:s text:c="1"/>1: option function</text:p>
      <text:p text:style-name="First_20_paragraph">IOC7 (Joystick No.1 Option B)</text:p>
      <text:p text:style-name="Preformatted_20_Text"><text:s text:c="1"/>0: normal operation</text:p>
      <text:p text:style-name="Preformatted_20_Text"><text:s text:c="1"/>1: option function</text:p>
      <text:p text:style-name="First_20_paragraph">3-3 Accessing the Joystick</text:p>
      <text:p text:style-name="Text_20_body">(1) To set mode 8255, please set 92H in E9A007H (refer to Chapter 5-4 for details).</text:p>
      <text:p text:style-name="Text_20_body">(2) To set the joystick to normal mode, set the upper 4 bits (D04 to D07) of port C in E9A005H to "0".</text:p>
      <text:p text:style-name="Text_20_body">(3) Input data No. 1 from the joystick is read from E9A001H. Also, when inputting data No. 2 from the joystick, it is read from E9A003H.</text:p>
      <text:list text:style-name="Numbering_20_1" text:start-value="4">
        <text:list-item>
          <text:p text:style-name="List_20_Number_20_Tight">Printer</text:p>
        </text:list-item>
      </text:list>
      <text:p text:style-name="First_20_paragraph">The X68000, like the X1 and X1turbo series, is equipped with a Centronics-standard 8-bit parallel I/F as a printer I/F.</text:p>
      <text:p text:style-name="Text_20_body">To send 1 byte of data to the printer from this device, a control signal, the BUSY signal, and the STROBE signal are used. The BUSY signal is the input signal from the printer, and no data can be sent when this signal is at "H" level. In other words, when the BUSY signal is at "H" level, the device waits until it goes down to "L" level before sending. Also, the STROBE signal is the output signal to the printer from the device, and by sampling data on this STROBE signal, the printer receives the data. However, before the STROBE signal is output, the data should be latched into the data register of E8C001H.</text:p>
      <text:p text:style-name="Text_20_body">In the X68000, in addition to the printing functions of the X1 and X1turbo series, a feature has been added that allows the software to mask the BUSY signal interrupt. By using this feature, there is no need to check the BUSY signal, and the status of the printer can be known through interrupts.</text:p>
      <text:p text:style-name="Text_20_body">Chapter 5 Other Hardware</text:p>
      <text:p text:style-name="Text_20_body">Register Address</text:p>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column table:style-name="Table69.G"/>
        <table:table-column table:style-name="Table69.H"/>
        <table:table-column table:style-name="Table69.I"/>
        <table:table-header-rows>
          <table:table-row>
            <table:table-cell table:style-name="TableHeaderRowCell" office:value-type="string">
              <text:p text:style-name="Table_20_Heading">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row>
        </table:table-header-rows>
        <table:table-row>
          <table:table-cell table:style-name="TableRowCell" office:value-type="string">
            <text:p text:style-name="Table_20_Contents">E8C001H</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row>
        <table:table-row>
          <table:table-cell table:style-name="TableRowCell" office:value-type="string">
            <text:p text:style-name="Table_20_Contents">E8C003H</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STRO</text:p>
          </table:table-cell>
        </table:table-row>
      </table:table>
      <text:p text:style-name="First_20_paragraph">(Light only) 0: Printer Busy Interrupt Mask 1: Printer Busy Interrupt Mask Release 0: FDD Write Interrupt Mask 1: FDD Write Interrupt Mask Release 0: FDC Write Interrupt Mask 1: FDC Write Interrupt Mask Release 0: Hard Disk Insert Interrupt Mask 1: Hard Disk Insert Interrupt Mask Release</text:p>
      <text:p text:style-name="Text_20_body">| E9C001H | X | X | X | X | X | X | X | X |</text:p>
      <text:p text:style-name="Text_20_body">(Read only) 0: Printer Busy Interrupt Mask (re) 1: Printer Busy Interrupt Mask Release 0: FDD Write Interrupt Mask 1: FDD Write Interrupt Mask Release 0: FDC Write Interrupt Mask 1: FDC Write Interrupt Mask Release 0: Hard Disk Insert Interrupt Mask 1: Hard Disk Insert Interrupt Mask Release</text:p>
      <text:p text:style-name="Text_20_body">0: Printer Busy Interrupt Mask (W) 1: Printer Busy Interrupt Mask Release 0: FDD Write Interrupt 1: FDD Write Interrupt ON 0: FDC Write Interrupt OFF 1: FDC Write Interrupt ON</text:p>
      <text:p text:style-name="Text_20_body">0: Printer Busy OFF (BUSY=0) 1: Printer Busy ON (BUSY=0)</text:p>
      <text:p text:style-name="Text_20_body">| E9C003H | Interrupt Vector | 1 | 1 | Printer Busy Interrupt Vector |</text:p>
      <text:list text:style-name="List_20_1">
        <text:list-item>
          <text:p text:style-name="List_20_Bullet_20_Tight">Table 5-7 Printer Register Map (X is invalid)</text:p>
        </text:list-item>
      </text:list>
      <text:p text:style-name="First_20_paragraph">4-1 Printer Access</text:p>
      <text:p text:style-name="Text_20_body">(1) Check the Printer BUSY Signal</text:p>
      <text:list text:style-name="List_20_1">
        <text:list-item>
          <text:p text:style-name="List_20_Bullet_20_Tight">In case of polling a) To mask the interrupt caused by the printer busy, set D00 of E9C001H to "0" (Other bits retain their previous states). b) Read E9C001H and confirm D05="1".</text:p>
        </text:list-item>
      </text:list>
      <text:p text:style-name="First_20_paragraph"><text:span text:style-name="Strong_20_Emphasis">In case of an interrupt:</text:span> a) Set the interrupt vector to E9003H, and initialize the interrupt processing routine's (2) and (3) processing programs. b) To release the printer's interrupt mask, set "1" to bit D00 in E9C001H (other bits retain their previous state). If BUSY = '0' (printer sends data), the program moves to the interrupt processing routine.</text:p>
      <text:list text:style-name="Pandoc_5f_Numbering_5f_1" text:start-value="2">
        <text:list-item>
          <text:p text:style-name="List_20_Number">Set Printer Output Data: Set 1 byte output data to the printer to E8C001H</text:p>
        </text:list-item>
        <text:list-item>
          <text:p text:style-name="List_20_Number">Printer Data Sample (Strobe signal rise): Set bit D00 of E8C003H to "0", and then to "1" to raise the strobe signal.</text:p>
        </text:list-item>
      </text:list>
      <text:h text:style-name="Heading_20_1" text:outline-level="1"><text:bookmark-start text:name="id_5-miscellaneous-switches"/>5. Miscellaneous Switches<text:bookmark-end text:name="id_5-miscellaneous-switches"/></text:h>
      <text:p text:style-name="First_20_paragraph">5-1 Switches at the Front of the Main Unit</text:p>
      <text:p text:style-name="Text_20_body">The front of the X68000 has the following 3 switches:</text:p>
      <text:p text:style-name="Text_20_body">(A) Reset Switch Press this switch to initiate a hardware reset. Processing addresses that are written to 000000H on the main memory will be executed.</text:p>
      <text:p text:style-name="Text_20_body">(B) NMI Switch Use this switch for system debugging. Pressing the switch triggers the highest priority interrupt (NMI Level-7) and executes exception processing starting from the address written at 000007H in the main memory. At the end of the NMI processing routine, please set "1" to bit D02 of E8C007H to generate a system report. If "1" is not set to system port E8C007H bit D02, the NMI processing routine will escape after NMI processing and jump again to the NMI processing routine.</text:p>
      <text:p text:style-name="Text_20_body">Page 183</text:p>
      <text:p text:style-name="Text_20_body">Chapter 5: Miscellaneous Hardware</text:p>
      <text:p text:style-name="Text_20_body">(C) POWER Switch The POWER switch on the X68000 becomes ON (Vcc1 ON) by working the hardware circuit when switched ON, but if it is OFF, this is recognized by the MFP by an interrupt due to the MFP detecting the POWER SW being switched off (MFP level 2 interrupt). That is, when the POWER switch is turned ON, before cutting off the power, the MFP recognizes it. Then, the MPU determines from this interrupt, performs a check around the interrupt handling routines, and writes the values "00", "OFF", "OFF" to the system port E8E00FH in sequence if there are no abnormalities, and executes POWER OFF (Vcc1 OFF). This prevents mistakes such as turning off the power in the middle of accessing a floppy disk.</text:p>
      <text:p text:style-name="Text_20_body">5-2 Power System</text:p>
      <text:p text:style-name="Text_20_body">The X68000 has the following three power systems. For the X68000, you can know whether Vcc1 has turned ON from MFP. For details, refer to 2 of this chapter.</text:p>
      <text:p text:style-name="Text_20_body">(A) Vcc2 (power supply to RTC, SRAM, keyboard, etc.) This can be turned ON and OFF by the rear power switch. Note, do not absolutely turn off this rear power switch when using timers, TV control, etc.</text:p>
      <text:p text:style-name="Text_20_body">(B) Vcc1 (power other than RTC, SRAM, keyboard, etc.) Most circuits operate on this power. When the POWER switch is ON, the rear power switch can turn it ON and OFF.</text:p>
      <text:list text:style-name="List_20_1">
        <text:list-item>
          <text:p text:style-name="List_20_Bullet_20_Tight">When the rear power switch is ON, the front POWER switch can turn it ON.</text:p>
        </text:list-item>
        <text:list-item>
          <text:p text:style-name="List_20_Bullet_20_Tight">When the rear power switch is ON, the EXPMON signal in the expansion I/O slot can turn it ON.</text:p>
        </text:list-item>
        <text:list-item>
          <text:p text:style-name="List_20_Bullet_20_Tight">When the rear power switch is ON, the ALARM signal from the RTC ALARM timer can turn it ON.</text:p>
        </text:list-item>
      </text:list>
      <text:p text:style-name="First_20_paragraph">Note: For Vcc1 OFF, it is only possible by writing "00", "OFF", "OFF" values to the system port E8E00FH sequentially through software.</text:p>
      <text:p text:style-name="Text_20_body">(C) Backup Battery Generally, it is continually charged by connections to Vcc2, but in the case that Vcc2 is cut off, it is used as a backup for the RTC and SRAM.</text:p>
      <text:p text:style-name="Text_20_body">5-3 LED</text:p>
      <text:p text:style-name="Text_20_body">On the front of the X68000, there are LEDs as shown below. However, Vcc2 is always assumed to be ON.</text:p>
      <text:p text:style-name="Text_20_body">(A) POWER LED The front POWER switch lights when it is in the ON state (Vcc1 ON). However, if the POWER switch is OFF but the EXP/MON signal from an expansion I/O slot or the RTC or ALARM signal is ON, the POWER switch will be OFF but the LED will light until Vcc1 is actually turned off. However, when only Vcc2 is ON, the red LED lights. When both Vcc1 and Vcc2 are ON, the green LED lights.</text:p>
      <text:p text:style-name="Text_20_body">(B) TIMER LED When using the RTC ALARM timer function, write 00H to the RTC CLKOUT register (BANK 1 of E8A001H) to turn on the TIMER LED. Conversely, write 07H to turn it off when not using the timer function. For details, refer to Chapter 4-3.</text:p>
      <text:p text:style-name="Text_20_body">(C) H/L Res. LED When Vcc1 is ON, the LED automatically lights up in the high-resolution mode (horizontal sync frequency of 31.5 kHz) and turns off in the standard resolution mode (horizontal sync frequency of 15.98 kHz).</text:p>
      <text:p text:style-name="Text_20_body">(D) Floppy Disk Drive LED (Refer to Chapter 4-5)</text:p>
      <table:table table:name="Table70" table:style-name="Table70">
        <table:table-column table:style-name="Table70.A"/>
        <table:table-column table:style-name="Table70.B"/>
        <table:table-column table:style-name="Table70.C"/>
        <table:table-header-rows>
          <table:table-row>
            <table:table-cell table:style-name="TableHeaderRowCell" office:value-type="string">
      </table:table-cell>
            <table:table-cell table:style-name="TableHeaderRowCell" office:value-type="string">
              <text:p text:style-name="Table_20_Heading">Activity LED</text:p>
            </table:table-cell>
            <table:table-cell table:style-name="TableHeaderRowCell" office:value-type="string">
              <text:p text:style-name="Table_20_Heading">Eject LED</text:p>
            </table:table-cell>
          </table:table-row>
        </table:table-header-rows>
        <table:table-row>
          <table:table-cell table:style-name="TableRowCell" office:value-type="string">
            <text:p text:style-name="Table_20_Contents">POWER</text:p>
          </table:table-cell>
          <table:table-cell table:style-name="TableRowCell" office:value-type="string">
            <text:p text:style-name="Table_20_Contents">Media is in the FDD --&gt; Lights up</text:p>
          </table:table-cell>
          <table:table-cell table:style-name="TableRowCell" office:value-type="string">
            <text:p text:style-name="Table_20_Contents">Only when the eject switch is ON --&gt; Lights up</text:p>
          </table:table-cell>
        </table:table-row>
        <table:table-row>
          <table:table-cell table:style-name="TableRowCell" office:value-type="string">
            <text:p text:style-name="Table_20_Contents">ON state</text:p>
          </table:table-cell>
          <table:table-cell table:style-name="TableRowCell" office:value-type="string">
            <text:p text:style-name="Table_20_Contents">Media is in the FDD and indicator is on --&gt; Lights up yellow</text:p>
          </table:table-cell>
          <table:table-cell table:style-name="TableRowCell" office:value-type="string">
            <text:p text:style-name="Table_20_Contents">Media is in the FDD during sleep mode --&gt; Lights up green or red</text:p>
          </table:table-cell>
        </table:table-row>
        <table:table-row>
          <table:table-cell table:style-name="TableRowCell" office:value-type="string">
    </table:table-cell>
          <table:table-cell table:style-name="TableRowCell" office:value-type="string">
            <text:p text:style-name="Table_20_Contents">Media is in the FDD and indicator is off --&gt; Goes ou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Reading from FDD (when RDY is ON, indicates LED --&gt; Lights up red)</text:p>
          </table:table-cell>
          <table:table-cell table:style-name="TableRowCell" office:value-type="string">
    </table:table-cell>
        </table:table-row>
        <table:table-row>
          <table:table-cell table:style-name="TableRowCell" office:value-type="string">
            <text:p text:style-name="Table_20_Contents">POWER</text:p>
          </table:table-cell>
          <table:table-cell table:style-name="TableRowCell" office:value-type="string">
            <text:p text:style-name="Table_20_Contents">Media is in the FDD --&gt; Stays lit</text:p>
          </table:table-cell>
          <table:table-cell table:style-name="TableRowCell" office:value-type="string">
            <text:p text:style-name="Table_20_Contents">Media is in the FDD --&gt; Lights up</text:p>
          </table:table-cell>
        </table:table-row>
        <table:table-row>
          <table:table-cell table:style-name="TableRowCell" office:value-type="string">
            <text:p text:style-name="Table_20_Contents">OFF state</text:p>
          </table:table-cell>
          <table:table-cell table:style-name="TableRowCell" office:value-type="string">
            <text:p text:style-name="Table_20_Contents">Media is in the FDD</text:p>
          </table:table-cell>
          <table:table-cell table:style-name="TableRowCell" office:value-type="string">
            <text:p text:style-name="Table_20_Contents">--&gt; Stays lit when media is in FDD</text:p>
          </table:table-cell>
        </table:table-row>
        <table:table-row>
          <table:table-cell table:style-name="TableRowCell" office:value-type="string">
    </table:table-cell>
          <table:table-cell table:style-name="TableRowCell" office:value-type="string">
            <text:p text:style-name="Table_20_Contents">Otherwise, turns off</text:p>
          </table:table-cell>
          <table:table-cell table:style-name="TableRowCell" office:value-type="string">
            <text:p text:style-name="Table_20_Contents">Otherwise, turns off</text:p>
          </table:table-cell>
        </table:table-row>
      </table:table>
      <text:p text:style-name="First_20_paragraph">(Table 5-8 FDD LEDs)</text:p>
      <text:p text:style-name="Text_20_body">Page 185</text:p>
      <text:p text:style-name="Text_20_body">Chapter 5 Other Hardware</text:p>
      <text:p text:style-name="Text_20_body">5-4 8255 Port</text:p>
      <text:p text:style-name="Text_20_body">In X68000, ports A and B of the 8255 are used as input ports for the joystick 2 port, and port C is used as an output port for sound synthesis output control and sampling frequency switching. Therefore, by using the control word register of this 8255, it is necessary to specify port A, B input, and port C output in mode 0.</text:p>
      <text:p text:style-name="Text_20_body">&lt;8255 Control Word Register (E9A007H)&gt;</text:p>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column table:style-name="Table71.G"/>
        <table:table-column table:style-name="Table71.H"/>
        <table:table-header-rows>
          <table:table-row>
            <table:table-cell table:style-name="TableHeaderRowCell" office:value-type="string">
              <text:p text:style-name="Table_20_Heading">D7</text:p>
            </table:table-cell>
            <table:table-cell table:style-name="TableHeaderRowCell" office:value-type="string">
              <text:p text:style-name="Table_20_Heading">D6</text:p>
            </table:table-cell>
            <table:table-cell table:style-name="TableHeaderRowCell" office:value-type="string">
              <text:p text:style-name="Table_20_Heading">D5</text:p>
            </table:table-cell>
            <table:table-cell table:style-name="TableHeaderRowCell" office:value-type="string">
              <text:p text:style-name="Table_20_Heading">D4</text:p>
            </table:table-cell>
            <table:table-cell table:style-name="TableHeaderRowCell" office:value-type="string">
              <text:p text:style-name="Table_20_Heading">D3</text:p>
            </table:table-cell>
            <table:table-cell table:style-name="TableHeaderRowCell" office:value-type="string">
              <text:p text:style-name="Table_20_Heading">D2</text:p>
            </table:table-cell>
            <table:table-cell table:style-name="TableHeaderRowCell" office:value-type="string">
              <text:p text:style-name="Table_20_Heading">D1</text:p>
            </table:table-cell>
            <table:table-cell table:style-name="TableHeaderRowCell" office:value-type="string">
              <text:p text:style-name="Table_20_Heading">D0</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list text:style-name="List_20_1">
        <text:list-item>
          <text:p text:style-name="List_20_Bullet_20_Tight">0 : Port C (Lower 4 bits) output (for sound synthesis use)</text:p>
        </text:list-item>
        <text:list-item>
          <text:p text:style-name="List_20_Bullet_20_Tight">0 : Port B output</text:p>
        </text:list-item>
        <text:list-item>
          <text:p text:style-name="List_20_Bullet_20_Tight">1 : Port B input (for Joystick No. 2)</text:p>
        </text:list-item>
        <text:list-item>
          <text:p text:style-name="List_20_Bullet_20_Tight">0 : Port C (Upper 4 bits) output</text:p>
        </text:list-item>
        <text:list-item>
          <text:p text:style-name="List_20_Bullet_20_Tight">0 : Port A output</text:p>
        </text:list-item>
        <text:list-item>
          <text:p text:style-name="List_20_Bullet_20_Tight">1 : Port A input (for Joystick No. 1)</text:p>
        </text:list-item>
      </text:list>
      <text:p text:style-name="First_20_paragraph">For details on the joystick, refer to Chapter 6; for details on sound synthesis, refer to Chapter 4.</text:p>
      <text:p text:style-name="Text_20_body">Appendix</text:p>
      <text:list text:style-name="Numbering_20_1">
        <text:list-item>
          <text:p text:style-name="List_20_Number_20_Tight">I/O Port Address List (Note: * is invalid, W is WRITE only, R is READ only, R/W is READ/WRITE available)</text:p>
        </text:list-item>
      </text:list>
      <table:table table:name="Table72" table:style-name="Table72">
        <table:table-column table:style-name="Table72.A"/>
        <table:table-column table:style-name="Table72.B"/>
        <table:table-column table:style-name="Table72.C"/>
        <table:table-column table:style-name="Table72.D"/>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RT</text:p>
          </table:table-cell>
          <table:table-cell table:style-name="TableRowCell" office:value-type="string">
            <text:p text:style-name="Table_20_Contents">E800000H</text:p>
          </table:table-cell>
          <table:table-cell table:style-name="TableRowCell" office:value-type="string">
            <text:p text:style-name="Table_20_Contents">W</text:p>
          </table:table-cell>
          <table:table-cell table:style-name="TableRowCell" office:value-type="string">
            <text:p text:style-name="Table_20_Contents">Horizontal total position</text:p>
          </table:table-cell>
        </table:table-row>
        <table:table-row>
          <table:table-cell table:style-name="TableRowCell" office:value-type="string">
    </table:table-cell>
          <table:table-cell table:style-name="TableRowCell" office:value-type="string">
            <text:p text:style-name="Table_20_Contents">E800001H</text:p>
          </table:table-cell>
          <table:table-cell table:style-name="TableRowCell" office:value-type="string">
            <text:p text:style-name="Table_20_Contents">W</text:p>
          </table:table-cell>
          <table:table-cell table:style-name="TableRowCell" office:value-type="string">
            <text:p text:style-name="Table_20_Contents">Horizontal display position</text:p>
          </table:table-cell>
        </table:table-row>
        <table:table-row>
          <table:table-cell table:style-name="TableRowCell" office:value-type="string">
    </table:table-cell>
          <table:table-cell table:style-name="TableRowCell" office:value-type="string">
            <text:p text:style-name="Table_20_Contents">E800002H</text:p>
          </table:table-cell>
          <table:table-cell table:style-name="TableRowCell" office:value-type="string">
            <text:p text:style-name="Table_20_Contents">W</text:p>
          </table:table-cell>
          <table:table-cell table:style-name="TableRowCell" office:value-type="string">
            <text:p text:style-name="Table_20_Contents">Horizontal sync position</text:p>
          </table:table-cell>
        </table:table-row>
        <table:table-row>
          <table:table-cell table:style-name="TableRowCell" office:value-type="string">
    </table:table-cell>
          <table:table-cell table:style-name="TableRowCell" office:value-type="string">
            <text:p text:style-name="Table_20_Contents">E800003H</text:p>
          </table:table-cell>
          <table:table-cell table:style-name="TableRowCell" office:value-type="string">
            <text:p text:style-name="Table_20_Contents">W</text:p>
          </table:table-cell>
          <table:table-cell table:style-name="TableRowCell" office:value-type="string">
            <text:p text:style-name="Table_20_Contents">Horizontal sync width position</text:p>
          </table:table-cell>
        </table:table-row>
        <table:table-row>
          <table:table-cell table:style-name="TableRowCell" office:value-type="string">
    </table:table-cell>
          <table:table-cell table:style-name="TableRowCell" office:value-type="string">
            <text:p text:style-name="Table_20_Contents">E800004H</text:p>
          </table:table-cell>
          <table:table-cell table:style-name="TableRowCell" office:value-type="string">
            <text:p text:style-name="Table_20_Contents">W</text:p>
          </table:table-cell>
          <table:table-cell table:style-name="TableRowCell" office:value-type="string">
            <text:p text:style-name="Table_20_Contents">Vertical total position</text:p>
          </table:table-cell>
        </table:table-row>
        <table:table-row>
          <table:table-cell table:style-name="TableRowCell" office:value-type="string">
    </table:table-cell>
          <table:table-cell table:style-name="TableRowCell" office:value-type="string">
            <text:p text:style-name="Table_20_Contents">E800005H</text:p>
          </table:table-cell>
          <table:table-cell table:style-name="TableRowCell" office:value-type="string">
            <text:p text:style-name="Table_20_Contents">W</text:p>
          </table:table-cell>
          <table:table-cell table:style-name="TableRowCell" office:value-type="string">
            <text:p text:style-name="Table_20_Contents">Vertical display position</text:p>
          </table:table-cell>
        </table:table-row>
        <table:table-row>
          <table:table-cell table:style-name="TableRowCell" office:value-type="string">
    </table:table-cell>
          <table:table-cell table:style-name="TableRowCell" office:value-type="string">
            <text:p text:style-name="Table_20_Contents">E800006H</text:p>
          </table:table-cell>
          <table:table-cell table:style-name="TableRowCell" office:value-type="string">
            <text:p text:style-name="Table_20_Contents">W</text:p>
          </table:table-cell>
          <table:table-cell table:style-name="TableRowCell" office:value-type="string">
            <text:p text:style-name="Table_20_Contents">Vertical sync position</text:p>
          </table:table-cell>
        </table:table-row>
        <table:table-row>
          <table:table-cell table:style-name="TableRowCell" office:value-type="string">
    </table:table-cell>
          <table:table-cell table:style-name="TableRowCell" office:value-type="string">
            <text:p text:style-name="Table_20_Contents">E800007H</text:p>
          </table:table-cell>
          <table:table-cell table:style-name="TableRowCell" office:value-type="string">
            <text:p text:style-name="Table_20_Contents">W</text:p>
          </table:table-cell>
          <table:table-cell table:style-name="TableRowCell" office:value-type="string">
            <text:p text:style-name="Table_20_Contents">Vertical sync width position</text:p>
          </table:table-cell>
        </table:table-row>
        <table:table-row>
          <table:table-cell table:style-name="TableRowCell" office:value-type="string">
    </table:table-cell>
          <table:table-cell table:style-name="TableRowCell" office:value-type="string">
            <text:p text:style-name="Table_20_Contents">E800008H</text:p>
          </table:table-cell>
          <table:table-cell table:style-name="TableRowCell" office:value-type="string">
            <text:p text:style-name="Table_20_Contents">W</text:p>
          </table:table-cell>
          <table:table-cell table:style-name="TableRowCell" office:value-type="string">
            <text:p text:style-name="Table_20_Contents">External sync adjustment</text:p>
          </table:table-cell>
        </table:table-row>
        <table:table-row>
          <table:table-cell table:style-name="TableRowCell" office:value-type="string">
    </table:table-cell>
          <table:table-cell table:style-name="TableRowCell" office:value-type="string">
            <text:p text:style-name="Table_20_Contents">E800009H</text:p>
          </table:table-cell>
          <table:table-cell table:style-name="TableRowCell" office:value-type="string">
            <text:p text:style-name="Table_20_Contents">W</text:p>
          </table:table-cell>
          <table:table-cell table:style-name="TableRowCell" office:value-type="string">
            <text:p text:style-name="Table_20_Contents">Raster control</text:p>
          </table:table-cell>
        </table:table-row>
        <table:table-row>
          <table:table-cell table:style-name="TableRowCell" office:value-type="string">
    </table:table-cell>
          <table:table-cell table:style-name="TableRowCell" office:value-type="string">
            <text:p text:style-name="Table_20_Contents">E80000AH</text:p>
          </table:table-cell>
          <table:table-cell table:style-name="TableRowCell" office:value-type="string">
            <text:p text:style-name="Table_20_Contents">W</text:p>
          </table:table-cell>
          <table:table-cell table:style-name="TableRowCell" office:value-type="string">
            <text:p text:style-name="Table_20_Contents">X direction scroll</text:p>
          </table:table-cell>
        </table:table-row>
        <table:table-row>
          <table:table-cell table:style-name="TableRowCell" office:value-type="string">
    </table:table-cell>
          <table:table-cell table:style-name="TableRowCell" office:value-type="string">
            <text:p text:style-name="Table_20_Contents">E80000BH</text:p>
          </table:table-cell>
          <table:table-cell table:style-name="TableRowCell" office:value-type="string">
            <text:p text:style-name="Table_20_Contents">W</text:p>
          </table:table-cell>
          <table:table-cell table:style-name="TableRowCell" office:value-type="string">
            <text:p text:style-name="Table_20_Contents">Y direction scroll</text:p>
          </table:table-cell>
        </table:table-row>
        <table:table-row>
          <table:table-cell table:style-name="TableRowCell" office:value-type="string">
    </table:table-cell>
          <table:table-cell table:style-name="TableRowCell" office:value-type="string">
            <text:p text:style-name="Table_20_Contents">E800016H</text:p>
          </table:table-cell>
          <table:table-cell table:style-name="TableRowCell" office:value-type="string">
            <text:p text:style-name="Table_20_Contents">W</text:p>
          </table:table-cell>
          <table:table-cell table:style-name="TableRowCell" office:value-type="string">
            <text:p text:style-name="Table_20_Contents">Screen 0 X Y</text:p>
          </table:table-cell>
        </table:table-row>
        <table:table-row>
          <table:table-cell table:style-name="TableRowCell" office:value-type="string">
    </table:table-cell>
          <table:table-cell table:style-name="TableRowCell" office:value-type="string">
            <text:p text:style-name="Table_20_Contents">E800017H</text:p>
          </table:table-cell>
          <table:table-cell table:style-name="TableRowCell" office:value-type="string">
            <text:p text:style-name="Table_20_Contents">W</text:p>
          </table:table-cell>
          <table:table-cell table:style-name="TableRowCell" office:value-type="string">
            <text:p text:style-name="Table_20_Contents">Screen 1 X Y</text:p>
          </table:table-cell>
        </table:table-row>
        <table:table-row>
          <table:table-cell table:style-name="TableRowCell" office:value-type="string">
    </table:table-cell>
          <table:table-cell table:style-name="TableRowCell" office:value-type="string">
            <text:p text:style-name="Table_20_Contents">E800018H</text:p>
          </table:table-cell>
          <table:table-cell table:style-name="TableRowCell" office:value-type="string">
            <text:p text:style-name="Table_20_Contents">W</text:p>
          </table:table-cell>
          <table:table-cell table:style-name="TableRowCell" office:value-type="string">
            <text:p text:style-name="Table_20_Contents">Screen 2 X Y</text:p>
          </table:table-cell>
        </table:table-row>
        <table:table-row>
          <table:table-cell table:style-name="TableRowCell" office:value-type="string">
    </table:table-cell>
          <table:table-cell table:style-name="TableRowCell" office:value-type="string">
            <text:p text:style-name="Table_20_Contents">E800019H</text:p>
          </table:table-cell>
          <table:table-cell table:style-name="TableRowCell" office:value-type="string">
            <text:p text:style-name="Table_20_Contents">W</text:p>
          </table:table-cell>
          <table:table-cell table:style-name="TableRowCell" office:value-type="string">
            <text:p text:style-name="Table_20_Contents">Screen 3 X Y</text:p>
          </table:table-cell>
        </table:table-row>
        <table:table-row>
          <table:table-cell table:style-name="TableRowCell" office:value-type="string">
    </table:table-cell>
          <table:table-cell table:style-name="TableRowCell" office:value-type="string">
            <text:p text:style-name="Table_20_Contents">E800024H</text:p>
          </table:table-cell>
          <table:table-cell table:style-name="TableRowCell" office:value-type="string">
            <text:p text:style-name="Table_20_Contents">W</text:p>
          </table:table-cell>
          <table:table-cell table:style-name="TableRowCell" office:value-type="string">
            <text:p text:style-name="Table_20_Contents">Text mode / display mode set</text:p>
          </table:table-cell>
        </table:table-row>
        <table:table-row>
          <table:table-cell table:style-name="TableRowCell" office:value-type="string">
    </table:table-cell>
          <table:table-cell table:style-name="TableRowCell" office:value-type="string">
            <text:p text:style-name="Table_20_Contents">E80002AH</text:p>
          </table:table-cell>
          <table:table-cell table:style-name="TableRowCell" office:value-type="string">
            <text:p text:style-name="Table_20_Contents">R/W</text:p>
          </table:table-cell>
          <table:table-cell table:style-name="TableRowCell" office:value-type="string">
            <text:p text:style-name="Table_20_Contents">Text address, high-speed clear</text:p>
          </table:table-cell>
        </table:table-row>
        <table:table-row>
          <table:table-cell table:style-name="TableRowCell" office:value-type="string">
    </table:table-cell>
          <table:table-cell table:style-name="TableRowCell" office:value-type="string">
            <text:p text:style-name="Table_20_Contents">E80002EH</text:p>
          </table:table-cell>
          <table:table-cell table:style-name="TableRowCell" office:value-type="string">
            <text:p text:style-name="Table_20_Contents">R/W</text:p>
          </table:table-cell>
          <table:table-cell table:style-name="TableRowCell" office:value-type="string">
            <text:p text:style-name="Table_20_Contents">Source / destination register</text:p>
          </table:table-cell>
        </table:table-row>
        <table:table-row>
          <table:table-cell table:style-name="TableRowCell" office:value-type="string">
    </table:table-cell>
          <table:table-cell table:style-name="TableRowCell" office:value-type="string">
            <text:p text:style-name="Table_20_Contents">E800030H</text:p>
          </table:table-cell>
          <table:table-cell table:style-name="TableRowCell" office:value-type="string">
            <text:p text:style-name="Table_20_Contents">W</text:p>
          </table:table-cell>
          <table:table-cell table:style-name="TableRowCell" office:value-type="string">
            <text:p text:style-name="Table_20_Contents">Hit mask register</text:p>
          </table:table-cell>
        </table:table-row>
        <table:table-row>
          <table:table-cell table:style-name="TableRowCell" office:value-type="string">
    </table:table-cell>
          <table:table-cell table:style-name="TableRowCell" office:value-type="string">
            <text:p text:style-name="Table_20_Contents">E800040H</text:p>
          </table:table-cell>
          <table:table-cell table:style-name="TableRowCell" office:value-type="string">
            <text:p text:style-name="Table_20_Contents">R/W</text:p>
          </table:table-cell>
          <table:table-cell table:style-name="TableRowCell" office:value-type="string">
            <text:p text:style-name="Table_20_Contents">CRTC command setting port</text:p>
          </table:table-cell>
        </table:table-row>
        <table:table-row>
          <table:table-cell table:style-name="TableRowCell" office:value-type="string">
            <text:p text:style-name="Table_20_Contents">Graphics Palette</text:p>
          </table:table-cell>
          <table:table-cell table:style-name="TableRowCell" office:value-type="string">
            <text:p text:style-name="Table_20_Contents">E82000H</text:p>
          </table:table-cell>
          <table:table-cell table:style-name="TableRowCell" office:value-type="string">
            <text:p text:style-name="Table_20_Contents">R/W</text:p>
          </table:table-cell>
          <table:table-cell table:style-name="TableRowCell" office:value-type="string">
            <text:p text:style-name="Table_20_Contents">16 color mode / 255 color mode / 65536 color mode</text:p>
          </table:table-cell>
        </table:table-row>
        <table:table-row>
          <table:table-cell table:style-name="TableRowCell" office:value-type="string">
    </table:table-cell>
          <table:table-cell table:style-name="TableRowCell" office:value-type="string">
            <text:p text:style-name="Table_20_Contents">E82010H</text:p>
          </table:table-cell>
          <table:table-cell table:style-name="TableRowCell" office:value-type="string">
            <text:p text:style-name="Table_20_Contents">R/W</text:p>
          </table:table-cell>
          <table:table-cell table:style-name="TableRowCell" office:value-type="string">
    </table:table-cell>
        </table:table-row>
        <table:table-row>
          <table:table-cell table:style-name="TableRowCell" office:value-type="string">
            <text:p text:style-name="Table_20_Contents">Palette (1)</text:p>
          </table:table-cell>
          <table:table-cell table:style-name="TableRowCell" office:value-type="string">
            <text:p text:style-name="Table_20_Contents">E8210FEH</text:p>
          </table:table-cell>
          <table:table-cell table:style-name="TableRowCell" office:value-type="string">
            <text:p text:style-name="Table_20_Contents">R/W</text:p>
          </table:table-cell>
          <table:table-cell table:style-name="TableRowCell" office:value-type="string">
    </table:table-cell>
        </table:table-row>
        <table:table-row>
          <table:table-cell table:style-name="TableRowCell" office:value-type="string">
            <text:p text:style-name="Table_20_Contents">Text RAM Scroll Control</text:p>
          </table:table-cell>
          <table:table-cell table:style-name="TableRowCell" office:value-type="string">
            <text:p text:style-name="Table_20_Contents">E82200H</text:p>
          </table:table-cell>
          <table:table-cell table:style-name="TableRowCell" office:value-type="string">
            <text:p text:style-name="Table_20_Contents">R/W</text:p>
          </table:table-cell>
          <table:table-cell table:style-name="TableRowCell" office:value-type="string">
            <text:p text:style-name="Table_20_Contents">Text (Sprite Color Table 0) / Shared Palette</text:p>
          </table:table-cell>
        </table:table-row>
        <table:table-row>
          <table:table-cell table:style-name="TableRowCell" office:value-type="string">
    </table:table-cell>
          <table:table-cell table:style-name="TableRowCell" office:value-type="string">
            <text:p text:style-name="Table_20_Contents">E82210H</text:p>
          </table:table-cell>
          <table:table-cell table:style-name="TableRowCell" office:value-type="string">
            <text:p text:style-name="Table_20_Contents">R/W</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23H</text:p>
          </table:table-cell>
          <table:table-cell table:style-name="TableRowCell" office:value-type="string">
            <text:p text:style-name="Table_20_Contents">R/W</text:p>
          </table:table-cell>
          <table:table-cell table:style-name="TableRowCell" office:value-type="string">
            <text:p text:style-name="Table_20_Contents">Sprite Color Table 1 Palette</text:p>
          </table:table-cell>
        </table:table-row>
      </table:table>
      <text:p text:style-name="First_20_paragraph">Page 187</text:p>
      <text:p text:style-name="Text_20_body">Appendix</text:p>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Sprites &amp; Text Screen</text:p>
          </table:table-cell>
          <table:table-cell table:style-name="TableRowCell" office:value-type="string">
            <text:p text:style-name="Table_20_Contents">E82240H</text:p>
          </table:table-cell>
          <table:table-cell table:style-name="TableRowCell" office:value-type="string">
            <text:p text:style-name="Table_20_Contents">R/W</text:p>
          </table:table-cell>
          <table:table-cell table:style-name="TableRowCell" office:value-type="string">
            <text:p text:style-name="Table_20_Contents">Sprite color table 2 palette</text:p>
          </table:table-cell>
        </table:table-row>
        <table:table-row>
          <table:table-cell table:style-name="TableRowCell" office:value-type="string">
    </table:table-cell>
          <table:table-cell table:style-name="TableRowCell" office:value-type="string">
            <text:p text:style-name="Table_20_Contents">E8225EH</text:p>
          </table:table-cell>
          <table:table-cell table:style-name="TableRowCell" office:value-type="string">
            <text:p text:style-name="Table_20_Contents">R/W</text:p>
          </table:table-cell>
          <table:table-cell table:style-name="TableRowCell" office:value-type="string">
            <text:p text:style-name="Table_20_Contents">Sprite color table 15 palette</text:p>
          </table:table-cell>
        </table:table-row>
        <table:table-row>
          <table:table-cell table:style-name="TableRowCell" office:value-type="string">
    </table:table-cell>
          <table:table-cell table:style-name="TableRowCell" office:value-type="string">
            <text:p text:style-name="Table_20_Contents">Video Controller</text:p>
          </table:table-cell>
          <table:table-cell table:style-name="TableRowCell" office:value-type="string">
            <text:p text:style-name="Table_20_Contents">E82400H</text:p>
          </table:table-cell>
          <table:table-cell table:style-name="TableRowCell" office:value-type="string">
            <text:p text:style-name="Table_20_Contents">R/W</text:p>
          </table:table-cell>
        </table:table-row>
        <table:table-row>
          <table:table-cell table:style-name="TableRowCell" office:value-type="string">
    </table:table-cell>
          <table:table-cell table:style-name="TableRowCell" office:value-type="string">
            <text:p text:style-name="Table_20_Contents">E82500H</text:p>
          </table:table-cell>
          <table:table-cell table:style-name="TableRowCell" office:value-type="string">
            <text:p text:style-name="Table_20_Contents">R/W</text:p>
          </table:table-cell>
          <table:table-cell table:style-name="TableRowCell" office:value-type="string">
            <text:p text:style-name="Table_20_Contents">Sprite area setting</text:p>
          </table:table-cell>
        </table:table-row>
        <table:table-row>
          <table:table-cell table:style-name="TableRowCell" office:value-type="string">
    </table:table-cell>
          <table:table-cell table:style-name="TableRowCell" office:value-type="string">
            <text:p text:style-name="Table_20_Contents">E82600H</text:p>
          </table:table-cell>
          <table:table-cell table:style-name="TableRowCell" office:value-type="string">
            <text:p text:style-name="Table_20_Contents">R/W</text:p>
          </table:table-cell>
          <table:table-cell table:style-name="TableRowCell" office:value-type="string">
            <text:p text:style-name="Table_20_Contents">Special mode, screen display limit</text:p>
          </table:table-cell>
        </table:table-row>
      </table:table>
      <text:p text:style-name="First_20_paragraph">DMA Controller | | E84000H | R/W | Channel status register | Left-side port addresses are for Channel 0 only, otherwise other channels follow next port addresses | | E84010H | R/W | Channel control register | | E84020H | R/W | Device control register | | E84030H | R/W | Device control register | | E84040H | R/W | Device control register | | E84050H | R/W | Device control register | | E84060H | R/W | Device control register | | E84070H | R/W | Area expansion (Identity register) || | E84080H | R/W | Even/odd refresh rate sync | | E84090H | W | Memory function code | | E840A0H | W | Memory function code (Word) | | E840B0H | W | Memory address counter (Word) | | E840C0H | W | Memory address counter (Long word) | | E840D0H | W | Base address register (Long word) | | E840FFH | R/W | Channel control Register | | Edit Set | E86001H | W | Supervisor scalar adjustment |</text:p>
      <text:p text:style-name="Text_20_body">MFP | | E88000H | R | GPIP data register | Unused | | E88003H | W | Active edge register | | E88005H | R/W | Data direction register | | E88007H | R/W | Timer A control register | | E88009H | R/W | Timer B control register | | E8800BH | R/W | Timer C control register | | E8800DH | R/W | Timer D control register | | E8800FH | R/W | Service register A | | E88011H | R/W | Service register B | | E88013H | R/W | Interrupt vector register | | E88015H | R/W | IP interrupt enable register | | E88017H | R/W | IS interrupt status register | | E88019H | R/W | Timer A data register | | E8801BH | R/W | Timer B data register | | E8801DH | R/W | Timer C data register | | E8801FH | R/W | Timer D data register | | E88021H | R/W | Device management register | | E88023H | R/W | Sync/Async control register | | E88025H | R/W | USART control register | |</text:p>
      <text:h text:style-name="Heading_20_1" text:outline-level="1"><text:bookmark-start text:name="id_1-io-port-address-list"/>1. I/O Port Address List<text:bookmark-end text:name="id_1-io-port-address-list"/></text:h>
      <table:table table:name="Table74" table:style-name="Table74">
        <table:table-column table:style-name="Table74.A"/>
        <table:table-column table:style-name="Table74.B"/>
        <table:table-column table:style-name="Table74.C"/>
        <table:table-column table:style-name="Table74.D"/>
        <table:table-column table:style-name="Table74.E"/>
        <table:table-column table:style-name="Table74.F"/>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R/W</text:p>
            </table:table-cell>
            <table:table-cell table:style-name="TableHeaderRowCell" office:value-type="string">
              <text:p text:style-name="Table_20_Heading">Device</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able:table-cell>
          <table:table-cell table:style-name="TableRowCell" office:value-type="string">
            <text:p text:style-name="Table_20_Contents">E8B02BH</text:p>
          </table:table-cell>
          <table:table-cell table:style-name="TableRowCell" office:value-type="string">
            <text:p text:style-name="Table_20_Contents">R/W</text:p>
          </table:table-cell>
          <table:table-cell table:style-name="TableRowCell" office:value-type="string">
            <text:p text:style-name="Table_20_Contents">Receive Data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text:p>
          </table:table-cell>
          <table:table-cell table:style-name="TableRowCell" office:value-type="string">
            <text:p text:style-name="Table_20_Contents">E8B02DH</text:p>
          </table:table-cell>
          <table:table-cell table:style-name="TableRowCell" office:value-type="string">
            <text:p text:style-name="Table_20_Contents">R/W</text:p>
          </table:table-cell>
          <table:table-cell table:style-name="TableRowCell" office:value-type="string">
            <text:p text:style-name="Table_20_Contents">Transmit Data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text:p>
          </table:table-cell>
          <table:table-cell table:style-name="TableRowCell" office:value-type="string">
            <text:p text:style-name="Table_20_Contents">E8B02FH</text:p>
          </table:table-cell>
          <table:table-cell table:style-name="TableRowCell" office:value-type="string">
            <text:p text:style-name="Table_20_Contents">R/W</text:p>
          </table:table-cell>
          <table:table-cell table:style-name="TableRowCell" office:value-type="string">
            <text:p text:style-name="Table_20_Contents">USART Data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text:p>
          </table:table-cell>
          <table:table-cell table:style-name="TableRowCell" office:value-type="string">
            <text:p text:style-name="Table_20_Contents">E8A000H</text:p>
          </table:table-cell>
          <table:table-cell table:style-name="TableRowCell" office:value-type="string">
            <text:p text:style-name="Table_20_Contents">W</text:p>
          </table:table-cell>
          <table:table-cell table:style-name="TableRowCell" office:value-type="string">
            <text:p text:style-name="Table_20_Contents">Timer Counter/CLKOUT Selec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02H</text:p>
          </table:table-cell>
          <table:table-cell table:style-name="TableRowCell" office:value-type="string">
            <text:p text:style-name="Table_20_Contents">W</text:p>
          </table:table-cell>
          <table:table-cell table:style-name="TableRowCell" office:value-type="string">
            <text:p text:style-name="Table_20_Contents">Timer Counter/Adjus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05H</text:p>
          </table:table-cell>
          <table:table-cell table:style-name="TableRowCell" office:value-type="string">
            <text:p text:style-name="Table_20_Contents">R/W</text:p>
          </table:table-cell>
          <table:table-cell table:style-name="TableRowCell" office:value-type="string">
            <text:p text:style-name="Table_20_Contents">Minute Counter/Alarm 1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07H</text:p>
          </table:table-cell>
          <table:table-cell table:style-name="TableRowCell" office:value-type="string">
            <text:p text:style-name="Table_20_Contents">R/W</text:p>
          </table:table-cell>
          <table:table-cell table:style-name="TableRowCell" office:value-type="string">
            <text:p text:style-name="Table_20_Contents">Minute Counter/Alarm 10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09H</text:p>
          </table:table-cell>
          <table:table-cell table:style-name="TableRowCell" office:value-type="string">
            <text:p text:style-name="Table_20_Contents">R/W</text:p>
          </table:table-cell>
          <table:table-cell table:style-name="TableRowCell" office:value-type="string">
            <text:p text:style-name="Table_20_Contents">Hour Counter/Alarm 1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text:p>
          </table:table-cell>
          <table:table-cell table:style-name="TableRowCell" office:value-type="string">
            <text:p text:style-name="Table_20_Contents">E8A00BH</text:p>
          </table:table-cell>
          <table:table-cell table:style-name="TableRowCell" office:value-type="string">
            <text:p text:style-name="Table_20_Contents">R/W</text:p>
          </table:table-cell>
          <table:table-cell table:style-name="TableRowCell" office:value-type="string">
            <text:p text:style-name="Table_20_Contents">Hour Counter/Alarm 10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text:p>
          </table:table-cell>
          <table:table-cell table:style-name="TableRowCell" office:value-type="string">
            <text:p text:style-name="Table_20_Contents">E8A00DH</text:p>
          </table:table-cell>
          <table:table-cell table:style-name="TableRowCell" office:value-type="string">
            <text:p text:style-name="Table_20_Contents">R/W</text:p>
          </table:table-cell>
          <table:table-cell table:style-name="TableRowCell" office:value-type="string">
            <text:p text:style-name="Table_20_Contents">Day Counter/Day of Week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text:p>
          </table:table-cell>
          <table:table-cell table:style-name="TableRowCell" office:value-type="string">
            <text:p text:style-name="Table_20_Contents">E8A00FH</text:p>
          </table:table-cell>
          <table:table-cell table:style-name="TableRowCell" office:value-type="string">
            <text:p text:style-name="Table_20_Contents">R/W</text:p>
          </table:table-cell>
          <table:table-cell table:style-name="TableRowCell" office:value-type="string">
            <text:p text:style-name="Table_20_Contents">Day Counter/Alarm Enable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11H</text:p>
          </table:table-cell>
          <table:table-cell table:style-name="TableRowCell" office:value-type="string">
            <text:p text:style-name="Table_20_Contents">R/W</text:p>
          </table:table-cell>
          <table:table-cell table:style-name="TableRowCell" office:value-type="string">
            <text:p text:style-name="Table_20_Contents">Day Counter/Alarm 1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13H</text:p>
          </table:table-cell>
          <table:table-cell table:style-name="TableRowCell" office:value-type="string">
            <text:p text:style-name="Table_20_Contents">R/W</text:p>
          </table:table-cell>
          <table:table-cell table:style-name="TableRowCell" office:value-type="string">
            <text:p text:style-name="Table_20_Contents">Day Counter/Alarm 10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15H</text:p>
          </table:table-cell>
          <table:table-cell table:style-name="TableRowCell" office:value-type="string">
            <text:p text:style-name="Table_20_Contents">R/W</text:p>
          </table:table-cell>
          <table:table-cell table:style-name="TableRowCell" office:value-type="string">
            <text:p text:style-name="Table_20_Contents">Month Counter/12-24 Hour Selec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17H</text:p>
          </table:table-cell>
          <table:table-cell table:style-name="TableRowCell" office:value-type="string">
            <text:p text:style-name="Table_20_Contents">R/W</text:p>
          </table:table-cell>
          <table:table-cell table:style-name="TableRowCell" office:value-type="string">
            <text:p text:style-name="Table_20_Contents">Control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19H</text:p>
          </table:table-cell>
          <table:table-cell table:style-name="TableRowCell" office:value-type="string">
            <text:p text:style-name="Table_20_Contents">R</text:p>
          </table:table-cell>
          <table:table-cell table:style-name="TableRowCell" office:value-type="string">
            <text:p text:style-name="Table_20_Contents">Test Regist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A01BH</text:p>
          </table:table-cell>
          <table:table-cell table:style-name="TableRowCell" office:value-type="string">
            <text:p text:style-name="Table_20_Contents">W</text:p>
          </table:table-cell>
          <table:table-cell table:style-name="TableRowCell" office:value-type="string">
            <text:p text:style-name="Table_20_Contents">Reset Controlle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rinter</text:p>
          </table:table-cell>
          <table:table-cell table:style-name="TableRowCell" office:value-type="string">
            <text:p text:style-name="Table_20_Contents">E8C001H</text:p>
          </table:table-cell>
          <table:table-cell table:style-name="TableRowCell" office:value-type="string">
            <text:p text:style-name="Table_20_Contents">R</text:p>
          </table:table-cell>
          <table:table-cell table:style-name="TableRowCell" office:value-type="string">
            <text:p text:style-name="Table_20_Contents">Printer Data</text:p>
          </table:table-cell>
          <table:table-cell table:style-name="TableRowCell" office:value-type="string">
            <text:p text:style-name="Table_20_Contents">Wri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C003H</text:p>
          </table:table-cell>
          <table:table-cell table:style-name="TableRowCell" office:value-type="string">
            <text:p text:style-name="Table_20_Contents">W</text:p>
          </table:table-cell>
          <table:table-cell table:style-name="TableRowCell" office:value-type="string">
            <text:p text:style-name="Table_20_Contents">Printer Strobe</text:p>
          </table:table-cell>
          <table:table-cell table:style-name="TableRowCell" office:value-type="string">
            <text:p text:style-name="Table_20_Contents">Wri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C005H</text:p>
          </table:table-cell>
          <table:table-cell table:style-name="TableRowCell" office:value-type="string">
            <text:p text:style-name="Table_20_Contents">R</text:p>
          </table:table-cell>
          <table:table-cell table:style-name="TableRowCell" office:value-type="string">
            <text:p text:style-name="Table_20_Contents">Printer Busy</text:p>
          </table:table-cell>
          <table:table-cell table:style-name="TableRowCell" office:value-type="string">
            <text:p text:style-name="Table_20_Contents">Read</text:p>
          </table:table-cell>
          <table:table-cell table:style-name="TableRowCell" office:value-type="string">
    </table:table-cell>
        </table:table-row>
        <table:table-row>
          <table:table-cell table:style-name="TableRowCell" office:value-type="string">
            <text:p text:style-name="Table_20_Contents">System</text:p>
          </table:table-cell>
          <table:table-cell table:style-name="TableRowCell" office:value-type="string">
            <text:p text:style-name="Table_20_Contents">E8E001H</text:p>
          </table:table-cell>
          <table:table-cell table:style-name="TableRowCell" office:value-type="string">
            <text:p text:style-name="Table_20_Contents">R/W</text:p>
          </table:table-cell>
          <table:table-cell table:style-name="TableRowCell" office:value-type="string">
            <text:p text:style-name="Table_20_Contents">Contrast Adjustment (D/A)</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oard</text:p>
          </table:table-cell>
          <table:table-cell table:style-name="TableRowCell" office:value-type="string">
            <text:p text:style-name="Table_20_Contents">E8E003H</text:p>
          </table:table-cell>
          <table:table-cell table:style-name="TableRowCell" office:value-type="string">
            <text:p text:style-name="Table_20_Contents">W</text:p>
          </table:table-cell>
          <table:table-cell table:style-name="TableRowCell" office:value-type="string">
            <text:p text:style-name="Table_20_Contents">Contrast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E005H</text:p>
          </table:table-cell>
          <table:table-cell table:style-name="TableRowCell" office:value-type="string">
            <text:p text:style-name="Table_20_Contents">R/W</text:p>
          </table:table-cell>
          <table:table-cell table:style-name="TableRowCell" office:value-type="string">
            <text:p text:style-name="Table_20_Contents">MNL LED ON/OFF, NMI Reset, Keyboard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E006H</text:p>
          </table:table-cell>
          <table:table-cell table:style-name="TableRowCell" office:value-type="string">
            <text:p text:style-name="Table_20_Contents">W</text:p>
          </table:table-cell>
          <table:table-cell table:style-name="TableRowCell" office:value-type="string">
            <text:p text:style-name="Table_20_Contents">SRAM Write Enable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E00FH</text:p>
          </table:table-cell>
          <table:table-cell table:style-name="TableRowCell" office:value-type="string">
            <text:p text:style-name="Table_20_Contents">W</text:p>
          </table:table-cell>
          <table:table-cell table:style-name="TableRowCell" office:value-type="string">
            <text:p text:style-name="Table_20_Contents">POWER OFF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M</text:p>
          </table:table-cell>
          <table:table-cell table:style-name="TableRowCell" office:value-type="string">
            <text:p text:style-name="Table_20_Contents">E9O001H</text:p>
          </table:table-cell>
          <table:table-cell table:style-name="TableRowCell" office:value-type="string">
            <text:p text:style-name="Table_20_Contents">R/W</text:p>
          </table:table-cell>
          <table:table-cell table:style-name="TableRowCell" office:value-type="string">
            <text:p text:style-name="Table_20_Contents">FM Sound Register Address Por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ound</text:p>
          </table:table-cell>
          <table:table-cell table:style-name="TableRowCell" office:value-type="string">
            <text:p text:style-name="Table_20_Contents">E9O003H</text:p>
          </table:table-cell>
          <table:table-cell table:style-name="TableRowCell" office:value-type="string">
            <text:p text:style-name="Table_20_Contents">R/W</text:p>
          </table:table-cell>
          <table:table-cell table:style-name="TableRowCell" office:value-type="string">
            <text:p text:style-name="Table_20_Contents">FM Sound Register Data Por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ynthesis</text:p>
          </table:table-cell>
          <table:table-cell table:style-name="TableRowCell" office:value-type="string">
            <text:p text:style-name="Table_20_Contents">E92001H</text:p>
          </table:table-cell>
          <table:table-cell table:style-name="TableRowCell" office:value-type="string">
            <text:p text:style-name="Table_20_Contents">R/W</text:p>
          </table:table-cell>
          <table:table-cell table:style-name="TableRowCell" office:value-type="string">
            <text:p text:style-name="Table_20_Contents">ADPCM Data I/O (IN)/ADPCM Command (OU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2003H</text:p>
          </table:table-cell>
          <table:table-cell table:style-name="TableRowCell" office:value-type="string">
            <text:p text:style-name="Table_20_Contents">R/W</text:p>
          </table:table-cell>
          <table:table-cell table:style-name="TableRowCell" office:value-type="string">
            <text:p text:style-name="Table_20_Contents">ADPCM Data I/O (IN/OU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A005H</text:p>
          </table:table-cell>
          <table:table-cell table:style-name="TableRowCell" office:value-type="string">
            <text:p text:style-name="Table_20_Contents">R</text:p>
          </table:table-cell>
          <table:table-cell table:style-name="TableRowCell" office:value-type="string">
            <text:p text:style-name="Table_20_Contents">ADPCM Output, Loop Switching Register</text:p>
          </table:table-cell>
          <table:table-cell table:style-name="TableRowCell" office:value-type="string">
            <text:p text:style-name="Table_20_Contents">8255 Port C</text:p>
          </table:table-cell>
          <table:table-cell table:style-name="TableRowCell" office:value-type="string">
    </table:table-cell>
        </table:table-row>
        <table:table-row>
          <table:table-cell table:style-name="TableRowCell" office:value-type="string">
            <text:p text:style-name="Table_20_Contents">Floppy</text:p>
          </table:table-cell>
          <table:table-cell table:style-name="TableRowCell" office:value-type="string">
            <text:p text:style-name="Table_20_Contents">E94001H</text:p>
          </table:table-cell>
          <table:table-cell table:style-name="TableRowCell" office:value-type="string">
            <text:p text:style-name="Table_20_Contents">R</text:p>
          </table:table-cell>
          <table:table-cell table:style-name="TableRowCell" office:value-type="string">
            <text:p text:style-name="Table_20_Contents">FDC Status Register (I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isk</text:p>
          </table:table-cell>
          <table:table-cell table:style-name="TableRowCell" office:value-type="string">
            <text:p text:style-name="Table_20_Contents">E94003H</text:p>
          </table:table-cell>
          <table:table-cell table:style-name="TableRowCell" office:value-type="string">
            <text:p text:style-name="Table_20_Contents">R/W</text:p>
          </table:table-cell>
          <table:table-cell table:style-name="TableRowCell" office:value-type="string">
            <text:p text:style-name="Table_20_Contents">FDC Data Register (IN/OU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0005H</text:p>
          </table:table-cell>
          <table:table-cell table:style-name="TableRowCell" office:value-type="string">
            <text:p text:style-name="Table_20_Contents">R/W</text:p>
          </table:table-cell>
          <table:table-cell table:style-name="TableRowCell" office:value-type="string">
            <text:p text:style-name="Table_20_Contents">Drive Status (IN)/Drive Control (OUT)</text:p>
          </table:table-cell>
          <table:table-cell table:style-name="TableRowCell" office:value-type="string">
            <text:p text:style-name="Table_20_Contents">Objection Signa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007H</text:p>
          </table:table-cell>
          <table:table-cell table:style-name="TableRowCell" office:value-type="string">
            <text:p text:style-name="Table_20_Contents">W</text:p>
          </table:table-cell>
          <table:table-cell table:style-name="TableRowCell" office:value-type="string">
            <text:p text:style-name="Table_20_Contents">"Busy" Signal Reset, 2HD/2DD-2D Switch (OU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Hard Disk</text:p>
          </table:table-cell>
          <table:table-cell table:style-name="TableRowCell" office:value-type="string">
            <text:p text:style-name="Table_20_Contents">E96001H</text:p>
          </table:table-cell>
          <table:table-cell table:style-name="TableRowCell" office:value-type="string">
            <text:p text:style-name="Table_20_Contents">R/W</text:p>
          </table:table-cell>
          <table:table-cell table:style-name="TableRowCell" office:value-type="string">
            <text:p text:style-name="Table_20_Contents">HD Data (IN/OU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03H</text:p>
          </table:table-cell>
          <table:table-cell table:style-name="TableRowCell" office:value-type="string">
            <text:p text:style-name="Table_20_Contents">R/W</text:p>
          </table:table-cell>
          <table:table-cell table:style-name="TableRowCell" office:value-type="string">
            <text:p text:style-name="Table_20_Contents">Status (IN)/Select Reset (OU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05H</text:p>
          </table:table-cell>
          <table:table-cell table:style-name="TableRowCell" office:value-type="string">
            <text:p text:style-name="Table_20_Contents">R/W</text:p>
          </table:table-cell>
          <table:table-cell table:style-name="TableRowCell" office:value-type="string">
            <text:p text:style-name="Table_20_Contents">Controller Board Reset (OU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07H</text:p>
          </table:table-cell>
          <table:table-cell table:style-name="TableRowCell" office:value-type="string">
            <text:p text:style-name="Table_20_Contents">W</text:p>
          </table:table-cell>
          <table:table-cell table:style-name="TableRowCell" office:value-type="string">
            <text:p text:style-name="Table_20_Contents">Select Reset (OU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C</text:p>
          </table:table-cell>
          <table:table-cell table:style-name="TableRowCell" office:value-type="string">
            <text:p text:style-name="Table_20_Contents">E98001H</text:p>
          </table:table-cell>
          <table:table-cell table:style-name="TableRowCell" office:value-type="string">
            <text:p text:style-name="Table_20_Contents">R/W</text:p>
          </table:table-cell>
          <table:table-cell table:style-name="TableRowCell" office:value-type="string">
            <text:p text:style-name="Table_20_Contents">SCC Command Port B</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3H</text:p>
          </table:table-cell>
          <table:table-cell table:style-name="TableRowCell" office:value-type="string">
            <text:p text:style-name="Table_20_Contents">R/W</text:p>
          </table:table-cell>
          <table:table-cell table:style-name="TableRowCell" office:value-type="string">
            <text:p text:style-name="Table_20_Contents">SCC Data Port B</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5H</text:p>
          </table:table-cell>
          <table:table-cell table:style-name="TableRowCell" office:value-type="string">
            <text:p text:style-name="Table_20_Contents">R/W</text:p>
          </table:table-cell>
          <table:table-cell table:style-name="TableRowCell" office:value-type="string">
            <text:p text:style-name="Table_20_Contents">SCC Command Port A</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7H</text:p>
          </table:table-cell>
          <table:table-cell table:style-name="TableRowCell" office:value-type="string">
            <text:p text:style-name="Table_20_Contents">R/W</text:p>
          </table:table-cell>
          <table:table-cell table:style-name="TableRowCell" office:value-type="string">
            <text:p text:style-name="Table_20_Contents">SCC Data Port A</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9H</text:p>
          </table:table-cell>
          <table:table-cell table:style-name="TableRowCell" office:value-type="string">
            <text:p text:style-name="Table_20_Contents">R/W</text:p>
          </table:table-cell>
          <table:table-cell table:style-name="TableRowCell" office:value-type="string">
            <text:p text:style-name="Table_20_Contents">SCC Register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Joystick</text:p>
          </table:table-cell>
          <table:table-cell table:style-name="TableRowCell" office:value-type="string">
            <text:p text:style-name="Table_20_Contents">E9A001H</text:p>
          </table:table-cell>
          <table:table-cell table:style-name="TableRowCell" office:value-type="string">
            <text:p text:style-name="Table_20_Contents">R</text:p>
          </table:table-cell>
          <table:table-cell table:style-name="TableRowCell" office:value-type="string">
            <text:p text:style-name="Table_20_Contents">Joystick 0</text:p>
          </table:table-cell>
          <table:table-cell table:style-name="TableRowCell" office:value-type="string">
            <text:p text:style-name="Table_20_Contents">8255 Port A</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A003H</text:p>
          </table:table-cell>
          <table:table-cell table:style-name="TableRowCell" office:value-type="string">
            <text:p text:style-name="Table_20_Contents">R</text:p>
          </table:table-cell>
          <table:table-cell table:style-name="TableRowCell" office:value-type="string">
            <text:p text:style-name="Table_20_Contents">Joystick 1</text:p>
          </table:table-cell>
          <table:table-cell table:style-name="TableRowCell" office:value-type="string">
            <text:p text:style-name="Table_20_Contents">8255 Port B</text:p>
          </table:table-cell>
          <table:table-cell table:style-name="TableRowCell" office:value-type="string">
    </table:table-cell>
        </table:table-row>
      </table:table>
      <text:p text:style-name="First_20_paragraph">Page 189</text:p>
      <text:p text:style-name="Text_20_body">Attachment</text:p>
      <table:table table:name="Table75" table:style-name="Table75">
        <table:table-column table:style-name="Table75.A"/>
        <table:table-column table:style-name="Table75.B"/>
        <table:table-column table:style-name="Table75.C"/>
        <table:table-column table:style-name="Table75.D"/>
        <table:table-column table:style-name="Table75.E"/>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Acc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8255</text:p>
          </table:table-cell>
          <table:table-cell table:style-name="TableRowCell" office:value-type="string">
            <text:p text:style-name="Table_20_Contents">E9A007H</text:p>
          </table:table-cell>
          <table:table-cell table:style-name="TableRowCell" office:value-type="string">
            <text:p text:style-name="Table_20_Contents">W</text:p>
          </table:table-cell>
          <table:table-cell table:style-name="TableRowCell" office:value-type="string">
            <text:p text:style-name="Table_20_Contents">8255 Control Word Register</text:p>
          </table:table-cell>
          <table:table-cell table:style-name="TableRowCell" office:value-type="string">
    </table:table-cell>
        </table:table-row>
        <table:table-row>
          <table:table-cell table:style-name="TableRowCell" office:value-type="string">
            <text:p text:style-name="Table_20_Contents">FD, PR, HD</text:p>
          </table:table-cell>
          <table:table-cell table:style-name="TableRowCell" office:value-type="string">
            <text:p text:style-name="Table_20_Contents">E9C001H</text:p>
          </table:table-cell>
          <table:table-cell table:style-name="TableRowCell" office:value-type="string">
            <text:p text:style-name="Table_20_Contents">R/W</text:p>
          </table:table-cell>
          <table:table-cell table:style-name="TableRowCell" office:value-type="string">
            <text:p text:style-name="Table_20_Contents">FDC, FDD, HD, Printer Interrupt Status (I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002H</text:p>
          </table:table-cell>
          <table:table-cell table:style-name="TableRowCell" office:value-type="string">
            <text:p text:style-name="Table_20_Contents">R/W</text:p>
          </table:table-cell>
          <table:table-cell table:style-name="TableRowCell" office:value-type="string">
            <text:p text:style-name="Table_20_Contents">FDC, FDD, HD, Printer Interrupt Status (OUT)</text:p>
          </table:table-cell>
          <table:table-cell table:style-name="TableRowCell" office:value-type="string">
    </table:table-cell>
        </table:table-row>
        <table:table-row>
          <table:table-cell table:style-name="TableRowCell" office:value-type="string">
            <text:p text:style-name="Table_20_Contents">FD, PR</text:p>
          </table:table-cell>
          <table:table-cell table:style-name="TableRowCell" office:value-type="string">
            <text:p text:style-name="Table_20_Contents">E9C003H</text:p>
          </table:table-cell>
          <table:table-cell table:style-name="TableRowCell" office:value-type="string">
            <text:p text:style-name="Table_20_Contents">R/W</text:p>
          </table:table-cell>
          <table:table-cell table:style-name="TableRowCell" office:value-type="string">
            <text:p text:style-name="Table_20_Contents">FDC, FDD, HD, Printer Interrupt Vector</text:p>
          </table:table-cell>
          <table:table-cell table:style-name="TableRowCell" office:value-type="string">
    </table:table-cell>
        </table:table-row>
        <table:table-row>
          <table:table-cell table:style-name="TableRowCell" office:value-type="string">
            <text:p text:style-name="Table_20_Contents">Sprite</text:p>
          </table:table-cell>
          <table:table-cell table:style-name="TableRowCell" office:value-type="string">
            <text:p text:style-name="Table_20_Contents">EB8000H</text:p>
          </table:table-cell>
          <table:table-cell table:style-name="TableRowCell" office:value-type="string">
            <text:p text:style-name="Table_20_Contents">R/W</text:p>
          </table:table-cell>
          <table:table-cell table:style-name="TableRowCell" office:value-type="string">
            <text:p text:style-name="Table_20_Contents">Sprite X Coordinate</text:p>
          </table:table-cell>
          <table:table-cell table:style-name="TableRowCell" office:value-type="string">
            <text:p text:style-name="Table_20_Contents">Sprite 0</text:p>
          </table:table-cell>
        </table:table-row>
        <table:table-row>
          <table:table-cell table:style-name="TableRowCell" office:value-type="string">
    </table:table-cell>
          <table:table-cell table:style-name="TableRowCell" office:value-type="string">
            <text:p text:style-name="Table_20_Contents">EB8002H</text:p>
          </table:table-cell>
          <table:table-cell table:style-name="TableRowCell" office:value-type="string">
            <text:p text:style-name="Table_20_Contents">R/W</text:p>
          </table:table-cell>
          <table:table-cell table:style-name="TableRowCell" office:value-type="string">
            <text:p text:style-name="Table_20_Contents">Sprite Y Coordina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4H</text:p>
          </table:table-cell>
          <table:table-cell table:style-name="TableRowCell" office:value-type="string">
            <text:p text:style-name="Table_20_Contents">R/W</text:p>
          </table:table-cell>
          <table:table-cell table:style-name="TableRowCell" office:value-type="string">
            <text:p text:style-name="Table_20_Contents">Sprite Contro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6H</text:p>
          </table:table-cell>
          <table:table-cell table:style-name="TableRowCell" office:value-type="string">
            <text:p text:style-name="Table_20_Contents">R/W</text:p>
          </table:table-cell>
          <table:table-cell table:style-name="TableRowCell" office:value-type="string">
            <text:p text:style-name="Table_20_Contents">Sprite Priority</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3FH</text:p>
          </table:table-cell>
          <table:table-cell table:style-name="TableRowCell" office:value-type="string">
            <text:p text:style-name="Table_20_Contents">R/W</text:p>
          </table:table-cell>
          <table:table-cell table:style-name="TableRowCell" office:value-type="string">
            <text:p text:style-name="Table_20_Contents">Sprite X Coordinate</text:p>
          </table:table-cell>
          <table:table-cell table:style-name="TableRowCell" office:value-type="string">
            <text:p text:style-name="Table_20_Contents">Sprite 127</text:p>
          </table:table-cell>
        </table:table-row>
        <table:table-row>
          <table:table-cell table:style-name="TableRowCell" office:value-type="string">
    </table:table-cell>
          <table:table-cell table:style-name="TableRowCell" office:value-type="string">
            <text:p text:style-name="Table_20_Contents">EB803EH</text:p>
          </table:table-cell>
          <table:table-cell table:style-name="TableRowCell" office:value-type="string">
            <text:p text:style-name="Table_20_Contents">R/W</text:p>
          </table:table-cell>
          <table:table-cell table:style-name="TableRowCell" office:value-type="string">
            <text:p text:style-name="Table_20_Contents">Sprite Y Coordina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3CH</text:p>
          </table:table-cell>
          <table:table-cell table:style-name="TableRowCell" office:value-type="string">
            <text:p text:style-name="Table_20_Contents">R/W</text:p>
          </table:table-cell>
          <table:table-cell table:style-name="TableRowCell" office:value-type="string">
            <text:p text:style-name="Table_20_Contents">Sprite Contro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3EH</text:p>
          </table:table-cell>
          <table:table-cell table:style-name="TableRowCell" office:value-type="string">
            <text:p text:style-name="Table_20_Contents">R/W</text:p>
          </table:table-cell>
          <table:table-cell table:style-name="TableRowCell" office:value-type="string">
            <text:p text:style-name="Table_20_Contents">Sprite Priority</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0H</text:p>
          </table:table-cell>
          <table:table-cell table:style-name="TableRowCell" office:value-type="string">
            <text:p text:style-name="Table_20_Contents">R/W</text:p>
          </table:table-cell>
          <table:table-cell table:style-name="TableRowCell" office:value-type="string">
            <text:p text:style-name="Table_20_Contents">Background KO X Coordina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2H</text:p>
          </table:table-cell>
          <table:table-cell table:style-name="TableRowCell" office:value-type="string">
            <text:p text:style-name="Table_20_Contents">R/W</text:p>
          </table:table-cell>
          <table:table-cell table:style-name="TableRowCell" office:value-type="string">
            <text:p text:style-name="Table_20_Contents">Background KO Y Coordina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4H</text:p>
          </table:table-cell>
          <table:table-cell table:style-name="TableRowCell" office:value-type="string">
            <text:p text:style-name="Table_20_Contents">R/W</text:p>
          </table:table-cell>
          <table:table-cell table:style-name="TableRowCell" office:value-type="string">
            <text:p text:style-name="Table_20_Contents">Background KO X Coordina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6H</text:p>
          </table:table-cell>
          <table:table-cell table:style-name="TableRowCell" office:value-type="string">
            <text:p text:style-name="Table_20_Contents">R/W</text:p>
          </table:table-cell>
          <table:table-cell table:style-name="TableRowCell" office:value-type="string">
            <text:p text:style-name="Table_20_Contents">Background KO Y Coordina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8H</text:p>
          </table:table-cell>
          <table:table-cell table:style-name="TableRowCell" office:value-type="string">
            <text:p text:style-name="Table_20_Contents">R/W</text:p>
          </table:table-cell>
          <table:table-cell table:style-name="TableRowCell" office:value-type="string">
            <text:p text:style-name="Table_20_Contents">Background KO Contro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AH</text:p>
          </table:table-cell>
          <table:table-cell table:style-name="TableRowCell" office:value-type="string">
            <text:p text:style-name="Table_20_Contents">R/W</text:p>
          </table:table-cell>
          <table:table-cell table:style-name="TableRowCell" office:value-type="string">
            <text:p text:style-name="Table_20_Contents">Raster Coun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CH</text:p>
          </table:table-cell>
          <table:table-cell table:style-name="TableRowCell" office:value-type="string">
            <text:p text:style-name="Table_20_Contents">R/W</text:p>
          </table:table-cell>
          <table:table-cell table:style-name="TableRowCell" office:value-type="string">
            <text:p text:style-name="Table_20_Contents">Window Display</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EH</text:p>
          </table:table-cell>
          <table:table-cell table:style-name="TableRowCell" office:value-type="string">
            <text:p text:style-name="Table_20_Contents">R/W</text:p>
          </table:table-cell>
          <table:table-cell table:style-name="TableRowCell" office:value-type="string">
            <text:p text:style-name="Table_20_Contents">Blinking Display</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10H</text:p>
          </table:table-cell>
          <table:table-cell table:style-name="TableRowCell" office:value-type="string">
            <text:p text:style-name="Table_20_Contents">R/W</text:p>
          </table:table-cell>
          <table:table-cell table:style-name="TableRowCell" office:value-type="string">
            <text:p text:style-name="Table_20_Contents">Disable Display</text:p>
          </table:table-cell>
          <table:table-cell table:style-name="TableRowCell" office:value-type="string">
    </table:table-cell>
        </table:table-row>
        <table:table-row>
          <table:table-cell table:style-name="TableRowCell" office:value-type="string">
            <text:p text:style-name="Table_20_Contents">Sprite PCG Area</text:p>
          </table:table-cell>
          <table:table-cell table:style-name="TableRowCell" office:value-type="string">
            <text:p text:style-name="Table_20_Contents">EB8000H</text:p>
          </table:table-cell>
          <table:table-cell table:style-name="TableRowCell" office:value-type="string">
            <text:p text:style-name="Table_20_Contents">R/W</text:p>
          </table:table-cell>
          <table:table-cell table:style-name="TableRowCell" office:value-type="string">
            <text:p text:style-name="Table_20_Contents">Sprite 0 PCG Area</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007EH</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8F80H</text:p>
          </table:table-cell>
          <table:table-cell table:style-name="TableRowCell" office:value-type="string">
            <text:p text:style-name="Table_20_Contents">R/W</text:p>
          </table:table-cell>
          <table:table-cell table:style-name="TableRowCell" office:value-type="string">
            <text:p text:style-name="Table_20_Contents">Sprite 127 PCG Area</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BFFEH</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rite Text Area</text:p>
          </table:table-cell>
          <table:table-cell table:style-name="TableRowCell" office:value-type="string">
            <text:p text:style-name="Table_20_Contents">EBC000H</text:p>
          </table:table-cell>
          <table:table-cell table:style-name="TableRowCell" office:value-type="string">
            <text:p text:style-name="Table_20_Contents">R/W</text:p>
          </table:table-cell>
          <table:table-cell table:style-name="TableRowCell" office:value-type="string">
            <text:p text:style-name="Table_20_Contents">Text Area 0</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DFEEH</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E000H</text:p>
          </table:table-cell>
          <table:table-cell table:style-name="TableRowCell" office:value-type="string">
            <text:p text:style-name="Table_20_Contents">R/W</text:p>
          </table:table-cell>
          <table:table-cell table:style-name="TableRowCell" office:value-type="string">
            <text:p text:style-name="Table_20_Contents">Text Area 1</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BBFFEH</text:p>
          </table:table-cell>
          <table:table-cell table:style-name="TableRowCell" office:value-type="string">
            <text:p text:style-name="Table_20_Contents">R/W</text:p>
          </table:table-cell>
          <table:table-cell table:style-name="TableRowCell" office:value-type="string">
    </table:table-cell>
          <table:table-cell table:style-name="TableRowCell" office:value-type="string">
    </table:table-cell>
        </table:table-row>
      </table:table>
      <text:p text:style-name="First_20_paragraph">Table A-1 I/O Port List</text:p>
      <text:list text:style-name="Numbering_20_1" text:start-value="2">
        <text:list-item>
          <text:p text:style-name="List_20_Number_20_Tight">Area Set</text:p>
        </text:list-item>
      </text:list>
      <text:p text:style-name="First_20_paragraph">In X68000, within the area from the beginning of 2M bytes (000000H-1FFFFFFH), by setting data in the E86001H register, it is possible to set any location in 8K byte units as a supervisor area.</text:p>
      <text:list text:style-name="List_20_1">
        <text:list-item>
          <text:p text:style-name="List_20_Bullet_20_Tight">Register Support – Address E86001H, Write only, 8-bit register (However the upper bit ** is disabled)</text:p>
        </text:list-item>
      </text:list>
      <text:p text:style-name="First_20_paragraph">E86001H: ** ** ** ** D7 D6 D5 D4 D3 D2 D1 D0 (Lower 8 bits are effective)</text:p>
      <text:list text:style-name="List_20_1">
        <text:list-item>
          <text:p text:style-name="List_20_Bullet_20_Tight">Operation: Within the range of the first 2M bytes of main memory, the supervisor area can be specified by setting data. However, the setting is in 8K byte units (the 2M bytes are divided into 256 parts).</text:p>
        </text:list-item>
      </text:list>
      <text:p text:style-name="First_20_paragraph">Example: Memory Map when setting data to 7FH</text:p>
      <text:p text:style-name="Text_20_body">000000H Port Setting Value Supervisor Area</text:p>
      <text:p text:style-name="Text_20_body">0FFFFFH 7FH (127) 100000H Supervisor &amp; User Area</text:p>
      <text:p text:style-name="Text_20_body">200000H Supervisor &amp; User Area</text:p>
      <text:p text:style-name="Text_20_body">BFFFFFH</text:p>
      <text:p text:style-name="Preformatted_20_Text"><text:s text:c="2"/>Key: Port Setting Value <text:s text:c="4"/>Supervisor Area</text:p>
      <text:p text:style-name="Preformatted_20_Text"><text:s text:c="6"/>0 <text:s text:c="30"/>0 ~ 1FFFH (8 KB)</text:p>
      <text:p text:style-name="Preformatted_20_Text"><text:s text:c="6"/>1 <text:s text:c="30"/>0 ~ 3FFFH</text:p>
      <text:p text:style-name="Preformatted_20_Text"><text:s text:c="6"/>2 <text:s text:c="30"/>0 ~ 5FFFH</text:p>
      <text:p text:style-name="Preformatted_20_Text"><text:s text:c="6"/>3 <text:s text:c="30"/>0 ~ 7FFFH</text:p>
      <text:p text:style-name="Preformatted_20_Text"><text:s text:c="6"/>4 <text:s text:c="30"/>0 ~ 9FFFH</text:p>
      <text:p text:style-name="Preformatted_20_Text"><text:s text:c="6"/>5 <text:s text:c="30"/>0 ~ BFFFH</text:p>
      <text:p text:style-name="Preformatted_20_Text"/>
      <text:p text:style-name="Preformatted_20_Text"><text:s text:c="6"/>127 <text:s text:c="27"/>0 ~ FFFFFH (1 MB)</text:p>
      <text:p text:style-name="Preformatted_20_Text"><text:s text:c="6"/>128 <text:s text:c="27"/>0 ~ 101FFFH</text:p>
      <text:p text:style-name="Preformatted_20_Text"><text:s text:c="6"/>...</text:p>
      <text:p text:style-name="Preformatted_20_Text"><text:s text:c="6"/>254 <text:s text:c="27"/>0 ~ 1FDFFFH</text:p>
      <text:p text:style-name="Preformatted_20_Text"><text:s text:c="6"/>255 <text:s text:c="27"/>0 ~ 1FFFFFH (2 MB)</text:p>
      <text:list text:style-name="List_20_1">
        <text:list-item>
          <text:p text:style-name="List_20_Bullet_20_Tight">The area beyond 200000H can be accessed from both supervisor and user sides.</text:p>
        </text:list-item>
      </text:list>
      <text:p text:style-name="First_20_paragraph">Diagram A-1 Example of Area Set</text:p>
      <text:list text:style-name="Numbering_20_1" text:start-value="3">
        <text:list-item>
          <text:p text:style-name="List_20_Number_20_Tight">System Port</text:p>
        </text:list-item>
      </text:list>
      <text:p text:style-name="First_20_paragraph">3-1 System Port Register Address Map</text:p>
      <text:p text:style-name="Text_20_body">(* means invalid, * means FIELD(READ))</text:p>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able:table-column table:style-name="Table76.H"/>
        <table:table-column table:style-name="Table76.I"/>
        <table:table-column table:style-name="Table76.J"/>
        <table:table-column table:style-name="Table76.K"/>
        <table:table-column table:style-name="Table76.L"/>
        <table:table-header-rows>
          <table:table-row>
            <table:table-cell table:style-name="TableHeaderRowCell" office:value-type="string">
              <text:p text:style-name="Table_20_Heading">No.</text:p>
            </table:table-cell>
            <table:table-cell table:style-name="TableHeaderRowCell" office:value-type="string">
              <text:p text:style-name="Table_20_Heading">Register Address</text:p>
            </table:table-cell>
            <table:table-cell table:style-name="TableHeaderRowCell" office:value-type="string">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8E001H</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Contrast adjustment</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E8E003H</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V control</text:p>
          </table:table-cell>
          <table:table-cell table:style-name="TableRowCell" office:value-type="string">
            <text:p text:style-name="Table_20_Contents">*</text:p>
          </table:table-cell>
          <table:table-cell table:style-name="TableRowCell" office:value-type="string">
            <text:p text:style-name="Table_20_Contents">3D L</text:p>
          </table:table-cell>
          <table:table-cell table:style-name="TableRowCell" office:value-type="string">
            <text:p text:style-name="Table_20_Contents">3D R</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E8E005H</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Video input contro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E8E007H</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Key control</text:p>
          </table:table-cell>
          <table:table-cell table:style-name="TableRowCell" office:value-type="string">
            <text:p text:style-name="Table_20_Contents">NMI reset</text:p>
          </table:table-cell>
          <table:table-cell table:style-name="TableRowCell" office:value-type="string">
            <text:p text:style-name="Table_20_Contents">HRL</text:p>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E8E00DH</text:p>
          </table:table-cell>
          <table:table-cell table:style-name="TableRowCell" office:value-type="string">
    </table:table-cell>
          <table:table-cell table:style-name="TableRowCell" office:value-type="string">
            <text:p text:style-name="Table_20_Contents">SRAM Write Enable Contro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E8E00FH</text:p>
          </table:table-cell>
          <table:table-cell table:style-name="TableRowCell" office:value-type="string">
    </table:table-cell>
          <table:table-cell table:style-name="TableRowCell" office:value-type="string">
            <text:p text:style-name="Table_20_Contents">POWER OFF Contro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able A-2 System Port Register Address Map</text:p>
      <text:p text:style-name="Text_20_body">3-2 Details of System Port Registers</text:p>
      <text:p text:style-name="Text_20_body">(1) E8E001H [READ/WRITE]</text:p>
      <text:list text:style-name="List_20_1">
        <text:list-item>
          <text:p text:style-name="List_20_Bullet_20_Tight">16-step computer screen contrast adjustment (OH [dark] - FH [bright])</text:p>
        </text:list-item>
      </text:list>
      <text:p text:style-name="First_20_paragraph">(2) E8E003H [READ/WRITE]</text:p>
      <text:list text:style-name="List_20_1">
        <text:list-item>
          <text:p text:style-name="List_20_Bullet_20_Tight">See Table A-3.</text:p>
        </text:list-item>
        <text:list-item>
          <text:p text:style-name="List_20_Bullet_20_Tight">In WRITE MODE, by controlling "0" and "1" in D03, it can be used as a TV remote control signal (normally write "0"). In READ MODE, you can know the TV ON/OFF status ("0" for TV ON, "1" for TV OFF). However, TV remote control and keyboard cannot be used at the same time. See Chapter 3, Section 1 (2).</text:p>
        </text:list-item>
        <text:list-item>
          <text:p text:style-name="List_20_Bullet_20_Tight">D00 and D01 are related to stereo vision.</text:p>
        </text:list-item>
      </text:list>
      <text:list text:style-name="Numbering_20_1" text:start-value="3">
        <text:list-item>
          <text:p text:style-name="List_20_Number_20_Tight">System Port</text:p>
        </text:list-item>
      </text:list>
      <table:table table:name="Table77" table:style-name="Table77">
        <table:table-column table:style-name="Table77.A"/>
        <table:table-column table:style-name="Table77.B"/>
        <table:table-column table:style-name="Table77.C"/>
        <table:table-header-rows>
          <table:table-row>
            <table:table-cell table:style-name="TableHeaderRowCell" office:value-type="string">
              <text:p text:style-name="Table_20_Heading">Bit</text:p>
            </table:table-cell>
            <table:table-cell table:style-name="TableHeaderRowCell" office:value-type="string">
              <text:p text:style-name="Table_20_Heading">WRITE</text:p>
            </table:table-cell>
            <table:table-cell table:style-name="TableHeaderRowCell" office:value-type="string">
              <text:p text:style-name="Table_20_Heading">READ</text:p>
            </table:table-cell>
          </table:table-row>
        </table:table-header-rows>
        <table:table-row>
          <table:table-cell table:style-name="TableRowCell" office:value-type="string">
            <text:p text:style-name="Table_20_Contents">D00</text:p>
          </table:table-cell>
          <table:table-cell table:style-name="TableRowCell" office:value-type="string">
            <text:p text:style-name="Table_20_Contents">3D R</text:p>
          </table:table-cell>
          <table:table-cell table:style-name="TableRowCell" office:value-type="string">
            <text:p text:style-name="Table_20_Contents">3D R</text:p>
          </table:table-cell>
        </table:table-row>
        <table:table-row>
          <table:table-cell table:style-name="TableRowCell" office:value-type="string">
            <text:p text:style-name="Table_20_Contents">D01</text:p>
          </table:table-cell>
          <table:table-cell table:style-name="TableRowCell" office:value-type="string">
            <text:p text:style-name="Table_20_Contents">3D L</text:p>
          </table:table-cell>
          <table:table-cell table:style-name="TableRowCell" office:value-type="string">
            <text:p text:style-name="Table_20_Contents">3D L</text:p>
          </table:table-cell>
        </table:table-row>
        <table:table-row>
          <table:table-cell table:style-name="TableRowCell" office:value-type="string">
            <text:p text:style-name="Table_20_Contents">D02</text:p>
          </table:table-cell>
          <table:table-cell table:style-name="TableRowCell" office:value-type="string">
            <text:p text:style-name="Table_20_Contents">*</text:p>
          </table:table-cell>
          <table:table-cell table:style-name="TableRowCell" office:value-type="string">
            <text:p text:style-name="Table_20_Contents">FIELD</text:p>
          </table:table-cell>
        </table:table-row>
        <table:table-row>
          <table:table-cell table:style-name="TableRowCell" office:value-type="string">
            <text:p text:style-name="Table_20_Contents">D03</text:p>
          </table:table-cell>
          <table:table-cell table:style-name="TableRowCell" office:value-type="string">
            <text:p text:style-name="Table_20_Contents">TV Remote Signal</text:p>
          </table:table-cell>
          <table:table-cell table:style-name="TableRowCell" office:value-type="string">
            <text:p text:style-name="Table_20_Contents">TV ON/OFF Status</text:p>
          </table:table-cell>
        </table:table-row>
      </table:table>
      <text:p text:style-name="First_20_paragraph">Table A-3 System Port Register E8E003H</text:p>
      <text:p text:style-name="Text_20_body">0: Shutter OPEN 1: Shutter CLOSE</text:p>
      <text:p text:style-name="Text_20_body">(3) E8E005H [WRITE]</text:p>
      <text:list text:style-name="List_20_1">
        <text:list-item>
          <text:p text:style-name="List_20_Bullet_20_Tight">This is the system port for controlling the optional "digitizer dropout" using a computer.</text:p>
        </text:list-item>
      </text:list>
      <text:p text:style-name="First_20_paragraph">(4) E8E007H [READ/WRITE]</text:p>
      <text:list text:style-name="List_20_1">
        <text:list-item>
          <text:p text:style-name="List_20_Bullet_20_Tight">Please refer to Table A-4.</text:p>
        </text:list-item>
        <text:list-item>
          <text:p text:style-name="List_20_Bullet_20_Tight">D01 is used for switching the dot clock, so usually set it to "0".</text:p>
        </text:list-item>
        <text:list-item>
          <text:p text:style-name="List_20_Bullet_20_Tight">When the NMI switch is pressed, the MPU moves to the highest-level edge (forced edge level), shifting to the NMI processing loop. In this NMI processing loop, at the end of the loop processing, it is necessary to write "1" to D02 to reset NMI again. If "1" is not written to D02, the MPU remains in the NMI processing loop and will not exit, causing the NMI to fire continuously.</text:p>
        </text:list-item>
        <text:list-item>
          <text:p text:style-name="List_20_Bullet_20_Tight">In WRITE mode, D03 is used as the data transmission permission signal from the sub-CPU 8051 of the keyboard to the MPP (RR terminal). Writing "1" permits data transmission, and writing "0" cancels data transmission. In READ mode, you can know the state (whether the key jacket is inserted or not; "1" when inserted, "0" when removed) by checking if the keyboard key jacket is inserted.</text:p>
        </text:list-item>
      </text:list>
      <table:table table:name="Table78" table:style-name="Table78">
        <table:table-column table:style-name="Table78.A"/>
        <table:table-column table:style-name="Table78.B"/>
        <table:table-column table:style-name="Table78.C"/>
        <table:table-header-rows>
          <table:table-row>
            <table:table-cell table:style-name="TableHeaderRowCell" office:value-type="string">
              <text:p text:style-name="Table_20_Heading">Bit</text:p>
            </table:table-cell>
            <table:table-cell table:style-name="TableHeaderRowCell" office:value-type="string">
              <text:p text:style-name="Table_20_Heading">WRITE</text:p>
            </table:table-cell>
            <table:table-cell table:style-name="TableHeaderRowCell" office:value-type="string">
              <text:p text:style-name="Table_20_Heading">READ</text:p>
            </table:table-cell>
          </table:table-row>
        </table:table-header-rows>
        <table:table-row>
          <table:table-cell table:style-name="TableRowCell" office:value-type="string">
            <text:p text:style-name="Table_20_Contents">D01</text:p>
          </table:table-cell>
          <table:table-cell table:style-name="TableRowCell" office:value-type="string">
            <text:p text:style-name="Table_20_Contents">HRL</text:p>
          </table:table-cell>
          <table:table-cell table:style-name="TableRowCell" office:value-type="string">
            <text:p text:style-name="Table_20_Contents">HRL Status</text:p>
          </table:table-cell>
        </table:table-row>
        <table:table-row>
          <table:table-cell table:style-name="TableRowCell" office:value-type="string">
            <text:p text:style-name="Table_20_Contents">D02</text:p>
          </table:table-cell>
          <table:table-cell table:style-name="TableRowCell" office:value-type="string">
            <text:p text:style-name="Table_20_Contents">NMI Reset</text:p>
          </table:table-cell>
          <table:table-cell table:style-name="TableRowCell" office:value-type="string">
            <text:p text:style-name="Table_20_Contents">..........</text:p>
          </table:table-cell>
        </table:table-row>
        <table:table-row>
          <table:table-cell table:style-name="TableRowCell" office:value-type="string">
            <text:p text:style-name="Table_20_Contents">D03</text:p>
          </table:table-cell>
          <table:table-cell table:style-name="TableRowCell" office:value-type="string">
            <text:p text:style-name="Table_20_Contents">Key Ready</text:p>
          </table:table-cell>
          <table:table-cell table:style-name="TableRowCell" office:value-type="string">
            <text:p text:style-name="Table_20_Contents">Key Jacket Status</text:p>
          </table:table-cell>
        </table:table-row>
      </table:table>
      <text:p text:style-name="First_20_paragraph">Table A-4 System Port Register E8E007H</text:p>
      <text:p text:style-name="Text_20_body">Appendix</text:p>
      <text:p text:style-name="Text_20_body">(5) EB00DDH [WRITE]</text:p>
      <text:list text:style-name="List_20_1">
        <text:list-item>
          <text:p text:style-name="List_20_Bullet_20_Tight">Normally, SRAM is Read-Only, but this port is designed to protect the contents of SRAM from being destroyed during program runaway.</text:p>
        </text:list-item>
        <text:list-item>
          <text:p text:style-name="List_20_Bullet_20_Tight">Writing 31H enables SRAM Write, and any other code will be Read-Only.</text:p>
        </text:list-item>
      </text:list>
      <text:p text:style-name="First_20_paragraph">(6) EB00FFH [WRITE]</text:p>
      <text:list text:style-name="List_20_1">
        <text:list-item>
          <text:p text:style-name="List_20_Bullet_20_Tight">When input in the order of 00H→01H→FFH, only POWER OFF (Vcc1 OFF) will be effective, and any other code will be invalid. In other words, this makes it so that POWER OFF cannot be easily executed.</text:p>
        </text:list-item>
      </text:list>
      <text:list text:style-name="Numbering_20_1" text:start-value="4">
        <text:list-item>
          <text:p text:style-name="List_20_Number_20_Tight">Interrupts</text:p>
        </text:list-item>
      </text:list>
      <text:p text:style-name="First_20_paragraph">4-1 Interrupts of the 68000 MPU</text:p>
      <table:table table:name="Table79" table:style-name="Table79">
        <table:table-column table:style-name="Table79.A"/>
        <table:table-column table:style-name="Table79.B"/>
        <table:table-column table:style-name="Table79.C"/>
        <table:table-header-rows>
          <table:table-row>
            <table:table-cell table:style-name="TableHeaderRowCell" office:value-type="string">
              <text:p text:style-name="Table_20_Heading">Level</text:p>
            </table:table-cell>
            <table:table-cell table:style-name="TableHeaderRowCell" office:value-type="string">
              <text:p text:style-name="Table_20_Heading">Interrupt</text:p>
            </table:table-cell>
            <table:table-cell table:style-name="TableHeaderRowCell" office:value-type="string">
              <text:p text:style-name="Table_20_Heading">Cause</text:p>
            </table:table-cell>
          </table:table-row>
        </table:table-header-rows>
        <table:table-row>
          <table:table-cell table:style-name="TableRowCell" office:value-type="string">
            <text:p text:style-name="Table_20_Contents">High 6</text:p>
          </table:table-cell>
          <table:table-cell table:style-name="TableRowCell" office:value-type="string">
            <text:p text:style-name="Table_20_Contents">NMI</text:p>
          </table:table-cell>
          <table:table-cell table:style-name="TableRowCell" office:value-type="string">
            <text:p text:style-name="Table_20_Contents">Interrupt by external NMI switch (Auto vector interrupt)</text:p>
          </table:table-cell>
        </table:table-row>
        <table:table-row>
          <table:table-cell table:style-name="TableRowCell" office:value-type="string">
    </table:table-cell>
          <table:table-cell table:style-name="TableRowCell" office:value-type="string">
            <text:p text:style-name="Table_20_Contents">MFP</text:p>
          </table:table-cell>
          <table:table-cell table:style-name="TableRowCell" office:value-type="string">
            <text:p text:style-name="Table_20_Contents">Various timers, key data reception, H-SYNC, V-DISP, etc. (Auto vector interrupt)</text:p>
          </table:table-cell>
        </table:table-row>
        <table:table-row>
          <table:table-cell table:style-name="TableRowCell" office:value-type="string">
            <text:p text:style-name="Table_20_Contents">5</text:p>
          </table:table-cell>
          <table:table-cell table:style-name="TableRowCell" office:value-type="string">
            <text:p text:style-name="Table_20_Contents">SCC</text:p>
          </table:table-cell>
          <table:table-cell table:style-name="TableRowCell" office:value-type="string">
            <text:p text:style-name="Table_20_Contents">Interrupt by RS-232C, mouse data reception (Vector interrupt)</text:p>
          </table:table-cell>
        </table:table-row>
        <table:table-row>
          <table:table-cell table:style-name="TableRowCell" office:value-type="string">
            <text:p text:style-name="Table_20_Contents">4</text:p>
          </table:table-cell>
          <table:table-cell table:style-name="TableRowCell" office:value-type="string">
            <text:p text:style-name="Table_20_Contents">Floppy</text:p>
          </table:table-cell>
          <table:table-cell table:style-name="TableRowCell" office:value-type="string">
            <text:p text:style-name="Table_20_Contents">Expansion I/O slot B</text:p>
          </table:table-cell>
        </table:table-row>
        <table:table-row>
          <table:table-cell table:style-name="TableRowCell" office:value-type="string">
            <text:p text:style-name="Table_20_Contents">3</text:p>
          </table:table-cell>
          <table:table-cell table:style-name="TableRowCell" office:value-type="string">
            <text:p text:style-name="Table_20_Contents">DMAC</text:p>
          </table:table-cell>
          <table:table-cell table:style-name="TableRowCell" office:value-type="string">
            <text:p text:style-name="Table_20_Contents">Interrupt during DMA transfer position (Vector interrupt)</text:p>
          </table:table-cell>
        </table:table-row>
        <table:table-row>
          <table:table-cell table:style-name="TableRowCell" office:value-type="string">
            <text:p text:style-name="Table_20_Contents">2</text:p>
          </table:table-cell>
          <table:table-cell table:style-name="TableRowCell" office:value-type="string">
            <text:p text:style-name="Table_20_Contents">Floppy</text:p>
          </table:table-cell>
          <table:table-cell table:style-name="TableRowCell" office:value-type="string">
            <text:p text:style-name="Table_20_Contents">Expansion I/O slot A</text:p>
          </table:table-cell>
        </table:table-row>
        <table:table-row>
          <table:table-cell table:style-name="TableRowCell" office:value-type="string">
            <text:p text:style-name="Table_20_Contents">Low 1</text:p>
          </table:table-cell>
          <table:table-cell table:style-name="TableRowCell" office:value-type="string">
            <text:p text:style-name="Table_20_Contents">Disk</text:p>
          </table:table-cell>
          <table:table-cell table:style-name="TableRowCell" office:value-type="string">
            <text:p text:style-name="Table_20_Contents">Interrupt by FDC, FDD, hard drives, printer BUSY, etc. (Auto vector interrupt) (Note, FDC &lt;-&gt; FDD HD -&gt; Printer outputs are output by the disc hardware controlled by the DMA)</text:p>
          </table:table-cell>
        </table:table-row>
        <table:table-row>
          <table:table-cell table:style-name="TableRowCell" office:value-type="string">
            <text:p text:style-name="Table_20_Contents">0</text:p>
          </table:table-cell>
          <table:table-cell table:style-name="TableRowCell" office:value-type="string">
            <text:p text:style-name="Table_20_Contents">Printer</text:p>
          </table:table-cell>
          <table:table-cell table:style-name="TableRowCell" office:value-type="string">
            <text:p text:style-name="Table_20_Contents">Table A-5 Interrupts by MPU (Vector interrupt)</text:p>
          </table:table-cell>
        </table:table-row>
      </table:table>
      <text:p text:style-name="First_20_paragraph">4-2 Interrupt read-out report of the MFP (Multi-Function Peripheral)</text:p>
      <table:table table:name="Table80" table:style-name="Table80">
        <table:table-column table:style-name="Table80.A"/>
        <table:table-column table:style-name="Table80.B"/>
        <table:table-column table:style-name="Table80.C"/>
        <table:table-column table:style-name="Table80.D"/>
        <table:table-header-rows>
          <table:table-row>
            <table:table-cell table:style-name="TableHeaderRowCell" office:value-type="string">
              <text:p text:style-name="Table_20_Heading">Masking level</text:p>
            </table:table-cell>
            <table:table-cell table:style-name="TableHeaderRowCell" office:value-type="string">
              <text:p text:style-name="Table_20_Heading">Interrupt</text:p>
            </table:table-cell>
            <table:table-cell table:style-name="TableHeaderRowCell" office:value-type="string">
              <text:p text:style-name="Table_20_Heading">Cause</text:p>
            </table:table-cell>
            <table:table-cell table:style-name="TableHeaderRowCell" office:value-type="string">
              <text:p text:style-name="Table_20_Heading">General name in function</text:p>
            </table:table-cell>
          </table:table-row>
        </table:table-header-rows>
        <table:table-row>
          <table:table-cell table:style-name="TableRowCell" office:value-type="string">
            <text:p text:style-name="Table_20_Contents">High 15</text:p>
          </table:table-cell>
          <table:table-cell table:style-name="TableRowCell" office:value-type="string">
            <text:p text:style-name="Table_20_Contents">1111</text:p>
          </table:table-cell>
          <table:table-cell table:style-name="TableRowCell" office:value-type="string">
            <text:p text:style-name="Table_20_Contents">H-SYNC signal from CRTC</text:p>
          </table:table-cell>
          <table:table-cell table:style-name="TableRowCell" office:value-type="string">
            <text:p text:style-name="Table_20_Contents">General Purpose Interrupt 7 (17)</text:p>
          </table:table-cell>
        </table:table-row>
        <table:table-row>
          <table:table-cell table:style-name="TableRowCell" office:value-type="string">
            <text:p text:style-name="Table_20_Contents">14</text:p>
          </table:table-cell>
          <table:table-cell table:style-name="TableRowCell" office:value-type="string">
            <text:p text:style-name="Table_20_Contents">1110</text:p>
          </table:table-cell>
          <table:table-cell table:style-name="TableRowCell" office:value-type="string">
            <text:p text:style-name="Table_20_Contents">IRQ signal from CRTC (Specify row in raster)</text:p>
          </table:table-cell>
          <table:table-cell table:style-name="TableRowCell" office:value-type="string">
            <text:p text:style-name="Table_20_Contents">General Purpose Interrupt 6 (16)</text:p>
          </table:table-cell>
        </table:table-row>
        <table:table-row>
          <table:table-cell table:style-name="TableRowCell" office:value-type="string">
            <text:p text:style-name="Table_20_Contents">13</text:p>
          </table:table-cell>
          <table:table-cell table:style-name="TableRowCell" office:value-type="string">
            <text:p text:style-name="Table_20_Contents">1101</text:p>
          </table:table-cell>
          <table:table-cell table:style-name="TableRowCell" office:value-type="string">
            <text:p text:style-name="Table_20_Contents">V-DISP signal from CRTC</text:p>
          </table:table-cell>
          <table:table-cell table:style-name="TableRowCell" office:value-type="string">
            <text:p text:style-name="Table_20_Contents">Timer A</text:p>
          </table:table-cell>
        </table:table-row>
        <table:table-row>
          <table:table-cell table:style-name="TableRowCell" office:value-type="string">
            <text:p text:style-name="Table_20_Contents">12</text:p>
          </table:table-cell>
          <table:table-cell table:style-name="TableRowCell" office:value-type="string">
            <text:p text:style-name="Table_20_Contents">1100</text:p>
          </table:table-cell>
          <table:table-cell table:style-name="TableRowCell" office:value-type="string">
            <text:p text:style-name="Table_20_Contents">KEY data reception completion</text:p>
          </table:table-cell>
          <table:table-cell table:style-name="TableRowCell" office:value-type="string">
            <text:p text:style-name="Table_20_Contents">Receive Buffer Full</text:p>
          </table:table-cell>
        </table:table-row>
        <table:table-row>
          <table:table-cell table:style-name="TableRowCell" office:value-type="string">
            <text:p text:style-name="Table_20_Contents">11</text:p>
          </table:table-cell>
          <table:table-cell table:style-name="TableRowCell" office:value-type="string">
            <text:p text:style-name="Table_20_Contents">1011</text:p>
          </table:table-cell>
          <table:table-cell table:style-name="TableRowCell" office:value-type="string">
            <text:p text:style-name="Table_20_Contents">KEY data reception error</text:p>
          </table:table-cell>
          <table:table-cell table:style-name="TableRowCell" office:value-type="string">
            <text:p text:style-name="Table_20_Contents">Receive Error</text:p>
          </table:table-cell>
        </table:table-row>
        <table:table-row>
          <table:table-cell table:style-name="TableRowCell" office:value-type="string">
            <text:p text:style-name="Table_20_Contents">10</text:p>
          </table:table-cell>
          <table:table-cell table:style-name="TableRowCell" office:value-type="string">
            <text:p text:style-name="Table_20_Contents">1010</text:p>
          </table:table-cell>
          <table:table-cell table:style-name="TableRowCell" office:value-type="string">
            <text:p text:style-name="Table_20_Contents">KEY data transmission completion</text:p>
          </table:table-cell>
          <table:table-cell table:style-name="TableRowCell" office:value-type="string">
            <text:p text:style-name="Table_20_Contents">Transmit Buffer Empty</text:p>
          </table:table-cell>
        </table:table-row>
        <table:table-row>
          <table:table-cell table:style-name="TableRowCell" office:value-type="string">
            <text:p text:style-name="Table_20_Contents">9</text:p>
          </table:table-cell>
          <table:table-cell table:style-name="TableRowCell" office:value-type="string">
            <text:p text:style-name="Table_20_Contents">1001</text:p>
          </table:table-cell>
          <table:table-cell table:style-name="TableRowCell" office:value-type="string">
            <text:p text:style-name="Table_20_Contents">KEY data transmission error</text:p>
          </table:table-cell>
          <table:table-cell table:style-name="TableRowCell" office:value-type="string">
            <text:p text:style-name="Table_20_Contents">Transmit Error</text:p>
          </table:table-cell>
        </table:table-row>
        <table:table-row>
          <table:table-cell table:style-name="TableRowCell" office:value-type="string">
            <text:p text:style-name="Table_20_Contents">8</text:p>
          </table:table-cell>
          <table:table-cell table:style-name="TableRowCell" office:value-type="string">
            <text:p text:style-name="Table_20_Contents">1000</text:p>
          </table:table-cell>
          <table:table-cell table:style-name="TableRowCell" office:value-type="string">
            <text:p text:style-name="Table_20_Contents">USART (keyboard) serial flow</text:p>
          </table:table-cell>
          <table:table-cell table:style-name="TableRowCell" office:value-type="string">
            <text:p text:style-name="Table_20_Contents">Timer B</text:p>
          </table:table-cell>
        </table:table-row>
        <table:table-row>
          <table:table-cell table:style-name="TableRowCell" office:value-type="string">
            <text:p text:style-name="Table_20_Contents">7</text:p>
          </table:table-cell>
          <table:table-cell table:style-name="TableRowCell" office:value-type="string">
            <text:p text:style-name="Table_20_Contents">0111</text:p>
          </table:table-cell>
          <table:table-cell table:style-name="TableRowCell" office:value-type="string">
            <text:p text:style-name="Table_20_Contents">Unused</text:p>
          </table:table-cell>
          <table:table-cell table:style-name="TableRowCell" office:value-type="string">
            <text:p text:style-name="Table_20_Contents">General Purpose Interrupt 5 (15)</text:p>
          </table:table-cell>
        </table:table-row>
        <table:table-row>
          <table:table-cell table:style-name="TableRowCell" office:value-type="string">
            <text:p text:style-name="Table_20_Contents">6</text:p>
          </table:table-cell>
          <table:table-cell table:style-name="TableRowCell" office:value-type="string">
            <text:p text:style-name="Table_20_Contents">0110</text:p>
          </table:table-cell>
          <table:table-cell table:style-name="TableRowCell" office:value-type="string">
            <text:p text:style-name="Table_20_Contents">CRTC V-DISP signal status change</text:p>
          </table:table-cell>
          <table:table-cell table:style-name="TableRowCell" office:value-type="string">
            <text:p text:style-name="Table_20_Contents">General Purpose Interrupt 4 (14)</text:p>
          </table:table-cell>
        </table:table-row>
        <table:table-row>
          <table:table-cell table:style-name="TableRowCell" office:value-type="string">
            <text:p text:style-name="Table_20_Contents">5</text:p>
          </table:table-cell>
          <table:table-cell table:style-name="TableRowCell" office:value-type="string">
            <text:p text:style-name="Table_20_Contents">0101</text:p>
          </table:table-cell>
          <table:table-cell table:style-name="TableRowCell" office:value-type="string">
            <text:p text:style-name="Table_20_Contents">8-bit dedicated size (bus clock 4 MHz)</text:p>
          </table:table-cell>
          <table:table-cell table:style-name="TableRowCell" office:value-type="string">
            <text:p text:style-name="Table_20_Contents">Timer C</text:p>
          </table:table-cell>
        </table:table-row>
        <table:table-row>
          <table:table-cell table:style-name="TableRowCell" office:value-type="string">
            <text:p text:style-name="Table_20_Contents">4</text:p>
          </table:table-cell>
          <table:table-cell table:style-name="TableRowCell" office:value-type="string">
            <text:p text:style-name="Table_20_Contents">0100</text:p>
          </table:table-cell>
          <table:table-cell table:style-name="TableRowCell" office:value-type="string">
            <text:p text:style-name="Table_20_Contents">8-bit dedicated size (bus clock 4 MHz)</text:p>
          </table:table-cell>
          <table:table-cell table:style-name="TableRowCell" office:value-type="string">
            <text:p text:style-name="Table_20_Contents">Timer D</text:p>
          </table:table-cell>
        </table:table-row>
        <table:table-row>
          <table:table-cell table:style-name="TableRowCell" office:value-type="string">
            <text:p text:style-name="Table_20_Contents">3</text:p>
          </table:table-cell>
          <table:table-cell table:style-name="TableRowCell" office:value-type="string">
            <text:p text:style-name="Table_20_Contents">0011</text:p>
          </table:table-cell>
          <table:table-cell table:style-name="TableRowCell" office:value-type="string">
            <text:p text:style-name="Table_20_Contents">FM sound source interrupt mismatch detection</text:p>
          </table:table-cell>
          <table:table-cell table:style-name="TableRowCell" office:value-type="string">
            <text:p text:style-name="Table_20_Contents">General Purpose Interrupt 3 (13)</text:p>
          </table:table-cell>
        </table:table-row>
        <table:table-row>
          <table:table-cell table:style-name="TableRowCell" office:value-type="string">
            <text:p text:style-name="Table_20_Contents">2</text:p>
          </table:table-cell>
          <table:table-cell table:style-name="TableRowCell" office:value-type="string">
            <text:p text:style-name="Table_20_Contents">0010</text:p>
          </table:table-cell>
          <table:table-cell table:style-name="TableRowCell" office:value-type="string">
            <text:p text:style-name="Table_20_Contents">POWER SW ON/OFF status detection</text:p>
          </table:table-cell>
          <table:table-cell table:style-name="TableRowCell" office:value-type="string">
            <text:p text:style-name="Table_20_Contents">General Purpose Interrupt 2 (12)</text:p>
          </table:table-cell>
        </table:table-row>
        <table:table-row>
          <table:table-cell table:style-name="TableRowCell" office:value-type="string">
            <text:p text:style-name="Table_20_Contents">1</text:p>
          </table:table-cell>
          <table:table-cell table:style-name="TableRowCell" office:value-type="string">
            <text:p text:style-name="Table_20_Contents">0001</text:p>
          </table:table-cell>
          <table:table-cell table:style-name="TableRowCell" office:value-type="string">
            <text:p text:style-name="Table_20_Contents">Expansion I/O slot B EXPIOIN signal ON/OFF detection</text:p>
          </table:table-cell>
          <table:table-cell table:style-name="TableRowCell" office:value-type="string">
            <text:p text:style-name="Table_20_Contents">General Purpose Interrupt 1 (11)</text:p>
          </table:table-cell>
        </table:table-row>
        <table:table-row>
          <table:table-cell table:style-name="TableRowCell" office:value-type="string">
            <text:p text:style-name="Table_20_Contents">Low 0</text:p>
          </table:table-cell>
          <table:table-cell table:style-name="TableRowCell" office:value-type="string">
            <text:p text:style-name="Table_20_Contents">0000</text:p>
          </table:table-cell>
          <table:table-cell table:style-name="TableRowCell" office:value-type="string">
            <text:p text:style-name="Table_20_Contents">RTC ALARM signal ON/OFF detection</text:p>
          </table:table-cell>
          <table:table-cell table:style-name="TableRowCell" office:value-type="string">
            <text:p text:style-name="Table_20_Contents">General Purpose Interrupt 0 (10)</text:p>
          </table:table-cell>
        </table:table-row>
      </table:table>
      <text:p text:style-name="First_20_paragraph">Table A-6 Interrupts read out by MFP</text:p>
      <text:p text:style-name="Text_20_body">Page 195</text:p>
      <text:p text:style-name="Text_20_body">4-3 Settings for Interrupt Vectors</text:p>
      <text:p text:style-name="Text_20_body">-Assignee- -Register Address-</text:p>
      <text:p text:style-name="Text_20_body">MFP E88017H</text:p>
      <text:p text:style-name="Preformatted_20_Text"><text:s text:c="42"/>D07 <text:s text:c="4"/>D06 <text:s text:c="4"/>D05 <text:s text:c="4"/>D04 <text:s text:c="4"/>D03 <text:s text:c="4"/>D02 <text:s text:c="4"/>D01 <text:s text:c="4"/>D00</text:p>
      <text:p text:style-name="Preformatted_20_Text"><text:s text:c="42"/>─────── <text:s text:c="1"/>Setting <text:s text:c="2"/>─────── <text:s text:c="1"/>0: Automatic interrupt end</text:p>
      <text:p text:style-name="Preformatted_20_Text"><text:s text:c="91"/>1: Software interrupt ending</text:p>
      <text:p text:style-name="First_20_paragraph">SCC (Channels A, B shared) Write to Register 2</text:p>
      <text:p text:style-name="Text_20_body">DMAC (Channel 0) EB4025H (Normal Interrupt 0)</text:p>
      <text:p text:style-name="Text_20_body">(Internal 2HD) EB4027H (External Interrupt 0)</text:p>
      <text:p text:style-name="Text_20_body">DMAC (Channel 1) EB4065H (Normal Interrupt 0)</text:p>
      <text:p text:style-name="Text_20_body">(Hard Disk) EB4067H (External Interrupt 0)</text:p>
      <text:p text:style-name="Text_20_body">DMAC (Channel 2) EB40A5H (Normal Interrupt 0)</text:p>
      <text:p text:style-name="Text_20_body">(Memory: Memory) EB40A7H (External Interrupt 0)</text:p>
      <text:p text:style-name="Text_20_body">DMAC (Channel 3) EB40E5H (Normal Interrupt 0)</text:p>
      <text:p text:style-name="Text_20_body">(Audio Synthesis) EB40E7H<text:line-break/>(External Interrupt 0)</text:p>
      <text:p text:style-name="Text_20_body">Disk and Printer E9C ■■ 3H</text:p>
      <text:p text:style-name="Preformatted_20_Text"><text:s text:c="44"/>D07 <text:s text:c="4"/>D06 <text:s text:c="4"/>D05 <text:s text:c="4"/>D04 <text:s text:c="4"/>D03 <text:s text:c="4"/>D02 <text:s text:c="4"/>D01 <text:s text:c="4"/>D00</text:p>
      <text:p text:style-name="Preformatted_20_Text"><text:s text:c="44"/>──────────────── Setting ──────────────────</text:p>
      <text:p text:style-name="Preformatted_20_Text"/>
      <text:p text:style-name="Preformatted_20_Text"><text:s text:c="44"/>FDC Interrupt: 00</text:p>
      <text:p text:style-name="Preformatted_20_Text"><text:s text:c="44"/>FDD Interrupt: 01</text:p>
      <text:p text:style-name="Preformatted_20_Text"><text:s text:c="44"/>Hard Disk Interrupt: 01</text:p>
      <text:p text:style-name="Preformatted_20_Text"><text:s text:c="44"/>Printer Interrupt: 11</text:p>
      <text:p text:style-name="First_20_paragraph">Table A-7 Settings for Interrupt Vectors</text:p>
      <text:p text:style-name="Text_20_body">Page 196</text:p>
      <text:list text:style-name="Numbering_20_1" text:start-value="5">
        <text:list-item>
          <text:p text:style-name="List_20_Number_20_Tight">IPL (Initial Program Loader)</text:p>
        </text:list-item>
      </text:list>
      <text:list text:style-name="List_20_1">
        <text:list-item>
          <text:p text:style-name="List_20_Bullet">IPL ROM address: FC0000H ~ FFFFFFH (256 K bytes)</text:p>
        </text:list-item>
        <text:list-item>
          <text:p text:style-name="List_20_Bullet">Access:</text:p>
        </text:list-item>
      </text:list>
      <text:p text:style-name="Preformatted_20_Text"><text:s text:c="2"/>(1) Supervisor program, data area</text:p>
      <text:p text:style-name="Preformatted_20_Text"><text:s text:c="2"/>(2) Read-only</text:p>
      <text:p text:style-name="First_20_paragraph">At reset:</text:p>
      <text:list text:style-name="Numbering_20_1">
        <text:list-item>
          <text:p text:style-name="List_20_Number">At reset, the portion of IPL ROM 1 (FF****H) appears in the first 64 K bytes (000000H ~ 00FFFFH) of the memory map.</text:p>
        </text:list-item>
        <text:list-item>
          <text:p text:style-name="List_20_Number">From the beginning of this IPL ROM 1, the 68000 MPU will perform initializing processes, and the program counter and stack pointer values are written from the first two long words.</text:p>
        </text:list-item>
        <text:list-item>
          <text:p text:style-name="List_20_Number">When the reset signal is released, the MPU switches the two long words read from ROM (address control data) into the memory map and starts execution.</text:p>
        </text:list-item>
        <text:list-item>
          <text:p text:style-name="List_20_Number">The MPU processes the first instruction of the program counted from the address written into the two long words read previously. At the same time, the image inside IPL ROM 1 will disappear from the memory map (refer to Figure A-3).</text:p>
        </text:list-item>
      </text:list>
      <text:p text:style-name="First_20_paragraph">Note: The program counter and stack pointer value written at the top of the IPL ROM 1 are handled so that the IPL image of IPL ROM 1 does not disappear from the memory map by accessing outside the range (FC0000H ~ FFFFFFH) of IPL ROM 1.</text:p>
      <text:p text:style-name="Text_20_body">Only when the ROM image is powered on, or during manual reset, the use of the memory map (Figure A-2) will be observed. (During the execution of the reset command for the 68000 MPU, the ROM image will not appear.)</text:p>
      <text:p text:style-name="Text_20_body">[Figure descriptions:] Figure A-2: Reset time map Figure A-3: Reset processing map</text:p>
      <text:h text:style-name="Heading_20_1" text:outline-level="1"><text:bookmark-start text:name="id_6-character-code-table"/>6. Character Code Table<text:bookmark-end text:name="id_6-character-code-table"/></text:h>
      <table:table table:name="Table81" table:style-name="Table81">
        <table:table-column table:style-name="Table81.A"/>
        <table:table-column table:style-name="Table81.B"/>
        <table:table-column table:style-name="Table81.C"/>
        <table:table-column table:style-name="Table81.D"/>
        <table:table-column table:style-name="Table81.E"/>
        <table:table-column table:style-name="Table81.F"/>
        <table:table-column table:style-name="Table81.G"/>
        <table:table-column table:style-name="Table81.H"/>
        <table:table-column table:style-name="Table81.I"/>
        <table:table-column table:style-name="Table81.J"/>
        <table:table-column table:style-name="Table81.K"/>
        <table:table-column table:style-name="Table81.L"/>
        <table:table-column table:style-name="Table81.M"/>
        <table:table-column table:style-name="Table81.N"/>
        <table:table-column table:style-name="Table81.O"/>
        <table:table-column table:style-name="Table81.P"/>
        <table:table-column table:style-name="Table81.Q"/>
        <table:table-header-rows>
          <table:table-row>
            <table:table-cell table:style-name="TableHeaderRowCell" office:value-type="string">
              <text:p text:style-name="Table_20_Heading">Upper digit →</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cell table:style-name="TableHeaderRowCell" office:value-type="string">
              <text:p text:style-name="Table_20_Heading">3</text:p>
            </table:table-cell>
            <table:table-cell table:style-name="TableHeaderRowCell" office:value-type="string">
              <text:p text:style-name="Table_20_Heading">4</text:p>
            </table:table-cell>
            <table:table-cell table:style-name="TableHeaderRowCell" office:value-type="string">
              <text:p text:style-name="Table_20_Heading">5</text:p>
            </table:table-cell>
            <table:table-cell table:style-name="TableHeaderRowCell" office:value-type="string">
              <text:p text:style-name="Table_20_Heading">6</text:p>
            </table:table-cell>
            <table:table-cell table:style-name="TableHeaderRowCell" office:value-type="string">
              <text:p text:style-name="Table_20_Heading">7</text:p>
            </table:table-cell>
            <table:table-cell table:style-name="TableHeaderRowCell" office:value-type="string">
              <text:p text:style-name="Table_20_Heading">8</text:p>
            </table:table-cell>
            <table:table-cell table:style-name="TableHeaderRowCell" office:value-type="string">
              <text:p text:style-name="Table_20_Heading">9</text:p>
            </table:table-cell>
            <table:table-cell table:style-name="TableHeaderRowCell" office:value-type="string">
              <text:p text:style-name="Table_20_Heading">A</text:p>
            </table:table-cell>
            <table:table-cell table:style-name="TableHeaderRowCell" office:value-type="string">
              <text:p text:style-name="Table_20_Heading">B</text:p>
            </table:table-cell>
            <table:table-cell table:style-name="TableHeaderRowCell" office:value-type="string">
              <text:p text:style-name="Table_20_Heading">C</text:p>
            </table:table-cell>
            <table:table-cell table:style-name="TableHeaderRowCell" office:value-type="string">
              <text:p text:style-name="Table_20_Heading">D</text:p>
            </table:table-cell>
            <table:table-cell table:style-name="TableHeaderRowCell" office:value-type="string">
              <text:p text:style-name="Table_20_Heading">E</text:p>
            </table:table-cell>
            <table:table-cell table:style-name="TableHeaderRowCell" office:value-type="string">
              <text:p text:style-name="Table_20_Heading">F</text:p>
            </table:table-cell>
          </table:table-row>
        </table:table-header-rows>
        <table:table-row>
          <table:table-cell table:style-name="TableRowCell" office:value-type="string">
            <text:p text:style-name="Table_20_Contents">Lower digi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amp;</text:p>
          </table:table-cell>
        </table:table-row>
        <table:table-row>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2</text:p>
          </table:table-cell>
          <table:table-cell table:style-name="TableRowCell" office:value-type="string">
            <text:p text:style-name="Table_20_Contents">3</text:p>
          </table:table-cell>
          <table:table-cell table:style-name="TableRowCell" office:value-type="string">
            <text:p text:style-name="Table_20_Contents">4</text:p>
          </table:table-cell>
          <table:table-cell table:style-name="TableRowCell" office:value-type="string">
            <text:p text:style-name="Table_20_Contents">5</text:p>
          </table:table-cell>
          <table:table-cell table:style-name="TableRowCell" office:value-type="string">
            <text:p text:style-name="Table_20_Contents">6</text:p>
          </table:table-cell>
          <table:table-cell table:style-name="TableRowCell" office:value-type="string">
            <text:p text:style-name="Table_20_Contents">7</text:p>
          </table:table-cell>
          <table:table-cell table:style-name="TableRowCell" office:value-type="string">
            <text:p text:style-name="Table_20_Contents">8</text:p>
          </table:table-cell>
          <table:table-cell table:style-name="TableRowCell" office:value-type="string">
            <text:p text:style-name="Table_20_Contents">9</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lt;</text:p>
          </table:table-cell>
          <table:table-cell table:style-name="TableRowCell" office:value-type="string">
            <text:p text:style-name="Table_20_Contents">=</text:p>
          </table:table-cell>
          <table:table-cell table:style-name="TableRowCell" office:value-type="string">
            <text:p text:style-name="Table_20_Contents">&gt;</text:p>
          </table:table-cell>
          <table:table-cell table:style-name="TableRowCell" office:value-type="string">
            <text:p text:style-name="Table_20_Contents">?</text:p>
          </table:table-cell>
        </table:table-row>
        <table:table-row>
          <table:table-cell table:style-name="TableRowCell" office:value-type="string">
            <text:p text:style-name="Table_20_Contents">3</text:p>
          </table:table-cell>
          <table:table-cell table:style-name="TableRowCell" office:value-type="string">
            <text:p text:style-name="Table_20_Contents">@</text:p>
          </table:table-cell>
          <table:table-cell table:style-name="TableRowCell" office:value-type="string">
            <text:p text:style-name="Table_20_Contents">A</text:p>
          </table:table-cell>
          <table:table-cell table:style-name="TableRowCell" office:value-type="string">
            <text:p text:style-name="Table_20_Contents">B</text:p>
          </table:table-cell>
          <table:table-cell table:style-name="TableRowCell" office:value-type="string">
            <text:p text:style-name="Table_20_Contents">C</text:p>
          </table:table-cell>
          <table:table-cell table:style-name="TableRowCell" office:value-type="string">
            <text:p text:style-name="Table_20_Contents">D</text:p>
          </table:table-cell>
          <table:table-cell table:style-name="TableRowCell" office:value-type="string">
            <text:p text:style-name="Table_20_Contents">E</text:p>
          </table:table-cell>
          <table:table-cell table:style-name="TableRowCell" office:value-type="string">
            <text:p text:style-name="Table_20_Contents">F</text:p>
          </table:table-cell>
          <table:table-cell table:style-name="TableRowCell" office:value-type="string">
            <text:p text:style-name="Table_20_Contents">G</text:p>
          </table:table-cell>
          <table:table-cell table:style-name="TableRowCell" office:value-type="string">
            <text:p text:style-name="Table_20_Contents">H</text:p>
          </table:table-cell>
          <table:table-cell table:style-name="TableRowCell" office:value-type="string">
            <text:p text:style-name="Table_20_Contents">I</text:p>
          </table:table-cell>
          <table:table-cell table:style-name="TableRowCell" office:value-type="string">
            <text:p text:style-name="Table_20_Contents">J</text:p>
          </table:table-cell>
          <table:table-cell table:style-name="TableRowCell" office:value-type="string">
            <text:p text:style-name="Table_20_Contents">K</text:p>
          </table:table-cell>
          <table:table-cell table:style-name="TableRowCell" office:value-type="string">
            <text:p text:style-name="Table_20_Contents">L</text:p>
          </table:table-cell>
          <table:table-cell table:style-name="TableRowCell" office:value-type="string">
            <text:p text:style-name="Table_20_Contents">M</text:p>
          </table:table-cell>
          <table:table-cell table:style-name="TableRowCell" office:value-type="string">
            <text:p text:style-name="Table_20_Contents">N</text:p>
          </table:table-cell>
          <table:table-cell table:style-name="TableRowCell" office:value-type="string">
            <text:p text:style-name="Table_20_Contents">O</text:p>
          </table:table-cell>
        </table:table-row>
        <table:table-row>
          <table:table-cell table:style-name="TableRowCell" office:value-type="string">
            <text:p text:style-name="Table_20_Contents">4</text:p>
          </table:table-cell>
          <table:table-cell table:style-name="TableRowCell" office:value-type="string">
            <text:p text:style-name="Table_20_Contents">P</text:p>
          </table:table-cell>
          <table:table-cell table:style-name="TableRowCell" office:value-type="string">
            <text:p text:style-name="Table_20_Contents">Q</text:p>
          </table:table-cell>
          <table:table-cell table:style-name="TableRowCell" office:value-type="string">
            <text:p text:style-name="Table_20_Contents">R</text:p>
          </table:table-cell>
          <table:table-cell table:style-name="TableRowCell" office:value-type="string">
            <text:p text:style-name="Table_20_Contents">S</text:p>
          </table:table-cell>
          <table:table-cell table:style-name="TableRowCell" office:value-type="string">
            <text:p text:style-name="Table_20_Contents">T</text:p>
          </table:table-cell>
          <table:table-cell table:style-name="TableRowCell" office:value-type="string">
            <text:p text:style-name="Table_20_Contents">U</text:p>
          </table:table-cell>
          <table:table-cell table:style-name="TableRowCell" office:value-type="string">
            <text:p text:style-name="Table_20_Contents">V</text:p>
          </table:table-cell>
          <table:table-cell table:style-name="TableRowCell" office:value-type="string">
            <text:p text:style-name="Table_20_Contents">W</text:p>
          </table:table-cell>
          <table:table-cell table:style-name="TableRowCell" office:value-type="string">
            <text:p text:style-name="Table_20_Contents">X</text:p>
          </table:table-cell>
          <table:table-cell table:style-name="TableRowCell" office:value-type="string">
            <text:p text:style-name="Table_20_Contents">Y</text:p>
          </table:table-cell>
          <table:table-cell table:style-name="TableRowCell" office:value-type="string">
            <text:p text:style-name="Table_20_Contents">Z</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_</text:p>
          </table:table-cell>
        </table:table-row>
        <table:table-row>
          <table:table-cell table:style-name="TableRowCell" office:value-type="string">
            <text:p text:style-name="Table_20_Contents">5</text:p>
          </table:table-cell>
          <table:table-cell table:style-name="TableRowCell" office:value-type="string">
            <text:p text:style-name="Table_20_Contents">'</text:p>
          </table:table-cell>
          <table:table-cell table:style-name="TableRowCell" office:value-type="string">
            <text:p text:style-name="Table_20_Contents">a</text:p>
          </table:table-cell>
          <table:table-cell table:style-name="TableRowCell" office:value-type="string">
            <text:p text:style-name="Table_20_Contents">b</text:p>
          </table:table-cell>
          <table:table-cell table:style-name="TableRowCell" office:value-type="string">
            <text:p text:style-name="Table_20_Contents">c</text:p>
          </table:table-cell>
          <table:table-cell table:style-name="TableRowCell" office:value-type="string">
            <text:p text:style-name="Table_20_Contents">d</text:p>
          </table:table-cell>
          <table:table-cell table:style-name="TableRowCell" office:value-type="string">
            <text:p text:style-name="Table_20_Contents">e</text:p>
          </table:table-cell>
          <table:table-cell table:style-name="TableRowCell" office:value-type="string">
            <text:p text:style-name="Table_20_Contents">f</text:p>
          </table:table-cell>
          <table:table-cell table:style-name="TableRowCell" office:value-type="string">
            <text:p text:style-name="Table_20_Contents">g</text:p>
          </table:table-cell>
          <table:table-cell table:style-name="TableRowCell" office:value-type="string">
            <text:p text:style-name="Table_20_Contents">h</text:p>
          </table:table-cell>
          <table:table-cell table:style-name="TableRowCell" office:value-type="string">
            <text:p text:style-name="Table_20_Contents">i</text:p>
          </table:table-cell>
          <table:table-cell table:style-name="TableRowCell" office:value-type="string">
            <text:p text:style-name="Table_20_Contents">j</text:p>
          </table:table-cell>
          <table:table-cell table:style-name="TableRowCell" office:value-type="string">
            <text:p text:style-name="Table_20_Contents">k</text:p>
          </table:table-cell>
          <table:table-cell table:style-name="TableRowCell" office:value-type="string">
            <text:p text:style-name="Table_20_Contents">l</text:p>
          </table:table-cell>
          <table:table-cell table:style-name="TableRowCell" office:value-type="string">
            <text:p text:style-name="Table_20_Contents">m</text:p>
          </table:table-cell>
          <table:table-cell table:style-name="TableRowCell" office:value-type="string">
            <text:p text:style-name="Table_20_Contents">n</text:p>
          </table:table-cell>
          <table:table-cell table:style-name="TableRowCell" office:value-type="string">
            <text:p text:style-name="Table_20_Contents">o</text:p>
          </table:table-cell>
        </table:table-row>
        <table:table-row>
          <table:table-cell table:style-name="TableRowCell" office:value-type="string">
            <text:p text:style-name="Table_20_Contents">6</text:p>
          </table:table-cell>
          <table:table-cell table:style-name="TableRowCell" office:value-type="string">
            <text:p text:style-name="Table_20_Contents">p</text:p>
          </table:table-cell>
          <table:table-cell table:style-name="TableRowCell" office:value-type="string">
            <text:p text:style-name="Table_20_Contents">q</text:p>
          </table:table-cell>
          <table:table-cell table:style-name="TableRowCell" office:value-type="string">
            <text:p text:style-name="Table_20_Contents">r</text:p>
          </table:table-cell>
          <table:table-cell table:style-name="TableRowCell" office:value-type="string">
            <text:p text:style-name="Table_20_Contents">s</text:p>
          </table:table-cell>
          <table:table-cell table:style-name="TableRowCell" office:value-type="string">
            <text:p text:style-name="Table_20_Contents">t</text:p>
          </table:table-cell>
          <table:table-cell table:style-name="TableRowCell" office:value-type="string">
            <text:p text:style-name="Table_20_Contents">u</text:p>
          </table:table-cell>
          <table:table-cell table:style-name="TableRowCell" office:value-type="string">
            <text:p text:style-name="Table_20_Contents">v</text:p>
          </table:table-cell>
          <table:table-cell table:style-name="TableRowCell" office:value-type="string">
            <text:p text:style-name="Table_20_Contents">w</text:p>
          </table:table-cell>
          <table:table-cell table:style-name="TableRowCell" office:value-type="string">
            <text:p text:style-name="Table_20_Contents">x</text:p>
          </table:table-cell>
          <table:table-cell table:style-name="TableRowCell" office:value-type="string">
            <text:p text:style-name="Table_20_Contents">y</text:p>
          </table:table-cell>
          <table:table-cell table:style-name="TableRowCell" office:value-type="string">
            <text:p text:style-name="Table_20_Contents">z</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あ</text:p>
          </table:table-cell>
          <table:table-cell table:style-name="TableRowCell" office:value-type="string">
            <text:p text:style-name="Table_20_Contents">い</text:p>
          </table:table-cell>
          <table:table-cell table:style-name="TableRowCell" office:value-type="string">
            <text:p text:style-name="Table_20_Contents">う</text:p>
          </table:table-cell>
          <table:table-cell table:style-name="TableRowCell" office:value-type="string">
            <text:p text:style-name="Table_20_Contents">え</text:p>
          </table:table-cell>
          <table:table-cell table:style-name="TableRowCell" office:value-type="string">
            <text:p text:style-name="Table_20_Contents">お</text:p>
          </table:table-cell>
          <table:table-cell table:style-name="TableRowCell" office:value-type="string">
            <text:p text:style-name="Table_20_Contents">か</text:p>
          </table:table-cell>
          <table:table-cell table:style-name="TableRowCell" office:value-type="string">
            <text:p text:style-name="Table_20_Contents">き</text:p>
          </table:table-cell>
          <table:table-cell table:style-name="TableRowCell" office:value-type="string">
            <text:p text:style-name="Table_20_Contents">く</text:p>
          </table:table-cell>
          <table:table-cell table:style-name="TableRowCell" office:value-type="string">
            <text:p text:style-name="Table_20_Contents">け</text:p>
          </table:table-cell>
          <table:table-cell table:style-name="TableRowCell" office:value-type="string">
            <text:p text:style-name="Table_20_Contents">こ</text:p>
          </table:table-cell>
          <table:table-cell table:style-name="TableRowCell" office:value-type="string">
            <text:p text:style-name="Table_20_Contents">さ</text:p>
          </table:table-cell>
          <table:table-cell table:style-name="TableRowCell" office:value-type="string">
            <text:p text:style-name="Table_20_Contents">し</text:p>
          </table:table-cell>
          <table:table-cell table:style-name="TableRowCell" office:value-type="string">
            <text:p text:style-name="Table_20_Contents">す</text:p>
          </table:table-cell>
          <table:table-cell table:style-name="TableRowCell" office:value-type="string">
            <text:p text:style-name="Table_20_Contents">せ</text:p>
          </table:table-cell>
          <table:table-cell table:style-name="TableRowCell" office:value-type="string">
            <text:p text:style-name="Table_20_Contents">そ</text:p>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た</text:p>
          </table:table-cell>
          <table:table-cell table:style-name="TableRowCell" office:value-type="string">
            <text:p text:style-name="Table_20_Contents">ち</text:p>
          </table:table-cell>
          <table:table-cell table:style-name="TableRowCell" office:value-type="string">
            <text:p text:style-name="Table_20_Contents">つ</text:p>
          </table:table-cell>
          <table:table-cell table:style-name="TableRowCell" office:value-type="string">
            <text:p text:style-name="Table_20_Contents">て</text:p>
          </table:table-cell>
          <table:table-cell table:style-name="TableRowCell" office:value-type="string">
            <text:p text:style-name="Table_20_Contents">と</text:p>
          </table:table-cell>
          <table:table-cell table:style-name="TableRowCell" office:value-type="string">
            <text:p text:style-name="Table_20_Contents">な</text:p>
          </table:table-cell>
          <table:table-cell table:style-name="TableRowCell" office:value-type="string">
            <text:p text:style-name="Table_20_Contents">に</text:p>
          </table:table-cell>
          <table:table-cell table:style-name="TableRowCell" office:value-type="string">
            <text:p text:style-name="Table_20_Contents">ぬ</text:p>
          </table:table-cell>
          <table:table-cell table:style-name="TableRowCell" office:value-type="string">
            <text:p text:style-name="Table_20_Contents">ね</text:p>
          </table:table-cell>
          <table:table-cell table:style-name="TableRowCell" office:value-type="string">
            <text:p text:style-name="Table_20_Contents">の</text:p>
          </table:table-cell>
          <table:table-cell table:style-name="TableRowCell" office:value-type="string">
            <text:p text:style-name="Table_20_Contents">は</text:p>
          </table:table-cell>
          <table:table-cell table:style-name="TableRowCell" office:value-type="string">
            <text:p text:style-name="Table_20_Contents">ひ</text:p>
          </table:table-cell>
          <table:table-cell table:style-name="TableRowCell" office:value-type="string">
            <text:p text:style-name="Table_20_Contents">ふ</text:p>
          </table:table-cell>
          <table:table-cell table:style-name="TableRowCell" office:value-type="string">
            <text:p text:style-name="Table_20_Contents">へ</text:p>
          </table:table-cell>
          <table:table-cell table:style-name="TableRowCell" office:value-type="string">
            <text:p text:style-name="Table_20_Contents">ほ</text:p>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ま</text:p>
          </table:table-cell>
          <table:table-cell table:style-name="TableRowCell" office:value-type="string">
            <text:p text:style-name="Table_20_Contents">み</text:p>
          </table:table-cell>
          <table:table-cell table:style-name="TableRowCell" office:value-type="string">
            <text:p text:style-name="Table_20_Contents">む</text:p>
          </table:table-cell>
          <table:table-cell table:style-name="TableRowCell" office:value-type="string">
            <text:p text:style-name="Table_20_Contents">め</text:p>
          </table:table-cell>
          <table:table-cell table:style-name="TableRowCell" office:value-type="string">
            <text:p text:style-name="Table_20_Contents">も</text:p>
          </table:table-cell>
          <table:table-cell table:style-name="TableRowCell" office:value-type="string">
            <text:p text:style-name="Table_20_Contents">や</text:p>
          </table:table-cell>
          <table:table-cell table:style-name="TableRowCell" office:value-type="string">
            <text:p text:style-name="Table_20_Contents">ゆ</text:p>
          </table:table-cell>
          <table:table-cell table:style-name="TableRowCell" office:value-type="string">
            <text:p text:style-name="Table_20_Contents">よ</text:p>
          </table:table-cell>
          <table:table-cell table:style-name="TableRowCell" office:value-type="string">
            <text:p text:style-name="Table_20_Contents">ら</text:p>
          </table:table-cell>
          <table:table-cell table:style-name="TableRowCell" office:value-type="string">
            <text:p text:style-name="Table_20_Contents">り</text:p>
          </table:table-cell>
          <table:table-cell table:style-name="TableRowCell" office:value-type="string">
            <text:p text:style-name="Table_20_Contents">る</text:p>
          </table:table-cell>
          <table:table-cell table:style-name="TableRowCell" office:value-type="string">
            <text:p text:style-name="Table_20_Contents">れ</text:p>
          </table:table-cell>
          <table:table-cell table:style-name="TableRowCell" office:value-type="string">
            <text:p text:style-name="Table_20_Contents">ろ</text:p>
          </table:table-cell>
          <table:table-cell table:style-name="TableRowCell" office:value-type="string">
            <text:p text:style-name="Table_20_Contents">わ</text:p>
          </table:table-cell>
          <table:table-cell table:style-name="TableRowCell" office:value-type="string">
            <text:p text:style-name="Table_20_Contents">を</text:p>
          </table:table-cell>
          <table:table-cell table:style-name="TableRowCell" office:value-type="string">
    </table:table-cell>
        </table:table-row>
        <table:table-row>
          <table:table-cell table:style-name="TableRowCell" office:value-type="string">
            <text:p text:style-name="Table_20_Contents">A</text:p>
          </table:table-cell>
          <table:table-cell table:style-name="TableRowCell" office:value-type="string">
            <text:p text:style-name="Table_20_Contents">ん</text:p>
          </table:table-cell>
          <table:table-cell table:style-name="TableRowCell" office:value-type="string">
            <text:p text:style-name="Table_20_Contents">ア</text:p>
          </table:table-cell>
          <table:table-cell table:style-name="TableRowCell" office:value-type="string">
            <text:p text:style-name="Table_20_Contents">イ</text:p>
          </table:table-cell>
          <table:table-cell table:style-name="TableRowCell" office:value-type="string">
            <text:p text:style-name="Table_20_Contents">ウ</text:p>
          </table:table-cell>
          <table:table-cell table:style-name="TableRowCell" office:value-type="string">
            <text:p text:style-name="Table_20_Contents">エ</text:p>
          </table:table-cell>
          <table:table-cell table:style-name="TableRowCell" office:value-type="string">
            <text:p text:style-name="Table_20_Contents">オ</text:p>
          </table:table-cell>
          <table:table-cell table:style-name="TableRowCell" office:value-type="string">
            <text:p text:style-name="Table_20_Contents">カ</text:p>
          </table:table-cell>
          <table:table-cell table:style-name="TableRowCell" office:value-type="string">
            <text:p text:style-name="Table_20_Contents">キ</text:p>
          </table:table-cell>
          <table:table-cell table:style-name="TableRowCell" office:value-type="string">
            <text:p text:style-name="Table_20_Contents">ク</text:p>
          </table:table-cell>
          <table:table-cell table:style-name="TableRowCell" office:value-type="string">
            <text:p text:style-name="Table_20_Contents">ケ</text:p>
          </table:table-cell>
          <table:table-cell table:style-name="TableRowCell" office:value-type="string">
            <text:p text:style-name="Table_20_Contents">コ</text:p>
          </table:table-cell>
          <table:table-cell table:style-name="TableRowCell" office:value-type="string">
            <text:p text:style-name="Table_20_Contents">サ</text:p>
          </table:table-cell>
          <table:table-cell table:style-name="TableRowCell" office:value-type="string">
            <text:p text:style-name="Table_20_Contents">シ</text:p>
          </table:table-cell>
          <table:table-cell table:style-name="TableRowCell" office:value-type="string">
            <text:p text:style-name="Table_20_Contents">ス</text:p>
          </table:table-cell>
          <table:table-cell table:style-name="TableRowCell" office:value-type="string">
            <text:p text:style-name="Table_20_Contents">セ</text:p>
          </table:table-cell>
          <table:table-cell table:style-name="TableRowCell" office:value-type="string">
            <text:p text:style-name="Table_20_Contents">ソ</text:p>
          </table:table-cell>
        </table:table-row>
        <table:table-row>
          <table:table-cell table:style-name="TableRowCell" office:value-type="string">
            <text:p text:style-name="Table_20_Contents">B</text:p>
          </table:table-cell>
          <table:table-cell table:style-name="TableRowCell" office:value-type="string">
            <text:p text:style-name="Table_20_Contents">タ</text:p>
          </table:table-cell>
          <table:table-cell table:style-name="TableRowCell" office:value-type="string">
            <text:p text:style-name="Table_20_Contents">チ</text:p>
          </table:table-cell>
          <table:table-cell table:style-name="TableRowCell" office:value-type="string">
            <text:p text:style-name="Table_20_Contents">ツ</text:p>
          </table:table-cell>
          <table:table-cell table:style-name="TableRowCell" office:value-type="string">
            <text:p text:style-name="Table_20_Contents">テ</text:p>
          </table:table-cell>
          <table:table-cell table:style-name="TableRowCell" office:value-type="string">
            <text:p text:style-name="Table_20_Contents">ト</text:p>
          </table:table-cell>
          <table:table-cell table:style-name="TableRowCell" office:value-type="string">
            <text:p text:style-name="Table_20_Contents">ナ</text:p>
          </table:table-cell>
          <table:table-cell table:style-name="TableRowCell" office:value-type="string">
            <text:p text:style-name="Table_20_Contents">ニ</text:p>
          </table:table-cell>
          <table:table-cell table:style-name="TableRowCell" office:value-type="string">
            <text:p text:style-name="Table_20_Contents">ヌ</text:p>
          </table:table-cell>
          <table:table-cell table:style-name="TableRowCell" office:value-type="string">
            <text:p text:style-name="Table_20_Contents">ネ</text:p>
          </table:table-cell>
          <table:table-cell table:style-name="TableRowCell" office:value-type="string">
            <text:p text:style-name="Table_20_Contents">ノ</text:p>
          </table:table-cell>
          <table:table-cell table:style-name="TableRowCell" office:value-type="string">
            <text:p text:style-name="Table_20_Contents">ハ</text:p>
          </table:table-cell>
          <table:table-cell table:style-name="TableRowCell" office:value-type="string">
            <text:p text:style-name="Table_20_Contents">ヒ</text:p>
          </table:table-cell>
          <table:table-cell table:style-name="TableRowCell" office:value-type="string">
            <text:p text:style-name="Table_20_Contents">フ</text:p>
          </table:table-cell>
          <table:table-cell table:style-name="TableRowCell" office:value-type="string">
            <text:p text:style-name="Table_20_Contents">ヘ</text:p>
          </table:table-cell>
          <table:table-cell table:style-name="TableRowCell" office:value-type="string">
            <text:p text:style-name="Table_20_Contents">ホ</text:p>
          </table:table-cell>
          <table:table-cell table:style-name="TableRowCell" office:value-type="string">
    </table:table-cell>
        </table:table-row>
        <table:table-row>
          <table:table-cell table:style-name="TableRowCell" office:value-type="string">
            <text:p text:style-name="Table_20_Contents">C</text:p>
          </table:table-cell>
          <table:table-cell table:style-name="TableRowCell" office:value-type="string">
            <text:p text:style-name="Table_20_Contents">マ</text:p>
          </table:table-cell>
          <table:table-cell table:style-name="TableRowCell" office:value-type="string">
            <text:p text:style-name="Table_20_Contents">ミ</text:p>
          </table:table-cell>
          <table:table-cell table:style-name="TableRowCell" office:value-type="string">
            <text:p text:style-name="Table_20_Contents">ム</text:p>
          </table:table-cell>
          <table:table-cell table:style-name="TableRowCell" office:value-type="string">
            <text:p text:style-name="Table_20_Contents">メ</text:p>
          </table:table-cell>
          <table:table-cell table:style-name="TableRowCell" office:value-type="string">
            <text:p text:style-name="Table_20_Contents">モ</text:p>
          </table:table-cell>
          <table:table-cell table:style-name="TableRowCell" office:value-type="string">
            <text:p text:style-name="Table_20_Contents">ヤ</text:p>
          </table:table-cell>
          <table:table-cell table:style-name="TableRowCell" office:value-type="string">
            <text:p text:style-name="Table_20_Contents">ユ</text:p>
          </table:table-cell>
          <table:table-cell table:style-name="TableRowCell" office:value-type="string">
            <text:p text:style-name="Table_20_Contents">ヨ</text:p>
          </table:table-cell>
          <table:table-cell table:style-name="TableRowCell" office:value-type="string">
            <text:p text:style-name="Table_20_Contents">ラ</text:p>
          </table:table-cell>
          <table:table-cell table:style-name="TableRowCell" office:value-type="string">
            <text:p text:style-name="Table_20_Contents">リ</text:p>
          </table:table-cell>
          <table:table-cell table:style-name="TableRowCell" office:value-type="string">
            <text:p text:style-name="Table_20_Contents">ル</text:p>
          </table:table-cell>
          <table:table-cell table:style-name="TableRowCell" office:value-type="string">
            <text:p text:style-name="Table_20_Contents">レ</text:p>
          </table:table-cell>
          <table:table-cell table:style-name="TableRowCell" office:value-type="string">
            <text:p text:style-name="Table_20_Contents">ロ</text:p>
          </table:table-cell>
          <table:table-cell table:style-name="TableRowCell" office:value-type="string">
            <text:p text:style-name="Table_20_Contents">ワ</text:p>
          </table:table-cell>
          <table:table-cell table:style-name="TableRowCell" office:value-type="string">
            <text:p text:style-name="Table_20_Contents">ン</text:p>
          </table:table-cell>
          <table:table-cell table:style-name="TableRowCell" office:value-type="string">
            <text:p text:style-name="Table_20_Contents">ヲ</text:p>
          </table:table-cell>
        </table:table-row>
        <table:table-row>
          <table:table-cell table:style-name="TableRowCell" office:value-type="string">
            <text:p text:style-name="Table_20_Contents">D</text:p>
          </table:table-cell>
          <table:table-cell table:style-name="TableRowCell" office:value-type="string">
            <text:p text:style-name="Table_20_Contents">a</text:p>
          </table:table-cell>
          <table:table-cell table:style-name="TableRowCell" office:value-type="string">
            <text:p text:style-name="Table_20_Contents">b</text:p>
          </table:table-cell>
          <table:table-cell table:style-name="TableRowCell" office:value-type="string">
            <text:p text:style-name="Table_20_Contents">c</text:p>
          </table:table-cell>
          <table:table-cell table:style-name="TableRowCell" office:value-type="string">
            <text:p text:style-name="Table_20_Contents">d</text:p>
          </table:table-cell>
          <table:table-cell table:style-name="TableRowCell" office:value-type="string">
            <text:p text:style-name="Table_20_Contents">e</text:p>
          </table:table-cell>
          <table:table-cell table:style-name="TableRowCell" office:value-type="string">
            <text:p text:style-name="Table_20_Contents">f</text:p>
          </table:table-cell>
          <table:table-cell table:style-name="TableRowCell" office:value-type="string">
            <text:p text:style-name="Table_20_Contents">g</text:p>
          </table:table-cell>
          <table:table-cell table:style-name="TableRowCell" office:value-type="string">
            <text:p text:style-name="Table_20_Contents">h</text:p>
          </table:table-cell>
          <table:table-cell table:style-name="TableRowCell" office:value-type="string">
            <text:p text:style-name="Table_20_Contents">i</text:p>
          </table:table-cell>
          <table:table-cell table:style-name="TableRowCell" office:value-type="string">
            <text:p text:style-name="Table_20_Contents">j</text:p>
          </table:table-cell>
          <table:table-cell table:style-name="TableRowCell" office:value-type="string">
            <text:p text:style-name="Table_20_Contents">k</text:p>
          </table:table-cell>
          <table:table-cell table:style-name="TableRowCell" office:value-type="string">
            <text:p text:style-name="Table_20_Contents">l</text:p>
          </table:table-cell>
          <table:table-cell table:style-name="TableRowCell" office:value-type="string">
            <text:p text:style-name="Table_20_Contents">m</text:p>
          </table:table-cell>
          <table:table-cell table:style-name="TableRowCell" office:value-type="string">
            <text:p text:style-name="Table_20_Contents">n</text:p>
          </table:table-cell>
          <table:table-cell table:style-name="TableRowCell" office:value-type="string">
            <text:p text:style-name="Table_20_Contents">o</text:p>
          </table:table-cell>
          <table:table-cell table:style-name="TableRowCell" office:value-type="string">
            <text:p text:style-name="Table_20_Contents">p</text:p>
          </table:table-cell>
        </table:table-row>
        <table:table-row>
          <table:table-cell table:style-name="TableRowCell" office:value-type="string">
            <text:p text:style-name="Table_20_Contents">E</text:p>
          </table:table-cell>
          <table:table-cell table:style-name="TableRowCell" office:value-type="string">
            <text:p text:style-name="Table_20_Contents">q</text:p>
          </table:table-cell>
          <table:table-cell table:style-name="TableRowCell" office:value-type="string">
            <text:p text:style-name="Table_20_Contents">r</text:p>
          </table:table-cell>
          <table:table-cell table:style-name="TableRowCell" office:value-type="string">
            <text:p text:style-name="Table_20_Contents">s</text:p>
          </table:table-cell>
          <table:table-cell table:style-name="TableRowCell" office:value-type="string">
            <text:p text:style-name="Table_20_Contents">t</text:p>
          </table:table-cell>
          <table:table-cell table:style-name="TableRowCell" office:value-type="string">
            <text:p text:style-name="Table_20_Contents">u</text:p>
          </table:table-cell>
          <table:table-cell table:style-name="TableRowCell" office:value-type="string">
            <text:p text:style-name="Table_20_Contents">v</text:p>
          </table:table-cell>
          <table:table-cell table:style-name="TableRowCell" office:value-type="string">
            <text:p text:style-name="Table_20_Contents">w</text:p>
          </table:table-cell>
          <table:table-cell table:style-name="TableRowCell" office:value-type="string">
            <text:p text:style-name="Table_20_Contents">x</text:p>
          </table:table-cell>
          <table:table-cell table:style-name="TableRowCell" office:value-type="string">
            <text:p text:style-name="Table_20_Contents">y</text:p>
          </table:table-cell>
          <table:table-cell table:style-name="TableRowCell" office:value-type="string">
            <text:p text:style-name="Table_20_Contents">z</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text:p>
          </table:table-cell>
          <table:table-cell table:style-name="TableRowCell" office:value-type="string">
    </table:table-cell>
          <table:table-cell table:style-name="TableRowCell" office:value-type="string">
    </table:table-cell>
          <table:table-cell table:style-name="TableRowCell" office:value-type="string">
            <text:p text:style-name="Table_20_Contents">の</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able A-8: Character Code Table</text:p>
      <text:p text:style-name="Text_20_body">Kanji codes comply with JIS C-6226-1983. For details, please refer to the instruction manual attached to the X68000 main unit.</text:p>
      <text:p text:style-name="Text_20_body">Index</text:p>
      <text:p text:style-name="Text_20_body">Index</text:p>
      <text:p text:style-name="Text_20_body">Odds Field .................. 81 Character Clock ........... 52, 54 Carrier .................. 91 Central Processing Unit .......... 10, 27 Forced READY .......... 157 Expected Resolution .......... 81</text:p>
      <text:p text:style-name="Text_20_body">Page 200</text:p>
      <text:p text:style-name="Text_20_body">Graphics Palette Address ............................ 14, 18, 21, 22, 72</text:p>
      <text:p text:style-name="Text_20_body">Graphics Screen .................................. 5, 10, 14, 23, 60, 62, 63, 66</text:p>
      <text:p text:style-name="Text_20_body">Graphics Actual Screen Address.............. 17, 19</text:p>
      <text:p text:style-name="Text_20_body">Graphics Actual Screen Address Placement ... 20</text:p>
      <text:p text:style-name="Text_20_body">Decoration........................................... 95, 100</text:p>
      <text:p text:style-name="Text_20_body">High Resolution ..................................... 5, 9, 11, 14, 26, 28, 45, 46, 51, 82</text:p>
      <text:p text:style-name="Text_20_body">High Resolution Clear .......................... 30, 33, 34</text:p>
      <text:p text:style-name="Text_20_body">High Brightness ....................................... 84</text:p>
      <text:p text:style-name="Text_20_body">Command Port .................................. 141, 142</text:p>
      <text:p text:style-name="Text_20_body">Control Signal ....................................... 169</text:p>
      <text:p text:style-name="Text_20_body">Control Panel .................................. 119, 140</text:p>
      <text:p text:style-name="Text_20_body">Control Register ......................... 25, 28</text:p>
      <text:p text:style-name="Text_20_body">Control Word Register ........ 116, 186</text:p>
      <text:p text:style-name="Text_20_body">Computer Screen ............................................. 27</text:p>
      <text:p text:style-name="Text_20_body">Silkscreen Steel ............................................120</text:p>
      <text:p text:style-name="Text_20_body">Sign Table .......................................................... 93</text:p>
      <text:p text:style-name="Text_20_body">Significance ............................................................95</text:p>
      <text:p text:style-name="Text_20_body">Sound Function .......................................................83</text:p>
      <text:p text:style-name="Text_20_body">Sound CPU .............................................................. 160</text:p>
      <text:p text:style-name="Text_20_body">Triangle Mark............................................................. 94</text:p>
      <text:p text:style-name="Text_20_body">Sampling Count ............................ 114, 115, 116, 117</text:p>
      <text:p text:style-name="Text_20_body">System ............................................................... 7</text:p>
      <text:p text:style-name="Text_20_body">System Report ......................................................... 192</text:p>
      <text:p text:style-name="Text_20_body">System Register ................................................81, 104, 107</text:p>
      <text:p text:style-name="Text_20_body">Frequency Counter ............................. 91, 104, 107</text:p>
      <text:p text:style-name="Text_20_body">Seal ..................................................... 107</text:p>
      <text:p text:style-name="Text_20_body">Serial Interface ......................................................... 33</text:p>
      <text:p text:style-name="Text_20_body">Flip Screen ........................................................... 60</text:p>
      <text:p text:style-name="Text_20_body">Time Counter............... 91, 104, 107</text:p>
      <text:p text:style-name="Text_20_body">Joystick ............................................ 2, 116, 179, 186</text:p>
      <text:p text:style-name="Text_20_body">Joystick Controller .......................... 180</text:p>
      <text:p text:style-name="Text_20_body">Information Field ................................... 139</text:p>
      <text:p text:style-name="Text_20_body">Synchronization Signal ...................... 82</text:p>
      <text:p text:style-name="Text_20_body">Vertical Display Start Location .............. 44</text:p>
      <text:p text:style-name="Text_20_body">Switch .......................................................... 183</text:p>
      <text:p text:style-name="Text_20_body">Horizontal Position Fine Adjustment..... 27</text:p>
      <text:p text:style-name="Text_20_body">Horizontal Position Signal ........................... 2, 14, 27, 52, 53, 71, 80</text:p>
      <text:p text:style-name="Text_20_body">Horizontal Display Area .............................................191</text:p>
      <text:p text:style-name="Text_20_body">Scroll ........................................................... 23</text:p>
      <text:p text:style-name="Text_20_body">Scroll Register ........................................................ 34</text:p>
      <text:p text:style-name="Text_20_body">Scro Compact disc ...................... 86, 92, 95, 96</text:p>
      <text:p text:style-name="Text_20_body">Star Bit............................................................ 140</text:p>
      <text:p text:style-name="Text_20_body">Status Register .................................................153</text:p>
      <text:p text:style-name="Text_20_body">Stop Bit........................................... 139, 140</text:p>
      <text:p text:style-name="Text_20_body">Stroke ........................................................... 183</text:p>
      <text:p text:style-name="Text_20_body">Sprite ................................... 1, 4, 6, 35</text:p>
      <text:p text:style-name="Text_20_body">Sprite Access ................. 46</text:p>
      <text:p text:style-name="Text_20_body">Sprite Virtual Resolution..................................... 40</text:p>
      <text:p text:style-name="Text_20_body">Sprite High Color Table ................................................... 49</text:p>
      <text:p text:style-name="Text_20_body">Sprite High Resolution Screen ............. 10, 60, 62</text:p>
      <text:p text:style-name="Text_20_body">Sprite Code .................. 38, 39, 47</text:p>
      <text:p text:style-name="Text_20_body">Sprite Controller ........................................3, 9</text:p>
      <text:p text:style-name="Text_20_body">Sprite Scroll Register ............................ 36, 37, 40, 51, 52</text:p>
      <text:p text:style-name="Text_20_body">Sprite Palette Address ................................................ 49</text:p>
      <text:p text:style-name="Text_20_body">Sprite Register Address .................................36, 38</text:p>
      <text:p text:style-name="Text_20_body">Smooth Scroll........................................................ 6</text:p>
      <text:p text:style-name="Text_20_body">Slot .....................................4, 86, 88, 89, 101, 103</text:p>
      <text:p text:style-name="Text_20_body">Set ................................................... 91, 112</text:p>
      <text:p text:style-name="Text_20_body">Centronics ................................................. 181</text:p>
      <text:p text:style-name="Text_20_body">Full Angle ........................................ 139</text:p>
      <text:p text:style-name="Text_20_body">Full Width Character............................................. 74</text:p>
      <text:p text:style-name="Text_20_body">Running Frequency............................................45</text:p>
      <text:p text:style-name="Text_20_body">Running Style ................................ ............81</text:p>
      <text:p text:style-name="Text_20_body">Title ......................................... 109, 110, 111, 123, 124, 125, 127, 135, 168, 185</text:p>
      <text:p text:style-name="Text_20_body">Title Fill In ........................ 177</text:p>
      <text:p text:style-name="Text_20_body">First Horizontal Character..........................180</text:p>
      <text:p text:style-name="Text_20_body">Second Horizontal Character.......................74</text:p>
      <text:p text:style-name="Text_20_body">Page 201</text:p>
      <text:p text:style-name="Text_20_body">Index</text:p>
      <text:p text:style-name="Text_20_body"><text:span text:style-name="Strong_20_Emphasis">Symbol Resolution Degree</text:span></text:p>
      <text:p text:style-name="Text_20_body">..5, 9, 11, 14, 26, 28, 45, 46, 51, 54, 71, 80<text:line-break/>Bit Map...............................9<text:line-break/>Video Controller.....................3, 9, 55, 69<text:line-break/>Video Controller Register..........56, 57<text:line-break/>Video Screen.......................27, 84, 86, 91, 94</text:p>
      <text:p text:style-name="Text_20_body"><text:span text:style-name="Strong_20_Emphasis">(a)</text:span> Feedback............................86, 101<text:line-break/>Format.............................107, 148, 152<text:line-break/>Font.......................................74<text:line-break/>Label................................139<text:line-break/>Flag.........................86, 110, 111, 139<text:line-break/>Framing..............................139<text:line-break/>Floppy Disk Drive.....................2, 185<text:line-break/>Block Diagram........................7<text:line-break/>Block Transfer....................120<text:line-break/>Branch................................100, 107<text:line-break/>Priority...1, 6, 35, 41, 55, 57, 60, 62, 63<text:line-break/>Processor.............................125<text:line-break/>Print...................2, 155, 181<text:line-break/>Print Access.......................182<text:line-break/>Plain.................11, 17, 29</text:p>
      <text:p text:style-name="Text_20_body"><text:span text:style-name="Strong_20_Emphasis">(i)</text:span> Vector....................................117<text:line-break/>Transformation.............84, 107, 148</text:p>
      <text:p text:style-name="Text_20_body"><text:span text:style-name="Strong_20_Emphasis">(u)</text:span> Border Color.........................55<text:line-break/>Ball Point...........................140<text:line-break/>Point Generator.........................141<text:line-break/>Point...........................32<text:line-break/>Boarding..................................182</text:p>
      <text:p text:style-name="Text_20_body"><text:span text:style-name="Strong_20_Emphasis">(e)</text:span> Mouse.................2, 139, 159, 174<text:line-break/>Mouse Access......................176<text:line-break/>Mouse Control.........162, 175, 177<text:line-break/>Mouse Data............175, 176, 178<text:line-break/>Mouse Trackball....................2</text:p>
      <text:p text:style-name="Text_20_body"><text:span text:style-name="Strong_20_Emphasis">(o)</text:span> Main Memory......................120<text:line-break/>Media.................................156<text:line-break/>Memory.................................4<text:line-break/>Memory Map.....8, 11, 17, 18, 19, 20</text:p>
      <text:p text:style-name="Text_20_body"><text:span text:style-name="Strong_20_Emphasis">(k)</text:span> Mode Register.....................36<text:line-break/>Modulator.......................91<text:line-break/>Monochrome.......................139</text:p>
      <text:p text:style-name="Text_20_body"><text:span text:style-name="Strong_20_Emphasis">(s)</text:span> User Domain.......................191</text:p>
      <text:p text:style-name="Text_20_body"><text:span text:style-name="Strong_20_Emphasis">(ra)</text:span> Raster Address........25, 27, 33, 125<text:line-break/>Raster Copy Bit Mask............33</text:p>
      <text:p text:style-name="Text_20_body"><text:span text:style-name="Strong_20_Emphasis">(tu)</text:span> Real-Time Clock...................142<text:line-break/>Reset.............87, 90, 183<text:line-break/>Repeat................................160<text:line-break/>Repeat Control.....................167<text:line-break/>Remote Control.....................160<text:line-break/>Resource.............................96</text:p>
      <text:p text:style-name="Text_20_body"><text:span text:style-name="Strong_20_Emphasis">(na)</text:span> Rate.................................97<text:line-break/>Register Transfer....................53</text:p>
      <text:p text:style-name="Text_20_body"><text:span text:style-name="Strong_20_Emphasis">(ha)</text:span> Interrupt.......................108, 110<text:line-break/>........117, 123, 124, 149, 153, 157, 168, 170, 183, 195<text:line-break/>Interrupt Control.....................131<text:line-break/>Interrupt Wait Mode...................133<text:line-break/>Interrupt Signal Status...............155<text:line-break/>Interrupt Signal Mask.................155<text:line-break/>Interrupt Vector......................196<text:line-break/>Interrupt Vector Register....133, 134, 133, 134</text:p>
      <text:p text:style-name="Text_20_body">Page 203</text:p>
      <text:p text:style-name="Text_20_body">X68000 Technical Data Book</text:p>
      <text:p text:style-name="Text_20_body">First Edition Published on September 1, 1987</text:p>
      <text:p text:style-name="Text_20_body">Price: 3,000 Yen</text:p>
      <text:p text:style-name="Text_20_body">Supervision: TV Division, SHARP Corporation Editing: ASCII Publishing Bureau Techwrite</text:p>
      <text:p text:style-name="Text_20_body">Publisher: Keiichiro Tsukamoto</text:p>
      <text:p text:style-name="Text_20_body">Published by: ASCII Corporation Postal code 107: Three-F Minami-Aoyama Building, 6-11-1 Minami-Aoyama, Minato-ku, Tokyo Phone: 03-486-1111 (Main) Inquiries: 03-498-0299 (Direct) Sales Department: 03-486-1977 (Direct)</text:p>
      <text:p text:style-name="Text_20_body">© SHARP Corporation © ASCII Corporation</text:p>
      <text:p text:style-name="Text_20_body">Unauthorized copying and reproduction of part or all of this book without permission is prohibited.</text:p>
      <text:p text:style-name="Text_20_body">Editing in charge: Kenji Higuchi Production in charge: Yoshiko Furuya Printing program in charge: Eiko Akanaruse Printing: Aoshodo Co., Ltd. Binding: Seishosha</text:p>
      <text:p text:style-name="Text_20_body">ISBN4-87148-426-2 C3055 ¥3000E</text:p>
      <text:p text:style-name="Text_20_body"><text:span text:style-name="Emphasis">(Blank page in the original.)</text:span></text:p>
      <text:p text:style-name="Text_20_body">ISBN4-87148-426-2 C3055 ¥3000E</text:p>
      <text:p text:style-name="Text_20_body">List Price: 3,000 yen</text:p>
      <text:p text:style-name="Text_20_body">Technical Data Book.</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fo:line-height="116%" fo:text-align="justify"/>
      <style:text-properties style:country-asian="none" style:country-complex="none" style:font-name="Liberation Serif" style:font-name-asian="Lucida Sans Unicode" style:font-name-complex="Tahoma" style:font-size-asian="12pt" style:font-size-complex="12pt" style:language-asian="zxx" style:language-complex="zxx" style:letter-kerning="true" style:use-window-font-color="true" fo:country="US" fo:font-size="11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size-asian="9pt" style:font-size-complex="9pt" style:font-weight-asian="bold" style:font-weight-complex="bold" fo:font-size="9pt"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0.9in" fo:margin-left="0.9in" fo:margin-right="0.9in" fo:margin-top="0.9in" fo:page-height="11.69in" fo:page-width="8.27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X68000 Technical Guide</dc:title>
    <dc:description/>
    <dc:subject/>
    <meta:keyword/>
    <meta:initial-creator/>
    <dc:creator/>
    <meta:creation-date>2026-06-19T19:14:51Z</meta:creation-date>
    <dc:date>2026-06-19T19:14:51Z</dc:date>
    <meta:user-defined meta:name="subtitle" meta:value-type="string">English translation from the Japanese original</meta:user-defined>
  </office:meta>
</office:document-meta>
</file>