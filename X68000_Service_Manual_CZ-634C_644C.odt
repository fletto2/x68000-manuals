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6.I" style:family="table-column"/>
    <style:style style:name="Table26.J"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7.I"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text:p>
        </text:list-item>
      </text:list>
      <text:p text:style-name="First_20_paragraph"><draw:frame draw:name="img1" svg:width="480.0pt" svg:height="294.72pt"><draw:image xlink:href="Pictures/0.png" xlink:type="simple" xlink:show="embed" xlink:actuate="onLoad"/></draw:frame></text:p>
      <text:p text:style-name="Text_20_body">1-4. System Configuration-------------------------------9 2. Names of Each Part------------------------------------10 2-1. Front of the Computer Body---------------------11 2-2. Rear of the Computer Body----------------------11 3. Hardware-----------------------------------------------12 3-1. Memory Map-----------------------------------14 3-2. I/O Port Address List----------------------------15 3-3. Interrupts-----------------------------------------18 3-4. System Report----------------------------------22 3-5. IPL---------------------------------------------25 4. Control of Video Screen and Graphic Screen (CRTC)-28 4-1. Sprites------------------------------------------33 4-2. Priority Controller-------------------------------36 4-3. Text and Graphics Screen Control-----------39 4-4. Others------------------------------------------41 4-5. Keyboard and Mouse--------------------------43 5. Color Palette------------------------------------------43 6. CRT Controller-----------------------------------------45 7. Peripheral Devices-----------------------------------45 8. Devices---------------------------------------------45 8-1. DMA Controller--------------------------------46 8-2. Priority Interrupt Controller--------------------49 8-3. Enhanced Memory-------------------------------54 8-4. MFP--------------------------------------------55 8-5. SCC--------------------------------------------53 8-6. RTC--------------------------------------------57 9. Peripherals------------------------------------------59 9-1. Disks--------------------------------------------62 9-2. Printer--------------------------------------------62 9-3. Joystick--------------------------------------------62 9-4. Expansion Slot----------------------------------63 9-5. Other Connectors-------------------------------66 10. Main Circuit Board----------------------------------67 10-1. Main Circuit Board (1)------------------------71 10-2. Main Circuit Board (2)------------------------72 10-3. Main Circuit Board (3)------------------------73 11. Sub Circuit Board-----------------------------------75 11-1. Sub Circuit Board (1)-------------------------76 11-2. Sub Circuit Board (2)-------------------------77 12. Controller Circuit Board---------------------------80 13. Keyboard Controller-------------------------------85 14. LED of FD Connector, SCSI Connector---------89 15. Basics of the Control Circuit---------------------91 16. Digital LED, FD LED------------------------------91 17. FD Controller-------------------------------------92 18. Analog Board-------------------------------------94 19. CPU Board---------------------------------------99 20. ROM Board--------------------------------------103 21. Sound Board-------------------------------------105 22. Video Board--------------------------------------106 23. Connector Board----------------------------------107 24. Sub Connector Board---------------------------110 25. Printer Output Board-----------------------------111 26. Power Supply Design----------------------------112 27. Power Supply Method----------------------------113 28. Printer Separation Transformer--------------114</text:p>
      <text:p text:style-name="Text_20_body"><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text:p>
      <text:p text:style-name="Text_20_body"><draw:frame draw:name="img2" svg:width="480.0pt" svg:height="678.24pt"><draw:image xlink:href="Pictures/1.png" xlink:type="simple" xlink:show="embed" xlink:actuate="onLoad"/></draw:frame></text:p>
      <text:p text:style-name="Text_20_body">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h text:style-name="Heading_20_1" text:outline-level="1"><text:bookmark-start text:name="id_3-6-ipl-1"/>3-6. IPL<text:bookmark-end text:name="id_3-6-ipl-1"/></text:h>
      <text:list text:style-name="List_20_1">
        <text:list-item>
          <text:p text:style-name="List_20_Bullet_20_Tight"><text:span text:style-name="Strong_20_Emphasis">IPL ROM address</text:span>: FC0000H - FFFFFFH (256 Kbytes)</text:p>
        </text:list-item>
        <text:list-item>
          <text:p text:style-name="List_20_Bullet_20_Tight"><text:span text:style-name="Strong_20_Emphasis">Access</text:span>:</text:p>
          <text:list text:style-name="Numbering_20_1">
            <text:list-item>
              <text:p text:style-name="List_20_Number_20_Tight">Supervisor program, data area</text:p>
            </text:list-item>
            <text:list-item>
              <text:p text:style-name="List_20_Number_20_Tight">Read only</text:p>
            </text:list-item>
          </text:list>
        </text:list-item>
      </text:list>
      <text:p text:style-name="Preformatted_20_Text"><text:s text:c="3"/>MSB <text:s text:c="7"/>LSB <text:s text:c="9"/>MSB <text:s text:c="7"/>LSB</text:p>
      <text:p text:style-name="Preformatted_20_Text">+-----------+ --- 000000H <text:s text:c="1"/>+-----------+</text:p>
      <text:p text:style-name="Preformatted_20_Text">| IPL ROM1 <text:s text:c="1"/>| <text:s text:c="13"/>| <text:s text:c="10"/>|</text:p>
      <text:p text:style-name="Preformatted_20_Text">| image <text:s text:c="4"/>| <text:s text:c="13"/>| <text:s text:c="2"/>Main <text:s text:c="3"/>|</text:p>
      <text:p text:style-name="Preformatted_20_Text">+-----------+ --- 00FFFEH <text:s text:c="1"/>| <text:s text:c="2"/>memory <text:s text:c="1"/>|</text:p>
      <text:p text:style-name="First_20_paragraph"><text:span text:style-name="Strong_20_Emphasis">At reset:</text:span></text:p>
      <text:list text:style-name="Numbering_20_1">
        <text:list-item>
          <text:p text:style-name="List_20_Number_20_Tight">At reset, the IPL ROM 1 area (FF****H) appears at the first 64 Kbytes of the memory map (000000H to 00FFFFH).</text:p>
        </text:list-item>
        <text:list-item>
          <text:p text:style-name="List_20_Number_20_Tight">The first 2 long words from the start of this IPL ROM 1 hold the program counter and ... (for the 68000 MPU to perform reset exception processing) [text continues beyond crop]</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h text:style-name="Heading_20_1" text:outline-level="1"><text:bookmark-start text:name="id_4-screen-configuration-and-control"/>4. Screen configuration and control<text:bookmark-end text:name="id_4-screen-configuration-and-control"/></text:h>
      <text:h text:style-name="Heading_20_1" text:outline-level="1"><text:bookmark-start text:name="id_4-1-screen-configuration"/>4-1. Screen configuration<text:bookmark-end text:name="id_4-1-screen-configuration"/></text:h>
      <text:p text:style-name="First_20_paragraph">This machine has three independent screens: text, graphics, and sprite. Control of the text screen and graphics screen is performed by the CRTC, and control of the sprite screen is performed by the sprite controller. In addition, screen control such as priority and translucency between the text, graphics, and sprite screens, special priority functions, palette functions for each screen, and screen display functions are performed by the video controller.</text:p>
      <text:p text:style-name="Text_20_body">However, when accessing the screen, the CRTC, sprite controller, and video controller must always be set up, regardless of whether they are used or not.</text:p>
      <text:p text:style-name="Text_20_body"><text:span text:style-name="Strong_20_Emphasis">Fig. 4-1 Display control system block diagram</text:span></text:p>
      <text:p text:style-name="Preformatted_20_Text"><text:s text:c="2"/>[Sprite V-RAM]</text:p>
      <text:p text:style-name="Preformatted_20_Text"><text:s text:c="8"/>|</text:p>
      <text:p text:style-name="Preformatted_20_Text"><text:s text:c="8"/>v</text:p>
      <text:p text:style-name="Preformatted_20_Text"><text:s text:c="2"/>[Sprite <text:s text:c="35"/>GREEN</text:p>
      <text:p text:style-name="Preformatted_20_Text"><text:s text:c="3"/>Controller] ------&gt;+----+ <text:s text:c="5"/>+-------+ <text:s text:c="2"/>+-----+</text:p>
      <text:p text:style-name="Preformatted_20_Text"><text:s text:c="8"/>^ <text:s text:c="12"/>| <text:s text:c="3"/>|-----&gt;| <text:s text:c="6"/>|--&gt;| DAC |--+</text:p>
      <text:p text:style-name="Preformatted_20_Text"><text:s text:c="8"/>| <text:s text:c="12"/>+----+ <text:s text:c="2"/>16 | Video | <text:s text:c="1"/>5+-----+ <text:s text:c="1"/>|</text:p>
      <text:p text:style-name="Preformatted_20_Text"><text:s text:c="8"/>| <text:s text:c="3"/>[Text V-RAM] -------&gt;| Cont- | <text:s text:c="2"/>RED <text:s text:c="5"/>| <text:s text:c="1"/>+-----+</text:p>
      <text:p text:style-name="Preformatted_20_Text"><text:s text:c="8"/>| <text:s text:c="23"/>| roller| <text:s text:c="2"/>+-----+ <text:s text:c="2"/>+-&gt;| <text:s text:c="4"/>|</text:p>
      <text:p text:style-name="Preformatted_20_Text"><text:s text:c="2"/>[CRTC]--[Graphic V-RAM]--&gt;+--+ | <text:s text:c="6"/>|--&gt;| DAC |----&gt;| AMP |</text:p>
      <text:p text:style-name="Preformatted_20_Text"><text:s text:c="12"/>32 <text:s text:c="13"/>+--+ | <text:s text:c="6"/>| <text:s text:c="1"/>5+-----+ <text:s text:c="2"/>+-&gt;| <text:s text:c="4"/>|</text:p>
      <text:p text:style-name="Preformatted_20_Text"><text:s text:c="29"/>16 <text:s text:c="1"/>| <text:s text:c="6"/>| <text:s text:c="2"/>BLUE <text:s text:c="5"/>| <text:s text:c="1"/>+-----+</text:p>
      <text:p text:style-name="Preformatted_20_Text"><text:s text:c="33"/>| <text:s text:c="6"/>| <text:s text:c="2"/>+-----+ <text:s text:c="2"/>|</text:p>
      <text:p text:style-name="Preformatted_20_Text"><text:s text:c="33"/>| <text:s text:c="6"/>|--&gt;| DAC |---+</text:p>
      <text:p text:style-name="Preformatted_20_Text"><text:s text:c="33"/>+-------+ <text:s text:c="1"/>5+-----+ <text:s text:c="3"/>4</text:p>
      <text:p text:style-name="Preformatted_20_Text"><text:s text:c="52"/>System port</text:p>
      <text:p text:style-name="First_20_paragraph"><text:span text:style-name="Strong_20_Emphasis">1) Text screen (bitmap method)</text:span></text:p>
      <text:p text:style-name="Text_20_body">(Illustration: a display screen within a larger virtual screen, with labels Up / Down / Left / Right; "display screen" inside "virtual screen".)</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draw:frame draw:name="img3" svg:width="480.0pt" svg:height="391.2pt"><draw:image xlink:href="Pictures/2.png" xlink:type="simple" xlink:show="embed" xlink:actuate="onLoad"/></draw:frame></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text:span text:style-name="Strong_20_Emphasis">Table 6-2 Key scan data format</text:span></text:p>
      <text:p text:style-name="Preformatted_20_Text"><text:s text:c="1"/>D7 <text:s text:c="1"/>D6 <text:s text:c="1"/>D5 <text:s text:c="1"/>D4 <text:s text:c="1"/>D3 <text:s text:c="1"/>D2 <text:s text:c="1"/>D1 <text:s text:c="1"/>D0</text:p>
      <text:p text:style-name="Preformatted_20_Text">+---+---+---+---+---+---+---+---+</text:p>
      <text:p text:style-name="Preformatted_20_Text">| <text:s text:c="2"/>| <text:s text:c="2"/>| <text:s text:c="2"/>| <text:s text:c="2"/>| <text:s text:c="2"/>| <text:s text:c="2"/>| <text:s text:c="2"/>| <text:s text:c="2"/>|</text:p>
      <text:p text:style-name="Preformatted_20_Text">+---+---+---+---+---+---+---+---+</text:p>
      <text:p text:style-name="Preformatted_20_Text"><text:s text:c="2"/>^ <text:s text:c="2"/>&lt;----- key code -----&gt; <text:s text:c="2"/>^</text:p>
      <text:p text:style-name="Preformatted_20_Text"><text:s text:c="2"/>| <text:s text:c="27"/>|</text:p>
      <text:p text:style-name="Preformatted_20_Text"><text:s text:c="2"/>| <text:s text:c="2"/>(D6..D0: key code) <text:s text:c="7"/></text:p>
      <text:p text:style-name="Preformatted_20_Text">D7: 0 = key pressed state</text:p>
      <text:p text:style-name="Preformatted_20_Text"><text:s text:c="4"/>1 = key released state</text:p>
      <text:p text:style-name="First_20_paragraph">1-byte data from 80C51 to MFP. For key correspondence codes, see Fig.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text:span text:style-name="Strong_20_Emphasis">Figure 7-1 Sound System Block Diagram</text:span></text:p>
      <text:p text:style-name="Preformatted_20_Text"><text:s text:c="2"/>Data &lt;===&gt; [Buffer] --+</text:p>
      <text:p text:style-name="Preformatted_20_Text"><text:s text:c="24"/>|</text:p>
      <text:p text:style-name="Preformatted_20_Text"><text:s text:c="24"/>v</text:p>
      <text:p text:style-name="Preformatted_20_Text"><text:s text:c="13"/>+----------+----------+</text:p>
      <text:p text:style-name="Preformatted_20_Text"><text:s text:c="13"/>| <text:s text:c="20"/>|</text:p>
      <text:p text:style-name="Preformatted_20_Text"><text:s text:c="13"/>| <text:s text:c="2"/>FM Sound Source <text:s text:c="2"/>| <text:s text:c="7"/>+-------+</text:p>
      <text:p text:style-name="Preformatted_20_Text"><text:s text:c="13"/>| <text:s text:c="4"/>(YM2151) <text:s text:c="7"/>|-------&gt;| Amp <text:s text:c="2"/>|---o Internal Speaker</text:p>
      <text:p text:style-name="Preformatted_20_Text"><text:s text:c="13"/>| <text:s text:c="2"/>Vcc1 Vss CLK(4MHz)|---+ <text:s text:c="3"/>+-------+---o Headphone Out</text:p>
      <text:p text:style-name="Preformatted_20_Text"><text:s text:c="13"/>| <text:s text:c="20"/>| <text:s text:c="2"/>|</text:p>
      <text:p text:style-name="Preformatted_20_Text"><text:s text:c="2"/>Address ==&gt;| <text:s text:c="2"/>[Decoder] <text:s text:c="8"/>| <text:s text:c="2"/>+-------------o L line Out</text:p>
      <text:p text:style-name="Preformatted_20_Text"><text:s text:c="13"/>| <text:s text:c="20"/>| <text:s text:c="2"/>+-------------o R line Out</text:p>
      <text:p text:style-name="Preformatted_20_Text"><text:s text:c="13"/>| <text:s text:c="2"/>uPD8255 <text:s text:c="10"/>| <text:s text:c="16"/>o R TV AUDIO</text:p>
      <text:p text:style-name="Preformatted_20_Text"><text:s text:c="13"/>| <text:s text:c="4"/>PC <text:s text:c="13"/>| <text:s text:c="16"/>o L TV AUDIO</text:p>
      <text:p text:style-name="Preformatted_20_Text"><text:s text:c="13"/>| <text:s text:c="2"/>Vcc1 Vss <text:s text:c="9"/>|</text:p>
      <text:p text:style-name="Preformatted_20_Text"><text:s text:c="13"/>| <text:s text:c="20"/>| <text:s text:c="4"/>+---------+</text:p>
      <text:p text:style-name="Preformatted_20_Text"><text:s text:c="13"/>| <text:s text:c="2"/>ADPCM <text:s text:c="12"/>|----&gt;| PCM PAN |</text:p>
      <text:p text:style-name="Preformatted_20_Text"><text:s text:c="2"/>Control ==&gt;| <text:s text:c="4"/>(MSM6258) <text:s text:c="6"/>| <text:s text:c="4"/>+---------+</text:p>
      <text:p text:style-name="Preformatted_20_Text"><text:s text:c="13"/>| <text:s text:c="2"/>Vcc1 Vss CLK(4MHz)| <text:s text:c="16"/>o line In</text:p>
      <text:p text:style-name="Preformatted_20_Text"><text:s text:c="13"/>+---------------------+</text:p>
      <text:p text:style-name="First_20_paragraph">Note: PCM PAN receives control from uPD8255 PC and ADPCM (MSM6258) output.</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p text:style-name="Text_20_body"><text:span text:style-name="Strong_20_Emphasis">Fig. 8-1 DMAC block diagram</text:span></text:p>
      <text:p text:style-name="Preformatted_20_Text"><text:s text:c="2"/>+-----------+ <text:s text:c="2"/>address bus <text:s text:c="3"/>+-----------+</text:p>
      <text:p text:style-name="Preformatted_20_Text"><text:s text:c="2"/>| <text:s text:c="10"/>| ---------------&gt; | <text:s text:c="10"/>|--[ Ch0 ]-- Internal 2HD</text:p>
      <text:p text:style-name="Preformatted_20_Text"><text:s text:c="2"/>| <text:s text:c="2"/>68000 <text:s text:c="2"/>| <text:s text:c="3"/>data bus <text:s text:c="5"/>| <text:s text:c="2"/>63450 <text:s text:c="2"/>|</text:p>
      <text:p text:style-name="Preformatted_20_Text"><text:s text:c="2"/>| <text:s text:c="10"/>| &lt;--------------&gt; | <text:s text:c="10"/>|--[ Ch0 ]-- SCSI device</text:p>
      <text:p text:style-name="Preformatted_20_Text"><text:s text:c="2"/>| <text:s text:c="10"/>| <text:s text:c="2"/>control bus <text:s text:c="3"/>| <text:s text:c="10"/>|</text:p>
      <text:p text:style-name="Preformatted_20_Text"><text:s text:c="2"/>| <text:s text:c="10"/>| &lt;--------------&gt; | <text:s text:c="10"/>|--[ Ch2 ]-- Memory-to-memory</text:p>
      <text:p text:style-name="Preformatted_20_Text"><text:s text:c="2"/>+-----------+ <text:s text:c="17"/>+-----------+</text:p>
      <text:p text:style-name="Preformatted_20_Text"><text:s text:c="3"/>| <text:s text:c="3"/>| <text:s text:c="2"/>| <text:s text:c="20"/>| <text:s text:c="3"/>| <text:s text:c="2"/>| <text:s text:c="1"/>--[ Ch3 ]-- Voice synthesis</text:p>
      <text:p text:style-name="Preformatted_20_Text"><text:s text:c="2"/>CLK Vcc1 Vss <text:s text:c="17"/>CLK Vcc1 Vss</text:p>
      <text:p text:style-name="Preformatted_20_Text"><text:s text:c="1"/>(10/16MHz) <text:s text:c="21"/>(10MHz)</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list text:style-name="List_20_1">
        <text:list-item>
          <text:p text:style-name="List_20_Bullet_20_Tight">67-bit arithmetic unit</text:p>
        </text:list-item>
        <text:list-item>
          <text:p text:style-name="List_20_Bullet_20_Tight">High-speed shift via 67-bit barrel shifter</text:p>
        </text:list-item>
        <text:list-item>
          <text:p text:style-name="List_20_Bullet_20_Tight">46 types of instructions</text:p>
        </text:list-item>
        <text:list-item>
          <text:p text:style-name="List_20_Bullet_20_Tight">Fully compliant with the IEEE 754 standard</text:p>
        </text:list-item>
        <text:list-item>
          <text:p text:style-name="List_20_Bullet_20_Tight">Support for functions not defined by the IEEE standard (trigonometric functions, transcendental functions, etc.)</text:p>
        </text:list-item>
        <text:list-item>
          <text:p text:style-name="List_20_Bullet_20_Tight">7 data types (byte, word and long-word integers; single-precision real; double-precision real; extended-precision real; packed decimal real)</text:p>
        </text:list-item>
        <text:list-item>
          <text:p text:style-name="List_20_Bullet_20_Tight">On-chip ROM support for 22 constants (pi, e, etc.)</text:p>
        </text:list-item>
        <text:list-item>
          <text:p text:style-name="List_20_Bullet_20_Tight">Virtual memory / machine operation</text:p>
        </text:list-item>
        <text:list-item>
          <text:p text:style-name="List_20_Bullet_20_Tight">Efficient mechanisms for procedure calls, context switching, and interrupt processing</text:p>
        </text:list-item>
        <text:list-item>
          <text:p text:style-name="List_20_Bullet_20_Tight">Parallel instruction execution with the main processor</text:p>
        </text:list-item>
        <text:list-item>
          <text:p text:style-name="List_20_Bullet_20_Tight">Can be connected to a host processor that appears on an 8-bit, 16-bit, or 32-bit data bus</text:p>
        </text:list-item>
      </text:list>
      <text:p text:style-name="First_20_paragraph">The circuit automatically determines whether or not an FPU is installed in the IC socket on this unit's main board. Because of this, if no FPU is installed in the socket on the board, a CZ-6BP1 numeric processor board can be connected to the I/O slot to operate. However, if a processor board is installed in the I/O slot even though an FPU is installed in the socket on the board, the circuit will operate with the built-in FPU taking priority; since there is a risk of malfunction, this state must absolutely be avoided.</text:p>
      <text:p text:style-name="Text_20_body"><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ext:span text:style-name="Strong_20_Emphasis">Figure 8-6 MFP USART System Block Diagram</text:span></text:p>
      <text:p text:style-name="Preformatted_20_Text"><text:s text:c="18"/>RC terminal --&gt;+-----------+</text:p>
      <text:p text:style-name="Preformatted_20_Text"><text:s text:c="2"/>TBO terminal ---+ <text:s text:c="13"/>| <text:s text:c="10"/>|--&gt; SI (keyboard receive data)</text:p>
      <text:p text:style-name="Preformatted_20_Text"><text:s text:c="18"/>| <text:s text:c="13"/>| USART(x16)|--&gt; SO (keyboard send data)</text:p>
      <text:p text:style-name="Preformatted_20_Text"><text:s text:c="18"/>TC terminal --&gt;| <text:s text:c="10"/>|--&gt; RR (receive status)</text:p>
      <text:p text:style-name="Preformatted_20_Text"><text:s text:c="33"/>+-----------+--&gt; TR (send status)</text:p>
      <text:p text:style-name="First_20_paragraph">Asynchronous communication: 2400 baud, start 1 bit, data 8 bits, no parity, stop 1 bit.</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draw:frame draw:name="img4" svg:width="480.0pt" svg:height="308.16pt"><draw:image xlink:href="Pictures/3.png" xlink:type="simple" xlink:show="embed" xlink:actuate="onLoad"/></draw:frame></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h text:style-name="Heading_20_1" text:outline-level="1"><text:bookmark-start text:name="id_8-5-scc"/>8-5. SCC<text:bookmark-end text:name="id_8-5-scc"/></text:h>
      <text:p text:style-name="First_20_paragraph">This unit uses the Z8530SCC, a member of the Z8000 family, as the serial communication controller to support RS-232C and the mouse. The block diagram is shown in Figure 8-7.</text:p>
      <text:p text:style-name="Text_20_body"><text:span text:style-name="Strong_20_Emphasis">Features</text:span></text:p>
      <text:p text:style-name="Text_20_body">This SCC has 2 independent full-duplex channels, each equipped with 14 write registers, 7 read registers, and a baud rate generator.</text:p>
      <text:p text:style-name="Text_20_body"><text:span text:style-name="Strong_20_Emphasis">(1) Channel A (RS-232C)</text:span></text:p>
      <text:p text:style-name="Text_20_body"><text:span text:style-name="Emphasis">Asynchronous (start-stop synchronous) mode</text:span></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Even parity, odd parity, no parity</text:p>
        </text:list-item>
        <text:list-item>
          <text:p text:style-name="List_20_Bullet_20_Tight">x1, x16, x32, x64 clock modes</text:p>
        </text:list-item>
        <text:list-item>
          <text:p text:style-name="List_20_Bullet_20_Tight">Block generation and detection</text:p>
        </text:list-item>
        <text:list-item>
          <text:p text:style-name="List_20_Bullet_20_Tight">Detection of parity, overrun, and framing errors</text:p>
        </text:list-item>
      </text:list>
      <text:p text:style-name="First_20_paragraph"><text:span text:style-name="Emphasis">Synchronous mode</text:span></text:p>
      <text:list text:style-name="List_20_1">
        <text:list-item>
          <text:p text:style-name="List_20_Bullet_20_Tight">Byte-oriented synchronous mode ...... character sync can be either internal or external</text:p>
          <text:list text:style-name="List_20_1">
            <text:list-item>
              <text:p text:style-name="List_20_Bullet_20_Tight">1 or 2 sync characters</text:p>
            </text:list-item>
            <text:list-item>
              <text:p text:style-name="List_20_Bullet_20_Tight">Sync characters are 6 or 8 bits</text:p>
            </text:list-item>
            <text:list-item>
              <text:p text:style-name="List_20_Bullet_20_Tight">Automatic insertion or deletion of sync characters</text:p>
            </text:list-item>
            <text:list-item>
              <text:p text:style-name="List_20_Bullet_20_Tight">CRC generation and comparison</text:p>
            </text:list-item>
          </text:list>
        </text:list-item>
        <text:list-item>
          <text:p text:style-name="List_20_Bullet_20_Tight">SDLC/HDLC mode ... abort sequence generation and detection</text:p>
          <text:list text:style-name="List_20_1">
            <text:list-item>
              <text:p text:style-name="List_20_Bullet_20_Tight">Automatic zero insertion and deletion</text:p>
            </text:list-item>
            <text:list-item>
              <text:p text:style-name="List_20_Bullet_20_Tight">Automatic flag insertion between messages</text:p>
            </text:list-item>
            <text:list-item>
              <text:p text:style-name="List_20_Bullet_20_Tight">Address field detection</text:p>
            </text:list-item>
            <text:list-item>
              <text:p text:style-name="List_20_Bullet_20_Tight">Residue processing of the information field</text:p>
            </text:list-item>
            <text:list-item>
              <text:p text:style-name="List_20_Bullet_20_Tight">CRC generation and comparison</text:p>
            </text:list-item>
            <text:list-item>
              <text:p text:style-name="List_20_Bullet_20_Tight">Entry by EOP detection in SDLC loop mode (on-loop) and exit</text:p>
            </text:list-item>
          </text:list>
        </text:list-item>
        <text:list-item>
          <text:p text:style-name="List_20_Bullet_20_Tight">Data transfer rate ............... max 1.5 Mbits/sec (monosync, bisync)</text:p>
          <text:list text:style-name="List_20_1">
            <text:list-item>
              <text:p text:style-name="List_20_Bullet_20_Tight">max 375 kbits/sec (FM encoding DPLL)</text:p>
            </text:list-item>
            <text:list-item>
              <text:p text:style-name="List_20_Bullet_20_Tight">max 187 kbits/sec (NRZI encoding DPLL)</text:p>
            </text:list-item>
          </text:list>
        </text:list-item>
      </text:list>
      <text:p text:style-name="First_20_paragraph"><text:span text:style-name="Strong_20_Emphasis">(2) Channel B (mouse)</text:span></text:p>
      <text:p text:style-name="Text_20_body"><text:span text:style-name="Emphasis">Asynchronous communication</text:spa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s ......... 8 bits</text:p>
        </text:list-item>
        <text:list-item>
          <text:p text:style-name="List_20_Bullet_20_Tight">Parity ............ none</text:p>
        </text:list-item>
        <text:list-item>
          <text:p text:style-name="List_20_Bullet_20_Tight">Stop bit ......... 2 bits</text:p>
        </text:list-item>
        <text:list-item>
          <text:p text:style-name="List_20_Bullet_20_Tight">Data bus ......... RxDB</text:p>
        </text:list-item>
        <text:list-item>
          <text:p text:style-name="List_20_Bullet_20_Tight">Control bus ... RTSB</text:p>
        </text:list-item>
      </text:list>
      <text:p text:style-name="First_20_paragraph">(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h text:style-name="Heading_20_1" text:outline-level="1"><text:bookmark-start text:name="id_8-6-rtc"/>8-6. RTC<text:bookmark-end text:name="id_8-6-rtc"/></text:h>
      <text:p text:style-name="First_20_paragraph">This unit uses the RP5C15 as the real-time clock.</text:p>
      <text:p text:style-name="Text_20_body"><text:span text:style-name="Strong_20_Emphasis">Figure 8-9 RTC Block Diagram</text:span></text:p>
      <text:p text:style-name="Preformatted_20_Text"><text:s text:c="2"/>Address (4) ==&gt;+--------+ CLKOUT (1Hz) clock --&gt; [MFP (GPIP5) 7-level interrupt]</text:p>
      <text:p text:style-name="Preformatted_20_Text"><text:s text:c="2"/>Data <text:s text:c="3"/>(4) &lt;=&gt;| <text:s text:c="7"/>|</text:p>
      <text:p text:style-name="Preformatted_20_Text"><text:s text:c="2"/>Control <text:s text:c="4"/>==&gt;| RP5C15 |---------------------&gt; [POWER LED and TIMER LED blink clock]</text:p>
      <text:p text:style-name="Preformatted_20_Text"><text:s text:c="17"/>| <text:s text:c="7"/>| ALARM (alarm signal,</text:p>
      <text:p text:style-name="Preformatted_20_Text"><text:s text:c="17"/>| <text:s text:c="7"/>| <text:s text:c="1"/>1Hz, 16Hz clock) ---&gt; [MFP (GPIP0) 0-level interrupt, readout]</text:p>
      <text:p text:style-name="Preformatted_20_Text"><text:s text:c="17"/>+--------+</text:p>
      <text:p text:style-name="Preformatted_20_Text"><text:s text:c="2"/>Battery backup <text:s text:c="2"/>Vcc2 <text:s text:c="2"/>[Oscillator circuit] (32.768 kHz)</text:p>
      <text:p text:style-name="First_20_paragraph"><text:span text:style-name="Strong_20_Emphasis">Features</text:span></text:p>
      <text:p text:style-name="Text_20_body">The RP5C15 is a real-time clock that allows setting and reading of the time, etc. using the same procedure as memory READ/WRITE. It has the following features:</text:p>
      <text:list text:style-name="Numbering_20_1">
        <text:list-item>
          <text:p text:style-name="List_20_Number_20_Tight">Can be directly connected to a 16-bit CPU, and high-speed access is also possible</text:p>
        </text:list-item>
        <text:list-item>
          <text:p text:style-name="List_20_Number_20_Tight">4-bit bidirectional data bus (D00 - D03)</text:p>
        </text:list-item>
        <text:list-item>
          <text:p text:style-name="List_20_Number_20_Tight">4-bit address input</text:p>
        </text:list-item>
        <text:list-item>
          <text:p text:style-name="List_20_Number_20_Tight">Built-in counters for time (hours, minutes, seconds) and calendar (leap year, year, month, day, day of week)</text:p>
        </text:list-item>
        <text:list-item>
          <text:p text:style-name="List_20_Number_20_Tight">Built-in alarm function</text:p>
        </text:list-item>
        <text:list-item>
          <text:p text:style-name="List_20_Number_20_Tight">All clock data is represented in BCD code</text:p>
        </text:list-item>
        <text:list-item>
          <text:p text:style-name="List_20_Number_20_Tight">Built-in +/-30 second Adjust function</text:p>
        </text:list-item>
        <text:list-item>
          <text:p text:style-name="List_20_Number_20_Tight">Battery backup possible (minimum 2.0V)</text:p>
        </text:list-item>
        <text:list-item>
          <text:p text:style-name="List_20_Number_20_Tight">Can output an alarm signal or a 16Hz or 1Hz timing pulse</text:p>
        </text:list-item>
      </text:list>
      <text:p text:style-name="First_20_paragraph"><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he battery for RP5C15 backup is normally connected to Vcc2, so when using the timer, etc., never turn off the rear power switch.</text:p>
      <text:h text:style-name="Heading_20_1" text:outline-level="1"><text:bookmark-start text:name="id_9-peripheral-io"/>9. Peripheral I/O<text:bookmark-end text:name="id_9-peripheral-io"/></text:h>
      <text:h text:style-name="Heading_20_1" text:outline-level="1"><text:bookmark-start text:name="id_9-1-disk"/>9-1. Disk<text:bookmark-end text:name="id_9-1-disk"/></text:h>
      <text:p text:style-name="First_20_paragraph">This unit has 2 built-in 5-inch 2HD (double-sided high-density) type FDDs (floppy disk drives), and uses the uPD72065 as the FDC controlling these FDDs. It also uses the MB89352 as the SCSI controller for controlling SCSI devices (this unit is 80MHDD). The block diagram is shown in Figure 9-1.</text:p>
      <text:p text:style-name="Text_20_body"><text:span text:style-name="Strong_20_Emphasis">Table 9-1 Floppy Disk Specificatio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Capacity / Format</text:p>
            </table:table-cell>
            <table:table-cell table:style-name="TableHeaderRowCell" office:value-type="string">
              <text:p text:style-name="Table_20_Heading">FDC input clock</text:p>
            </table:table-cell>
            <table:table-cell table:style-name="TableHeaderRowCell" office:value-type="string">
              <text:p text:style-name="Table_20_Heading">Modulation method</text:p>
            </table:table-cell>
          </table:table-row>
        </table:table-header-rows>
        <table:table-row>
          <table:table-cell table:style-name="TableRowCell" office:value-type="string">
            <text:p text:style-name="Table_20_Contents">128, 256, 512, 1024 Bytes/sector</text:p>
          </table:table-cell>
          <table:table-cell table:style-name="TableRowCell" office:value-type="string">
            <text:p text:style-name="Table_20_Contents">2HD (8MHz)</text:p>
          </table:table-cell>
          <table:table-cell table:style-name="TableRowCell" office:value-type="string">
            <text:p text:style-name="Table_20_Contents">MFM</text:p>
          </table:table-cell>
        </table:table-row>
        <table:table-row>
          <table:table-cell table:style-name="TableRowCell" office:value-type="string">
            <text:p text:style-name="Table_20_Contents">26, 16, 8 Sector/track</text:p>
          </table:table-cell>
          <table:table-cell table:style-name="TableRowCell" office:value-type="string">
            <text:p text:style-name="Table_20_Contents">2DD-2D (4MHz)</text:p>
          </table:table-cell>
          <table:table-cell table:style-name="TableRowCell" office:value-type="string">
            <text:p text:style-name="Table_20_Contents">FM</text:p>
          </table:table-cell>
        </table:table-row>
        <table:table-row>
          <table:table-cell table:style-name="TableRowCell" office:value-type="string">
            <text:p text:style-name="Table_20_Contents">77 Track/side</text:p>
          </table:table-cell>
          <table:table-cell table:style-name="TableRowCell" office:value-type="string">
            <text:p text:style-name="Table_20_Contents">switchable</text:p>
          </table:table-cell>
          <table:table-cell table:style-name="TableRowCell" office:value-type="string">
            <text:p text:style-name="Table_20_Contents">switchable</text:p>
          </table:table-cell>
        </table:table-row>
        <table:table-row>
          <table:table-cell table:style-name="TableRowCell" office:value-type="string">
            <text:p text:style-name="Table_20_Contents">154 Track/dis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8 MBytes when formatted)</text:p>
          </table:table-cell>
          <table:table-cell table:style-name="TableRowCell" office:value-type="string">
            <text:p text:style-name="Table_20_Contents">When connecting a 2DD-2D type FDC, use the expansion floppy disk connector.</text:p>
          </table:table-cell>
          <table:table-cell table:style-name="TableRowCell" office:value-type="string">
    </table:table-cell>
        </table:table-row>
      </table:table>
      <text:p text:style-name="First_20_paragraph"><text:span text:style-name="Strong_20_Emphasis">FDD Features and Specifications</text:span></text:p>
      <text:p text:style-name="Text_20_body">The FDD of this unit is equipped with the following unique functions:</text:p>
      <text:p text:style-name="Text_20_body">(1) Auto-eject function</text:p>
      <text:list text:style-name="List_20_1">
        <text:list-item>
          <text:p text:style-name="List_20_Bullet_20_Tight">Automatic ejection function for the media inserted in the specified drive</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ext:span text:style-name="Strong_20_Emphasis">Figure 9-1 FDD/HDD Peripheral Block Diagram</text:span></text:p>
      <text:p text:style-name="Preformatted_20_Text"><text:s text:c="2"/>Address bus ==&gt;+------------+ <text:s text:c="20"/>ATN</text:p>
      <text:p text:style-name="Preformatted_20_Text"><text:s text:c="17"/>| <text:s text:c="2"/>SCSI <text:s text:c="4"/>|--Hard Disk Control--{SEL, RESET, REQ, BUSY,</text:p>
      <text:p text:style-name="Preformatted_20_Text"><text:s text:c="2"/>Data bus <text:s text:c="3"/>&lt;=&gt;| Controller | <text:s text:c="21"/>I/O, C/D, MSG}</text:p>
      <text:p text:style-name="Preformatted_20_Text"><text:s text:c="17"/>| <text:s text:c="11"/>|--Hard Disk Data Bus--{D0~D7, DP}</text:p>
      <text:p text:style-name="Preformatted_20_Text"><text:s text:c="17"/>+------------+</text:p>
      <text:p text:style-name="Preformatted_20_Text"><text:s text:c="2"/>- - - - - - - - - - - - - - - - - - - - - - - - HD (hard disk) - - - -</text:p>
      <text:p text:style-name="Preformatted_20_Text"><text:s text:c="51"/>FD (floppy disk)</text:p>
      <text:p text:style-name="Preformatted_20_Text"><text:s text:c="2"/>Address bus ==&gt;+------------+</text:p>
      <text:p text:style-name="Preformatted_20_Text"><text:s text:c="17"/>| <text:s text:c="2"/>I/O <text:s text:c="5"/>|--FDD Option Control--{OPTION SELECT 0~3,</text:p>
      <text:p text:style-name="Preformatted_20_Text"><text:s text:c="2"/>Data bus <text:s text:c="3"/>&lt;=&gt;| Controller | <text:s text:c="3"/>EJECT, EJECT MASK, LED BLINK,</text:p>
      <text:p text:style-name="Preformatted_20_Text"><text:s text:c="17"/>| <text:s text:c="11"/>| <text:s text:c="3"/>FDD INT, ERR DISK, DISK IN}</text:p>
      <text:p text:style-name="Preformatted_20_Text"><text:s text:c="17"/>| <text:s text:c="11"/>|---------------------{TRK00, WRITE PROTECT,</text:p>
      <text:p text:style-name="Preformatted_20_Text"><text:s text:c="17"/>| <text:s text:c="11"/>| <text:s text:c="21"/>DRIVE SELECT 0~3}</text:p>
      <text:p text:style-name="Preformatted_20_Text"><text:s text:c="17"/>+-----+------+</text:p>
      <text:p text:style-name="Preformatted_20_Text"><text:s text:c="23"/>| <text:s text:c="6"/>+-----------+</text:p>
      <text:p text:style-name="Preformatted_20_Text"><text:s text:c="23"/>+------&gt;| <text:s text:c="2"/>FDC <text:s text:c="4"/>|--{READY, INDEX, DISK TYPE SELECT,</text:p>
      <text:p text:style-name="Preformatted_20_Text"><text:s text:c="31"/>| (uPD72065)| <text:s text:c="2"/>DIRECTION, STEP, WRITE GATE,</text:p>
      <text:p text:style-name="Preformatted_20_Text"><text:s text:c="31"/>| <text:s text:c="10"/>| <text:s text:c="2"/>WRITE DATA, SIDE SELECT}</text:p>
      <text:p text:style-name="Preformatted_20_Text"><text:s text:c="31"/>+-----+-----+</text:p>
      <text:p text:style-name="Preformatted_20_Text"><text:s text:c="37"/>| <text:s text:c="3"/>+----------+</text:p>
      <text:p text:style-name="Preformatted_20_Text"><text:s text:c="37"/>+---&gt;| <text:s text:c="2"/>VFO <text:s text:c="3"/>|--{MOTOR ON, READ DATA}</text:p>
      <text:p text:style-name="Preformatted_20_Text"><text:s text:c="42"/>| circuit <text:s text:c="1"/>|</text:p>
      <text:p text:style-name="Preformatted_20_Text"><text:s text:c="42"/>|(SED9420AC)|</text:p>
      <text:p text:style-name="Preformatted_20_Text"><text:s text:c="42"/>+----------+</text:p>
      <text:p text:style-name="Preformatted_20_Text"><text:s text:c="44"/>MSN/STD</text:p>
      <text:p text:style-name="First_20_paragraph">Clocks/power: 2HD/2DD-2D switching, Vcc1, Vss, 16MHz.</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5" table:style-name="Table25">
        <table:table-column table:style-name="Table25.A"/>
        <table:table-column table:style-name="Table25.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ext:p text:style-name="Text_20_body">(2) Set printer output data</text:p>
      <text:list text:style-name="List_20_1">
        <text:list-item>
          <text:p text:style-name="List_20_Bullet_20_Tight">Set the 1-byte output data to the printer at E8C001H.</text:p>
        </text:list-item>
      </text:list>
      <text:p text:style-name="First_20_paragraph">(3) Printer data sample (rising edge of strobe signal)</text:p>
      <text:list text:style-name="List_20_1">
        <text:list-item>
          <text:p text:style-name="List_20_Bullet_20_Tight">Set bit D00 of E8C003H to "0", then set it to "1" to raise the strobe signal.</text:p>
        </text:list-item>
      </text:list>
      <text:h text:style-name="Heading_20_1" text:outline-level="1"><text:bookmark-start text:name="id_9-3-joystick"/>9-3. Joystick<text:bookmark-end text:name="id_9-3-joystick"/></text:h>
      <text:p text:style-name="First_20_paragraph">In the X1 and X1turbo series, 2 joysticks were accessed using PSG register 14 and register 15, but in this unit, 2 joysticks can be used via the 8255 ports. When using these 2 joysticks (input), always set 92H to E9A007H of the 8255, and set the upper 4 bits (D04~D07) of portC at E9A005H to "0".</text:p>
      <text:p text:style-name="Text_20_body"><text:span text:style-name="Strong_20_Emphasis">Figure 9-2 Joystick Block Diagram</text:span></text:p>
      <text:p text:style-name="Preformatted_20_Text"><text:s text:c="2"/>Address ==&gt;+-----------+</text:p>
      <text:p text:style-name="Preformatted_20_Text"><text:s text:c="2"/>Data <text:s text:c="3"/>&lt;=&gt;| uPD8255 <text:s text:c="2"/>| <text:s text:c="1"/>portA &lt;--&gt; [Joystick No.1]</text:p>
      <text:p text:style-name="Preformatted_20_Text"><text:s text:c="2"/>Control ==&gt;| <text:s text:c="10"/>| <text:s text:c="1"/>portB &lt;--&gt; [Joystick No.2]</text:p>
      <text:p text:style-name="Preformatted_20_Text"><text:s text:c="13"/>| <text:s text:c="10"/>| <text:s text:c="1"/>portC ---&gt; [Voice synthesis PCM control]</text:p>
      <text:p text:style-name="Preformatted_20_Text"><text:s text:c="13"/>+-----------+</text:p>
      <text:p text:style-name="First_20_paragraph"><text:span text:style-name="Strong_20_Emphasis">Table 9-6 Joystick Register Address Map</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Late</text:p>
          </table:table-cell>
          <table:table-cell table:style-name="TableRowCell" office:value-type="string">
    </table:table-cell>
          <table:table-cell table:style-name="TableRowCell" office:value-type="string">
            <text:p text:style-name="Table_20_Contents">PCM PAN</text:p>
          </table:table-cell>
          <table:table-cell table:style-name="TableRowCell" office:value-type="string">
    </table:table-cell>
        </table:table-row>
      </table:table>
      <table:table table:name="Table28" table:style-name="Table28">
        <table:table-column table:style-name="Table28.A"/>
        <table:table-column table:style-name="Table28.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draw:frame draw:name="img5" svg:width="480.0pt" svg:height="299.52pt"><draw:image xlink:href="Pictures/4.png" xlink:type="simple" xlink:show="embed" xlink:actuate="onLoad"/></draw:frame></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draw:frame draw:name="img6" svg:width="480.0pt" svg:height="295.68pt"><draw:image xlink:href="Pictures/5.png" xlink:type="simple" xlink:show="embed" xlink:actuate="onLoad"/></draw:frame></text:p>
      <text:p text:style-name="Text_20_body">The numbers at the bottom of the page, "- 77 -" and "- 78 -", probably indicate the page numbers in the document.</text:p>
      <text:p text:style-name="Text_20_body">"13. Main Basic Circuit Diagram (3)"</text:p>
      <text:p text:style-name="Text_20_body"><draw:frame draw:name="img7" svg:width="480.0pt" svg:height="339.36pt"><draw:image xlink:href="Pictures/6.png" xlink:type="simple" xlink:show="embed" xlink:actuate="onLoad"/></draw:frame></text:p>
      <text:p text:style-name="Text_20_body">"14. Main basic wiring diagram (4)"</text:p>
      <text:p text:style-name="Text_20_body"><draw:frame draw:name="img8" svg:width="480.0pt" svg:height="339.36pt"><draw:image xlink:href="Pictures/7.png" xlink:type="simple" xlink:show="embed" xlink:actuate="onLoad"/></draw:frame></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draw:frame draw:name="img9" svg:width="480.0pt" svg:height="339.36pt"><draw:image xlink:href="Pictures/8.png" xlink:type="simple" xlink:show="embed" xlink:actuate="onLoad"/></draw:frame></text:p>
      <text:p text:style-name="Text_20_body">[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draw:frame draw:name="img10" svg:width="480.0pt" svg:height="339.36pt"><draw:image xlink:href="Pictures/9.png" xlink:type="simple" xlink:show="embed" xlink:actuate="onLoad"/></draw:frame></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Text_20_body"><draw:frame draw:name="img11" svg:width="480.0pt" svg:height="279.36pt"><draw:image xlink:href="Pictures/10.png" xlink:type="simple" xlink:show="embed" xlink:actuate="onLoad"/></draw:frame></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draw:frame draw:name="img12" svg:width="480.0pt" svg:height="339.36pt"><draw:image xlink:href="Pictures/11.png" xlink:type="simple" xlink:show="embed" xlink:actuate="onLoad"/></draw:frame></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draw:frame draw:name="img13" svg:width="480.0pt" svg:height="339.36pt"><draw:image xlink:href="Pictures/12.png" xlink:type="simple" xlink:show="embed" xlink:actuate="onLoad"/></draw:frame></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draw:frame draw:name="img14" svg:width="480.0pt" svg:height="230.4pt"><draw:image xlink:href="Pictures/13.png" xlink:type="simple" xlink:show="embed" xlink:actuate="onLoad"/></draw:frame></text:p>
      <text:p text:style-name="Text_20_body">[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20T01:40:50Z</meta:creation-date>
    <dc:date>2026-06-20T01:40:50Z</dc:date>
    <meta:user-defined meta:name="subtitle" meta:value-type="string">English translation from the Japanese original</meta:user-defined>
  </office:meta>
</office:document-meta>
</file>