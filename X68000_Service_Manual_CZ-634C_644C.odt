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5.I" style:family="table-column"/>
    <style:style style:name="Table25.J"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h text:style-name="Heading_20_1" text:outline-level="1"><text:bookmark-start text:name="x68000-service-manual-cz-634c644c"/>X68000 Service Manual (CZ-634C/644C)<text:bookmark-end text:name="x68000-service-manual-cz-634c644c"/></text:h>
      <text:p text:style-name="First_20_paragraph"><text:span text:style-name="Emphasis">English translation from the Japanese original — 95 pages.</text:span></text:p>
      <text:p text:style-name="Horizontal_20_Line"/>
      <text:h text:style-name="Heading_20_2" text:outline-level="2"><text:bookmark-start text:name="serv_-000001"/>serv_-000001<text:bookmark-end text:name="serv_-000001"/></text:h>
      <text:p text:style-name="First_20_paragraph"><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 1-4. System Configuration-------------------------------9</text:p>
        </text:list-item>
        <text:list-item>
          <text:p text:style-name="List_20_Number_20_Tight">Names of Each Part------------------------------------10 2-1. Front of the Computer Body---------------------11 2-2. Rear of the Computer Body----------------------11</text:p>
        </text:list-item>
        <text:list-item>
          <text:p text:style-name="List_20_Number_20_Tight">Hardware-----------------------------------------------12 3-1. Memory Map-----------------------------------14 3-2. I/O Port Address List----------------------------15 3-3. Interrupts-----------------------------------------18 3-4. System Report----------------------------------22 3-5. IPL---------------------------------------------25</text:p>
        </text:list-item>
        <text:list-item>
          <text:p text:style-name="List_20_Number_20_Tight">Control of Video Screen and Graphic Screen (CRTC)-28 4-1. Sprites------------------------------------------33 4-2. Priority Controller-------------------------------36 4-3. Text and Graphics Screen Control-----------39 4-4. Others------------------------------------------41 4-5. Keyboard and Mouse--------------------------43</text:p>
        </text:list-item>
        <text:list-item>
          <text:p text:style-name="List_20_Number_20_Tight">Color Palette------------------------------------------43</text:p>
        </text:list-item>
        <text:list-item>
          <text:p text:style-name="List_20_Number_20_Tight">CRT Controller-----------------------------------------45</text:p>
        </text:list-item>
        <text:list-item>
          <text:p text:style-name="List_20_Number_20_Tight">Peripheral Devices-----------------------------------45</text:p>
        </text:list-item>
        <text:list-item>
          <text:p text:style-name="List_20_Number_20_Tight">Devices---------------------------------------------45 8-1. DMA Controller--------------------------------46 8-2. Priority Interrupt Controller--------------------49 8-3. Enhanced Memory-------------------------------54 8-4. MFP--------------------------------------------55 8-5. SCC--------------------------------------------53 8-6. RTC--------------------------------------------57</text:p>
        </text:list-item>
        <text:list-item>
          <text:p text:style-name="List_20_Number_20_Tight">Peripherals------------------------------------------59 9-1. Disks--------------------------------------------62 9-2. Printer--------------------------------------------62 9-3. Joystick--------------------------------------------62 9-4. Expansion Slot----------------------------------63 9-5. Other Connectors-------------------------------66</text:p>
        </text:list-item>
        <text:list-item>
          <text:p text:style-name="List_20_Number_20_Tight">Main Circuit Board----------------------------------67 10-1. Main Circuit Board (1)------------------------71 10-2. Main Circuit Board (2)------------------------72 10-3. Main Circuit Board (3)------------------------73</text:p>
        </text:list-item>
        <text:list-item>
          <text:p text:style-name="List_20_Number_20_Tight">Sub Circuit Board-----------------------------------75 11-1. Sub Circuit Board (1)-------------------------76 11-2. Sub Circuit Board (2)-------------------------77</text:p>
        </text:list-item>
        <text:list-item>
          <text:p text:style-name="List_20_Number_20_Tight">Controller Circuit Board---------------------------80</text:p>
        </text:list-item>
        <text:list-item>
          <text:p text:style-name="List_20_Number_20_Tight">Keyboard Controller-------------------------------85</text:p>
        </text:list-item>
        <text:list-item>
          <text:p text:style-name="List_20_Number_20_Tight">LED of FD Connector, SCSI Connector---------89</text:p>
        </text:list-item>
        <text:list-item>
          <text:p text:style-name="List_20_Number_20_Tight">Basics of the Control Circuit---------------------91</text:p>
        </text:list-item>
        <text:list-item>
          <text:p text:style-name="List_20_Number_20_Tight">Digital LED, FD LED------------------------------91</text:p>
        </text:list-item>
        <text:list-item>
          <text:p text:style-name="List_20_Number_20_Tight">FD Controller-------------------------------------92</text:p>
        </text:list-item>
        <text:list-item>
          <text:p text:style-name="List_20_Number_20_Tight">Analog Board-------------------------------------94</text:p>
        </text:list-item>
        <text:list-item>
          <text:p text:style-name="List_20_Number_20_Tight">CPU Board---------------------------------------99</text:p>
        </text:list-item>
        <text:list-item>
          <text:p text:style-name="List_20_Number_20_Tight">ROM Board--------------------------------------103</text:p>
        </text:list-item>
        <text:list-item>
          <text:p text:style-name="List_20_Number_20_Tight">Sound Board-------------------------------------105</text:p>
        </text:list-item>
        <text:list-item>
          <text:p text:style-name="List_20_Number_20_Tight">Video Board--------------------------------------106</text:p>
        </text:list-item>
        <text:list-item>
          <text:p text:style-name="List_20_Number_20_Tight">Connector Board----------------------------------107</text:p>
        </text:list-item>
        <text:list-item>
          <text:p text:style-name="List_20_Number_20_Tight">Sub Connector Board---------------------------110</text:p>
        </text:list-item>
        <text:list-item>
          <text:p text:style-name="List_20_Number_20_Tight">Printer Output Board-----------------------------111</text:p>
        </text:list-item>
        <text:list-item>
          <text:p text:style-name="List_20_Number_20_Tight">Power Supply Design----------------------------112</text:p>
        </text:list-item>
        <text:list-item>
          <text:p text:style-name="List_20_Number_20_Tight">Power Supply Method----------------------------113</text:p>
        </text:list-item>
        <text:list-item>
          <text:p text:style-name="List_20_Number_20_Tight">Printer Separation Transformer--------------114</text:p>
        </text:list-item>
      </text:list>
      <text:p text:style-name="First_20_paragraph"><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p text:style-name="Horizontal_20_Line"/>
      <text:h text:style-name="Heading_20_2" text:outline-level="2"><text:bookmark-start text:name="serv_-000002"/>serv_-000002<text:bookmark-end text:name="serv_-000002"/></text:h>
      <text:p text:style-name="Horizontal_20_Line"/>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Horizontal_20_Line"/>
      <text:p text:style-name="Horizontal_20_Line"/>
      <text:h text:style-name="Heading_20_2" text:outline-level="2"><text:bookmark-start text:name="serv_-000003"/>serv_-000003<text:bookmark-end text:name="serv_-000003"/></text:h>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3-</text:p>
      <text:p text:style-name="Horizontal_20_Line"/>
      <text:h text:style-name="Heading_20_2" text:outline-level="2"><text:bookmark-start text:name="serv_-000004"/>serv_-000004<text:bookmark-end text:name="serv_-000004"/></text:h>
      <text:p text:style-name="Horizontal_20_Lin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Horizontal_20_Line"/>
      <text:p text:style-name="First_20_paragraph">Note: CEZZ appears to be suffix for LSI chip codes, specifics can be machine dependent.</text:p>
      <text:p text:style-name="Horizontal_20_Line"/>
      <text:h text:style-name="Heading_20_2" text:outline-level="2"><text:bookmark-start text:name="serv_-000005"/>serv_-000005<text:bookmark-end text:name="serv_-000005"/></text:h>
      <text:p text:style-name="Horizontal_20_Line"/>
      <text:p text:style-name="First_20_paragraph"><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Horizontal_20_Line"/>
      <text:h text:style-name="Heading_20_3" text:outline-level="3"><text:bookmark-start text:name="memory"/>Memory<text:bookmark-end text:name="memory"/></text:h>
      <text:p text:style-name="First_20_paragraph"><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Horizontal_20_Line"/>
      <text:h text:style-name="Heading_20_3" text:outline-level="3"><text:bookmark-start text:name="media-storage"/>Media Storage<text:bookmark-end text:name="media-storage"/></text:h>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Horizontal_20_Line"/>
      <text:h text:style-name="Heading_20_3" text:outline-level="3"><text:bookmark-start text:name="interface"/>Interface<text:bookmark-end text:name="interface"/></text:h>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Horizontal_20_Line"/>
      <text:h text:style-name="Heading_20_3" text:outline-level="3"><text:bookmark-start text:name="additional-connections"/>Additional Connections<text:bookmark-end text:name="additional-connections"/></text:h>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Horizontal_20_Line"/>
      <text:p text:style-name="First_20_paragraph"><text:span text:style-name="Strong_20_Emphasis">Page 5</text:span></text:p>
      <text:p text:style-name="Horizontal_20_Line"/>
      <text:h text:style-name="Heading_20_2" text:outline-level="2"><text:bookmark-start text:name="serv_-000006"/>serv_-000006<text:bookmark-end text:name="serv_-000006"/></text:h>
      <text:p text:style-name="First_20_paragraph">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6-</text:p>
      <text:p text:style-name="Horizontal_20_Line"/>
      <text:h text:style-name="Heading_20_2" text:outline-level="2"><text:bookmark-start text:name="serv_-000007"/>serv_-000007<text:bookmark-end text:name="serv_-000007"/></text:h>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7-</text:p>
      <text:p text:style-name="Horizontal_20_Line"/>
      <text:h text:style-name="Heading_20_2" text:outline-level="2"><text:bookmark-start text:name="serv_-000008"/>serv_-000008<text:bookmark-end text:name="serv_-000008"/></text:h>
      <text:p text:style-name="First_20_paragraph">1-3. Block Diagram</text:p>
      <text:p text:style-name="Text_20_body">[Textual summary of the fold-out block diagram. Component names and clock values 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p text:style-name="Horizontal_20_Line"/>
      <text:h text:style-name="Heading_20_2" text:outline-level="2"><text:bookmark-start text:name="serv_-000009"/>serv_-000009<text:bookmark-end text:name="serv_-000009"/></text:h>
      <text:p text:style-name="Horizontal_20_Line"/>
      <text:h text:style-name="Heading_20_3" text:outline-level="3"><text:bookmark-start text:name="id_1-4-system-configuration"/>1-4. System Configuration<text:bookmark-end text:name="id_1-4-system-configuration"/></text:h>
      <text:p text:style-name="First_20_paragraph">This diagram shows the system expansion centered around the main unit.</text:p>
      <text:h text:style-name="Heading_20_4" text:outline-level="4"><text:bookmark-start text:name="main-unit"/>Main Unit<text:bookmark-end text:name="main-unit"/></text:h>
      <text:list text:style-name="List_20_1">
        <text:list-item>
          <text:p text:style-name="List_20_Bullet_20_Tight">X68000</text:p>
        </text:list-item>
      </text:list>
      <text:p text:style-name="Preformatted_20_Text"><text:s text:c="2"/>CZ-63AC-TN</text:p>
      <text:p text:style-name="Preformatted_20_Text"><text:s text:c="2"/>CZ-64AC-TN</text:p>
      <text:h text:style-name="Heading_20_4" text:outline-level="4"><text:bookmark-start text:name="exclusive-display-tv"/>Exclusive Display TV<text:bookmark-end text:name="exclusive-display-tv"/></text:h>
      <text:h text:style-name="Heading_20_5" text:outline-level="5"><text:bookmark-start text:name="expansion-board"/>Expansion Board<text:bookmark-end text:name="expansion-board"/></text:h>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h text:style-name="Heading_20_5" text:outline-level="5"><text:bookmark-start text:name="universal-io-card"/>Universal I/O Card<text:bookmark-end text:name="universal-io-card"/></text:h>
      <text:list text:style-name="List_20_1">
        <text:list-item>
          <text:p text:style-name="List_20_Bullet_20_Tight">CZ-6BU1</text:p>
        </text:list-item>
      </text:list>
      <text:h text:style-name="Heading_20_5" text:outline-level="5"><text:bookmark-start text:name="gp-ib-board"/>GP-IB Board<text:bookmark-end text:name="gp-ib-board"/></text:h>
      <text:list text:style-name="List_20_1">
        <text:list-item>
          <text:p text:style-name="List_20_Bullet_20_Tight">CZ-6BG1</text:p>
        </text:list-item>
      </text:list>
      <text:h text:style-name="Heading_20_5" text:outline-level="5"><text:bookmark-start text:name="joystick-card"/>Joystick Card<text:bookmark-end text:name="joystick-card"/></text:h>
      <text:list text:style-name="List_20_1">
        <text:list-item>
          <text:p text:style-name="List_20_Bullet_20_Tight">CZ-8NJ1</text:p>
        </text:list-item>
      </text:list>
      <text:h text:style-name="Heading_20_5" text:outline-level="5"><text:bookmark-start text:name="device-rs-232c-card"/>Device RS-232C Card<text:bookmark-end text:name="device-rs-232c-card"/></text:h>
      <text:list text:style-name="List_20_1">
        <text:list-item>
          <text:p text:style-name="List_20_Bullet_20_Tight">CZ-6BF1</text:p>
        </text:list-item>
      </text:list>
      <text:h text:style-name="Heading_20_5" text:outline-level="5"><text:bookmark-start text:name="device-processor-board"/>Device Processor Board<text:bookmark-end text:name="device-processor-board"/></text:h>
      <text:list text:style-name="List_20_1">
        <text:list-item>
          <text:p text:style-name="List_20_Bullet_20_Tight">CZ-6BP1</text:p>
        </text:list-item>
      </text:list>
      <text:h text:style-name="Heading_20_5" text:outline-level="5"><text:bookmark-start text:name="device-control-board"/>Device Control Board<text:bookmark-end text:name="device-control-board"/></text:h>
      <text:list text:style-name="List_20_1">
        <text:list-item>
          <text:p text:style-name="List_20_Bullet_20_Tight">CZ-6BP2</text:p>
        </text:list-item>
      </text:list>
      <text:h text:style-name="Heading_20_5" text:outline-level="5"><text:bookmark-start text:name="fax-board"/>FAX Board<text:bookmark-end text:name="fax-board"/></text:h>
      <text:list text:style-name="List_20_1">
        <text:list-item>
          <text:p text:style-name="List_20_Bullet_20_Tight">CZ-6BC1</text:p>
        </text:list-item>
      </text:list>
      <text:h text:style-name="Heading_20_5" text:outline-level="5"><text:bookmark-start text:name="midi-board"/>MIDI Board<text:bookmark-end text:name="midi-board"/></text:h>
      <text:list text:style-name="List_20_1">
        <text:list-item>
          <text:p text:style-name="List_20_Bullet_20_Tight">CZ-6BM1</text:p>
        </text:list-item>
      </text:list>
      <text:h text:style-name="Heading_20_5" text:outline-level="5"><text:bookmark-start text:name="sound-amplifier-speaker"/>Sound Amplifier Speaker<text:bookmark-end text:name="sound-amplifier-speaker"/></text:h>
      <text:list text:style-name="List_20_1">
        <text:list-item>
          <text:p text:style-name="List_20_Bullet_20_Tight">AN-S100</text:p>
        </text:list-item>
      </text:list>
      <text:h text:style-name="Heading_20_5" text:outline-level="5"><text:bookmark-start text:name="peripherals"/>Peripherals<text:bookmark-end text:name="peripherals"/></text:h>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h text:style-name="Heading_20_5" text:outline-level="5"><text:bookmark-start text:name="network"/>Network<text:bookmark-end text:name="network"/></text:h>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h text:style-name="Heading_20_5" text:outline-level="5"><text:bookmark-start text:name="imaging-and-image-inputoutput-switch"/>Imaging and Image Input/Output Switch<text:bookmark-end text:name="imaging-and-image-inputoutput-switch"/></text:h>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h text:style-name="Heading_20_5" text:outline-level="5"><text:bookmark-start text:name="printer"/>Printer<text:bookmark-end text:name="printer"/></text:h>
      <text:list text:style-name="List_20_1">
        <text:list-item>
          <text:p text:style-name="List_20_Bullet">24-Dot Matrix Color/Monochrome Printer CZ-8PC3</text:p>
        </text:list-item>
        <text:list-item>
          <text:p text:style-name="List_20_Bullet">48-Dot Matrix Color Printer CZ-8PC4</text:p>
        </text:list-item>
      </text:list>
      <text:h text:style-name="Heading_20_5" text:outline-level="5"><text:bookmark-start text:name="display-section"/>Display Section<text:bookmark-end text:name="display-section"/></text:h>
      <text:list text:style-name="List_20_1">
        <text:list-item>
          <text:p text:style-name="List_20_Bullet_20_Tight">RGB System Selector CZ-6TU</text:p>
        </text:list-item>
      </text:list>
      <text:h text:style-name="Heading_20_5" text:outline-level="5"><text:bookmark-start text:name="file-section"/>File Section<text:bookmark-end text:name="file-section"/></text:h>
      <text:list text:style-name="List_20_1">
        <text:list-item>
          <text:p text:style-name="List_20_Bullet_20_Tight">Removable Mass Storage Disc System (594MB) CZ-6MO1</text:p>
        </text:list-item>
      </text:list>
      <text:h text:style-name="Heading_20_5" text:outline-level="5"><text:bookmark-start text:name="print-buffer"/>Print Buffer<text:bookmark-end text:name="print-buffer"/></text:h>
      <text:list text:style-name="List_20_1">
        <text:list-item>
          <text:p text:style-name="List_20_Bullet_20_Tight">Constant Print Buffer CZ-6EB1</text:p>
        </text:list-item>
      </text:list>
      <text:h text:style-name="Heading_20_5" text:outline-level="5"><text:bookmark-start text:name="system-rack"/>System Rack<text:bookmark-end text:name="system-rack"/></text:h>
      <text:list text:style-name="List_20_1">
        <text:list-item>
          <text:p text:style-name="List_20_Bullet_20_Tight">System Rack CZ-6SD1</text:p>
        </text:list-item>
      </text:list>
      <text:h text:style-name="Heading_20_5" text:outline-level="5"><text:bookmark-start text:name="id_24-pin-dot-impact-13-color"/>24-Pin Dot Impact (13 Color)<text:bookmark-end text:name="id_24-pin-dot-impact-13-color"/></text:h>
      <text:p text:style-name="First_20_paragraph">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h text:style-name="Heading_20_5" text:outline-level="5"><text:bookmark-start text:name="id_24-pin-dot-13-color-with-scanner"/>24-Pin Dot (13 Color) with Scanner<text:bookmark-end text:name="id_24-pin-dot-13-color-with-scanner"/></text:h>
      <text:p text:style-name="First_20_paragraph">CZ-8PK10</text:p>
      <text:h text:style-name="Heading_20_5" text:outline-level="5"><text:bookmark-start text:name="crt-filter"/>CRT Filter<text:bookmark-end text:name="crt-filter"/></text:h>
      <text:p text:style-name="First_20_paragraph">BF-6BP10 (14/15 inches)</text:p>
      <text:p text:style-name="Horizontal_20_Line"/>
      <text:p text:style-name="Horizontal_20_Line"/>
      <text:h text:style-name="Heading_20_2" text:outline-level="2"><text:bookmark-start text:name="serv_-000010"/>serv_-000010<text:bookmark-end text:name="serv_-000010"/></text:h>
      <text:p text:style-name="Horizontal_20_Line"/>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Horizontal_20_Line"/>
      <text:p text:style-name="First_20_paragraph">Page 10</text:p>
      <text:p text:style-name="Horizontal_20_Line"/>
      <text:h text:style-name="Heading_20_2" text:outline-level="2"><text:bookmark-start text:name="serv_-000011"/>serv_-000011<text:bookmark-end text:name="serv_-000011"/></text:h>
      <text:p text:style-name="Horizontal_20_Line"/>
      <text:p text:style-name="First_20_paragraph">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Horizontal_20_Line"/>
      <text:p text:style-name="Horizontal_20_Line"/>
      <text:h text:style-name="Heading_20_2" text:outline-level="2"><text:bookmark-start text:name="serv_-000012"/>serv_-000012<text:bookmark-end text:name="serv_-000012"/></text:h>
      <text:p text:style-name="Horizontal_20_Line"/>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Horizontal_20_Line"/>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Horizontal_20_Line"/>
      <text:p text:style-name="First_20_paragraph">Note: The addresses provided (like 06B0000H, 00CFFFFF, etc.) appear to be hexadecimal memory addresses used in the context of the system's memory map.</text:p>
      <text:p text:style-name="Horizontal_20_Line"/>
      <text:h text:style-name="Heading_20_2" text:outline-level="2"><text:bookmark-start text:name="serv_-000013"/>serv_-000013<text:bookmark-end text:name="serv_-000013"/></text:h>
      <text:p text:style-name="Horizontal_20_Line"/>
      <text:p text:style-name="First_20_paragraph">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Horizontal_20_Line"/>
      <text:p text:style-name="Horizontal_20_Line"/>
      <text:h text:style-name="Heading_20_2" text:outline-level="2"><text:bookmark-start text:name="serv_-000014"/>serv_-000014<text:bookmark-end text:name="serv_-000014"/></text:h>
      <text:p text:style-name="Horizontal_20_Lin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ext:p text:style-name="Horizontal_20_Line"/>
      <text:p text:style-name="Horizontal_20_Line"/>
      <text:h text:style-name="Heading_20_2" text:outline-level="2"><text:bookmark-start text:name="serv_-000015"/>serv_-000015<text:bookmark-end text:name="serv_-000015"/></text:h>
      <text:p text:style-name="Horizontal_20_Lin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ext:p text:style-name="Horizontal_20_Line"/>
      <text:p text:style-name="First_20_paragraph">This is a translation of the table containing port addresses, their functions, and remarks.</text:p>
      <text:p text:style-name="Horizontal_20_Line"/>
      <text:h text:style-name="Heading_20_2" text:outline-level="2"><text:bookmark-start text:name="serv_-000016"/>serv_-000016<text:bookmark-end text:name="serv_-000016"/></text:h>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Horizontal_20_Line"/>
      <text:h text:style-name="Heading_20_2" text:outline-level="2"><text:bookmark-start text:name="serv_-000017"/>serv_-000017<text:bookmark-end text:name="serv_-000017"/></text:h>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17-</text:p>
      <text:p text:style-name="Horizontal_20_Line"/>
      <text:h text:style-name="Heading_20_2" text:outline-level="2"><text:bookmark-start text:name="serv_-000018"/>serv_-000018<text:bookmark-end text:name="serv_-000018"/></text:h>
      <text:p text:style-name="Horizontal_20_Line"/>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 18 --</text:p>
      <text:p text:style-name="Horizontal_20_Line"/>
      <text:p text:style-name="First_20_paragraph">Note: H means hexadecimal in the context of memory and register addresses.</text:p>
      <text:p text:style-name="Horizontal_20_Line"/>
      <text:h text:style-name="Heading_20_2" text:outline-level="2"><text:bookmark-start text:name="serv_-000019"/>serv_-000019<text:bookmark-end text:name="serv_-000019"/></text:h>
      <text:p text:style-name="Horizontal_20_Line"/>
      <text:p text:style-name="First_20_paragraph">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Horizontal_20_Line"/>
      <text:p text:style-name="Horizontal_20_Line"/>
      <text:h text:style-name="Heading_20_2" text:outline-level="2"><text:bookmark-start text:name="serv_-000020"/>serv_-000020<text:bookmark-end text:name="serv_-000020"/></text:h>
      <text:p text:style-name="Horizontal_20_Line"/>
      <text:p text:style-name="First_20_paragraph">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Horizontal_20_Line"/>
      <text:p text:style-name="First_20_paragraph">Page -20-</text:p>
      <text:p text:style-name="Horizontal_20_Line"/>
      <text:h text:style-name="Heading_20_2" text:outline-level="2"><text:bookmark-start text:name="serv_-000021"/>serv_-000021<text:bookmark-end text:name="serv_-000021"/></text:h>
      <text:p text:style-name="First_20_paragraph">.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list text:style-name="List_20_1">
        <text:list-item>
          <text:p text:style-name="List_20_Bullet_20_Tight">21 -</text:p>
        </text:list-item>
      </text:list>
      <text:p text:style-name="Horizontal_20_Line"/>
      <text:h text:style-name="Heading_20_2" text:outline-level="2"><text:bookmark-start text:name="serv_-000022"/>serv_-000022<text:bookmark-end text:name="serv_-000022"/></text:h>
      <text:h text:style-name="Heading_20_3" text:outline-level="3"><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 22 —</text:p>
      <text:p text:style-name="Horizontal_20_Line"/>
      <text:h text:style-name="Heading_20_2" text:outline-level="2"><text:bookmark-start text:name="serv_-000023"/>serv_-000023<text:bookmark-end text:name="serv_-000023"/></text:h>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 (Error Interrupt Vector)</text:p>
      <text:p text:style-name="Text_20_body">DMAC E840E5H Set (Channel 2) (Normal Interrupt Vector) (Memory) E840A7H Set (Memory) (Error Interrupt Vector)</text:p>
      <text:p text:style-name="Text_20_body">DMAC E840A5H Set (Channel 3) (Normal Interrupt Vector) (Audio Synthesis) E840E7H Set (Error Interrupt Vector)</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p text:style-name="Horizontal_20_Line"/>
      <text:h text:style-name="Heading_20_2" text:outline-level="2"><text:bookmark-start text:name="serv_-000024"/>serv_-000024<text:bookmark-end text:name="serv_-000024"/></text:h>
      <text:p text:style-name="Horizontal_20_Line"/>
      <text:h text:style-name="Heading_20_2" text:outline-level="2"><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Horizontal_20_Line"/>
      <text:h text:style-name="Heading_20_2" text:outline-level="2"><text:bookmark-start text:name="serv_-000025"/>serv_-000025<text:bookmark-end text:name="serv_-000025"/></text:h>
      <text:p text:style-name="Horizontal_20_Line"/>
      <text:p text:style-name="First_20_paragraph"><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p text:style-name="Horizontal_20_Line"/>
      <text:p text:style-name="Horizontal_20_Line"/>
      <text:h text:style-name="Heading_20_2" text:outline-level="2"><text:bookmark-start text:name="serv_-000026"/>serv_-000026<text:bookmark-end text:name="serv_-000026"/></text:h>
      <text:p text:style-name="Horizontal_20_Line"/>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Horizontal_20_Line"/>
      <text:p text:style-name="First_20_paragraph">Page 26</text:p>
      <text:p text:style-name="Horizontal_20_Line"/>
      <text:h text:style-name="Heading_20_2" text:outline-level="2"><text:bookmark-start text:name="serv_-000027"/>serv_-000027<text:bookmark-end text:name="serv_-000027"/></text:h>
      <text:p text:style-name="Horizontal_20_Line"/>
      <text:p text:style-name="First_20_paragraph"><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Horizontal_20_Lin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Horizontal_20_Line"/>
      <text:p text:style-name="First_20_paragraph"><text:span text:style-name="Strong_20_Emphasis">Note</text:span>: The numbers <text:span text:style-name="Source_20_Text">(1), (2), (3), (4), (5)</text:span> correspond to the parts of the diagram provided below the table in the original document.</text:p>
      <text:p text:style-name="Horizontal_20_Line"/>
      <text:h text:style-name="Heading_20_2" text:outline-level="2"><text:bookmark-start text:name="serv_-000028"/>serv_-000028<text:bookmark-end text:name="serv_-000028"/></text:h>
      <text:p text:style-name="Horizontal_20_Line"/>
      <text:p text:style-name="First_20_paragraph"><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Horizontal_20_Line"/>
      <text:p text:style-name="Horizontal_20_Line"/>
      <text:h text:style-name="Heading_20_2" text:outline-level="2"><text:bookmark-start text:name="serv_-000029"/>serv_-000029<text:bookmark-end text:name="serv_-000029"/></text:h>
      <text:p text:style-name="First_20_paragraph">(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Horizontal_20_Line"/>
      <text:h text:style-name="Heading_20_2" text:outline-level="2"><text:bookmark-start text:name="serv_-000030"/>serv_-000030<text:bookmark-end text:name="serv_-000030"/></text:h>
      <text:p text:style-name="First_20_paragraph">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list text:style-name="List_20_1">
        <text:list-item>
          <text:p text:style-name="List_20_Bullet_20_Tight">30 -</text:p>
        </text:list-item>
      </text:list>
      <text:p text:style-name="Horizontal_20_Line"/>
      <text:h text:style-name="Heading_20_2" text:outline-level="2"><text:bookmark-start text:name="serv_-000031"/>serv_-000031<text:bookmark-end text:name="serv_-000031"/></text:h>
      <text:p text:style-name="First_20_paragraph">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31—</text:p>
      <text:p text:style-name="Horizontal_20_Line"/>
      <text:h text:style-name="Heading_20_2" text:outline-level="2"><text:bookmark-start text:name="serv_-000032"/>serv_-000032<text:bookmark-end text:name="serv_-000032"/></text:h>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32-</text:p>
      <text:p text:style-name="Horizontal_20_Line"/>
      <text:h text:style-name="Heading_20_2" text:outline-level="2"><text:bookmark-start text:name="serv_-000033"/>serv_-000033<text:bookmark-end text:name="serv_-000033"/></text:h>
      <text:p text:style-name="Horizontal_20_Line"/>
      <text:p text:style-name="First_20_paragraph">(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Horizontal_20_Line"/>
      <text:p text:style-name="Horizontal_20_Line"/>
      <text:h text:style-name="Heading_20_2" text:outline-level="2"><text:bookmark-start text:name="serv_-000034"/>serv_-000034<text:bookmark-end text:name="serv_-000034"/></text:h>
      <text:p text:style-name="Horizontal_20_Line"/>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Horizontal_20_Line"/>
      <text:p text:style-name="First_20_paragraph">Page - 34 -</text:p>
      <text:p text:style-name="Horizontal_20_Line"/>
      <text:h text:style-name="Heading_20_2" text:outline-level="2"><text:bookmark-start text:name="serv_-000035"/>serv_-000035<text:bookmark-end text:name="serv_-000035"/></text:h>
      <text:p text:style-name="Horizontal_20_Line"/>
      <text:p text:style-name="First_20_paragraph">(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0 - Port C (lower 4 bits) output (sound synthesis)<text:line-break/>1 - Port B input (joystick No.2)<text:line-break/>0 - Port C (upper 4 bits) output (joystick control)<text:line-break/>1 - Port A input (joystick No.1)</text:p>
      <text:p text:style-name="Horizontal_20_Line"/>
      <text:p text:style-name="First_20_paragraph">Page 35</text:p>
      <text:p text:style-name="Horizontal_20_Line"/>
      <text:h text:style-name="Heading_20_2" text:outline-level="2"><text:bookmark-start text:name="serv_-000036"/>serv_-000036<text:bookmark-end text:name="serv_-000036"/></text:h>
      <text:p text:style-name="Horizontal_20_Line"/>
      <text:h text:style-name="Heading_20_2" text:outline-level="2"><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Data Bus Control Bus Address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Horizontal_20_Line"/>
      <text:p text:style-name="Horizontal_20_Line"/>
      <text:h text:style-name="Heading_20_2" text:outline-level="2"><text:bookmark-start text:name="serv_-000037"/>serv_-000037<text:bookmark-end text:name="serv_-000037"/></text:h>
      <text:p text:style-name="First_20_paragraph">(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list text:style-name="List_20_1">
        <text:list-item>
          <text:p text:style-name="List_20_Bullet_20_Tight">37 -</text:p>
        </text:list-item>
      </text:list>
      <text:p text:style-name="Horizontal_20_Line"/>
      <text:h text:style-name="Heading_20_2" text:outline-level="2"><text:bookmark-start text:name="serv_-000038"/>serv_-000038<text:bookmark-end text:name="serv_-000038"/></text:h>
      <text:p text:style-name="First_20_paragraph"><text:span text:style-name="Strong_20_Emphasis">Image Translation:</text:span></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38-</text:p>
      <text:p text:style-name="Horizontal_20_Line"/>
      <text:h text:style-name="Heading_20_2" text:outline-level="2"><text:bookmark-start text:name="serv_-000039"/>serv_-000039<text:bookmark-end text:name="serv_-000039"/></text:h>
      <text:p text:style-name="Horizontal_20_Line"/>
      <text:p text:style-name="First_20_paragraph">(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 0 - Key pressed state 1 - Key not pressed state</text:p>
      <text:p text:style-name="Text_20_body">1-byte data from 80C51 to MFP Key code reference is in figure 3-2</text:p>
      <text:list text:style-name="List_20_1">
        <text:list-item>
          <text:p text:style-name="List_20_Bullet_20_Tight">39 -</text:p>
        </text:list-item>
      </text:list>
      <text:p text:style-name="Horizontal_20_Line"/>
      <text:p text:style-name="Horizontal_20_Line"/>
      <text:h text:style-name="Heading_20_2" text:outline-level="2"><text:bookmark-start text:name="serv_-000040"/>serv_-000040<text:bookmark-end text:name="serv_-000040"/></text:h>
      <text:p text:style-name="First_20_paragraph">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40-</text:p>
      <text:p text:style-name="Horizontal_20_Line"/>
      <text:h text:style-name="Heading_20_2" text:outline-level="2"><text:bookmark-start text:name="serv_-000041"/>serv_-000041<text:bookmark-end text:name="serv_-000041"/></text:h>
      <text:p text:style-name="Horizontal_20_Line"/>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Horizontal_20_Line"/>
      <text:p text:style-name="First_20_paragraph">(End of page 41)</text:p>
      <text:p text:style-name="Horizontal_20_Line"/>
      <text:h text:style-name="Heading_20_2" text:outline-level="2"><text:bookmark-start text:name="serv_-000042"/>serv_-000042<text:bookmark-end text:name="serv_-000042"/></text:h>
      <text:p text:style-name="Horizontal_20_Line"/>
      <text:p text:style-name="First_20_paragraph"><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Horizontal_20_Line"/>
      <text:p text:style-name="Horizontal_20_Line"/>
      <text:h text:style-name="Heading_20_2" text:outline-level="2"><text:bookmark-start text:name="serv_-000043"/>serv_-000043<text:bookmark-end text:name="serv_-000043"/></text:h>
      <text:p text:style-name="Horizontal_20_Line"/>
      <text:p text:style-name="First_20_paragraph"><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Horizontal_20_Line"/>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Horizontal_20_Line"/>
      <text:p text:style-name="Horizontal_20_Line"/>
      <text:h text:style-name="Heading_20_2" text:outline-level="2"><text:bookmark-start text:name="serv_-000044"/>serv_-000044<text:bookmark-end text:name="serv_-000044"/></text:h>
      <text:p text:style-name="Horizontal_20_Line"/>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text:p>
      <text:h text:style-name="Heading_20_3" text:outline-level="3"><text:bookmark-start text:name="mc68881-main-features"/>MC68881 Main Features<text:bookmark-end text:name="mc68881-main-features"/></text:h>
      <text:p text:style-name="First_20_paragraph">●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Horizontal_20_Line"/>
      <text:p text:style-name="First_20_paragraph">Note: The image contained a diagram illustrating the connections to the MC68881 FPU, which is referenced in the translated text but not described in detail here.</text:p>
      <text:p text:style-name="Horizontal_20_Line"/>
      <text:h text:style-name="Heading_20_2" text:outline-level="2"><text:bookmark-start text:name="serv_-000045"/>serv_-000045<text:bookmark-end text:name="serv_-000045"/></text:h>
      <text:p text:style-name="First_20_paragraph">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p text:style-name="Text_20_body">-45-</text:p>
      <text:p text:style-name="Horizontal_20_Line"/>
      <text:h text:style-name="Heading_20_2" text:outline-level="2"><text:bookmark-start text:name="serv_-000046"/>serv_-000046<text:bookmark-end text:name="serv_-000046"/></text:h>
      <text:p text:style-name="Horizontal_20_Line"/>
      <text:h text:style-name="Heading_20_3" text:outline-level="3"><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Horizontal_20_Line"/>
      <text:h text:style-name="Heading_20_4" text:outline-level="4"><text:bookmark-start text:name="diagram-translation"/>[Diagram Translation]<text:bookmark-end text:name="diagram-translation"/></text:h>
      <text:h text:style-name="Heading_20_4" text:outline-level="4"><text:bookmark-start text:name="clk-reset-vcc1-vss-4mhz"/>CLK RESET Vcc1 Vss (4MHz)<text:bookmark-end text:name="clk-reset-vcc1-vss-4mhz"/></text:h>
      <text:p text:style-name="First_20_paragraph"><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Horizontal_20_Line"/>
      <text:h text:style-name="Heading_20_4" text:outline-level="4"><text:bookmark-start text:name="figure-8-3-mfp-block-diagram"/>Figure 8-3 MFP Block Diagram<text:bookmark-end text:name="figure-8-3-mfp-block-diagram"/></text:h>
      <text:p text:style-name="Horizontal_20_Line"/>
      <text:p text:style-name="First_20_paragraph">Page 46</text:p>
      <text:p text:style-name="Horizontal_20_Line"/>
      <text:h text:style-name="Heading_20_2" text:outline-level="2"><text:bookmark-start text:name="serv_-000047"/>serv_-000047<text:bookmark-end text:name="serv_-000047"/></text:h>
      <text:p text:style-name="Horizontal_20_Line"/>
      <text:p text:style-name="First_20_paragraph">&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Horizontal_20_Line"/>
      <text:p text:style-name="First_20_paragraph">Note: The block diagrams depicted in the image consist of symbols and schematics outlining the logical flow of signals and counters within the MFP system. Translation of the labels within the diagrams remains consistent with the surrounding textual content.</text:p>
      <text:p text:style-name="Horizontal_20_Line"/>
      <text:h text:style-name="Heading_20_2" text:outline-level="2"><text:bookmark-start text:name="serv_-000048"/>serv_-000048<text:bookmark-end text:name="serv_-000048"/></text:h>
      <text:p text:style-name="First_20_paragraph">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48-</text:p>
      <text:p text:style-name="Horizontal_20_Line"/>
      <text:h text:style-name="Heading_20_2" text:outline-level="2"><text:bookmark-start text:name="serv_-000049"/>serv_-000049<text:bookmark-end text:name="serv_-000049"/></text:h>
      <text:p text:style-name="First_20_paragraph">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Horizontal_20_Line"/>
      <text:h text:style-name="Heading_20_2" text:outline-level="2"><text:bookmark-start text:name="serv_-000050"/>serv_-000050<text:bookmark-end text:name="serv_-000050"/></text:h>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Horizontal_20_Line"/>
      <text:h text:style-name="Heading_20_2" text:outline-level="2"><text:bookmark-start text:name="serv_-000051"/>serv_-000051<text:bookmark-end text:name="serv_-000051"/></text:h>
      <text:p text:style-name="Horizontal_20_Line"/>
      <text:p text:style-name="First_20_paragraph">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Horizontal_20_Line"/>
      <text:p text:style-name="First_20_paragraph">The page number at the bottom reads "51." The model numbers mentioned at the top right are CZ-634C-TN and CZ-644C-TN.</text:p>
      <text:p text:style-name="Horizontal_20_Line"/>
      <text:h text:style-name="Heading_20_2" text:outline-level="2"><text:bookmark-start text:name="serv_-000052"/>serv_-000052<text:bookmark-end text:name="serv_-000052"/></text:h>
      <text:p text:style-name="First_20_paragraph">Top Left: CZ-634C-TN CZ-644C-TN</text:p>
      <text:p text:style-name="Text_20_body">Middle Right: RS-232C Mouse Connector Pinout</text:p>
      <text:p text:style-name="Text_20_body">Bottom Center: Fig. 8-7 SCC Block Diagram</text:p>
      <text:p text:style-name="Text_20_body">Bottom Center: – 52 –</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Note: Some text from the image was repeated and translated groupwise.</text:p>
      <text:p text:style-name="Horizontal_20_Line"/>
      <text:h text:style-name="Heading_20_2" text:outline-level="2"><text:bookmark-start text:name="serv_-000053"/>serv_-000053<text:bookmark-end text:name="serv_-000053"/></text:h>
      <text:p text:style-name="First_20_paragraph"><text:span text:style-name="Strong_20_Emphasis">8-5. SCC</text:span></text:p>
      <text:p text:style-name="Text_20_body">In this manual, the RS-232C serial communication controller is used to support the mouse. We use the Z8530 SCC for the Z8000 family. The block diagram is shown in Fig. 8-7.</text:p>
      <text:p text:style-name="Text_20_body">(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Horizontal_20_Line"/>
      <text:h text:style-name="Heading_20_2" text:outline-level="2"><text:bookmark-start text:name="serv_-000054"/>serv_-000054<text:bookmark-end text:name="serv_-000054"/></text:h>
      <text:p text:style-name="Horizontal_20_Line"/>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p text:style-name="Horizontal_20_Line"/>
      <text:p text:style-name="First_20_paragraph"><text:span text:style-name="Emphasis">Page -54-</text:span></text:p>
      <text:p text:style-name="Horizontal_20_Line"/>
      <text:h text:style-name="Heading_20_2" text:outline-level="2"><text:bookmark-start text:name="serv_-000055"/>serv_-000055<text:bookmark-end text:name="serv_-000055"/></text:h>
      <text:p text:style-name="First_20_paragraph">The provided text translates to the following in English:</text:p>
      <text:p text:style-name="Horizontal_20_Line"/>
      <text:p text:style-name="First_20_paragraph">(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list text:style-name="List_20_1">
        <text:list-item>
          <text:p text:style-name="List_20_Bullet_20_Tight">55 -</text:p>
        </text:list-item>
      </text:list>
      <text:p text:style-name="Horizontal_20_Line"/>
      <text:p text:style-name="Horizontal_20_Line"/>
      <text:h text:style-name="Heading_20_2" text:outline-level="2"><text:bookmark-start text:name="serv_-000056"/>serv_-000056<text:bookmark-end text:name="serv_-000056"/></text:h>
      <text:p text:style-name="Horizontal_20_Line"/>
      <text:p text:style-name="First_20_paragraph">CZ-634C-TN CZ-644C-T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56-</text:p>
      <text:p text:style-name="Horizontal_20_Line"/>
      <text:p text:style-name="Horizontal_20_Line"/>
      <text:h text:style-name="Heading_20_2" text:outline-level="2"><text:bookmark-start text:name="serv_-000057"/>serv_-000057<text:bookmark-end text:name="serv_-000057"/></text:h>
      <text:p text:style-name="First_20_paragraph">Address Bus Data Bus SCSI Controller Hard Disk Control Hard Disk Data Bus</text:p>
      <text:p text:style-name="Text_20_body">HD (Hard Disk) FD (Floppy Disk)</text:p>
      <text:p text:style-name="Text_20_body">Address Bus Data Bus 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he labels next to specific arrows relate to signals or commands connecting different components in a hard disk and floppy disk drive control system.</text:p>
      <text:p text:style-name="Horizontal_20_Line"/>
      <text:h text:style-name="Heading_20_2" text:outline-level="2"><text:bookmark-start text:name="serv_-000058"/>serv_-000058<text:bookmark-end text:name="serv_-000058"/></text:h>
      <text:p text:style-name="First_20_paragraph">Table 9-2 Internal FDD Specifications</text:p>
      <table:table table:name="Table24" table:style-name="Table24">
        <table:table-column table:style-name="Table24.A"/>
        <table:table-column table:style-name="Table2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58-</text:p>
      <text:p text:style-name="Horizontal_20_Line"/>
      <text:h text:style-name="Heading_20_2" text:outline-level="2"><text:bookmark-start text:name="serv_-000059"/>serv_-000059<text:bookmark-end text:name="serv_-000059"/></text:h>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 4</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Horizontal_20_Line"/>
      <text:h text:style-name="Heading_20_2" text:outline-level="2"><text:bookmark-start text:name="serv_-000060"/>serv_-000060<text:bookmark-end text:name="serv_-000060"/></text:h>
      <text:p text:style-name="First_20_paragraph">&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60-</text:p>
      <text:p text:style-name="Horizontal_20_Line"/>
      <text:h text:style-name="Heading_20_2" text:outline-level="2"><text:bookmark-start text:name="serv_-000061"/>serv_-000061<text:bookmark-end text:name="serv_-000061"/></text:h>
      <text:p text:style-name="Horizontal_20_Line"/>
      <text:p text:style-name="First_20_paragraph">Table 9-5 Printer Register Map</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Horizontal_20_Line"/>
      <text:list text:style-name="List_20_1">
        <text:list-item>
          <text:p text:style-name="List_20_Bullet_20_Tight">61 -</text:p>
        </text:list-item>
      </text:list>
      <text:p text:style-name="Horizontal_20_Line"/>
      <text:h text:style-name="Heading_20_2" text:outline-level="2"><text:bookmark-start text:name="serv_-000062"/>serv_-000062<text:bookmark-end text:name="serv_-000062"/></text:h>
      <text:p text:style-name="First_20_paragraph">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able:table table:name="Table26" table:style-name="Table26">
        <table:table-column table:style-name="Table26.A"/>
        <table:table-column table:style-name="Table26.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Horizontal_20_Line"/>
      <text:h text:style-name="Heading_20_2" text:outline-level="2"><text:bookmark-start text:name="serv_-000063"/>serv_-000063<text:bookmark-end text:name="serv_-000063"/></text:h>
      <text:p text:style-name="First_20_paragraph">(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63—</text:p>
      <text:p text:style-name="Horizontal_20_Line"/>
      <text:h text:style-name="Heading_20_2" text:outline-level="2"><text:bookmark-start text:name="serv_-000064"/>serv_-000064<text:bookmark-end text:name="serv_-000064"/></text:h>
      <text:p text:style-name="First_20_paragraph">Extension I/O Socket Terminal (A)</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ext:p text:style-name="Horizontal_20_Line"/>
      <text:h text:style-name="Heading_20_2" text:outline-level="2"><text:bookmark-start text:name="serv_-000065"/>serv_-000065<text:bookmark-end text:name="serv_-000065"/></text:h>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Horizontal_20_Line"/>
      <text:h text:style-name="Heading_20_2" text:outline-level="2"><text:bookmark-start text:name="serv_-000066"/>serv_-000066<text:bookmark-end text:name="serv_-000066"/></text:h>
      <text:p text:style-name="Horizontal_20_Line"/>
      <text:p text:style-name="First_20_paragraph"><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Horizontal_20_Line"/>
      <text:p text:style-name="First_20_paragraph">(Page - 66)</text:p>
      <text:p text:style-name="Horizontal_20_Line"/>
      <text:h text:style-name="Heading_20_2" text:outline-level="2"><text:bookmark-start text:name="serv_-000067"/>serv_-000067<text:bookmark-end text:name="serv_-000067"/></text:h>
      <text:p text:style-name="First_20_paragraph"><text:span text:style-name="Strong_20_Emphasis">Terminal No. | Signal Name | I/O | Remarks | Notes</text:span> 16 | Vcc3 | Out | +12V 17 | CD4 | Out | Computer control signal 18 | CD3 | Out | Computer control signal 19 | CD2 | Out | Computer control signal 20 | CD1 | Out | Computer control signal 21 | CD1 | Out | Computer control signal 22 | ADD15 | In | Analog/Digital conversion data 23 | ADD14 | In | Analog/Digital conversion data 24 | ADD13 | In | Analog/Digital conversion data 25 | ADD12 | In | Analog/Digital conversion data</text:p>
      <text:p text:style-name="Text_20_body"><text:span text:style-name="Strong_20_Emphasis">Printer Connector</text:span> <text:span text:style-name="Strong_20_Emphasis">(Pins diagram)</text:span></text:p>
      <text:p text:style-name="Text_20_body"><text:span text:style-name="Strong_20_Emphasis">Terminal No. | Signal Name | I/O | Remarks | Notes</text:span> 1 | STROBE | Out | Negative polarity print output strobe signal 2 | PA0 | Out | Parallel data bus 3 | PA1 | " | " 4 | PA2 | " | " 5 | PA3 | " | " 6 | PA4 | " | " 7 | PA5 | " | " 8 | PA6 | " | " 9 | PA7 | " | " 10 | N.C | - | Not connected 11 | BUSY | In | Printer 'LOW' level when ready 12 | N.C | - | Not connected 13 | GND | Out | Ground 14 | GND | Out | Ground</text:p>
      <text:p text:style-name="Text_20_body"><text:span text:style-name="Strong_20_Emphasis">SEE THROUGH COLOR</text:span> <text:span text:style-name="Strong_20_Emphasis">(Pins diagram)</text:span></text:p>
      <text:p text:style-name="Text_20_body"><text:span text:style-name="Strong_20_Emphasis">Terminal No. | Signal Name | I/O | Remarks | Notes</text:span> 1 | VHT | Out | Video Half Tone (semi-transparent color) 2 | GND | Out | Ground</text:p>
      <text:p text:style-name="Text_20_body"><text:span text:style-name="Strong_20_Emphasis">LINE IN</text:span> <text:span text:style-name="Strong_20_Emphasis">(Pins diagram)</text:span></text:p>
      <text:p text:style-name="Text_20_body"><text:span text:style-name="Strong_20_Emphasis">Terminal No. | Signal Name | I/O | Remarks | Notes</text:span> 1 | GND | Out | Ground 2 | LINEIN | In | Audio synthesis input 3 | N.C | - | Not connected</text:p>
      <text:p text:style-name="Text_20_body"><text:span text:style-name="Strong_20_Emphasis">LINE OUT</text:span> <text:span text:style-name="Strong_20_Emphasis">(Pins diagram)</text:span></text:p>
      <text:p text:style-name="Text_20_body"><text:span text:style-name="Strong_20_Emphasis">Terminal No. | Signal Name | I/O | Remarks | Notes</text:span> 1 | GND | Out | Ground 2 | L | Out | Audio (left output) 3 | R | Out | Audio (right output)</text:p>
      <text:p text:style-name="Horizontal_20_Line"/>
      <text:h text:style-name="Heading_20_2" text:outline-level="2"><text:bookmark-start text:name="serv_-000068"/>serv_-000068<text:bookmark-end text:name="serv_-000068"/></text:h>
      <text:h text:style-name="Heading_20_3" text:outline-level="3"><text:bookmark-start text:name="joystick-connector"/>Joystick Connector<text:bookmark-end text:name="joystick-connector"/></text:h>
      <text:h text:style-name="Heading_20_4" text:outline-level="4"><text:bookmark-start text:name="joystick-1"/>Joystick 1<text:bookmark-end text:name="joystick-1"/></text:h>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h text:style-name="Heading_20_4" text:outline-level="4"><text:bookmark-start text:name="joystick-2"/>Joystick 2<text:bookmark-end text:name="joystick-2"/></text:h>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h text:style-name="Heading_20_3" text:outline-level="3"><text:bookmark-start text:name="rs-232c-connector"/>RS-232C Connector<text:bookmark-end text:name="rs-232c-connector"/></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Horizontal_20_Line"/>
      <text:h text:style-name="Heading_20_2" text:outline-level="2"><text:bookmark-start text:name="serv_-000069"/>serv_-000069<text:bookmark-end text:name="serv_-000069"/></text:h>
      <text:h text:style-name="Heading_20_3" text:outline-level="3"><text:bookmark-start text:name="key-jack"/>Key Jack<text:bookmark-end text:name="key-jack"/></text:h>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h text:style-name="Heading_20_3" text:outline-level="3"><text:bookmark-start text:name="headphone"/>Headphone<text:bookmark-end text:name="headphone"/></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h text:style-name="Heading_20_3" text:outline-level="3"><text:bookmark-start text:name="mouse-port"/>Mouse Port<text:bookmark-end text:name="mouse-port"/></text:h>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h text:style-name="Heading_20_3" text:outline-level="3"><text:bookmark-start text:name="id_3d-terminal"/>3D Terminal<text:bookmark-end text:name="id_3d-terminal"/></text:h>
      <text:h text:style-name="Heading_20_3" text:outline-level="3"><text:bookmark-start text:name="external-floppy-disk-connection-connector"/>External Floppy Disk Connection Connector<text:bookmark-end text:name="external-floppy-disk-connection-connector"/></text:h>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Horizontal_20_Line"/>
      <text:h text:style-name="Heading_20_2" text:outline-level="2"><text:bookmark-start text:name="serv_-000070"/>serv_-000070<text:bookmark-end text:name="serv_-000070"/></text:h>
      <text:p text:style-name="First_20_paragraph"><text:span text:style-name="Strong_20_Emphasis">(CZ-634C-TN / CZ-644C-T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70—</text:p>
      <text:p text:style-name="Horizontal_20_Line"/>
      <text:h text:style-name="Heading_20_2" text:outline-level="2"><text:bookmark-start text:name="serv_-000071"/>serv_-000071<text:bookmark-end text:name="serv_-000071"/></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The image also includes a diagram showing the layout of the connector pins.</text:p>
      <text:p text:style-name="Horizontal_20_Line"/>
      <text:h text:style-name="Heading_20_2" text:outline-level="2"><text:bookmark-start text:name="serv_-000072"/>serv_-000072<text:bookmark-end text:name="serv_-000072"/></text:h>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72—</text:p>
      <text:p text:style-name="Horizontal_20_Line"/>
      <text:h text:style-name="Heading_20_2" text:outline-level="2"><text:bookmark-start text:name="serv_-000073"/>serv_-000073<text:bookmark-end text:name="serv_-000073"/></text:h>
      <text:p text:style-name="First_20_paragraph">The main text on the image translates to:</text:p>
      <text:p text:style-name="Text_20_body">"11. Main Circuit Diagram (1)"</text:p>
      <text:p text:style-name="Text_20_body">On the bottom left corner, it says:</text:p>
      <text:p text:style-name="Text_20_body">"- 75 -"</text:p>
      <text:p text:style-name="Text_20_body">On the bottom right corner, it says:</text:p>
      <text:p text:style-name="Text_20_body">"- 78 -"</text:p>
      <text:p text:style-name="Horizontal_20_Line"/>
      <text:h text:style-name="Heading_20_2" text:outline-level="2"><text:bookmark-start text:name="serv_-000074"/>serv_-000074<text:bookmark-end text:name="serv_-000074"/></text:h>
      <text:p text:style-name="First_20_paragraph">"12. Main basic wiring diagram (2)"</text:p>
      <text:p text:style-name="Text_20_body">The numbers at the bottom of the page, "- 77 -" and "- 78 -", probably indicate the page numbers in the document.</text:p>
      <text:p text:style-name="Horizontal_20_Line"/>
      <text:h text:style-name="Heading_20_2" text:outline-level="2"><text:bookmark-start text:name="serv_-000075"/>serv_-000075<text:bookmark-end text:name="serv_-000075"/></text:h>
      <text:p text:style-name="First_20_paragraph">"13. Main Basic Circuit Diagram (3)"</text:p>
      <text:p text:style-name="Text_20_body">The codes or alphanumeric text at the top do not need translation as they seem to represent part numbers or identifiers that remain the same in English.</text:p>
      <text:p text:style-name="Horizontal_20_Line"/>
      <text:h text:style-name="Heading_20_2" text:outline-level="2"><text:bookmark-start text:name="serv_-000076"/>serv_-000076<text:bookmark-end text:name="serv_-000076"/></text:h>
      <text:p text:style-name="First_20_paragraph">"14. Main basic wiring diagram (4)"</text:p>
      <text:p text:style-name="Text_20_body">"— 81 —"</text:p>
      <text:p text:style-name="Text_20_body">"— 82 —"</text:p>
      <text:p text:style-name="Horizontal_20_Line"/>
      <text:h text:style-name="Heading_20_2" text:outline-level="2"><text:bookmark-start text:name="serv_-000077"/>serv_-000077<text:bookmark-end text:name="serv_-000077"/></text:h>
      <text:p text:style-name="First_20_paragraph">CZ-634C-TN CZ-644C-TN CZ-644C-TN</text:p>
      <text:list text:style-name="Numbering_20_1" text:start-value="15">
        <text:list-item>
          <text:p text:style-name="List_20_Number_20_Tight">Main Basic Wiring Diagram (5)</text:p>
        </text:list-item>
      </text:list>
      <text:p text:style-name="First_20_paragraph">[Main board schematic diagram]</text:p>
      <text:p text:style-name="Text_20_body">—77—</text:p>
      <text:p text:style-name="Horizontal_20_Line"/>
      <text:h text:style-name="Heading_20_2" text:outline-level="2"><text:bookmark-start text:name="serv_-000078"/>serv_-000078<text:bookmark-end text:name="serv_-000078"/></text:h>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Horizontal_20_Line"/>
      <text:h text:style-name="Heading_20_2" text:outline-level="2"><text:bookmark-start text:name="serv_-000079"/>serv_-000079<text:bookmark-end text:name="serv_-000079"/></text:h>
      <text:p text:style-name="First_20_paragraph">"17. Control Board"</text:p>
      <text:p text:style-name="Text_20_body">Additional text such as component labels on the board itself is typically technical and consists of component identifiers that usually do not need translation.</text:p>
      <text:p text:style-name="Horizontal_20_Line"/>
      <text:h text:style-name="Heading_20_2" text:outline-level="2"><text:bookmark-start text:name="serv_-000080"/>serv_-000080<text:bookmark-end text:name="serv_-000080"/></text:h>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p text:style-name="Horizontal_20_Line"/>
      <text:h text:style-name="Heading_20_2" text:outline-level="2"><text:bookmark-start text:name="serv_-000081"/>serv_-000081<text:bookmark-end text:name="serv_-000081"/></text:h>
      <text:p text:style-name="Horizontal_20_Line"/>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Horizontal_20_Line"/>
      <text:p text:style-name="First_20_paragraph">(Note: The "FD" in the text likely stands for "Floppy Disk")</text:p>
      <text:p text:style-name="Horizontal_20_Line"/>
      <text:h text:style-name="Heading_20_2" text:outline-level="2"><text:bookmark-start text:name="serv_-000082"/>serv_-000082<text:bookmark-end text:name="serv_-000082"/></text:h>
      <text:p text:style-name="First_20_paragraph">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 92 —</text:p>
      <text:p text:style-name="Horizontal_20_Line"/>
      <text:h text:style-name="Heading_20_2" text:outline-level="2"><text:bookmark-start text:name="serv_-000083"/>serv_-000083<text:bookmark-end text:name="serv_-000083"/></text:h>
      <text:p text:style-name="First_20_paragraph">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 93 — — 94 —</text:p>
      <text:p text:style-name="Horizontal_20_Line"/>
      <text:h text:style-name="Heading_20_2" text:outline-level="2"><text:bookmark-start text:name="serv_-000084"/>serv_-000084<text:bookmark-end text:name="serv_-000084"/></text:h>
      <text:p text:style-name="First_20_paragraph">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96-</text:p>
      <text:p text:style-name="Horizontal_20_Line"/>
      <text:h text:style-name="Heading_20_2" text:outline-level="2"><text:bookmark-start text:name="serv_-000085"/>serv_-000085<text:bookmark-end text:name="serv_-000085"/></text:h>
      <text:p text:style-name="First_20_paragraph">Top-left corner: "22. Power Supply Unit Basic Circuit Diagram"</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Horizontal_20_Line"/>
      <text:h text:style-name="Heading_20_2" text:outline-level="2"><text:bookmark-start text:name="serv_-000086"/>serv_-000086<text:bookmark-end text:name="serv_-000086"/></text:h>
      <text:p text:style-name="First_20_paragraph">"23. Circuit Board"</text:p>
      <text:p text:style-name="Text_20_body">"KYOSAN"</text:p>
      <text:p text:style-name="Text_20_body">"AQ1716PA011D"</text:p>
      <text:p text:style-name="Horizontal_20_Line"/>
      <text:h text:style-name="Heading_20_2" text:outline-level="2"><text:bookmark-start text:name="serv_-000087"/>serv_-000087<text:bookmark-end text:name="serv_-000087"/></text:h>
      <text:p text:style-name="First_20_paragraph">CZ-634C-TN CZ-644C-TN</text:p>
      <text:list text:style-name="Numbering_20_1" text:start-value="24">
        <text:list-item>
          <text:p text:style-name="List_20_Number_20_Tight">Keyboard basic wiring diagram</text:p>
        </text:list-item>
      </text:list>
      <text:p text:style-name="First_20_paragraph">[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Horizontal_20_Line"/>
      <text:h text:style-name="Heading_20_2" text:outline-level="2"><text:bookmark-start text:name="serv_-000088"/>serv_-000088<text:bookmark-end text:name="serv_-000088"/></text:h>
      <text:p text:style-name="First_20_paragraph">"25. Keyboard Component Board"</text:p>
      <text:p text:style-name="Text_20_body">The numbers at the bottom indicate page numbers.</text:p>
      <text:list text:style-name="List_20_1">
        <text:list-item>
          <text:p text:style-name="List_20_Bullet_20_Tight">103 -</text:p>
        </text:list-item>
        <text:list-item>
          <text:p text:style-name="List_20_Bullet_20_Tight">104 -</text:p>
        </text:list-item>
      </text:list>
      <text:p text:style-name="First_20_paragraph">The text located in the upper center of the image reads:</text:p>
      <text:p text:style-name="Text_20_body">"CZ-634C-TN CZ-644C-TN CZ-634C-TN CZ-644C-TN"</text:p>
      <text:p text:style-name="Horizontal_20_Line"/>
      <text:h text:style-name="Heading_20_2" text:outline-level="2"><text:bookmark-start text:name="serv_-000089"/>serv_-000089<text:bookmark-end text:name="serv_-000089"/></text:h>
      <text:p text:style-name="First_20_paragraph">"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Horizontal_20_Line"/>
      <text:h text:style-name="Heading_20_2" text:outline-level="2"><text:bookmark-start text:name="serv_-000090"/>serv_-000090<text:bookmark-end text:name="serv_-000090"/></text:h>
      <text:p text:style-name="Horizontal_20_Line"/>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Page number: -106-</text:p>
      <text:p text:style-name="Horizontal_20_Line"/>
      <text:p text:style-name="Horizontal_20_Line"/>
      <text:h text:style-name="Heading_20_2" text:outline-level="2"><text:bookmark-start text:name="serv_-000091"/>serv_-000091<text:bookmark-end text:name="serv_-000091"/></text:h>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107-</text:p>
      <text:p text:style-name="Horizontal_20_Line"/>
      <text:h text:style-name="Heading_20_2" text:outline-level="2"><text:bookmark-start text:name="serv_-000092"/>serv_-000092<text:bookmark-end text:name="serv_-000092"/></text:h>
      <text:p text:style-name="First_20_paragraph">CZ-634C-TN CZ-644C-TN</text:p>
      <text:p text:style-name="Text_20_body">RH-IX1093CEZZ G/ARRAY (V/CON)</text:p>
      <text:p text:style-name="Text_20_body">108</text:p>
      <text:p text:style-name="Horizontal_20_Line"/>
      <text:h text:style-name="Heading_20_2" text:outline-level="2"><text:bookmark-start text:name="serv_-000093"/>serv_-000093<text:bookmark-end text:name="serv_-000093"/></text:h>
      <text:p text:style-name="First_20_paragraph">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p text:style-name="Text_20_body">-110-</text:p>
      <text:p text:style-name="Horizontal_20_Line"/>
      <text:h text:style-name="Heading_20_2" text:outline-level="2"><text:bookmark-start text:name="serv_-000094"/>serv_-000094<text:bookmark-end text:name="serv_-000094"/></text:h>
      <text:p text:style-name="Horizontal_20_Line"/>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1 2 3 4</text:p>
      <text:p text:style-name="Text_20_body">CZ-634C-TN CZ-644C-TN</text:p>
      <text:list text:style-name="List_20_1">
        <text:list-item>
          <text:p text:style-name="List_20_Bullet_20_Tight">111 -</text:p>
        </text:list-item>
      </text:list>
      <text:p text:style-name="Horizontal_20_Line"/>
      <text:p text:style-name="First_20_paragraph">Note: Numbers 1 through 9 in the image seem to reference specific steps or components in the disassembly process depicted without descriptive text.</text:p>
      <text:p text:style-name="Horizontal_20_Line"/>
      <text:h text:style-name="Heading_20_2" text:outline-level="2"><text:bookmark-start text:name="serv_-000095"/>serv_-000095<text:bookmark-end text:name="serv_-000095"/></text:h>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6-19T16:20:49Z</meta:creation-date>
    <dc:date>2026-06-19T16:20:49Z</dc:date>
  </office:meta>
</office:document-meta>
</file>