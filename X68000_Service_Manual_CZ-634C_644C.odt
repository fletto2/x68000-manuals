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G" style:family="table-column"/>
    <style:style style:name="Table8.H" style:family="table-column"/>
    <style:style style:name="Table8.I" style:family="table-column"/>
    <style:style style:name="Table8.J"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G" style:family="table-column"/>
    <style:style style:name="Table18.H"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G" style:family="table-column"/>
    <style:style style:name="Table25.H" style:family="table-column"/>
    <style:style style:name="Table25.I" style:family="table-column"/>
    <style:style style:name="Table25.J"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E" style:family="table-column"/>
    <style:style style:name="Table34.F" style:family="table-column"/>
    <style:style style:name="Table34.G" style:family="table-column"/>
    <style:style style:name="Table34.H"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0.E" style:family="table-column"/>
    <style:style style:name="Table40.F"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F"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X68000 Service Manual (CZ-634C / CZ-644C)</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Strong_20_Emphasis">SHARP</text:span> Service Manual No. CZ-134</text:p>
      <text:p text:style-name="Text_20_body"><text:span text:style-name="Strong_20_Emphasis">X68000</text:span> Personal Computer CZ-634C-TN CZ-644C-TN</text:p>
      <text:p text:style-name="Text_20_body">Distribution targets: Sharp Engineering (Co.) Ltd. SS, SB.</text:p>
      <text:p text:style-name="Text_20_body">Issued: April 1991</text:p>
      <text:p text:style-name="Text_20_body"><text:span text:style-name="Strong_20_Emphasis">Contents</text:span></text:p>
      <text:list text:style-name="Numbering_20_1">
        <text:list-item>
          <text:p text:style-name="List_20_Number_20_Tight">Hardware Structure------------------------------------------2 1-1. Features------------------------------------------------3 1-2. Specifications-----------------------------------------6 1-3. Block Diagram----------------------------------------8</text:p>
        </text:list-item>
      </text:list>
      <text:p text:style-name="First_20_paragraph"><draw:frame draw:name="img1" svg:width="480.0pt" svg:height="294.72pt"><draw:image xlink:href="Pictures/0.png" xlink:type="simple" xlink:show="embed" xlink:actuate="onLoad"/></draw:frame></text:p>
      <text:p text:style-name="Text_20_body">1-4. System Configuration-------------------------------9 2. Names of Each Part------------------------------------10 2-1. Front of the Computer Body---------------------11 2-2. Rear of the Computer Body----------------------11 3. Hardware-----------------------------------------------12 3-1. Memory Map-----------------------------------14 3-2. I/O Port Address List----------------------------15 3-3. Interrupts-----------------------------------------18 3-4. System Report----------------------------------22 3-5. IPL---------------------------------------------25 4. Control of Video Screen and Graphic Screen (CRTC)-28 4-1. Sprites------------------------------------------33 4-2. Priority Controller-------------------------------36 4-3. Text and Graphics Screen Control-----------39 4-4. Others------------------------------------------41 4-5. Keyboard and Mouse--------------------------43 5. Color Palette------------------------------------------43 6. CRT Controller-----------------------------------------45 7. Peripheral Devices-----------------------------------45 8. Devices---------------------------------------------45 8-1. DMA Controller--------------------------------46 8-2. Priority Interrupt Controller--------------------49 8-3. Enhanced Memory-------------------------------54 8-4. MFP--------------------------------------------55 8-5. SCC--------------------------------------------53 8-6. RTC--------------------------------------------57 9. Peripherals------------------------------------------59 9-1. Disks--------------------------------------------62 9-2. Printer--------------------------------------------62 9-3. Joystick--------------------------------------------62 9-4. Expansion Slot----------------------------------63 9-5. Other Connectors-------------------------------66 10. Main Circuit Board----------------------------------67 10-1. Main Circuit Board (1)------------------------71 10-2. Main Circuit Board (2)------------------------72 10-3. Main Circuit Board (3)------------------------73 11. Sub Circuit Board-----------------------------------75 11-1. Sub Circuit Board (1)-------------------------76 11-2. Sub Circuit Board (2)-------------------------77 12. Controller Circuit Board---------------------------80 13. Keyboard Controller-------------------------------85 14. LED of FD Connector, SCSI Connector---------89 15. Basics of the Control Circuit---------------------91 16. Digital LED, FD LED------------------------------91 17. FD Controller-------------------------------------92 18. Analog Board-------------------------------------94 19. CPU Board---------------------------------------99 20. ROM Board--------------------------------------103 21. Sound Board-------------------------------------105 22. Video Board--------------------------------------106 23. Connector Board----------------------------------107 24. Sub Connector Board---------------------------110 25. Printer Output Board-----------------------------111 26. Power Supply Design----------------------------112 27. Power Supply Method----------------------------113 28. Printer Separation Transformer--------------114</text:p>
      <text:p text:style-name="Text_20_body"><text:span text:style-name="Strong_20_Emphasis">(Note at the bottom)</text:span> ● Prompt and reliable service leads to repeat business. ● Proper maintenance connects you with customers. Ensure trust... Issue without fail.</text:p>
      <text:p text:style-name="Text_20_body"><text:span text:style-name="Strong_20_Emphasis">Sharp Corporation</text:span> Electronics Systems Division, Product Production Center</text:p>
      <text:list text:style-name="Numbering_20_1">
        <text:list-item>
          <text:p text:style-name="List_20_Number_20_Tight">Hardware Configuration</text:p>
        </text:list-item>
      </text:list>
      <text:p text:style-name="First_20_paragraph">1-1. Features</text:p>
      <text:list text:style-name="Pandoc_5f_Numbering_5f_1">
        <text:list-item>
          <text:p text:style-name="List_20_Number_20_Tight">CPU Peripheral</text:p>
        </text:list-item>
      </text:list>
      <text:list text:style-name="List_20_1">
        <text:list-item>
          <text:p text:style-name="List_20_Bullet_20_Tight">Uses 68000 (16.67 MHz), a 16-bit MPU.</text:p>
        </text:list-item>
        <text:list-item>
          <text:p text:style-name="List_20_Bullet_20_Tight">Capable of directly addressing up to 16MB of address space.</text:p>
        </text:list-item>
        <text:list-item>
          <text:p text:style-name="List_20_Bullet_20_Tight">Memory-mapped I/O (standard 2MB main memory equipped).</text:p>
        </text:list-item>
        <text:list-item>
          <text:p text:style-name="List_20_Bullet_20_Tight">Uses DMAC for 63450 and MFP for 68901.</text:p>
        </text:list-item>
        <text:list-item>
          <text:p text:style-name="List_20_Bullet_20_Tight">Multiple catalog ICs are supported.</text:p>
        </text:list-item>
      </text:list>
      <text:list text:style-name="Pandoc_5f_Numbering_5f_1" text:start-value="2">
        <text:list-item>
          <text:p text:style-name="List_20_Number_20_Tight">Text VRAM and Graphics VRAM use bit-mapping methods.</text:p>
        </text:list-item>
      </text:list>
      <text:list text:style-name="List_20_1">
        <text:list-item>
          <text:p text:style-name="List_20_Bullet_20_Tight">Screen resolution of 1024x1024 dots (supports display screens of 512x512 dots for graphics)</text:p>
        </text:list-item>
        <text:list-item>
          <text:p text:style-name="List_20_Bullet_20_Tight">Display resolutions can be selected from 768x512, 512x512, and 256x256.</text:p>
        </text:list-item>
        <text:list-item>
          <text:p text:style-name="List_20_Bullet_20_Tight">Supports both high resolution (31.5 kHz) and low resolution (15.98 kHz).</text:p>
        </text:list-item>
        <text:list-item>
          <text:p text:style-name="List_20_Bullet_20_Tight">In graphics mode, supports a color palette of 65536 colors, with 65536 selectable colors from the color palette (512x512 dots at selection time).</text:p>
        </text:list-item>
        <text:list-item>
          <text:p text:style-name="List_20_Bullet_20_Tight">In graphics mode at 768x512 dots, up to 16 colors from the 65536 colors can be arbitrarily selected per dot.</text:p>
        </text:list-item>
      </text:list>
      <text:list text:style-name="Pandoc_5f_Numbering_5f_1" text:start-value="4">
        <text:list-item>
          <text:p text:style-name="List_20_Number">Smooth scrolling is possible in single dot units.</text:p>
        </text:list-item>
        <text:list-item>
          <text:p text:style-name="List_20_Number">Sprite Features</text:p>
        </text:list-item>
      </text:list>
      <text:list text:style-name="List_20_1">
        <text:list-item>
          <text:p text:style-name="List_20_Bullet_20_Tight">Can generate up to 128 sprites of a 16x16 dot pattern (maximum of 256 images).</text:p>
        </text:list-item>
        <text:list-item>
          <text:p text:style-name="List_20_Bullet_20_Tight">Up to 32 sprites can be displayed simultaneously in one line.</text:p>
        </text:list-item>
        <text:list-item>
          <text:p text:style-name="List_20_Bullet_20_Tight">Can display up to 128 sprites simultaneously on one screen.</text:p>
        </text:list-item>
      </text:list>
      <text:list text:style-name="Pandoc_5f_Numbering_5f_1" text:start-value="6">
        <text:list-item>
          <text:p text:style-name="List_20_Number">Background switching capability.</text:p>
        </text:list-item>
        <text:list-item>
          <text:p text:style-name="List_20_Number">Equipped with a function to prioritize sprites over the background in graphics mode.</text:p>
        </text:list-item>
        <text:list-item>
          <text:p text:style-name="List_20_Number">Transparency specification, equipped with a semi-transparent sprite function.</text:p>
        </text:list-item>
        <text:list-item>
          <text:p text:style-name="List_20_Number">Equipped with a superimpose function that uses high-resolution overlaid images (supports interlace method for reduced flicker).</text:p>
        </text:list-item>
        <text:list-item>
          <text:p text:style-name="List_20_Number">CGROM includes ANK characters; JIS Level 1 and Level 2 Kanji are equipped as standard.</text:p>
        </text:list-item>
        <text:list-item>
          <text:p text:style-name="List_20_Number">Equipped with FM sound source and voice-synthesis functions.</text:p>
        </text:list-item>
        <text:list-item>
          <text:p text:style-name="List_20_Number">Equipped with a SCSI interface to support optical disk drives, such as CDROM as the next media, as well as analog RGB/I/F, RS-232C I/F, printer I/F, joystick I/F, mouse I/F, and other types of I/F.</text:p>
        </text:list-item>
        <text:list-item>
          <text:p text:style-name="List_20_Number">Uses a cylindrical stepper motor type keyboard.</text:p>
        </text:list-item>
        <text:list-item>
          <text:p text:style-name="List_20_Number">Equipped with 2 units of 5-inch floppy disk drives (2HD). Equipped with a trackball mouse.</text:p>
        </text:list-item>
        <text:list-item>
          <text:p text:style-name="List_20_Number">Equipped with a 3.5-inch 80MB hard disk (CZ-634C-TN model comes with an internal optional hard disk).</text:p>
        </text:list-item>
        <text:list-item>
          <text:p text:style-name="List_20_Number">SRAM Initialization Method</text:p>
        </text:list-item>
      </text:list>
      <text:p text:style-name="First_20_paragraph">A simple function to initialize SRAM has been added to this machine. Without booting the OS, pressing the <text:span text:style-name="Source_20_Text">CLR</text:span> key leads to a quick reset, and a message appears on the screen prompting for initialization. Press the <text:span text:style-name="Source_20_Text">Y</text:span> key to initialize, or <text:span text:style-name="Source_20_Text">N</text:span> key to cancel. This causes the SRAM to start in initialized state.</text:p>
      <text:p text:style-name="Text_20_body">Note: Specifications and external appearance are subject to change without notice.</text:p>
      <text:p text:style-name="Horizontal_20_Line"/>
      <text:p text:style-name="First_20_paragraph">CZ-623C to major changes</text:p>
      <text:p text:style-name="Text_20_body">■ Gate Array iX1197CE (OHM-2) …… changed to iX1748CE (ASA) iX1099CE(MESSIAH) …… changed to iX1749CE (DOSA) ■ Inhibit indicator connector addition ■ MPU HD68HC000PS10 …… changed to MC68HC000B16 ■ FPU IC socket added ■ MPU clock can be set to two modes: 16.67MHz/10MHz. ■ 4M x 2 ROM iX1614CE (EVEN) …… changed to iX1775CE iX1615CE (ODD) …… changed to iX1776CE ■ BIOS ROM replacement IC socket can be fitted on the 2MB expansion RAM module (CZ-6B2EA). ■ The SCSI connector can only be connected to SCSI-specification devices. (Non-SCSI devices such as the CZ620H cannot be connected.) ■ SCSI connector power terminal has a fuse to prevent overcurrent, with a 1A fuse installed. Do not use any fuses other than the designated ones.</text:p>
      <text:p text:style-name="Text_20_body">About service correspondence for print substrate modules For electronic controlled substrates, print substrate modules are subdivided as shown below. Please handle repairs by the respective method.</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art name</text:p>
            </table:table-cell>
            <table:table-cell table:style-name="TableHeaderRowCell" office:value-type="string">
              <text:p text:style-name="Table_20_Heading">Distribution code</text:p>
            </table:table-cell>
            <table:table-cell table:style-name="TableHeaderRowCell" office:value-type="string">
              <text:p text:style-name="Table_20_Heading">Service response method</text:p>
            </table:table-cell>
          </table:table-row>
        </table:table-header-rows>
        <table:table-row>
          <table:table-cell table:style-name="TableRowCell" office:value-type="string">
            <text:p text:style-name="Table_20_Contents">Main substrate unit</text:p>
          </table:table-cell>
          <table:table-cell table:style-name="TableRowCell" office:value-type="string">
    </table:table-cell>
          <table:table-cell table:style-name="TableRowCell" office:value-type="string">
            <text:p text:style-name="Table_20_Contents">Response by unit parts exchange in the substrate</text:p>
          </table:table-cell>
        </table:table-row>
        <table:table-row>
          <table:table-cell table:style-name="TableRowCell" office:value-type="string">
            <text:p text:style-name="Table_20_Contents">FD controller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ontrol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O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ower LED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LED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nalog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board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SI controller substrate unit</text:p>
          </table:table-cell>
          <table:table-cell table:style-name="TableRowCell" office:value-type="string">
            <text:p text:style-name="Table_20_Contents">(CZ-644C)</text:p>
          </table:table-cell>
          <table:table-cell table:style-name="TableRowCell" office:value-type="string">
    </table:table-cell>
        </table:table-row>
        <table:table-row>
          <table:table-cell table:style-name="TableRowCell" office:value-type="string">
            <text:p text:style-name="Table_20_Contents">SCSI controller substrate unit</text:p>
          </table:table-cell>
          <table:table-cell table:style-name="TableRowCell" office:value-type="string">
            <text:p text:style-name="Table_20_Contents">(CZ-634C)</text:p>
          </table:table-cell>
          <table:table-cell table:style-name="TableRowCell" office:value-type="string">
    </table:table-cell>
        </table:table-row>
      </table:table>
      <text:p text:style-name="First_20_paragraph"><text:span text:style-name="Strong_20_Emphasis">1-2. Specifications</text:span> </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Item</text:p>
            </table:table-cell>
            <table:table-cell table:style-name="TableHeaderRowCell" office:value-type="string">
              <text:p text:style-name="Table_20_Heading">Category</text:p>
            </table:table-cell>
            <table:table-cell table:style-name="TableHeaderRowCell" office:value-type="string">
              <text:p text:style-name="Table_20_Heading">Name &amp; Type</text:p>
            </table:table-cell>
            <table:table-cell table:style-name="TableHeaderRowCell" office:value-type="string">
              <text:p text:style-name="Table_20_Heading">Contents</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CPU</text:p>
          </table:table-cell>
          <table:table-cell table:style-name="TableRowCell" office:value-type="string">
            <text:p text:style-name="Table_20_Contents">MPU</text:p>
          </table:table-cell>
          <table:table-cell table:style-name="TableRowCell" office:value-type="string">
            <text:p text:style-name="Table_20_Contents">MC68HC000</text:p>
          </table:table-cell>
          <table:table-cell table:style-name="TableRowCell" office:value-type="string">
            <text:p text:style-name="Table_20_Contents">16-bit MPU (16.67MHz)</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ub CPU</text:p>
          </table:table-cell>
          <table:table-cell table:style-name="TableRowCell" office:value-type="string">
            <text:p text:style-name="Table_20_Contents">MSM80C51</text:p>
          </table:table-cell>
          <table:table-cell table:style-name="TableRowCell" office:value-type="string">
            <text:p text:style-name="Table_20_Contents">Keyboard sca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DMAC</text:p>
          </table:table-cell>
          <table:table-cell table:style-name="TableRowCell" office:value-type="string">
            <text:p text:style-name="Table_20_Contents">HD63450</text:p>
          </table:table-cell>
          <table:table-cell table:style-name="TableRowCell" office:value-type="string">
            <text:p text:style-name="Table_20_Contents">4-channel DMAC</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FPU</text:p>
          </table:table-cell>
          <table:table-cell table:style-name="TableRowCell" office:value-type="string">
            <text:p text:style-name="Table_20_Contents">MC68881</text:p>
          </table:table-cell>
          <table:table-cell table:style-name="TableRowCell" office:value-type="string">
            <text:p text:style-name="Table_20_Contents">Floating point arithmetic processor (16.67MHz)</text:p>
          </table:table-cell>
          <table:table-cell table:style-name="TableRowCell" office:value-type="string">
            <text:p text:style-name="Table_20_Contents">Option</text:p>
          </table:table-cell>
        </table:table-row>
        <table:table-row>
          <table:table-cell table:style-name="TableRowCell" office:value-type="string">
    </table:table-cell>
          <table:table-cell table:style-name="TableRowCell" office:value-type="string">
            <text:p text:style-name="Table_20_Contents">MFP</text:p>
          </table:table-cell>
          <table:table-cell table:style-name="TableRowCell" office:value-type="string">
            <text:p text:style-name="Table_20_Contents">MC68901</text:p>
          </table:table-cell>
          <table:table-cell table:style-name="TableRowCell" office:value-type="string">
            <text:p text:style-name="Table_20_Contents">Multifunction peripheral KEY scan presence, peripheral set inclusio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CRTC</text:p>
          </table:table-cell>
          <table:table-cell table:style-name="TableRowCell" office:value-type="string">
            <text:p text:style-name="Table_20_Contents">IX1093CEZZ (VICON)</text:p>
          </table:table-cell>
          <table:table-cell table:style-name="TableRowCell" office:value-type="string">
            <text:p text:style-name="Table_20_Contents">Text/graphics control CRTC. Dual port DRAM control. Scroll function</text:p>
          </table:table-cell>
          <table:table-cell table:style-name="TableRowCell" office:value-type="string">
    </table:table-cell>
        </table:table-row>
        <table:table-row>
          <table:table-cell table:style-name="TableRowCell" office:value-type="string">
            <text:p text:style-name="Table_20_Contents">Peripheral</text:p>
          </table:table-cell>
          <table:table-cell table:style-name="TableRowCell" office:value-type="string">
            <text:p text:style-name="Table_20_Contents">LSI</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ZZ (CYNTHIA)</text:p>
          </table:table-cell>
          <table:table-cell table:style-name="TableRowCell" office:value-type="string">
            <text:p text:style-name="Table_20_Contents">Sprite func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C</text:p>
          </table:table-cell>
          <table:table-cell table:style-name="TableRowCell" office:value-type="string">
            <text:p text:style-name="Table_20_Contents">µPD72065</text:p>
          </table:table-cell>
          <table:table-cell table:style-name="TableRowCell" office:value-type="string">
            <text:p text:style-name="Table_20_Contents">Controls built-in 5-inch 2HD FD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ZZ (VIPS)</text:p>
          </table:table-cell>
          <table:table-cell table:style-name="TableRowCell" office:value-type="string">
            <text:p text:style-name="Table_20_Contents">Display priority function. Special effects func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SI Controller</text:p>
          </table:table-cell>
          <table:table-cell table:style-name="TableRowCell" office:value-type="string">
            <text:p text:style-name="Table_20_Contents">MB89352</text:p>
          </table:table-cell>
          <table:table-cell table:style-name="TableRowCell" office:value-type="string">
            <text:p text:style-name="Table_20_Contents">SCSI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Z8530</text:p>
          </table:table-cell>
          <table:table-cell table:style-name="TableRowCell" office:value-type="string">
            <text:p text:style-name="Table_20_Contents">Serial communication controller. Dual-channel (RS-232C, mous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TC</text:p>
          </table:table-cell>
          <table:table-cell table:style-name="TableRowCell" office:value-type="string">
            <text:p text:style-name="Table_20_Contents">RP5C15</text:p>
          </table:table-cell>
          <table:table-cell table:style-name="TableRowCell" office:value-type="string">
            <text:p text:style-name="Table_20_Contents">Real-time clock</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M Sound Source</text:p>
          </table:table-cell>
          <table:table-cell table:style-name="TableRowCell" office:value-type="string">
            <text:p text:style-name="Table_20_Contents">YM2151</text:p>
          </table:table-cell>
          <table:table-cell table:style-name="TableRowCell" office:value-type="string">
            <text:p text:style-name="Table_20_Contents">8-channel FM sound source gener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CM</text:p>
          </table:table-cell>
          <table:table-cell table:style-name="TableRowCell" office:value-type="string">
            <text:p text:style-name="Table_20_Contents">MSM6258</text:p>
          </table:table-cell>
          <table:table-cell table:style-name="TableRowCell" office:value-type="string">
            <text:p text:style-name="Table_20_Contents">Adaptive Differential PCM</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ynthesis PPI</text:p>
          </table:table-cell>
          <table:table-cell table:style-name="TableRowCell" office:value-type="string">
            <text:p text:style-name="Table_20_Contents">µPD8255</text:p>
          </table:table-cell>
          <table:table-cell table:style-name="TableRowCell" office:value-type="string">
            <text:p text:style-name="Table_20_Contents">Joystick support. Sound source switching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O</text:p>
          </table:table-cell>
          <table:table-cell table:style-name="TableRowCell" office:value-type="string">
            <text:p text:style-name="Table_20_Contents">iX1604CEZZ</text:p>
          </table:table-cell>
          <table:table-cell table:style-name="TableRowCell" office:value-type="string">
            <text:p text:style-name="Table_20_Contents">Floppy disk, peripheral IC decod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748CEZZ</text:p>
          </table:table-cell>
          <table:table-cell table:style-name="TableRowCell" office:value-type="string">
            <text:p text:style-name="Table_20_Contents">Memory controller (AS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749CEZZ</text:p>
          </table:table-cell>
          <table:table-cell table:style-name="TableRowCell" office:value-type="string">
            <text:p text:style-name="Table_20_Contents">System controller (DOS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094CEZZ</text:p>
          </table:table-cell>
          <table:table-cell table:style-name="TableRowCell" office:value-type="string">
            <text:p text:style-name="Table_20_Contents">Video data selecto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096CEZZ</text:p>
          </table:table-cell>
          <table:table-cell table:style-name="TableRowCell" office:value-type="string">
            <text:p text:style-name="Table_20_Contents">Video clock controller</text:p>
          </table:table-cell>
          <table:table-cell table:style-name="TableRowCell" office:value-type="string">
    </table:table-cell>
          <table:table-cell table:style-name="TableRowCell" office:value-type="string">
    </table:table-cell>
        </table:table-row>
      </table:table>
      <text:p text:style-name="First_20_paragraph">Note: CEZZ appears to be suffix for LSI chip codes, specifics can be machine dependent.</text:p>
      <text:p text:style-name="Text_20_body"><text:span text:style-name="Strong_20_Emphasis">Item</text:span> | <text:span text:style-name="Strong_20_Emphasis">Category</text:span> | <text:span text:style-name="Strong_20_Emphasis">Name/Type</text:span> | <text:span text:style-name="Strong_20_Emphasis">Content</text:span> | <text:span text:style-name="Strong_20_Emphasis">Remarks</text:span></text:p>
      <text:p text:style-name="Text_20_body"><text:span text:style-name="Strong_20_Emphasis">Memory</text:span></text:p>
      <text:p text:style-name="Text_20_body"><text:span text:style-name="Strong_20_Emphasis">ROM</text:span> | <text:span text:style-name="Strong_20_Emphasis">CG ROM (combined IPL ROM)</text:span> | 1M byte (JIS first and second standards) | - |</text:p>
      <text:p text:style-name="Text_20_body"><text:span text:style-name="Strong_20_Emphasis">RAM</text:span> | <text:span text:style-name="Strong_20_Emphasis">Main Memory</text:span> | 2M bytes (Standard) | Can be expanded to 12M bytes (Selectable up to 6M bytes with inbuilt connector, in 2M byte units.) |</text:p>
      <text:p text:style-name="Text_20_body"><text:span text:style-name="Strong_20_Emphasis">Text VRAM</text:span> | Bit Map Method | 1024 x 1024 Dot | 4 Planes |</text:p>
      <text:p text:style-name="Text_20_body">| | 512K x 4 Bit | - | Dual Port Type, for DRAM |</text:p>
      <text:p text:style-name="Text_20_body"><text:span text:style-name="Strong_20_Emphasis">Graphics V-RAM</text:span> | Bit Map Method | 512K bytes x 1024 x 1024 Dot | 4 Planes | Dual Port Type, for DRAM |</text:p>
      <text:p text:style-name="Text_20_body">| | (512 x 512 Dot | 16 Planes) | - |</text:p>
      <text:p text:style-name="Text_20_body"><text:span text:style-name="Strong_20_Emphasis">Sprite V-RAM</text:span> | 32K byte | - | - |</text:p>
      <text:p text:style-name="Text_20_body"><text:span text:style-name="Strong_20_Emphasis">S-RAM</text:span> | 16K byte | - | - |</text:p>
      <text:p text:style-name="Text_20_body"><text:span text:style-name="Strong_20_Emphasis">Media Storage</text:span></text:p>
      <text:list text:style-name="List_20_1">
        <text:list-item>
          <text:p text:style-name="List_20_Bullet_20_Tight">Inbuilt 3.5-inch hard disk 80M byte (Optional for CZ-634C)</text:p>
        </text:list-item>
        <text:list-item>
          <text:p text:style-name="List_20_Bullet_20_Tight">Expansion floppy disk drive for disk expansion</text:p>
        </text:list-item>
      </text:list>
      <text:p text:style-name="First_20_paragraph"><text:span text:style-name="Strong_20_Emphasis">Interface</text:span></text:p>
      <text:list text:style-name="List_20_1">
        <text:list-item>
          <text:p text:style-name="List_20_Bullet_20_Tight"><text:span text:style-name="Strong_20_Emphasis">Floppy Disk Interface:</text:span> -</text:p>
        </text:list-item>
        <text:list-item>
          <text:p text:style-name="List_20_Bullet_20_Tight"><text:span text:style-name="Strong_20_Emphasis">SCSI Interface:</text:span> -</text:p>
        </text:list-item>
        <text:list-item>
          <text:p text:style-name="List_20_Bullet_20_Tight"><text:span text:style-name="Strong_20_Emphasis">Keyboard Connector:</text:span> For dedicated keyboards.</text:p>
        </text:list-item>
        <text:list-item>
          <text:p text:style-name="List_20_Bullet_20_Tight"><text:span text:style-name="Strong_20_Emphasis">CRT Interface:</text:span> For analog RGB output.</text:p>
        </text:list-item>
        <text:list-item>
          <text:p text:style-name="List_20_Bullet_20_Tight"><text:span text:style-name="Strong_20_Emphasis">TV Control Connector:</text:span> For dedicated display TV control.</text:p>
        </text:list-item>
        <text:list-item>
          <text:p text:style-name="List_20_Bullet_20_Tight"><text:span text:style-name="Strong_20_Emphasis">RS-232C Interface:</text:span> 1 channel RS-232C.</text:p>
        </text:list-item>
        <text:list-item>
          <text:p text:style-name="List_20_Bullet_20_Tight"><text:span text:style-name="Strong_20_Emphasis">Mouse Interface:</text:span> For attached trackball mouse.</text:p>
        </text:list-item>
        <text:list-item>
          <text:p text:style-name="List_20_Bullet_20_Tight"><text:span text:style-name="Strong_20_Emphasis">Printer Interface:</text:span> Centronics standard format.</text:p>
        </text:list-item>
        <text:list-item>
          <text:p text:style-name="List_20_Bullet_20_Tight"><text:span text:style-name="Strong_20_Emphasis">Joystick Interface:</text:span> Atari standard format (2 connectors).</text:p>
        </text:list-item>
        <text:list-item>
          <text:p text:style-name="List_20_Bullet_20_Tight"><text:span text:style-name="Strong_20_Emphasis">Audio Input/Output Connector:</text:span> Line in/output, headphone output.</text:p>
        </text:list-item>
        <text:list-item>
          <text:p text:style-name="List_20_Bullet_20_Tight"><text:span text:style-name="Strong_20_Emphasis">Video Input Connector:</text:span> For optional color image unit.</text:p>
        </text:list-item>
      </text:list>
      <text:p text:style-name="First_20_paragraph"><text:span text:style-name="Strong_20_Emphasis">Additional Connections</text:span></text:p>
      <text:list text:style-name="List_20_1">
        <text:list-item>
          <text:p text:style-name="List_20_Bullet_20_Tight"><text:span text:style-name="Strong_20_Emphasis">Other:</text:span> EXPWON, VHT</text:p>
        </text:list-item>
        <text:list-item>
          <text:p text:style-name="List_20_Bullet_20_Tight"><text:span text:style-name="Strong_20_Emphasis">Expansion Slots:</text:span> 2 Slots</text:p>
        </text:list-item>
        <text:list-item>
          <text:p text:style-name="List_20_Bullet_20_Tight"><text:span text:style-name="Strong_20_Emphasis">Power Supply:</text:span> AC 100V</text:p>
        </text:list-item>
        <text:list-item>
          <text:p text:style-name="List_20_Bullet_20_Tight"><text:span text:style-name="Strong_20_Emphasis">Frequency:</text:span> 50/60Hz</text:p>
        </text:list-item>
        <text:list-item>
          <text:p text:style-name="List_20_Bullet_20_Tight"><text:span text:style-name="Strong_20_Emphasis">Power Consumption:</text:span> CZ-644C: 46W, CZ-634C: 41W</text:p>
        </text:list-item>
      </text:list>
      <text:p text:style-name="First_20_paragraph"><text:span text:style-name="Strong_20_Emphasis">Page 5</text:span></text:p>
      <text:p text:style-name="Text_20_body">Item Classification Name-Category Content Remarks Display Surface Text Screen 1024 x 1024 dots 4-plane Bitmap Method Size Graphics Screen 1024 x 1024 dots 4-plane Bitmap Method</text:p>
      <text:p text:style-name="Preformatted_20_Text"><text:s text:c="62"/>(512 x 512 dots <text:s text:c="1"/>16-plane)</text:p>
      <text:p text:style-name="Preformatted_20_Text"/>
      <text:p text:style-name="Preformatted_20_Text"><text:s text:c="11"/>Text Surface <text:s text:c="6"/>High-Resolution Mode <text:s text:c="9"/>768 x 512 dots</text:p>
      <text:p text:style-name="Preformatted_20_Text"><text:s text:c="62"/>512 x 512 </text:p>
      <text:p text:style-name="Preformatted_20_Text"/>
      <text:p text:style-name="Preformatted_20_Text"><text:s text:c="62"/>256 x 256 (2-plane reading)</text:p>
      <text:p text:style-name="Preformatted_20_Text"/>
      <text:p text:style-name="Preformatted_20_Text"><text:s text:c="29"/>Low-Resolution Mode <text:s text:c="11"/>256 x 256</text:p>
      <text:p text:style-name="Preformatted_20_Text"><text:s text:c="29"/>(Overscan) <text:s text:c="20"/>512 x 512</text:p>
      <text:p text:style-name="Preformatted_20_Text"><text:s text:c="29"/>(Interlaced)</text:p>
      <text:p text:style-name="Preformatted_20_Text"/>
      <text:p text:style-name="Preformatted_20_Text"><text:s text:c="11"/>Display Surface <text:s text:c="3"/>High-Resolution Mode <text:s text:c="9"/>768 x 512 dots <text:s text:c="19"/>Per dot 65536 colors</text:p>
      <text:p text:style-name="First_20_paragraph">1024 x 1024 of which any 16 colors can be specified</text:p>
      <text:p text:style-name="Preformatted_20_Text"><text:s text:c="62"/>512 x 512</text:p>
      <text:p text:style-name="Preformatted_20_Text"/>
      <text:p text:style-name="Preformatted_20_Text"><text:s text:c="62"/>512 x 256 (2-plane reading)</text:p>
      <text:p text:style-name="Preformatted_20_Text"><text:s text:c="62"/>256 x 256 (2-plane reading)</text:p>
      <text:p text:style-name="Preformatted_20_Text"/>
      <text:p text:style-name="Preformatted_20_Text"><text:s text:c="29"/>Low-Resolution Mode <text:s text:c="11"/>512 x 256</text:p>
      <text:p text:style-name="Preformatted_20_Text"><text:s text:c="29"/>(Overscan) <text:s text:c="20"/>256 x 256</text:p>
      <text:p text:style-name="Preformatted_20_Text"/>
      <text:p text:style-name="Preformatted_20_Text"><text:s text:c="29"/>(Interlaced)</text:p>
      <text:p text:style-name="Preformatted_20_Text"/>
      <text:p text:style-name="Preformatted_20_Text"><text:s text:c="62"/>512 x 512</text:p>
      <text:p text:style-name="Preformatted_20_Text"/>
      <text:p text:style-name="Preformatted_20_Text"><text:s text:c="11"/>Graphics Screen <text:s text:c="3"/>High-Resolution Mode <text:s text:c="57"/>Per dot, 65536 colors out of which any</text:p>
      <text:p text:style-name="Preformatted_20_Text"><text:s text:c="110"/>16 colors can be specified (1 screen)</text:p>
      <text:p text:style-name="Preformatted_20_Text"><text:s text:c="110"/>Per dot, 65536 colors out of which any</text:p>
      <text:p text:style-name="Preformatted_20_Text"><text:s text:c="110"/>256 colors can be specified (2 screens)</text:p>
      <text:p text:style-name="Preformatted_20_Text"/>
      <text:p text:style-name="Preformatted_20_Text"><text:s text:c="29"/>Low-Resolution Mode</text:p>
      <text:p text:style-name="Preformatted_20_Text"/>
      <text:p text:style-name="Preformatted_20_Text"><text:s text:c="58"/>512 x 256 (Overscan) 256 x 256 <text:s text:c="67"/>Per dot, 65536 colors out of which any </text:p>
      <text:p text:style-name="Preformatted_20_Text"><text:s text:c="58"/>512 x 512 (Interlaced) <text:s text:c="71"/>16 colors can be specified </text:p>
      <text:p text:style-name="Preformatted_20_Text"><text:s text:c="174"/>(4 screens)</text:p>
      <text:p text:style-name="Preformatted_20_Text"><text:s text:c="110"/>512 x 512 <text:s text:c="81"/>Per dot, 65536 colors out of which any </text:p>
      <text:p text:style-name="Preformatted_20_Text"><text:s text:c="174"/>256 colors can be specified (2 screens)</text:p>
      <text:p text:style-name="Preformatted_20_Text"><text:s text:c="62"/>256 x 256 (2-plane reading)</text:p>
      <text:p text:style-name="Preformatted_20_Text"/>
      <text:p text:style-name="Preformatted_20_Text"><text:s text:c="174"/>Actual display screen size is smaller than </text:p>
      <text:p text:style-name="Preformatted_20_Text"><text:s text:c="174"/>the left specified size.</text:p>
      <text:p text:style-name="First_20_paragraph">CZ-634C-TN CZ-644C-TN</text:p>
      <text:p text:style-name="Text_20_body">Item Content</text:p>
      <text:p text:style-name="Text_20_body">Smooth Scroll Function Text screens can be scrolled circularly in dot units. Graphics screens can be scrolled spherically in dot units.</text:p>
      <text:p text:style-name="Text_20_body">Special Screen Control Function Graphics VRAM image input function, text raster copy function, graphics high-speed clear, text bit mask function.</text:p>
      <text:p text:style-name="Text_20_body">Priority Function</text:p>
      <text:list text:style-name="List_20_1">
        <text:list-item>
          <text:p text:style-name="List_20_Bullet_20_Tight">Priority order can be specified among text, graphics, and sprites.</text:p>
        </text:list-item>
        <text:list-item>
          <text:p text:style-name="List_20_Bullet_20_Tight">Priority order can be specified for each graphics screen when using 2, or 4, graphics screens in the 512 x 512 dot mode of the graphics actual screen.</text:p>
        </text:list-item>
      </text:list>
      <text:p text:style-name="First_20_paragraph">Palette Function Any color can be switched instantaneously.</text:p>
      <text:p text:style-name="Text_20_body">Half-Transparency Function Half-transparent display is supported.</text:p>
      <text:p text:style-name="Text_20_body">Special Priority Function A function that can give the highest priority to any area of the graphics screen within the displayed screen.</text:p>
      <text:p text:style-name="Text_20_body">Superimpose Function</text:p>
      <text:list text:style-name="List_20_1">
        <text:list-item>
          <text:p text:style-name="List_20_Bullet_20_Tight">Low resolution overscan superimpose is supported. (Pseudo high resolution by interlace method is also supported)</text:p>
        </text:list-item>
      </text:list>
      <text:p text:style-name="First_20_paragraph">Item Class Name/Type Content Sprite Sprite Pattern Definition Size 16 x 16 dot pattern</text:p>
      <text:p text:style-name="Preformatted_20_Text"><text:s text:c="12"/>Number of Definitions <text:s text:c="2"/>128 patterns (BG0,1 unused)</text:p>
      <text:p text:style-name="Preformatted_20_Text"><text:s text:c="16"/>(up to 256 patterns)</text:p>
      <text:p text:style-name="Preformatted_20_Text"><text:s text:c="12"/>Colors <text:s text:c="1"/>16 colors / 65536 colors per pattern</text:p>
      <text:p text:style-name="Preformatted_20_Text"><text:s text:c="16"/>(dot units)</text:p>
      <text:p text:style-name="Preformatted_20_Text"><text:s text:c="16"/>256 colors / 65536 colors for the whole screen</text:p>
      <text:p text:style-name="Preformatted_20_Text"><text:s text:c="8"/>Display Coordinate System <text:s text:c="2"/>1024 x 1024 dots</text:p>
      <text:p text:style-name="Preformatted_20_Text"><text:s text:c="12"/>Display Screen <text:s text:c="1"/>Horizontal 512 dots or 256 dots</text:p>
      <text:p text:style-name="Preformatted_20_Text"><text:s text:c="16"/>Vertical 512 lines or 256 lines</text:p>
      <text:p text:style-name="Preformatted_20_Text"><text:s text:c="12"/>Display Limit <text:s text:c="2"/>128 sprites / screen</text:p>
      <text:p text:style-name="Preformatted_20_Text"><text:s text:c="16"/>32 sprites / line</text:p>
      <text:p text:style-name="First_20_paragraph">1-3. Block Diagram</text:p>
      <text:p text:style-name="Text_20_body">[Textual summary of the fold-out block diagram. Component names and clock values</text:p>
      <text:p text:style-name="Text_20_body"><draw:frame draw:name="img2" svg:width="480.0pt" svg:height="678.24pt"><draw:image xlink:href="Pictures/1.png" xlink:type="simple" xlink:show="embed" xlink:actuate="onLoad"/></draw:frame></text:p>
      <text:p text:style-name="Text_20_body">were read directly from the source page); the original is a large interconnected diagram that cannot be linearised exactly. The original text layer of this page was unrecoverable noise and has been replaced.]</text:p>
      <text:p text:style-name="Text_20_body">Processor / bus</text:p>
      <text:list text:style-name="List_20_1">
        <text:list-item>
          <text:p text:style-name="List_20_Bullet_20_Tight">MPU: MC68HC000 (16.67 MHz / 10 MHz, 2-mode)</text:p>
        </text:list-item>
        <text:list-item>
          <text:p text:style-name="List_20_Bullet_20_Tight">FPU: MC68881 (IC socket)</text:p>
        </text:list-item>
        <text:list-item>
          <text:p text:style-name="List_20_Bullet_20_Tight">DMAC: HD63450</text:p>
        </text:list-item>
        <text:list-item>
          <text:p text:style-name="List_20_Bullet_20_Tight">CG / BIOS ROM: 1 Mbyte</text:p>
        </text:list-item>
        <text:list-item>
          <text:p text:style-name="List_20_Bullet_20_Tight">SRAM: 64 Kbyte</text:p>
        </text:list-item>
      </text:list>
      <text:p text:style-name="First_20_paragraph">Clocks</text:p>
      <text:list text:style-name="List_20_1">
        <text:list-item>
          <text:p text:style-name="List_20_Bullet_20_Tight">Main oscillator: 40 MHz / 33.33 MHz; also 16 MHz and 4 MHz</text:p>
        </text:list-item>
        <text:list-item>
          <text:p text:style-name="List_20_Bullet_20_Tight">Video / CRTC dot clocks: 38.863632 MHz, 69.5519 MHz, 50.350 MHz</text:p>
        </text:list-item>
        <text:list-item>
          <text:p text:style-name="List_20_Bullet_20_Tight">Sprite clock: 32.209 MHz</text:p>
        </text:list-item>
      </text:list>
      <text:p text:style-name="First_20_paragraph">Video</text:p>
      <text:list text:style-name="List_20_1">
        <text:list-item>
          <text:p text:style-name="List_20_Bullet_20_Tight">CRTC</text:p>
        </text:list-item>
        <text:list-item>
          <text:p text:style-name="List_20_Bullet_20_Tight">TEXT VRAM 512 Kbyte ×2</text:p>
        </text:list-item>
        <text:list-item>
          <text:p text:style-name="List_20_Bullet_20_Tight">GRAPHIC VRAM 512 Kbyte ×2</text:p>
        </text:list-item>
        <text:list-item>
          <text:p text:style-name="List_20_Bullet_20_Tight">Sprite controller + Sprite VRAM 32 Kbyte</text:p>
        </text:list-item>
        <text:list-item>
          <text:p text:style-name="List_20_Bullet_20_Tight">Video controller (GVA), Palette, D/A → CRT</text:p>
        </text:list-item>
      </text:list>
      <text:p text:style-name="First_20_paragraph">Sound</text:p>
      <text:list text:style-name="List_20_1">
        <text:list-item>
          <text:p text:style-name="List_20_Bullet_20_Tight">OPM (YM2151)</text:p>
        </text:list-item>
        <text:list-item>
          <text:p text:style-name="List_20_Bullet_20_Tight">ADPCM (MSM6258)</text:p>
        </text:list-item>
        <text:list-item>
          <text:p text:style-name="List_20_Bullet_20_Tight">PCM-PAN mixer → Amplifier → headphone/speaker, Line out, MIC in</text:p>
        </text:list-item>
      </text:list>
      <text:p text:style-name="First_20_paragraph">Peripherals</text:p>
      <text:list text:style-name="List_20_1">
        <text:list-item>
          <text:p text:style-name="List_20_Bullet_20_Tight">RTC (RP5C15, 32.768 kHz crystal)</text:p>
        </text:list-item>
        <text:list-item>
          <text:p text:style-name="List_20_Bullet_20_Tight">PPI (8255): ports A / B / C; Joystick 1, 2</text:p>
        </text:list-item>
        <text:list-item>
          <text:p text:style-name="List_20_Bullet_20_Tight">SCSI (MB89352) → SCSI HD</text:p>
        </text:list-item>
        <text:list-item>
          <text:p text:style-name="List_20_Bullet_20_Tight">FDC</text:p>
        </text:list-item>
        <text:list-item>
          <text:p text:style-name="List_20_Bullet_20_Tight">SCC → RS-232C</text:p>
        </text:list-item>
        <text:list-item>
          <text:p text:style-name="List_20_Bullet_20_Tight">MFP (MC68901)</text:p>
        </text:list-item>
        <text:list-item>
          <text:p text:style-name="List_20_Bullet_20_Tight">System controller, I/O control bus</text:p>
        </text:list-item>
      </text:list>
      <text:h text:style-name="Heading_20_1" text:outline-level="1"><text:bookmark-start text:name="id_1-4-system-configuration"/>1-4. System Configuration<text:bookmark-end text:name="id_1-4-system-configuration"/></text:h>
      <text:p text:style-name="First_20_paragraph">This diagram shows the system expansion centered around the main unit.</text:p>
      <text:p text:style-name="Text_20_body"><text:span text:style-name="Strong_20_Emphasis">Main Unit</text:span></text:p>
      <text:list text:style-name="List_20_1">
        <text:list-item>
          <text:p text:style-name="List_20_Bullet_20_Tight">X68000</text:p>
        </text:list-item>
      </text:list>
      <text:p text:style-name="Preformatted_20_Text"><text:s text:c="2"/>CZ-63AC-TN</text:p>
      <text:p text:style-name="Preformatted_20_Text"><text:s text:c="2"/>CZ-64AC-TN</text:p>
      <text:p text:style-name="First_20_paragraph"><text:span text:style-name="Strong_20_Emphasis">Exclusive Display TV</text:span></text:p>
      <text:p text:style-name="Text_20_body"><text:span text:style-name="Strong_20_Emphasis">Expansion Board</text:span></text:p>
      <text:list text:style-name="List_20_1">
        <text:list-item>
          <text:p text:style-name="List_20_Bullet_20_Tight">Expansion RAM Board (2M)</text:p>
        </text:list-item>
      </text:list>
      <text:p text:style-name="Preformatted_20_Text"><text:s text:c="2"/>CZ-6BE2 Expansion RAM (2M)</text:p>
      <text:p text:style-name="Preformatted_20_Text"><text:s text:c="2"/>CZ-6BE2B</text:p>
      <text:list text:style-name="List_20_1">
        <text:list-item>
          <text:p text:style-name="List_20_Bullet_20_Tight">Expansion RAM Board 2 (4M) CZ-6BE4</text:p>
        </text:list-item>
      </text:list>
      <text:p text:style-name="First_20_paragraph"><text:span text:style-name="Strong_20_Emphasis">Universal I/O Card</text:span></text:p>
      <text:list text:style-name="List_20_1">
        <text:list-item>
          <text:p text:style-name="List_20_Bullet_20_Tight">CZ-6BU1</text:p>
        </text:list-item>
      </text:list>
      <text:p text:style-name="First_20_paragraph"><text:span text:style-name="Strong_20_Emphasis">GP-IB Board</text:span></text:p>
      <text:list text:style-name="List_20_1">
        <text:list-item>
          <text:p text:style-name="List_20_Bullet_20_Tight">CZ-6BG1</text:p>
        </text:list-item>
      </text:list>
      <text:p text:style-name="First_20_paragraph"><text:span text:style-name="Strong_20_Emphasis">Joystick Card</text:span></text:p>
      <text:list text:style-name="List_20_1">
        <text:list-item>
          <text:p text:style-name="List_20_Bullet_20_Tight">CZ-8NJ1</text:p>
        </text:list-item>
      </text:list>
      <text:p text:style-name="First_20_paragraph"><text:span text:style-name="Strong_20_Emphasis">Device RS-232C Card</text:span></text:p>
      <text:list text:style-name="List_20_1">
        <text:list-item>
          <text:p text:style-name="List_20_Bullet_20_Tight">CZ-6BF1</text:p>
        </text:list-item>
      </text:list>
      <text:p text:style-name="First_20_paragraph"><text:span text:style-name="Strong_20_Emphasis">Device Processor Board</text:span></text:p>
      <text:list text:style-name="List_20_1">
        <text:list-item>
          <text:p text:style-name="List_20_Bullet_20_Tight">CZ-6BP1</text:p>
        </text:list-item>
      </text:list>
      <text:p text:style-name="First_20_paragraph"><text:span text:style-name="Strong_20_Emphasis">Device Control Board</text:span></text:p>
      <text:list text:style-name="List_20_1">
        <text:list-item>
          <text:p text:style-name="List_20_Bullet_20_Tight">CZ-6BP2</text:p>
        </text:list-item>
      </text:list>
      <text:p text:style-name="First_20_paragraph"><text:span text:style-name="Strong_20_Emphasis">FAX Board</text:span></text:p>
      <text:list text:style-name="List_20_1">
        <text:list-item>
          <text:p text:style-name="List_20_Bullet_20_Tight">CZ-6BC1</text:p>
        </text:list-item>
      </text:list>
      <text:p text:style-name="First_20_paragraph"><text:span text:style-name="Strong_20_Emphasis">MIDI Board</text:span></text:p>
      <text:list text:style-name="List_20_1">
        <text:list-item>
          <text:p text:style-name="List_20_Bullet_20_Tight">CZ-6BM1</text:p>
        </text:list-item>
      </text:list>
      <text:p text:style-name="First_20_paragraph"><text:span text:style-name="Strong_20_Emphasis">Sound Amplifier Speaker</text:span></text:p>
      <text:list text:style-name="List_20_1">
        <text:list-item>
          <text:p text:style-name="List_20_Bullet_20_Tight">AN-S100</text:p>
        </text:list-item>
      </text:list>
      <text:p text:style-name="First_20_paragraph"><text:span text:style-name="Strong_20_Emphasis">Peripherals</text:span></text:p>
      <text:list text:style-name="List_20_1">
        <text:list-item>
          <text:p text:style-name="List_20_Bullet">Intelligent Joy Unit Controller CZ-8NU2</text:p>
        </text:list-item>
        <text:list-item>
          <text:p text:style-name="List_20_Bullet">Mouse CZ-8NM2A</text:p>
        </text:list-item>
        <text:list-item>
          <text:p text:style-name="List_20_Bullet">Mouse Trackball CZ-8NM3</text:p>
        </text:list-item>
      </text:list>
      <text:p text:style-name="First_20_paragraph"><text:span text:style-name="Strong_20_Emphasis">Network</text:span></text:p>
      <text:list text:style-name="List_20_1">
        <text:list-item>
          <text:p text:style-name="List_20_Bullet">Module Unit Controller CZ-8TM2</text:p>
        </text:list-item>
        <text:list-item>
          <text:p text:style-name="List_20_Bullet">RS232C Cable</text:p>
        </text:list-item>
      </text:list>
      <text:p text:style-name="Preformatted_20_Text"><text:s text:c="2"/>CZ-8LM1 (Programming)</text:p>
      <text:p text:style-name="Preformatted_20_Text"><text:s text:c="2"/>CZ-8LM2 (Library Link)</text:p>
      <text:list text:style-name="List_20_1">
        <text:list-item>
          <text:p text:style-name="List_20_Bullet_20_Tight">LAN Port</text:p>
        </text:list-item>
      </text:list>
      <text:p text:style-name="Preformatted_20_Text"><text:s text:c="2"/>CZ-6BL1 (For Local Area Network)</text:p>
      <text:p text:style-name="Preformatted_20_Text"><text:s text:c="2"/>LAN Kit</text:p>
      <text:p text:style-name="Preformatted_20_Text"><text:s text:c="2"/>CZ-6BL2 (Including Adapter and TAP)</text:p>
      <text:p text:style-name="First_20_paragraph"><text:span text:style-name="Strong_20_Emphasis">Imaging and Image Input/Output Switch</text:span></text:p>
      <text:list text:style-name="List_20_1">
        <text:list-item>
          <text:p text:style-name="List_20_Bullet">Color Image Copier CZ-6VT1</text:p>
        </text:list-item>
        <text:list-item>
          <text:p text:style-name="List_20_Bullet">Color Image Scanner CZ-8NS1 GX-220X</text:p>
        </text:list-item>
        <text:list-item>
          <text:p text:style-name="List_20_Bullet">Video Capture Card CZ-6BV1</text:p>
        </text:list-item>
      </text:list>
      <text:p text:style-name="First_20_paragraph"><text:span text:style-name="Strong_20_Emphasis">Printer</text:span></text:p>
      <text:list text:style-name="List_20_1">
        <text:list-item>
          <text:p text:style-name="List_20_Bullet">24-Dot Matrix Color/Monochrome Printer CZ-8PC3</text:p>
        </text:list-item>
        <text:list-item>
          <text:p text:style-name="List_20_Bullet">48-Dot Matrix Color Printer CZ-8PC4</text:p>
        </text:list-item>
      </text:list>
      <text:p text:style-name="First_20_paragraph"><text:span text:style-name="Strong_20_Emphasis">Display Section</text:span></text:p>
      <text:list text:style-name="List_20_1">
        <text:list-item>
          <text:p text:style-name="List_20_Bullet_20_Tight">RGB System Selector CZ-6TU</text:p>
        </text:list-item>
      </text:list>
      <text:p text:style-name="First_20_paragraph"><text:span text:style-name="Strong_20_Emphasis">File Section</text:span></text:p>
      <text:list text:style-name="List_20_1">
        <text:list-item>
          <text:p text:style-name="List_20_Bullet_20_Tight">Removable Mass Storage Disc System (594MB) CZ-6MO1</text:p>
        </text:list-item>
      </text:list>
      <text:p text:style-name="First_20_paragraph"><text:span text:style-name="Strong_20_Emphasis">Print Buffer</text:span></text:p>
      <text:list text:style-name="List_20_1">
        <text:list-item>
          <text:p text:style-name="List_20_Bullet_20_Tight">Constant Print Buffer CZ-6EB1</text:p>
        </text:list-item>
      </text:list>
      <text:p text:style-name="First_20_paragraph"><text:span text:style-name="Strong_20_Emphasis">System Rack</text:span></text:p>
      <text:list text:style-name="List_20_1">
        <text:list-item>
          <text:p text:style-name="List_20_Bullet_20_Tight">System Rack CZ-6SD1</text:p>
        </text:list-item>
      </text:list>
      <text:p text:style-name="First_20_paragraph"><text:span text:style-name="Strong_20_Emphasis">24-Pin Dot Impact (13 Color)</text:span> CZ-8PG1</text:p>
      <text:list text:style-name="List_20_1">
        <text:list-item>
          <text:p text:style-name="List_20_Bullet_20_Tight">24-Pin Dot Impact (13 Color)</text:p>
        </text:list-item>
      </text:list>
      <text:p text:style-name="Preformatted_20_Text"><text:s text:c="2"/>Portable Printer</text:p>
      <text:p text:style-name="Preformatted_20_Text"><text:s text:c="2"/>CZ-8PG2</text:p>
      <text:list text:style-name="List_20_1">
        <text:list-item>
          <text:p text:style-name="List_20_Bullet">Color Video Printer CZ-6PV1</text:p>
        </text:list-item>
        <text:list-item>
          <text:p text:style-name="List_20_Bullet">Color Image Printer I/O-735X I/O-735X-B</text:p>
        </text:list-item>
      </text:list>
      <text:p text:style-name="First_20_paragraph"><text:span text:style-name="Strong_20_Emphasis">24-Pin Dot (13 Color) with Scanner</text:span> CZ-8PK10</text:p>
      <text:p text:style-name="Text_20_body"><text:span text:style-name="Strong_20_Emphasis">CRT Filter</text:span> BF-6BP10 (14/15 inches)</text:p>
      <text:list text:style-name="Numbering_20_1" text:start-value="2">
        <text:list-item>
          <text:p text:style-name="List_20_Number_20_Tight">Names of Each Part</text:p>
        </text:list-item>
      </text:list>
      <text:p text:style-name="First_20_paragraph">2-1. Front of the Computer Body</text:p>
      <text:list text:style-name="Numbering_20_1">
        <text:list-item>
          <text:p text:style-name="List_20_Number_20_Tight">Floppy disk drive access display lamp</text:p>
        </text:list-item>
        <text:list-item>
          <text:p text:style-name="List_20_Number_20_Tight">5-inch floppy disk drive</text:p>
        </text:list-item>
        <text:list-item>
          <text:p text:style-name="List_20_Number_20_Tight">Eject button</text:p>
        </text:list-item>
        <text:list-item>
          <text:p text:style-name="List_20_Number_20_Tight">Headphone jack (PHONES)</text:p>
        </text:list-item>
        <text:list-item>
          <text:p text:style-name="List_20_Number_20_Tight">Joystick connector (JOY STICK 1)</text:p>
        </text:list-item>
        <text:list-item>
          <text:p text:style-name="List_20_Number_20_Tight">Power switch (POWER)</text:p>
        </text:list-item>
        <text:list-item>
          <text:p text:style-name="List_20_Number_20_Tight">Volume control knob (VOLUME)</text:p>
        </text:list-item>
        <text:list-item>
          <text:p text:style-name="List_20_Number_20_Tight">Keyboard connector (KEYBOARD)</text:p>
        </text:list-item>
        <text:list-item>
          <text:p text:style-name="List_20_Number_20_Tight">Mouse connector (MOUSE)</text:p>
        </text:list-item>
        <text:list-item>
          <text:p text:style-name="List_20_Number_20_Tight">Indicator panel</text:p>
        </text:list-item>
        <text:list-item>
          <text:p text:style-name="List_20_Number_20_Tight">Clock frequency switching switch (CLOCK SPEED)</text:p>
        </text:list-item>
        <text:list-item>
          <text:p text:style-name="List_20_Number_20_Tight">Reset switch (RESET)</text:p>
        </text:list-item>
        <text:list-item>
          <text:p text:style-name="List_20_Number_20_Tight">Interrupt switch (INTERRUPT)</text:p>
        </text:list-item>
        <text:list-item>
          <text:p text:style-name="List_20_Number_20_Tight">Carrying handle</text:p>
        </text:list-item>
      </text:list>
      <text:p text:style-name="First_20_paragraph">Page 10</text:p>
      <text:p text:style-name="Text_20_body">2-2. Rear View of Computer Unit</text:p>
      <text:list text:style-name="Numbering_20_1">
        <text:list-item>
          <text:p text:style-name="List_20_Number_20_Tight">Slot Cover (I/O SLOT)</text:p>
        </text:list-item>
        <text:list-item>
          <text:p text:style-name="List_20_Number_20_Tight">Remote Terminal (REMOTE)</text:p>
        </text:list-item>
        <text:list-item>
          <text:p text:style-name="List_20_Number_20_Tight">Printer Connector (PRINTER)</text:p>
        </text:list-item>
        <text:list-item>
          <text:p text:style-name="List_20_Number_20_Tight">Frame Arm (FG)</text:p>
        </text:list-item>
        <text:list-item>
          <text:p text:style-name="List_20_Number_20_Tight">Stereoscopic</text:p>
        </text:list-item>
        <text:list-item>
          <text:p text:style-name="List_20_Number_20_Tight">Dedicated Stereo Display TV Control Terminal (TV CONTROL)</text:p>
        </text:list-item>
        <text:list-item>
          <text:p text:style-name="List_20_Number_20_Tight">See-Through Color Terminal (SEE THROUGH COLOR)</text:p>
        </text:list-item>
        <text:list-item>
          <text:p text:style-name="List_20_Number_20_Tight">Image Input Connector (IMAGE IN)</text:p>
        </text:list-item>
        <text:list-item>
          <text:p text:style-name="List_20_Number_20_Tight">Analog RGB Signal Output Connector (ANALOG RGB OUT)</text:p>
        </text:list-item>
        <text:list-item>
          <text:p text:style-name="List_20_Number_20_Tight">RS-232C Connector (RS-232C)</text:p>
        </text:list-item>
        <text:list-item>
          <text:p text:style-name="List_20_Number_20_Tight">Audio Input Terminal (AUDIO IN)</text:p>
        </text:list-item>
        <text:list-item>
          <text:p text:style-name="List_20_Number_20_Tight">Video Output Terminal (AUDIO OUT)</text:p>
        </text:list-item>
        <text:list-item>
          <text:p text:style-name="List_20_Number_20_Tight">Joystick Terminal (JOY STICK 2)</text:p>
        </text:list-item>
        <text:list-item>
          <text:p text:style-name="List_20_Number_20_Tight">Grounding Cord</text:p>
        </text:list-item>
        <text:list-item>
          <text:p text:style-name="List_20_Number_20_Tight">Main Power Switch (POWER)</text:p>
        </text:list-item>
        <text:list-item>
          <text:p text:style-name="List_20_Number_20_Tight">Service Connector (AC 100V OUT)</text:p>
        </text:list-item>
        <text:list-item>
          <text:p text:style-name="List_20_Number_20_Tight">External Floppy Disk Drive Connector (EXPANSION FDD)</text:p>
        </text:list-item>
        <text:list-item>
          <text:p text:style-name="List_20_Number_20_Tight">SCSI Connector</text:p>
        </text:list-item>
      </text:list>
      <text:p text:style-name="First_20_paragraph">**CZ-634C-TN CZ-644C-TN</text:p>
      <text:list text:style-name="Numbering_20_1" text:start-value="3">
        <text:list-item>
          <text:p text:style-name="List_20_Number_20_Tight">Hardware 3-1. Memory Map**</text:p>
        </text:list-item>
      </text:list>
      <text:p text:style-name="First_20_paragraph"><text:span text:style-name="Strong_20_Emphasis">Key:</text:span></text:p>
      <text:list text:style-name="List_20_1">
        <text:list-item>
          <text:p text:style-name="List_20_Bullet_20_Tight"><text:span text:style-name="Strong_20_Emphasis">CRTC</text:span>: Cathode Ray Tube Controller</text:p>
        </text:list-item>
        <text:list-item>
          <text:p text:style-name="List_20_Bullet_20_Tight"><text:span text:style-name="Strong_20_Emphasis">VIDEO</text:span>: Video</text:p>
        </text:list-item>
        <text:list-item>
          <text:p text:style-name="List_20_Bullet_20_Tight"><text:span text:style-name="Strong_20_Emphasis">DMA/C</text:span>: Direct Memory Access/Controller</text:p>
        </text:list-item>
        <text:list-item>
          <text:p text:style-name="List_20_Bullet_20_Tight"><text:span text:style-name="Strong_20_Emphasis">NMI SET</text:span>: Non-Maskable Interrupt Set</text:p>
        </text:list-item>
        <text:list-item>
          <text:p text:style-name="List_20_Bullet_20_Tight"><text:span text:style-name="Strong_20_Emphasis">INT</text:span>: Interrupt</text:p>
        </text:list-item>
        <text:list-item>
          <text:p text:style-name="List_20_Bullet_20_Tight"><text:span text:style-name="Strong_20_Emphasis">R/W CTRL</text:span>: Read/Write Control</text:p>
        </text:list-item>
        <text:list-item>
          <text:p text:style-name="List_20_Bullet_20_Tight"><text:span text:style-name="Strong_20_Emphasis">PRT IC</text:span>: Printer Integrated Circuit</text:p>
        </text:list-item>
        <text:list-item>
          <text:p text:style-name="List_20_Bullet_20_Tight"><text:span text:style-name="Strong_20_Emphasis">FDD</text:span>: Floppy Disk Drive</text:p>
        </text:list-item>
        <text:list-item>
          <text:p text:style-name="List_20_Bullet_20_Tight"><text:span text:style-name="Strong_20_Emphasis">HDC</text:span>: Hard Disk Controller</text:p>
        </text:list-item>
        <text:list-item>
          <text:p text:style-name="List_20_Bullet_20_Tight"><text:span text:style-name="Strong_20_Emphasis">SCC</text:span>: Serial Communication Controller (Z8530)</text:p>
        </text:list-item>
        <text:list-item>
          <text:p text:style-name="List_20_Bullet_20_Tight"><text:span text:style-name="Strong_20_Emphasis">8255</text:span>: Programmable Peripheral Interface (8255)</text:p>
        </text:list-item>
        <text:list-item>
          <text:p text:style-name="List_20_Bullet_20_Tight"><text:span text:style-name="Strong_20_Emphasis">INT</text:span>: Interrupt</text:p>
        </text:list-item>
        <text:list-item>
          <text:p text:style-name="List_20_Bullet_20_Tight"><text:span text:style-name="Strong_20_Emphasis">FPU</text:span>: Floating Point Unit</text:p>
        </text:list-item>
        <text:list-item>
          <text:p text:style-name="List_20_Bullet_20_Tight"><text:span text:style-name="Strong_20_Emphasis">SPRITE REGISTER</text:span>: Sprite Register</text:p>
        </text:list-item>
        <text:list-item>
          <text:p text:style-name="List_20_Bullet_20_Tight"><text:span text:style-name="Strong_20_Emphasis">SPRITE VRAM</text:span>: Sprite Video RAM</text:p>
        </text:list-item>
        <text:list-item>
          <text:p text:style-name="List_20_Bullet_20_Tight"><text:span text:style-name="Strong_20_Emphasis">EEPROM</text:span>: Electrically Erasable Programmable Read-Only Memory</text:p>
        </text:list-item>
        <text:list-item>
          <text:p text:style-name="List_20_Bullet_20_Tight"><text:span text:style-name="Strong_20_Emphasis">USER I/O AREA</text:span>: User Input/Output Area</text:p>
        </text:list-item>
        <text:list-item>
          <text:p text:style-name="List_20_Bullet_20_Tight"><text:span text:style-name="Strong_20_Emphasis">SUPERVISOR I/O AREA</text:span>: Supervisor Input/Output Area</text:p>
        </text:list-item>
        <text:list-item>
          <text:p text:style-name="List_20_Bullet_20_Tight"><text:span text:style-name="Strong_20_Emphasis">MEMORY SW (RAM)</text:span>: Memory Switch (RAM)</text:p>
        </text:list-item>
        <text:list-item>
          <text:p text:style-name="List_20_Bullet_20_Tight"><text:span text:style-name="Strong_20_Emphasis">SYSTEM I/O</text:span>: System Input/Output</text:p>
        </text:list-item>
        <text:list-item>
          <text:p text:style-name="List_20_Bullet_20_Tight"><text:span text:style-name="Strong_20_Emphasis">CG-ROM (128 KB)</text:span>: Character Generator Read-Only Memory</text:p>
        </text:list-item>
        <text:list-item>
          <text:p text:style-name="List_20_Bullet_20_Tight"><text:span text:style-name="Strong_20_Emphasis">IPL ROM</text:span>: Initial Program Load Read-Only Memory</text:p>
        </text:list-item>
        <text:list-item>
          <text:p text:style-name="List_20_Bullet_20_Tight"><text:span text:style-name="Strong_20_Emphasis">MAIN MEMORY (USER AREA)</text:span>: Main Memory (User Area)</text:p>
        </text:list-item>
        <text:list-item>
          <text:p text:style-name="List_20_Bullet_20_Tight"><text:span text:style-name="Strong_20_Emphasis">GRAPHIC VRAM</text:span>: Graphic Video RAM</text:p>
        </text:list-item>
        <text:list-item>
          <text:p text:style-name="List_20_Bullet_20_Tight"><text:span text:style-name="Strong_20_Emphasis">TEXT VRAM</text:span>: Text Video RAM</text:p>
        </text:list-item>
        <text:list-item>
          <text:p text:style-name="List_20_Bullet_20_Tight"><text:span text:style-name="Strong_20_Emphasis">SUPERVISOR AREA</text:span>: Supervisor Area (User Area)</text:p>
        </text:list-item>
      </text:list>
      <text:p text:style-name="First_20_paragraph">Additional labels within blocks:</text:p>
      <text:list text:style-name="List_20_1">
        <text:list-item>
          <text:p text:style-name="List_20_Bullet_20_Tight"><text:span text:style-name="Strong_20_Emphasis">06B0000H</text:span>: (Hexadecimal address), etc.</text:p>
        </text:list-item>
        <text:list-item>
          <text:p text:style-name="List_20_Bullet_20_Tight"><text:span text:style-name="Strong_20_Emphasis">00FFFFFFH</text:span>: (Hexadecimal address limit)</text:p>
        </text:list-item>
      </text:list>
      <text:p text:style-name="First_20_paragraph">Note: The addresses provided (like 06B0000H, 00CFFFFF, etc.) appear to be hexadecimal memory addresses used in the context of the system's memory map.</text:p>
      <text:p text:style-name="Text_20_body">3-2 I/O Port Address List</text:p>
      <text:list text:style-name="List_20_1">
        <text:list-item>
          <text:p text:style-name="List_20_Bullet_20_Tight">Indicates invalid. W is WRITE only, R is READ only, and R/W is READ/WRITE.</text:p>
        </text:list-item>
      </text:list>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text:p>
          </table:table-cell>
          <table:table-cell table:style-name="TableRowCell" office:value-type="string">
            <text:p text:style-name="Table_20_Contents">E80000H</text:p>
          </table:table-cell>
          <table:table-cell table:style-name="TableRowCell" office:value-type="string">
            <text:p text:style-name="Table_20_Contents">Horizontal Scroll</text:p>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0002H</text:p>
          </table:table-cell>
          <table:table-cell table:style-name="TableRowCell" office:value-type="string">
            <text:p text:style-name="Table_20_Contents">Horizontal Synchronization End Position</text:p>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0004H</text:p>
          </table:table-cell>
          <table:table-cell table:style-name="TableRowCell" office:value-type="string">
            <text:p text:style-name="Table_20_Contents">Horizontal Display Start Position</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0006H</text:p>
          </table:table-cell>
          <table:table-cell table:style-name="TableRowCell" office:value-type="string">
            <text:p text:style-name="Table_20_Contents">Horizontal Display End Position</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0008H</text:p>
          </table:table-cell>
          <table:table-cell table:style-name="TableRowCell" office:value-type="string">
            <text:p text:style-name="Table_20_Contents">Vertical Scroll (Y)</text:p>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000AH</text:p>
          </table:table-cell>
          <table:table-cell table:style-name="TableRowCell" office:value-type="string">
            <text:p text:style-name="Table_20_Contents">Vertical Synchronization End Position</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0CH</text:p>
          </table:table-cell>
          <table:table-cell table:style-name="TableRowCell" office:value-type="string">
            <text:p text:style-name="Table_20_Contents">Vertical Display Start Position</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0EH</text:p>
          </table:table-cell>
          <table:table-cell table:style-name="TableRowCell" office:value-type="string">
            <text:p text:style-name="Table_20_Contents">Vertical Display End Position</text:p>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0010H</text:p>
          </table:table-cell>
          <table:table-cell table:style-name="TableRowCell" office:value-type="string">
            <text:p text:style-name="Table_20_Contents">External Synchronization Adjust</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12H</text:p>
          </table:table-cell>
          <table:table-cell table:style-name="TableRowCell" office:value-type="string">
            <text:p text:style-name="Table_20_Contents">Raster Register Write Position</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14H</text:p>
          </table:table-cell>
          <table:table-cell table:style-name="TableRowCell" office:value-type="string">
            <text:p text:style-name="Table_20_Contents">X Axis Scroll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16H</text:p>
          </table:table-cell>
          <table:table-cell table:style-name="TableRowCell" office:value-type="string">
            <text:p text:style-name="Table_20_Contents">Y Axis Scroll Y</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18H</text:p>
          </table:table-cell>
          <table:table-cell table:style-name="TableRowCell" office:value-type="string">
            <text:p text:style-name="Table_20_Contents">Screen 0 X</text:p>
          </table:table-cell>
          <table:table-cell table:style-name="TableRowCell" office:value-type="string">
    </table:table-cell>
        </table:table-row>
        <table:table-row>
          <table:table-cell table:style-name="TableRowCell" office:value-type="string">
            <text:p text:style-name="Table_20_Contents">A</text:p>
          </table:table-cell>
          <table:table-cell table:style-name="TableRowCell" office:value-type="string">
            <text:p text:style-name="Table_20_Contents">E8001AH</text:p>
          </table:table-cell>
          <table:table-cell table:style-name="TableRowCell" office:value-type="string">
            <text:p text:style-name="Table_20_Contents">Screen 0 Y</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1CH</text:p>
          </table:table-cell>
          <table:table-cell table:style-name="TableRowCell" office:value-type="string">
            <text:p text:style-name="Table_20_Contents">Screen 1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1EH</text:p>
          </table:table-cell>
          <table:table-cell table:style-name="TableRowCell" office:value-type="string">
            <text:p text:style-name="Table_20_Contents">Screen 1 Y</text:p>
          </table:table-cell>
          <table:table-cell table:style-name="TableRowCell" office:value-type="string">
    </table:table-cell>
        </table:table-row>
        <table:table-row>
          <table:table-cell table:style-name="TableRowCell" office:value-type="string">
            <text:p text:style-name="Table_20_Contents">O</text:p>
          </table:table-cell>
          <table:table-cell table:style-name="TableRowCell" office:value-type="string">
            <text:p text:style-name="Table_20_Contents">E80020H</text:p>
          </table:table-cell>
          <table:table-cell table:style-name="TableRowCell" office:value-type="string">
            <text:p text:style-name="Table_20_Contents">Screen 2 X</text:p>
          </table:table-cell>
          <table:table-cell table:style-name="TableRowCell" office:value-type="string">
    </table:table-cell>
        </table:table-row>
        <table:table-row>
          <table:table-cell table:style-name="TableRowCell" office:value-type="string">
            <text:p text:style-name="Table_20_Contents">P</text:p>
          </table:table-cell>
          <table:table-cell table:style-name="TableRowCell" office:value-type="string">
            <text:p text:style-name="Table_20_Contents">E80022H</text:p>
          </table:table-cell>
          <table:table-cell table:style-name="TableRowCell" office:value-type="string">
            <text:p text:style-name="Table_20_Contents">Screen 2 Y</text:p>
          </table:table-cell>
          <table:table-cell table:style-name="TableRowCell" office:value-type="string">
    </table:table-cell>
        </table:table-row>
        <table:table-row>
          <table:table-cell table:style-name="TableRowCell" office:value-type="string">
            <text:p text:style-name="Table_20_Contents">L</text:p>
          </table:table-cell>
          <table:table-cell table:style-name="TableRowCell" office:value-type="string">
            <text:p text:style-name="Table_20_Contents">E80024H</text:p>
          </table:table-cell>
          <table:table-cell table:style-name="TableRowCell" office:value-type="string">
            <text:p text:style-name="Table_20_Contents">Screen 3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6H</text:p>
          </table:table-cell>
          <table:table-cell table:style-name="TableRowCell" office:value-type="string">
            <text:p text:style-name="Table_20_Contents">Screen 3 Y</text:p>
          </table:table-cell>
          <table:table-cell table:style-name="TableRowCell" office:value-type="string">
    </table:table-cell>
        </table:table-row>
        <table:table-row>
          <table:table-cell table:style-name="TableRowCell" office:value-type="string">
            <text:p text:style-name="Table_20_Contents">S</text:p>
          </table:table-cell>
          <table:table-cell table:style-name="TableRowCell" office:value-type="string">
            <text:p text:style-name="Table_20_Contents">E80028H</text:p>
          </table:table-cell>
          <table:table-cell table:style-name="TableRowCell" office:value-type="string">
            <text:p text:style-name="Table_20_Contents">Memory Mode; Display Mode Setting</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AH</text:p>
          </table:table-cell>
          <table:table-cell table:style-name="TableRowCell" office:value-type="string">
            <text:p text:style-name="Table_20_Contents">Text Access, High-Resolution Clear Plane</text:p>
          </table:table-cell>
          <table:table-cell table:style-name="TableRowCell" office:value-type="string">
    </table:table-cell>
        </table:table-row>
        <table:table-row>
          <table:table-cell table:style-name="TableRowCell" office:value-type="string">
            <text:p text:style-name="Table_20_Contents">R/W</text:p>
          </table:table-cell>
          <table:table-cell table:style-name="TableRowCell" office:value-type="string">
            <text:p text:style-name="Table_20_Contents">E8002CH</text:p>
          </table:table-cell>
          <table:table-cell table:style-name="TableRowCell" office:value-type="string">
            <text:p text:style-name="Table_20_Contents">Work Area Initialization Raster</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EH</text:p>
          </table:table-cell>
          <table:table-cell table:style-name="TableRowCell" office:value-type="string">
            <text:p text:style-name="Table_20_Contents">Bit Mask Register</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40H</text:p>
          </table:table-cell>
          <table:table-cell table:style-name="TableRowCell" office:value-type="string">
            <text:p text:style-name="Table_20_Contents">CRT Control Register</text:p>
          </table:table-cell>
          <table:table-cell table:style-name="TableRowCell" office:value-type="string">
    </table:table-cell>
        </table:table-row>
        <table:table-row>
          <table:table-cell table:style-name="TableRowCell" office:value-type="string">
            <text:p text:style-name="Table_20_Contents">Gra</text:p>
          </table:table-cell>
          <table:table-cell table:style-name="TableRowCell" office:value-type="string">
            <text:p text:style-name="Table_20_Contents">E82000H</text:p>
          </table:table-cell>
          <table:table-cell table:style-name="TableRowCell" office:value-type="string">
            <text:p text:style-name="Table_20_Contents">16 Color Mode - 256 Color Mode</text:p>
          </table:table-cell>
          <table:table-cell table:style-name="TableRowCell" office:value-type="string">
            <text:p text:style-name="Table_20_Contents">Graphics Palette</text:p>
          </table:table-cell>
        </table:table-row>
        <table:table-row>
          <table:table-cell table:style-name="TableRowCell" office:value-type="string">
            <text:p text:style-name="Table_20_Contents">Pal</text:p>
          </table:table-cell>
          <table:table-cell table:style-name="TableRowCell" office:value-type="string">
            <text:p text:style-name="Table_20_Contents">E82010H</text:p>
          </table:table-cell>
          <table:table-cell table:style-name="TableRowCell" office:value-type="string">
            <text:p text:style-name="Table_20_Contents">or 65536 Color Mode</text:p>
          </table:table-cell>
          <table:table-cell table:style-name="TableRowCell" office:value-type="string">
    </table:table-cell>
        </table:table-row>
        <table:table-row>
          <table:table-cell table:style-name="TableRowCell" office:value-type="string">
            <text:p text:style-name="Table_20_Contents">let</text:p>
          </table:table-cell>
          <table:table-cell table:style-name="TableRowCell" office:value-type="string">
            <text:p text:style-name="Table_20_Contents">E8210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020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B821FEH) R/W</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amp;</text:p>
          </table:table-cell>
          <table:table-cell table:style-name="TableRowCell" office:value-type="string">
            <text:p text:style-name="Table_20_Contents">E82200H</text:p>
          </table:table-cell>
          <table:table-cell table:style-name="TableRowCell" office:value-type="string">
            <text:p text:style-name="Table_20_Contents">Text (Sprite Color Table 0) Common Palette</text:p>
          </table:table-cell>
          <table:table-cell table:style-name="TableRowCell" office:value-type="string">
            <text:p text:style-name="Table_20_Contents">Text, Sprite Palette</text:p>
          </table:table-cell>
        </table:table-row>
        <table:table-row>
          <table:table-cell table:style-name="TableRowCell" office:value-type="string">
            <text:p text:style-name="Table_20_Contents">SP</text:p>
          </table:table-cell>
          <table:table-cell table:style-name="TableRowCell" office:value-type="string">
            <text:p text:style-name="Table_20_Contents">E8221E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al</text:p>
          </table:table-cell>
          <table:table-cell table:style-name="TableRowCell" office:value-type="string">
            <text:p text:style-name="Table_20_Contents">E82210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et</text:p>
          </table:table-cell>
          <table:table-cell table:style-name="TableRowCell" office:value-type="string">
            <text:p text:style-name="Table_20_Contents">(E82220H)</text:p>
          </table:table-cell>
          <table:table-cell table:style-name="TableRowCell" office:value-type="string">
            <text:p text:style-name="Table_20_Contents">Sprite Color Table 1 Palette</text:p>
          </table:table-cell>
          <table:table-cell table:style-name="TableRowCell" office:value-type="string">
            <text:p text:style-name="Table_20_Contents">Sprite Palette</text:p>
          </table:table-cell>
        </table:table-row>
        <table:table-row>
          <table:table-cell table:style-name="TableRowCell" office:value-type="string">
    </table:table-cell>
          <table:table-cell table:style-name="TableRowCell" office:value-type="string">
            <text:p text:style-name="Table_20_Contents">E8223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240H</text:p>
          </table:table-cell>
          <table:table-cell table:style-name="TableRowCell" office:value-type="string">
            <text:p text:style-name="Table_20_Contents">Sprite Color Table 2 Palet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25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0EH)</text:p>
          </table:table-cell>
          <table:table-cell table:style-name="TableRowCell" office:value-type="string">
            <text:p text:style-name="Table_20_Contents">Sprite Color Table 15 Palet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2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3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F0E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text:p>
          </table:table-cell>
          <table:table-cell table:style-name="TableRowCell" office:value-type="string">
            <text:p text:style-name="Table_20_Contents">E82400H</text:p>
          </table:table-cell>
          <table:table-cell table:style-name="TableRowCell" office:value-type="string">
            <text:p text:style-name="Table_20_Contents">Memory Mode Setting</text:p>
          </table:table-cell>
          <table:table-cell table:style-name="TableRowCell" office:value-type="string">
    </table:table-cell>
        </table:table-row>
        <table:table-row>
          <table:table-cell table:style-name="TableRowCell" office:value-type="string">
            <text:p text:style-name="Table_20_Contents">Cont-</text:p>
          </table:table-cell>
          <table:table-cell table:style-name="TableRowCell" office:value-type="string">
            <text:p text:style-name="Table_20_Contents">E82500H</text:p>
          </table:table-cell>
          <table:table-cell table:style-name="TableRowCell" office:value-type="string">
            <text:p text:style-name="Table_20_Contents">Priority Setting</text:p>
          </table:table-cell>
          <table:table-cell table:style-name="TableRowCell" office:value-type="string">
    </table:table-cell>
        </table:table-row>
        <table:table-row>
          <table:table-cell table:style-name="TableRowCell" office:value-type="string">
            <text:p text:style-name="Table_20_Contents">roller</text:p>
          </table:table-cell>
          <table:table-cell table:style-name="TableRowCell" office:value-type="string">
            <text:p text:style-name="Table_20_Contents">E82600H</text:p>
          </table:table-cell>
          <table:table-cell table:style-name="TableRowCell" office:value-type="string">
            <text:p text:style-name="Table_20_Contents">Special Mode, Screen Display Control</text:p>
          </table:table-cell>
          <table:table-cell table:style-name="TableRowCell" office:value-type="string">
            <text:p text:style-name="Table_20_Contents">Special Priority (Semi-Transparent)</text:p>
          </table:table-cell>
        </table:table-row>
      </table:table>
      <text:p text:style-name="First_20_paragraph"><text:span text:style-name="Strong_20_Emphasis">CZ-634C-TN</text:span><text:line-break/><text:span text:style-name="Strong_20_Emphasis">CZ-644C-TN</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No.</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D</text:p>
          </table:table-cell>
          <table:table-cell table:style-name="TableRowCell" office:value-type="string">
            <text:p text:style-name="Table_20_Contents">E84000H</text:p>
          </table:table-cell>
          <table:table-cell table:style-name="TableRowCell" office:value-type="string">
            <text:p text:style-name="Table_20_Contents">R/W</text:p>
          </table:table-cell>
          <table:table-cell table:style-name="TableRowCell" office:value-type="string">
            <text:p text:style-name="Table_20_Contents">Channel Status Register</text:p>
          </table:table-cell>
        </table:table-row>
        <table:table-row>
          <table:table-cell table:style-name="TableRowCell" office:value-type="string">
            <text:p text:style-name="Table_20_Contents">M</text:p>
          </table:table-cell>
          <table:table-cell table:style-name="TableRowCell" office:value-type="string">
            <text:p text:style-name="Table_20_Contents">E84001H</text:p>
          </table:table-cell>
          <table:table-cell table:style-name="TableRowCell" office:value-type="string">
            <text:p text:style-name="Table_20_Contents">R</text:p>
          </table:table-cell>
          <table:table-cell table:style-name="TableRowCell" office:value-type="string">
            <text:p text:style-name="Table_20_Contents">Channel Error Register</text:p>
          </table:table-cell>
        </table:table-row>
        <table:table-row>
          <table:table-cell table:style-name="TableRowCell" office:value-type="string">
            <text:p text:style-name="Table_20_Contents">A</text:p>
          </table:table-cell>
          <table:table-cell table:style-name="TableRowCell" office:value-type="string">
            <text:p text:style-name="Table_20_Contents">E84004H</text:p>
          </table:table-cell>
          <table:table-cell table:style-name="TableRowCell" office:value-type="string">
            <text:p text:style-name="Table_20_Contents">R/W</text:p>
          </table:table-cell>
          <table:table-cell table:style-name="TableRowCell" office:value-type="string">
            <text:p text:style-name="Table_20_Contents">Device Control Register</text:p>
          </table:table-cell>
        </table:table-row>
        <table:table-row>
          <table:table-cell table:style-name="TableRowCell" office:value-type="string">
            <text:p text:style-name="Table_20_Contents">C</text:p>
          </table:table-cell>
          <table:table-cell table:style-name="TableRowCell" office:value-type="string">
            <text:p text:style-name="Table_20_Contents">E84005H</text:p>
          </table:table-cell>
          <table:table-cell table:style-name="TableRowCell" office:value-type="string">
            <text:p text:style-name="Table_20_Contents">R/W</text:p>
          </table:table-cell>
          <table:table-cell table:style-name="TableRowCell" office:value-type="string">
            <text:p text:style-name="Table_20_Contents">Operation Control Register</text:p>
          </table:table-cell>
        </table:table-row>
        <table:table-row>
          <table:table-cell table:style-name="TableRowCell" office:value-type="string">
    </table:table-cell>
          <table:table-cell table:style-name="TableRowCell" office:value-type="string">
            <text:p text:style-name="Table_20_Contents">E84006H</text:p>
          </table:table-cell>
          <table:table-cell table:style-name="TableRowCell" office:value-type="string">
            <text:p text:style-name="Table_20_Contents">R/W</text:p>
          </table:table-cell>
          <table:table-cell table:style-name="TableRowCell" office:value-type="string">
            <text:p text:style-name="Table_20_Contents">Sequence Control Register</text:p>
          </table:table-cell>
        </table:table-row>
        <table:table-row>
          <table:table-cell table:style-name="TableRowCell" office:value-type="string">
    </table:table-cell>
          <table:table-cell table:style-name="TableRowCell" office:value-type="string">
            <text:p text:style-name="Table_20_Contents">E84025H</text:p>
          </table:table-cell>
          <table:table-cell table:style-name="TableRowCell" office:value-type="string">
            <text:p text:style-name="Table_20_Contents">R/W</text:p>
          </table:table-cell>
          <table:table-cell table:style-name="TableRowCell" office:value-type="string">
            <text:p text:style-name="Table_20_Contents">Normal Interrupt Vector</text:p>
          </table:table-cell>
        </table:table-row>
        <table:table-row>
          <table:table-cell table:style-name="TableRowCell" office:value-type="string">
    </table:table-cell>
          <table:table-cell table:style-name="TableRowCell" office:value-type="string">
            <text:p text:style-name="Table_20_Contents">E84027H</text:p>
          </table:table-cell>
          <table:table-cell table:style-name="TableRowCell" office:value-type="string">
            <text:p text:style-name="Table_20_Contents">R/W</text:p>
          </table:table-cell>
          <table:table-cell table:style-name="TableRowCell" office:value-type="string">
            <text:p text:style-name="Table_20_Contents">Error Interrupt Vector</text:p>
          </table:table-cell>
        </table:table-row>
        <table:table-row>
          <table:table-cell table:style-name="TableRowCell" office:value-type="string">
    </table:table-cell>
          <table:table-cell table:style-name="TableRowCell" office:value-type="string">
            <text:p text:style-name="Table_20_Contents">E8402DH</text:p>
          </table:table-cell>
          <table:table-cell table:style-name="TableRowCell" office:value-type="string">
            <text:p text:style-name="Table_20_Contents">R/W</text:p>
          </table:table-cell>
          <table:table-cell table:style-name="TableRowCell" office:value-type="string">
            <text:p text:style-name="Table_20_Contents">Channel Priority Register</text:p>
          </table:table-cell>
        </table:table-row>
        <table:table-row>
          <table:table-cell table:style-name="TableRowCell" office:value-type="string">
    </table:table-cell>
          <table:table-cell table:style-name="TableRowCell" office:value-type="string">
            <text:p text:style-name="Table_20_Contents">E84029H</text:p>
          </table:table-cell>
          <table:table-cell table:style-name="TableRowCell" office:value-type="string">
            <text:p text:style-name="Table_20_Contents">R/W</text:p>
          </table:table-cell>
          <table:table-cell table:style-name="TableRowCell" office:value-type="string">
            <text:p text:style-name="Table_20_Contents">Memory Function Code</text:p>
          </table:table-cell>
        </table:table-row>
        <table:table-row>
          <table:table-cell table:style-name="TableRowCell" office:value-type="string">
    </table:table-cell>
          <table:table-cell table:style-name="TableRowCell" office:value-type="string">
            <text:p text:style-name="Table_20_Contents">E84031H</text:p>
          </table:table-cell>
          <table:table-cell table:style-name="TableRowCell" office:value-type="string">
            <text:p text:style-name="Table_20_Contents">R/W</text:p>
          </table:table-cell>
          <table:table-cell table:style-name="TableRowCell" office:value-type="string">
            <text:p text:style-name="Table_20_Contents">Device Function Code</text:p>
          </table:table-cell>
        </table:table-row>
        <table:table-row>
          <table:table-cell table:style-name="TableRowCell" office:value-type="string">
    </table:table-cell>
          <table:table-cell table:style-name="TableRowCell" office:value-type="string">
            <text:p text:style-name="Table_20_Contents">E84039H</text:p>
          </table:table-cell>
          <table:table-cell table:style-name="TableRowCell" office:value-type="string">
            <text:p text:style-name="Table_20_Contents">R/W</text:p>
          </table:table-cell>
          <table:table-cell table:style-name="TableRowCell" office:value-type="string">
            <text:p text:style-name="Table_20_Contents">Base Function Code</text:p>
          </table:table-cell>
        </table:table-row>
        <table:table-row>
          <table:table-cell table:style-name="TableRowCell" office:value-type="string">
    </table:table-cell>
          <table:table-cell table:style-name="TableRowCell" office:value-type="string">
            <text:p text:style-name="Table_20_Contents">E8400AH</text:p>
          </table:table-cell>
          <table:table-cell table:style-name="TableRowCell" office:value-type="string">
            <text:p text:style-name="Table_20_Contents">R/W</text:p>
          </table:table-cell>
          <table:table-cell table:style-name="TableRowCell" office:value-type="string">
            <text:p text:style-name="Table_20_Contents">Memory Transfer Count (Word)</text:p>
          </table:table-cell>
        </table:table-row>
        <table:table-row>
          <table:table-cell table:style-name="TableRowCell" office:value-type="string">
    </table:table-cell>
          <table:table-cell table:style-name="TableRowCell" office:value-type="string">
            <text:p text:style-name="Table_20_Contents">E8401AH</text:p>
          </table:table-cell>
          <table:table-cell table:style-name="TableRowCell" office:value-type="string">
            <text:p text:style-name="Table_20_Contents">R/W</text:p>
          </table:table-cell>
          <table:table-cell table:style-name="TableRowCell" office:value-type="string">
            <text:p text:style-name="Table_20_Contents">Base Transfer Count (Word)</text:p>
          </table:table-cell>
        </table:table-row>
        <table:table-row>
          <table:table-cell table:style-name="TableRowCell" office:value-type="string">
    </table:table-cell>
          <table:table-cell table:style-name="TableRowCell" office:value-type="string">
            <text:p text:style-name="Table_20_Contents">E8400CH</text:p>
          </table:table-cell>
          <table:table-cell table:style-name="TableRowCell" office:value-type="string">
            <text:p text:style-name="Table_20_Contents">R/W</text:p>
          </table:table-cell>
          <table:table-cell table:style-name="TableRowCell" office:value-type="string">
            <text:p text:style-name="Table_20_Contents">Memory Address Register (LongWord)</text:p>
          </table:table-cell>
        </table:table-row>
        <table:table-row>
          <table:table-cell table:style-name="TableRowCell" office:value-type="string">
    </table:table-cell>
          <table:table-cell table:style-name="TableRowCell" office:value-type="string">
            <text:p text:style-name="Table_20_Contents">E8401CH</text:p>
          </table:table-cell>
          <table:table-cell table:style-name="TableRowCell" office:value-type="string">
            <text:p text:style-name="Table_20_Contents">R/W</text:p>
          </table:table-cell>
          <table:table-cell table:style-name="TableRowCell" office:value-type="string">
            <text:p text:style-name="Table_20_Contents">Device Address Register (LongWord)</text:p>
          </table:table-cell>
        </table:table-row>
        <table:table-row>
          <table:table-cell table:style-name="TableRowCell" office:value-type="string">
    </table:table-cell>
          <table:table-cell table:style-name="TableRowCell" office:value-type="string">
            <text:p text:style-name="Table_20_Contents">E8401DH</text:p>
          </table:table-cell>
          <table:table-cell table:style-name="TableRowCell" office:value-type="string">
            <text:p text:style-name="Table_20_Contents">R/W</text:p>
          </table:table-cell>
          <table:table-cell table:style-name="TableRowCell" office:value-type="string">
            <text:p text:style-name="Table_20_Contents">Base Address Register (LongWord)</text:p>
          </table:table-cell>
        </table:table-row>
        <table:table-row>
          <table:table-cell table:style-name="TableRowCell" office:value-type="string">
    </table:table-cell>
          <table:table-cell table:style-name="TableRowCell" office:value-type="string">
            <text:p text:style-name="Table_20_Contents">E840FFH</text:p>
          </table:table-cell>
          <table:table-cell table:style-name="TableRowCell" office:value-type="string">
            <text:p text:style-name="Table_20_Contents">R/W</text:p>
          </table:table-cell>
          <table:table-cell table:style-name="TableRowCell" office:value-type="string">
            <text:p text:style-name="Table_20_Contents">General Control Register</text:p>
          </table:table-cell>
        </table:table-row>
        <table:table-row>
          <table:table-cell table:style-name="TableRowCell" office:value-type="string">
            <text:p text:style-name="Table_20_Contents">Area Set</text:p>
          </table:table-cell>
          <table:table-cell table:style-name="TableRowCell" office:value-type="string">
            <text:p text:style-name="Table_20_Contents">E86001H</text:p>
          </table:table-cell>
          <table:table-cell table:style-name="TableRowCell" office:value-type="string">
            <text:p text:style-name="Table_20_Contents">W</text:p>
          </table:table-cell>
          <table:table-cell table:style-name="TableRowCell" office:value-type="string">
            <text:p text:style-name="Table_20_Contents">Supervisor Domain Setting</text:p>
          </table:table-cell>
        </table:table-row>
        <table:table-row>
          <table:table-cell table:style-name="TableRowCell" office:value-type="string">
            <text:p text:style-name="Table_20_Contents">M</text:p>
          </table:table-cell>
          <table:table-cell table:style-name="TableRowCell" office:value-type="string">
            <text:p text:style-name="Table_20_Contents">E88001H</text:p>
          </table:table-cell>
          <table:table-cell table:style-name="TableRowCell" office:value-type="string">
            <text:p text:style-name="Table_20_Contents">R</text:p>
          </table:table-cell>
          <table:table-cell table:style-name="TableRowCell" office:value-type="string">
            <text:p text:style-name="Table_20_Contents">GRIP Data Register</text:p>
          </table:table-cell>
        </table:table-row>
        <table:table-row>
          <table:table-cell table:style-name="TableRowCell" office:value-type="string">
            <text:p text:style-name="Table_20_Contents">F</text:p>
          </table:table-cell>
          <table:table-cell table:style-name="TableRowCell" office:value-type="string">
            <text:p text:style-name="Table_20_Contents">E88003H</text:p>
          </table:table-cell>
          <table:table-cell table:style-name="TableRowCell" office:value-type="string">
            <text:p text:style-name="Table_20_Contents">W</text:p>
          </table:table-cell>
          <table:table-cell table:style-name="TableRowCell" office:value-type="string">
            <text:p text:style-name="Table_20_Contents">Active Edge Register</text:p>
          </table:table-cell>
        </table:table-row>
        <table:table-row>
          <table:table-cell table:style-name="TableRowCell" office:value-type="string">
    </table:table-cell>
          <table:table-cell table:style-name="TableRowCell" office:value-type="string">
            <text:p text:style-name="Table_20_Contents">E88005H</text:p>
          </table:table-cell>
          <table:table-cell table:style-name="TableRowCell" office:value-type="string">
            <text:p text:style-name="Table_20_Contents">W</text:p>
          </table:table-cell>
          <table:table-cell table:style-name="TableRowCell" office:value-type="string">
            <text:p text:style-name="Table_20_Contents">Data Direction Register A</text:p>
          </table:table-cell>
        </table:table-row>
        <table:table-row>
          <table:table-cell table:style-name="TableRowCell" office:value-type="string">
    </table:table-cell>
          <table:table-cell table:style-name="TableRowCell" office:value-type="string">
            <text:p text:style-name="Table_20_Contents">E88007H</text:p>
          </table:table-cell>
          <table:table-cell table:style-name="TableRowCell" office:value-type="string">
            <text:p text:style-name="Table_20_Contents">R</text:p>
          </table:table-cell>
          <table:table-cell table:style-name="TableRowCell" office:value-type="string">
            <text:p text:style-name="Table_20_Contents">Interrupt Enable Register A</text:p>
          </table:table-cell>
        </table:table-row>
        <table:table-row>
          <table:table-cell table:style-name="TableRowCell" office:value-type="string">
    </table:table-cell>
          <table:table-cell table:style-name="TableRowCell" office:value-type="string">
            <text:p text:style-name="Table_20_Contents">E88009H</text:p>
          </table:table-cell>
          <table:table-cell table:style-name="TableRowCell" office:value-type="string">
            <text:p text:style-name="Table_20_Contents">R/W</text:p>
          </table:table-cell>
          <table:table-cell table:style-name="TableRowCell" office:value-type="string">
            <text:p text:style-name="Table_20_Contents">Interrupt Enable Register B</text:p>
          </table:table-cell>
        </table:table-row>
        <table:table-row>
          <table:table-cell table:style-name="TableRowCell" office:value-type="string">
    </table:table-cell>
          <table:table-cell table:style-name="TableRowCell" office:value-type="string">
            <text:p text:style-name="Table_20_Contents">E8800FH</text:p>
          </table:table-cell>
          <table:table-cell table:style-name="TableRowCell" office:value-type="string">
            <text:p text:style-name="Table_20_Contents">R/W</text:p>
          </table:table-cell>
          <table:table-cell table:style-name="TableRowCell" office:value-type="string">
            <text:p text:style-name="Table_20_Contents">Interrupt Pending Clear A</text:p>
          </table:table-cell>
        </table:table-row>
        <table:table-row>
          <table:table-cell table:style-name="TableRowCell" office:value-type="string">
    </table:table-cell>
          <table:table-cell table:style-name="TableRowCell" office:value-type="string">
            <text:p text:style-name="Table_20_Contents">E8800DH</text:p>
          </table:table-cell>
          <table:table-cell table:style-name="TableRowCell" office:value-type="string">
            <text:p text:style-name="Table_20_Contents">R/W</text:p>
          </table:table-cell>
          <table:table-cell table:style-name="TableRowCell" office:value-type="string">
            <text:p text:style-name="Table_20_Contents">Interrupt Pending Clear B</text:p>
          </table:table-cell>
        </table:table-row>
        <table:table-row>
          <table:table-cell table:style-name="TableRowCell" office:value-type="string">
    </table:table-cell>
          <table:table-cell table:style-name="TableRowCell" office:value-type="string">
            <text:p text:style-name="Table_20_Contents">E8800EH</text:p>
          </table:table-cell>
          <table:table-cell table:style-name="TableRowCell" office:value-type="string">
            <text:p text:style-name="Table_20_Contents">R/W</text:p>
          </table:table-cell>
          <table:table-cell table:style-name="TableRowCell" office:value-type="string">
            <text:p text:style-name="Table_20_Contents">Interrupt Service Level A</text:p>
          </table:table-cell>
        </table:table-row>
        <table:table-row>
          <table:table-cell table:style-name="TableRowCell" office:value-type="string">
    </table:table-cell>
          <table:table-cell table:style-name="TableRowCell" office:value-type="string">
            <text:p text:style-name="Table_20_Contents">E8800FH</text:p>
          </table:table-cell>
          <table:table-cell table:style-name="TableRowCell" office:value-type="string">
            <text:p text:style-name="Table_20_Contents">R/W</text:p>
          </table:table-cell>
          <table:table-cell table:style-name="TableRowCell" office:value-type="string">
            <text:p text:style-name="Table_20_Contents">Interrupt Service Level B</text:p>
          </table:table-cell>
        </table:table-row>
        <table:table-row>
          <table:table-cell table:style-name="TableRowCell" office:value-type="string">
    </table:table-cell>
          <table:table-cell table:style-name="TableRowCell" office:value-type="string">
            <text:p text:style-name="Table_20_Contents">E88010H</text:p>
          </table:table-cell>
          <table:table-cell table:style-name="TableRowCell" office:value-type="string">
            <text:p text:style-name="Table_20_Contents">R/W</text:p>
          </table:table-cell>
          <table:table-cell table:style-name="TableRowCell" office:value-type="string">
            <text:p text:style-name="Table_20_Contents">Interrupt Mask Register A</text:p>
          </table:table-cell>
        </table:table-row>
        <table:table-row>
          <table:table-cell table:style-name="TableRowCell" office:value-type="string">
    </table:table-cell>
          <table:table-cell table:style-name="TableRowCell" office:value-type="string">
            <text:p text:style-name="Table_20_Contents">E88011H</text:p>
          </table:table-cell>
          <table:table-cell table:style-name="TableRowCell" office:value-type="string">
            <text:p text:style-name="Table_20_Contents">R/W</text:p>
          </table:table-cell>
          <table:table-cell table:style-name="TableRowCell" office:value-type="string">
            <text:p text:style-name="Table_20_Contents">Interrupt Mask Register B</text:p>
          </table:table-cell>
        </table:table-row>
        <table:table-row>
          <table:table-cell table:style-name="TableRowCell" office:value-type="string">
    </table:table-cell>
          <table:table-cell table:style-name="TableRowCell" office:value-type="string">
            <text:p text:style-name="Table_20_Contents">E88015H</text:p>
          </table:table-cell>
          <table:table-cell table:style-name="TableRowCell" office:value-type="string">
            <text:p text:style-name="Table_20_Contents">R/W</text:p>
          </table:table-cell>
          <table:table-cell table:style-name="TableRowCell" office:value-type="string">
            <text:p text:style-name="Table_20_Contents">Vector Register</text:p>
          </table:table-cell>
        </table:table-row>
        <table:table-row>
          <table:table-cell table:style-name="TableRowCell" office:value-type="string">
    </table:table-cell>
          <table:table-cell table:style-name="TableRowCell" office:value-type="string">
            <text:p text:style-name="Table_20_Contents">E88091H</text:p>
          </table:table-cell>
          <table:table-cell table:style-name="TableRowCell" office:value-type="string">
            <text:p text:style-name="Table_20_Contents">W</text:p>
          </table:table-cell>
          <table:table-cell table:style-name="TableRowCell" office:value-type="string">
            <text:p text:style-name="Table_20_Contents">Type A Control Register</text:p>
          </table:table-cell>
        </table:table-row>
        <table:table-row>
          <table:table-cell table:style-name="TableRowCell" office:value-type="string">
    </table:table-cell>
          <table:table-cell table:style-name="TableRowCell" office:value-type="string">
            <text:p text:style-name="Table_20_Contents">E88093H</text:p>
          </table:table-cell>
          <table:table-cell table:style-name="TableRowCell" office:value-type="string">
            <text:p text:style-name="Table_20_Contents">W</text:p>
          </table:table-cell>
          <table:table-cell table:style-name="TableRowCell" office:value-type="string">
            <text:p text:style-name="Table_20_Contents">Type B Control Register</text:p>
          </table:table-cell>
        </table:table-row>
        <table:table-row>
          <table:table-cell table:style-name="TableRowCell" office:value-type="string">
    </table:table-cell>
          <table:table-cell table:style-name="TableRowCell" office:value-type="string">
            <text:p text:style-name="Table_20_Contents">E8808FH</text:p>
          </table:table-cell>
          <table:table-cell table:style-name="TableRowCell" office:value-type="string">
            <text:p text:style-name="Table_20_Contents">W</text:p>
          </table:table-cell>
          <table:table-cell table:style-name="TableRowCell" office:value-type="string">
            <text:p text:style-name="Table_20_Contents">Type C/D Control Register</text:p>
          </table:table-cell>
        </table:table-row>
        <table:table-row>
          <table:table-cell table:style-name="TableRowCell" office:value-type="string">
            <text:p text:style-name="Table_20_Contents">P</text:p>
          </table:table-cell>
          <table:table-cell table:style-name="TableRowCell" office:value-type="string">
            <text:p text:style-name="Table_20_Contents">E88071H</text:p>
          </table:table-cell>
          <table:table-cell table:style-name="TableRowCell" office:value-type="string">
            <text:p text:style-name="Table_20_Contents">R/W</text:p>
          </table:table-cell>
          <table:table-cell table:style-name="TableRowCell" office:value-type="string">
            <text:p text:style-name="Table_20_Contents">Type A Data Register</text:p>
          </table:table-cell>
        </table:table-row>
        <table:table-row>
          <table:table-cell table:style-name="TableRowCell" office:value-type="string">
    </table:table-cell>
          <table:table-cell table:style-name="TableRowCell" office:value-type="string">
            <text:p text:style-name="Table_20_Contents">E88081H</text:p>
          </table:table-cell>
          <table:table-cell table:style-name="TableRowCell" office:value-type="string">
            <text:p text:style-name="Table_20_Contents">R/W</text:p>
          </table:table-cell>
          <table:table-cell table:style-name="TableRowCell" office:value-type="string">
            <text:p text:style-name="Table_20_Contents">Type B Data Register</text:p>
          </table:table-cell>
        </table:table-row>
        <table:table-row>
          <table:table-cell table:style-name="TableRowCell" office:value-type="string">
    </table:table-cell>
          <table:table-cell table:style-name="TableRowCell" office:value-type="string">
            <text:p text:style-name="Table_20_Contents">E880E1H</text:p>
          </table:table-cell>
          <table:table-cell table:style-name="TableRowCell" office:value-type="string">
            <text:p text:style-name="Table_20_Contents">R/W</text:p>
          </table:table-cell>
          <table:table-cell table:style-name="TableRowCell" office:value-type="string">
            <text:p text:style-name="Table_20_Contents">Type C Data Register</text:p>
          </table:table-cell>
        </table:table-row>
      </table:table>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M</text:p>
          </table:table-cell>
          <table:table-cell table:style-name="TableRowCell" office:value-type="string">
            <text:p text:style-name="Table_20_Contents">E88025H</text:p>
          </table:table-cell>
          <table:table-cell table:style-name="TableRowCell" office:value-type="string">
            <text:p text:style-name="Table_20_Contents">R/W</text:p>
          </table:table-cell>
          <table:table-cell table:style-name="TableRowCell" office:value-type="string">
            <text:p text:style-name="Table_20_Contents">Timer D-Data Register</text:p>
          </table:table-cell>
        </table:table-row>
        <table:table-row>
          <table:table-cell table:style-name="TableRowCell" office:value-type="string">
            <text:p text:style-name="Table_20_Contents">F</text:p>
          </table:table-cell>
          <table:table-cell table:style-name="TableRowCell" office:value-type="string">
            <text:p text:style-name="Table_20_Contents">E88027H</text:p>
          </table:table-cell>
          <table:table-cell table:style-name="TableRowCell" office:value-type="string">
            <text:p text:style-name="Table_20_Contents">R/W</text:p>
          </table:table-cell>
          <table:table-cell table:style-name="TableRowCell" office:value-type="string">
            <text:p text:style-name="Table_20_Contents">Sync Character Register</text:p>
          </table:table-cell>
        </table:table-row>
        <table:table-row>
          <table:table-cell table:style-name="TableRowCell" office:value-type="string">
            <text:p text:style-name="Table_20_Contents">P</text:p>
          </table:table-cell>
          <table:table-cell table:style-name="TableRowCell" office:value-type="string">
            <text:p text:style-name="Table_20_Contents">E88029H</text:p>
          </table:table-cell>
          <table:table-cell table:style-name="TableRowCell" office:value-type="string">
            <text:p text:style-name="Table_20_Contents">W</text:p>
          </table:table-cell>
          <table:table-cell table:style-name="TableRowCell" office:value-type="string">
            <text:p text:style-name="Table_20_Contents">USART Control Register</text:p>
          </table:table-cell>
        </table:table-row>
        <table:table-row>
          <table:table-cell table:style-name="TableRowCell" office:value-type="string">
    </table:table-cell>
          <table:table-cell table:style-name="TableRowCell" office:value-type="string">
            <text:p text:style-name="Table_20_Contents">E8802BH</text:p>
          </table:table-cell>
          <table:table-cell table:style-name="TableRowCell" office:value-type="string">
            <text:p text:style-name="Table_20_Contents">R/W</text:p>
          </table:table-cell>
          <table:table-cell table:style-name="TableRowCell" office:value-type="string">
            <text:p text:style-name="Table_20_Contents">Receive Status Register</text:p>
          </table:table-cell>
        </table:table-row>
        <table:table-row>
          <table:table-cell table:style-name="TableRowCell" office:value-type="string">
    </table:table-cell>
          <table:table-cell table:style-name="TableRowCell" office:value-type="string">
            <text:p text:style-name="Table_20_Contents">E8802DH</text:p>
          </table:table-cell>
          <table:table-cell table:style-name="TableRowCell" office:value-type="string">
            <text:p text:style-name="Table_20_Contents">R/W</text:p>
          </table:table-cell>
          <table:table-cell table:style-name="TableRowCell" office:value-type="string">
            <text:p text:style-name="Table_20_Contents">Receive Status Register</text:p>
          </table:table-cell>
        </table:table-row>
        <table:table-row>
          <table:table-cell table:style-name="TableRowCell" office:value-type="string">
    </table:table-cell>
          <table:table-cell table:style-name="TableRowCell" office:value-type="string">
            <text:p text:style-name="Table_20_Contents">E8802FH</text:p>
          </table:table-cell>
          <table:table-cell table:style-name="TableRowCell" office:value-type="string">
            <text:p text:style-name="Table_20_Contents">R/W</text:p>
          </table:table-cell>
          <table:table-cell table:style-name="TableRowCell" office:value-type="string">
            <text:p text:style-name="Table_20_Contents">USART Data Register</text:p>
          </table:table-cell>
        </table:table-row>
      </table:table>
      <text:p text:style-name="First_20_paragraph">| R | E8A001H | R/W | 1 Second Counter / ICKLOUT Select | | | T | E8A003H | R/W | 10 Second Counter / Adjust | | | C | E8A005H | R/W | 1 Minute Counter / Alarm 1 Minute Register | | | | E8A007H | R/W | 10 Minute Counter / Alarm 10 Minute Register | | | | E8A009H | R/W | 1 Hour Counter / Alarm 1 Hour Register | | | | E8A00BH | R/W | 10 Hour Counter / Alarm 10 Hour Register | | | | E8A00DH | R/W | Day Counter / Alarm Day Register | | | | E8A00FH | R/W | 1 Day Counter / Alarm 1 Day Register | | | | E8A011H | R/W | 10 Day Counter / Alarm 10 Day Register | | | | E8A013H | R/W | 1 Month Counter | | | | E8A015H | R/W | 10 Month Counter / 12-24 Hour Select | | | | E8A017H | R/W | 1 Year Counter / 10 Year Counter | | | | E8A019H | R/W | 10 Year Counter | | | | E8A01BH | R/W | Mode Register | | | | E8A01DH | W | Test Register | | | | E8A01FH | W | Reset Controller | |</text:p>
      <text:p text:style-name="Text_20_body">| Printer | E8C001H | W | Printer Data | | | | E8C003H | R | Printer Strobe | | | | E9C001H | R | Printer Busy | |</text:p>
      <text:p text:style-name="Text_20_body">| System Port | E8E001H | R/W | Contrast Adjustment (D/A) | | | | E8E003H | R/W | TV Control | | | | E8E005H | W | Video Input Control | | | | E8E007H | R/W | H/L LED Lighting, NMI Reset, Key Control | | | | E8E00BH | R | MPU Operation Clock Frequency Determination Port | | | | E8E00DH | W | SRAM Write Enable Control | | | | E8E00FH | W | POWER OFF Control | |</text:p>
      <text:p text:style-name="Text_20_body">| FM Sound Source | E90001H | W | FM Sound Register / Address Port | | | | E90003H | R/W | FM Sound Register / Data Port | |</text:p>
      <text:p text:style-name="Text_20_body">| Sound Synthesis | E92001H | R/W | ADPCM Status (IN) / ADPCM Command (OUT) | | | | E92003H | R/W | ADPCM Data Register (IN/OUT) | | | | E9A005H | W | ADPCM Output, Sampling Frequency Switching Register | 8255 Port C |</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Floppy Disk</text:p>
          </table:table-cell>
          <table:table-cell table:style-name="TableRowCell" office:value-type="string">
            <text:p text:style-name="Table_20_Contents">E94**1H R</text:p>
          </table:table-cell>
          <table:table-cell table:style-name="TableRowCell" office:value-type="string">
            <text:p text:style-name="Table_20_Contents">FDCA Status Register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3H R/W</text:p>
          </table:table-cell>
          <table:table-cell table:style-name="TableRowCell" office:value-type="string">
            <text:p text:style-name="Table_20_Contents">FDC Data Register (IN/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5H R/W</text:p>
          </table:table-cell>
          <table:table-cell table:style-name="TableRowCell" office:value-type="string">
            <text:p text:style-name="Table_20_Contents">Drive Status (IN/Drive Control OUT)</text:p>
          </table:table-cell>
          <table:table-cell table:style-name="TableRowCell" office:value-type="string">
            <text:p text:style-name="Table_20_Contents">Optional Signal</text:p>
          </table:table-cell>
        </table:table-row>
        <table:table-row>
          <table:table-cell table:style-name="TableRowCell" office:value-type="string">
    </table:table-cell>
          <table:table-cell table:style-name="TableRowCell" office:value-type="string">
            <text:p text:style-name="Table_20_Contents">E94**7H W</text:p>
          </table:table-cell>
          <table:table-cell table:style-name="TableRowCell" office:value-type="string">
            <text:p text:style-name="Table_20_Contents">Access Drive Select, 2HD/2DD Switching (OUT)</text:p>
          </table:table-cell>
          <table:table-cell table:style-name="TableRowCell" office:value-type="string">
    </table:table-cell>
        </table:table-row>
        <table:table-row>
          <table:table-cell table:style-name="TableRowCell" office:value-type="string">
            <text:p text:style-name="Table_20_Contents">SCSI</text:p>
          </table:table-cell>
          <table:table-cell table:style-name="TableRowCell" office:value-type="string">
            <text:p text:style-name="Table_20_Contents">E96021H R/W</text:p>
          </table:table-cell>
          <table:table-cell table:style-name="TableRowCell" office:value-type="string">
            <text:p text:style-name="Table_20_Contents">Bus Device I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3H R/W</text:p>
          </table:table-cell>
          <table:table-cell table:style-name="TableRowCell" office:value-type="string">
            <text:p text:style-name="Table_20_Contents">SCSI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5H R/W</text:p>
          </table:table-cell>
          <table:table-cell table:style-name="TableRowCell" office:value-type="string">
            <text:p text:style-name="Table_20_Contents">Comman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9H R/W</text:p>
          </table:table-cell>
          <table:table-cell table:style-name="TableRowCell" office:value-type="string">
            <text:p text:style-name="Table_20_Contents">Interrup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BH R/W</text:p>
          </table:table-cell>
          <table:table-cell table:style-name="TableRowCell" office:value-type="string">
            <text:p text:style-name="Table_20_Contents">R...Re-Examine Status W...SCSI Controller Diagnosi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DH R</text:p>
          </table:table-cell>
          <table:table-cell table:style-name="TableRowCell" office:value-type="string">
            <text:p text:style-name="Table_20_Contents">Statu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FH R</text:p>
          </table:table-cell>
          <table:table-cell table:style-name="TableRowCell" office:value-type="string">
            <text:p text:style-name="Table_20_Contents">System Statu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1H R/W</text:p>
          </table:table-cell>
          <table:table-cell table:style-name="TableRowCell" office:value-type="string">
            <text:p text:style-name="Table_20_Contents">Phase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3H R</text:p>
          </table:table-cell>
          <table:table-cell table:style-name="TableRowCell" office:value-type="string">
            <text:p text:style-name="Table_20_Contents">Data Transfer Coun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5H R/W</text:p>
          </table:table-cell>
          <table:table-cell table:style-name="TableRowCell" office:value-type="string">
            <text:p text:style-name="Table_20_Contents">Data Addres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7H R/W</text:p>
          </table:table-cell>
          <table:table-cell table:style-name="TableRowCell" office:value-type="string">
            <text:p text:style-name="Table_20_Contents">Temporary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9H R/W</text:p>
          </table:table-cell>
          <table:table-cell table:style-name="TableRowCell" office:value-type="string">
            <text:p text:style-name="Table_20_Contents">Transfer Byte Count High</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BH R/W</text:p>
          </table:table-cell>
          <table:table-cell table:style-name="TableRowCell" office:value-type="string">
            <text:p text:style-name="Table_20_Contents">Transfer Byte Count Mi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DH R/W</text:p>
          </table:table-cell>
          <table:table-cell table:style-name="TableRowCell" office:value-type="string">
            <text:p text:style-name="Table_20_Contents">Transfer Byte Count Low</text:p>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E98001H R/W</text:p>
          </table:table-cell>
          <table:table-cell table:style-name="TableRowCell" office:value-type="string">
            <text:p text:style-name="Table_20_Contents">SCC Command Port B</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3H R/W</text:p>
          </table:table-cell>
          <table:table-cell table:style-name="TableRowCell" office:value-type="string">
            <text:p text:style-name="Table_20_Contents">SCC Data Port B</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5H R/W</text:p>
          </table:table-cell>
          <table:table-cell table:style-name="TableRowCell" office:value-type="string">
            <text:p text:style-name="Table_20_Contents">SCC Command Port 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7H R/W</text:p>
          </table:table-cell>
          <table:table-cell table:style-name="TableRowCell" office:value-type="string">
            <text:p text:style-name="Table_20_Contents">SCC Data Port A</text:p>
          </table:table-cell>
          <table:table-cell table:style-name="TableRowCell" office:value-type="string">
    </table:table-cell>
        </table:table-row>
        <table:table-row>
          <table:table-cell table:style-name="TableRowCell" office:value-type="string">
            <text:p text:style-name="Table_20_Contents">Joystick</text:p>
          </table:table-cell>
          <table:table-cell table:style-name="TableRowCell" office:value-type="string">
            <text:p text:style-name="Table_20_Contents">E9A001H R</text:p>
          </table:table-cell>
          <table:table-cell table:style-name="TableRowCell" office:value-type="string">
            <text:p text:style-name="Table_20_Contents">Joystick 0</text:p>
          </table:table-cell>
          <table:table-cell table:style-name="TableRowCell" office:value-type="string">
            <text:p text:style-name="Table_20_Contents">8255 Port A</text:p>
          </table:table-cell>
        </table:table-row>
        <table:table-row>
          <table:table-cell table:style-name="TableRowCell" office:value-type="string">
    </table:table-cell>
          <table:table-cell table:style-name="TableRowCell" office:value-type="string">
            <text:p text:style-name="Table_20_Contents">E98003H R</text:p>
          </table:table-cell>
          <table:table-cell table:style-name="TableRowCell" office:value-type="string">
            <text:p text:style-name="Table_20_Contents">Joystick 1</text:p>
          </table:table-cell>
          <table:table-cell table:style-name="TableRowCell" office:value-type="string">
            <text:p text:style-name="Table_20_Contents">8255 Port B</text:p>
          </table:table-cell>
        </table:table-row>
        <table:table-row>
          <table:table-cell table:style-name="TableRowCell" office:value-type="string">
            <text:p text:style-name="Table_20_Contents">8255</text:p>
          </table:table-cell>
          <table:table-cell table:style-name="TableRowCell" office:value-type="string">
            <text:p text:style-name="Table_20_Contents">E9A007H W</text:p>
          </table:table-cell>
          <table:table-cell table:style-name="TableRowCell" office:value-type="string">
            <text:p text:style-name="Table_20_Contents">8255 Control Word Register</text:p>
          </table:table-cell>
          <table:table-cell table:style-name="TableRowCell" office:value-type="string">
    </table:table-cell>
        </table:table-row>
        <table:table-row>
          <table:table-cell table:style-name="TableRowCell" office:value-type="string">
            <text:p text:style-name="Table_20_Contents">FD, PR</text:p>
          </table:table-cell>
          <table:table-cell table:style-name="TableRowCell" office:value-type="string">
            <text:p text:style-name="Table_20_Contents">E9C**1H R/W</text:p>
          </table:table-cell>
          <table:table-cell table:style-name="TableRowCell" office:value-type="string">
            <text:p text:style-name="Table_20_Contents">FDC, FDD, Printer Interrupt Status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3H R/W</text:p>
          </table:table-cell>
          <table:table-cell table:style-name="TableRowCell" office:value-type="string">
            <text:p text:style-name="Table_20_Contents">FDC, FDD, Printer Interrupt Mask (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5H R/W</text:p>
          </table:table-cell>
          <table:table-cell table:style-name="TableRowCell" office:value-type="string">
            <text:p text:style-name="Table_20_Contents">FDC, FDD, Printer Interrupt Vector</text:p>
          </table:table-cell>
          <table:table-cell table:style-name="TableRowCell" office:value-type="string">
    </table:table-cell>
        </table:table-row>
        <table:table-row>
          <table:table-cell table:style-name="TableRowCell" office:value-type="string">
            <text:p text:style-name="Table_20_Contents">FPU</text:p>
          </table:table-cell>
          <table:table-cell table:style-name="TableRowCell" office:value-type="string">
            <text:p text:style-name="Table_20_Contents">E9E000H R</text:p>
          </table:table-cell>
          <table:table-cell table:style-name="TableRowCell" office:value-type="string">
            <text:p text:style-name="Table_20_Contents">Response Register</text:p>
          </table:table-cell>
          <table:table-cell table:style-name="TableRowCell" office:value-type="string">
            <text:p text:style-name="Table_20_Contents">Internal Option</text:p>
          </table:table-cell>
        </table:table-row>
        <table:table-row>
          <table:table-cell table:style-name="TableRowCell" office:value-type="string">
    </table:table-cell>
          <table:table-cell table:style-name="TableRowCell" office:value-type="string">
            <text:p text:style-name="Table_20_Contents">E9E002H W</text:p>
          </table:table-cell>
          <table:table-cell table:style-name="TableRowCell" office:value-type="string">
            <text:p text:style-name="Table_20_Contents">Control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4H R</text:p>
          </table:table-cell>
          <table:table-cell table:style-name="TableRowCell" office:value-type="string">
            <text:p text:style-name="Table_20_Contents">Status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6H R/W</text:p>
          </table:table-cell>
          <table:table-cell table:style-name="TableRowCell" office:value-type="string">
            <text:p text:style-name="Table_20_Contents">Restore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8H R/W</text:p>
          </table:table-cell>
          <table:table-cell table:style-name="TableRowCell" office:value-type="string">
            <text:p text:style-name="Table_20_Contents">Operation Word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AH W</text:p>
          </table:table-cell>
          <table:table-cell table:style-name="TableRowCell" office:value-type="string">
            <text:p text:style-name="Table_20_Contents">Command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CH -</text:p>
          </table:table-cell>
          <table:table-cell table:style-name="TableRowCell" office:value-type="string">
            <text:p text:style-name="Table_20_Contents">(Reserv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EH W</text:p>
          </table:table-cell>
          <table:table-cell table:style-name="TableRowCell" office:value-type="string">
            <text:p text:style-name="Table_20_Contents">Condition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0H R/W</text:p>
          </table:table-cell>
          <table:table-cell table:style-name="TableRowCell" office:value-type="string">
            <text:p text:style-name="Table_20_Contents">Operand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2H R/W</text:p>
          </table:table-cell>
          <table:table-cell table:style-name="TableRowCell" office:value-type="string">
            <text:p text:style-name="Table_20_Contents">Operand Register Lower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4H R</text:p>
          </table:table-cell>
          <table:table-cell table:style-name="TableRowCell" office:value-type="string">
            <text:p text:style-name="Table_20_Contents">Register Selec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6H -</text:p>
          </table:table-cell>
          <table:table-cell table:style-name="TableRowCell" office:value-type="string">
            <text:p text:style-name="Table_20_Contents">(Reserv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8H W</text:p>
          </table:table-cell>
          <table:table-cell table:style-name="TableRowCell" office:value-type="string">
            <text:p text:style-name="Table_20_Contents">Instruction Address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AH W</text:p>
          </table:table-cell>
          <table:table-cell table:style-name="TableRowCell" office:value-type="string">
            <text:p text:style-name="Table_20_Contents">Instruction Address Register Lower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CH R/W</text:p>
          </table:table-cell>
          <table:table-cell table:style-name="TableRowCell" office:value-type="string">
            <text:p text:style-name="Table_20_Contents">Operand Address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EH R/W</text:p>
          </table:table-cell>
          <table:table-cell table:style-name="TableRowCell" office:value-type="string">
            <text:p text:style-name="Table_20_Contents">Operand Address Register Lower Word</text:p>
          </table:table-cell>
          <table:table-cell table:style-name="TableRowCell" office:value-type="string">
    </table:table-cell>
        </table:table-row>
      </table:table>
      <text:p text:style-name="First_20_paragraph">CZ-634C-TN CZ-644C-TN</text:p>
      <text:p text:style-name="Text_20_body">Item Port Address Function Remarks Expansion memory board / super visor setting port EAFF81H W Setting port for memory area 200000H~3FFFFFH Valid only when an option board is installed.</text:p>
      <text:p text:style-name="Preformatted_20_Text"><text:s text:c="4"/>EAFF83H W <text:s text:c="2"/>Setting port for memory area 400000H~5FFFFFH</text:p>
      <text:p text:style-name="Preformatted_20_Text"><text:s text:c="4"/>EAFF85H W <text:s text:c="2"/>Setting port for memory area 600000H~7FFFFFH</text:p>
      <text:p text:style-name="First_20_paragraph">Sprite EB0000H R/W Sprite X coordinate</text:p>
      <text:p text:style-name="Preformatted_20_Text"><text:s text:c="4"/>EB0002H R/W Sprite Y coordinate Sprite 0</text:p>
      <text:p text:style-name="Preformatted_20_Text"><text:s text:c="4"/>EB0004H R/W Sprite control</text:p>
      <text:p text:style-name="Preformatted_20_Text"><text:s text:c="4"/>EB0006H R/W Sprite priority</text:p>
      <text:p text:style-name="Preformatted_20_Text"/>
      <text:p text:style-name="Preformatted_20_Text"><text:s text:c="4"/>EB03F8H R/W Sprite X coordinate</text:p>
      <text:p text:style-name="Preformatted_20_Text"><text:s text:c="4"/>EB03FAH R/W Sprite Y coordinate Sprite 127</text:p>
      <text:p text:style-name="Preformatted_20_Text"><text:s text:c="4"/>EB03FCH R/W Sprite control</text:p>
      <text:p text:style-name="Preformatted_20_Text"><text:s text:c="4"/>EB03FEH R/W Sprite priority</text:p>
      <text:p text:style-name="Preformatted_20_Text"/>
      <text:p text:style-name="Preformatted_20_Text"><text:s text:c="4"/>EB0800H R/W Background 0 X coordinate</text:p>
      <text:p text:style-name="Preformatted_20_Text"><text:s text:c="4"/>EB0802H R/W Background 0 Y coordinate</text:p>
      <text:p text:style-name="Preformatted_20_Text"><text:s text:c="4"/>EB0804H R/W Background 1 X coordinate</text:p>
      <text:p text:style-name="Preformatted_20_Text"><text:s text:c="4"/>EB0806H R/W Background 1 Y coordinate</text:p>
      <text:p text:style-name="Preformatted_20_Text"><text:s text:c="4"/>EB0808H R/W Background control</text:p>
      <text:p text:style-name="Preformatted_20_Text"><text:s text:c="4"/>EB080AH R/W Horizontal total</text:p>
      <text:p text:style-name="Preformatted_20_Text"><text:s text:c="4"/>EB080CH R/W Horizontal display</text:p>
      <text:p text:style-name="Preformatted_20_Text"><text:s text:c="4"/>EB080EH R/W Vertical display</text:p>
      <text:p text:style-name="Preformatted_20_Text"><text:s text:c="4"/>EB0810H R/W Resolution</text:p>
      <text:p text:style-name="First_20_paragraph">Sprite PCG area EB0800H R/W Sprite 0 PCG Area</text:p>
      <text:p text:style-name="Preformatted_20_Text"><text:s text:c="4"/>EB807EH R/W</text:p>
      <text:p text:style-name="Preformatted_20_Text"><text:s text:c="4"/>EBBF80H R/W Sprite 127 PCG Area</text:p>
      <text:p text:style-name="Preformatted_20_Text"><text:s text:c="4"/>EBBFFEH R/W</text:p>
      <text:p text:style-name="First_20_paragraph">Sprite text area EBC000H R/W Text area 0</text:p>
      <text:p text:style-name="Preformatted_20_Text"><text:s text:c="4"/>EBDFFEH R/W</text:p>
      <text:p text:style-name="Preformatted_20_Text"><text:s text:c="4"/>EBE000H R/W Text area 1</text:p>
      <text:p text:style-name="Preformatted_20_Text"><text:s text:c="4"/>EBFFFEH R/W</text:p>
      <text:p text:style-name="First_20_paragraph"><text:span text:style-name="Strong_20_Emphasis">3-3. Area Set</text:span></text:p>
      <text:p text:style-name="Text_20_body">In this book, the data can be set in the register of E86001H in the range from the beginning of the memory to 2MB (000000H - 1FFFFFH), allowing any location to be set as a supervisor area in 8KB units from the beginning of the memory.</text:p>
      <text:list text:style-name="List_20_1">
        <text:list-item>
          <text:p text:style-name="List_20_Bullet_20_Tight"><text:span text:style-name="Strong_20_Emphasis">Register Port Address</text:span>: E86001H, Write only 8-bit Register</text:p>
        </text:list-item>
      </text:list>
      <text:p text:style-name="Preformatted_20_Text">D7 <text:s text:c="1"/>D6 <text:s text:c="1"/>D5 <text:s text:c="1"/>D4 <text:s text:c="1"/>D3 <text:s text:c="1"/>D2 <text:s text:c="1"/>D1 <text:s text:c="1"/>D0</text:p>
      <text:p text:style-name="Preformatted_20_Text"><text:s text:c="7"/>(Lower 8 bits are valid)</text:p>
      <text:list text:style-name="List_20_1">
        <text:list-item>
          <text:p text:style-name="List_20_Bullet_20_Tight"><text:span text:style-name="Strong_20_Emphasis">Operation</text:span>: In the range specification of 2MB from the beginning of the main memory, it becomes possible to specify the supervisor area by data settings.</text:p>
        </text:list-item>
      </text:list>
      <text:p text:style-name="Preformatted_20_Text"><text:s text:c="4"/>However, the setting is 8KB units (dividing 2MB into 256 parts).</text:p>
      <text:p text:style-name="Preformatted_20_Text"><text:s text:c="4"/>Example: Memory map when setting data is 7FH</text:p>
      <text:p text:style-name="First_20_paragraph">000000H Supervisor Area 000000H Port Setting Value Port Data Setting Value Supervisor Area FFFFFFFFH 100000H Supervisor &amp; User Area 0 0 ~ 1FFFFH (8KB)</text:p>
      <text:p text:style-name="Preformatted_20_Text"><text:s text:c="50"/>1 <text:s text:c="31"/>0 ~ 3FFFH</text:p>
      <text:p text:style-name="Preformatted_20_Text"><text:s text:c="50"/>2 <text:s text:c="31"/>0 ~ 5FFFH</text:p>
      <text:p text:style-name="Preformatted_20_Text"><text:s text:c="50"/>3 <text:s text:c="31"/>0 ~ 7FFFH</text:p>
      <text:p text:style-name="Preformatted_20_Text"><text:s text:c="50"/>4 <text:s text:c="31"/>0 ~ 9FFFH</text:p>
      <text:p text:style-name="Preformatted_20_Text"><text:s text:c="50"/>5 <text:s text:c="31"/>0 ~ BFFFH</text:p>
      <text:p text:style-name="Preformatted_20_Text"><text:s text:c="85"/>.</text:p>
      <text:p text:style-name="Preformatted_20_Text"><text:s text:c="85"/>.</text:p>
      <text:p text:style-name="Preformatted_20_Text"><text:s text:c="85"/>.</text:p>
      <text:p text:style-name="First_20_paragraph">200000H Supervisor &amp; User Area 127 0 ~ FFFFFFH (1MB)</text:p>
      <text:p text:style-name="Preformatted_20_Text"><text:s text:c="85"/>.</text:p>
      <text:p text:style-name="Preformatted_20_Text"><text:s text:c="49"/>128 <text:s text:c="29"/>0 ~ 10FFFFH</text:p>
      <text:p text:style-name="Preformatted_20_Text"><text:s text:c="85"/>.</text:p>
      <text:p text:style-name="Preformatted_20_Text"><text:s text:c="85"/>.</text:p>
      <text:p text:style-name="First_20_paragraph">FFFFFFFH 254 0 ~ 1FDFFFH</text:p>
      <text:p text:style-name="Preformatted_20_Text"><text:s text:c="46"/>255 <text:s text:c="31"/>0 ~ 1FFFFFH (2MB)</text:p>
      <text:p text:style-name="Preformatted_20_Text"><text:s text:c="50"/></text:p>
      <text:p text:style-name="Preformatted_20_Text"><text:s text:c="13"/>Supervisor &amp; User Area</text:p>
      <text:p text:style-name="First_20_paragraph">FFFFFFFH</text:p>
      <text:list text:style-name="List_20_1">
        <text:list-item>
          <text:p text:style-name="List_20_Bullet_20_Tight"><text:span text:style-name="Strong_20_Emphasis">Expansion Memory Board Supervisor Setting Port</text:span> By writing data into the supervisor area setting port, it is possible to specify the supervisor area in 256KB units for the memory area on the extension board.</text:p>
        </text:list-item>
      </text:list>
      <text:p text:style-name="First_20_paragraph">Memory Area Supervisor Area Setting Port 200000 ~ 3FFFFFH EAFF81H 400000 ~ 5FFFFFH EAFF83H 600000 ~ 7FFFFFH EAFF85H (Supervisor area mode write only port)</text:p>
      <text:p text:style-name="Text_20_body">Writing Data</text:p>
      <text:p text:style-name="Preformatted_20_Text">D7 <text:s text:c="1"/>D6 <text:s text:c="1"/>D5 <text:s text:c="1"/>D4 <text:s text:c="1"/>D3 <text:s text:c="1"/>D2 <text:s text:c="1"/>D1 <text:s text:c="1"/>D0</text:p>
      <text:p text:style-name="Preformatted_20_Text"><text:s text:c="7"/>(Lower 8 bits are valid)</text:p>
      <text:p text:style-name="First_20_paragraph">Note: H means hexadecimal in the context of memory and register addresses.</text:p>
      <text:p text:style-name="Text_20_body">Writing data of the 2-bit lower digit corresponds to each 256K byte memory region. Writing 0 addresses it to Supervisor-only region, and writing 1 addresses to Supervisor &amp; User region. The initial state is set to Supervisor &amp; User region.<text:line-break/>(Example) When EAFB| | HC-07 bit is written to the supervisor mode,<text:line-break/>200000 to 2BFFFFH: Supervisor Mode<text:line-break/>2C0000 to 3FFFFFH: Supervisor &amp; User Mode</text:p>
      <table:table table:name="Table7" table:style-name="Table7">
        <table:table-column table:style-name="Table7.A"/>
        <table:table-column table:style-name="Table7.B"/>
        <table:table-header-rows>
          <table:table-row>
            <table:table-cell table:style-name="TableHeaderRowCell" office:value-type="string">
              <text:p text:style-name="Table_20_Heading">Memory Region (HEX)</text:p>
            </table:table-cell>
            <table:table-cell table:style-name="TableHeaderRowCell" office:value-type="string">
              <text:p text:style-name="Table_20_Heading">Corresponding Bit</text:p>
            </table:table-cell>
          </table:table-row>
        </table:table-header-rows>
        <table:table-row>
          <table:table-cell table:style-name="TableRowCell" office:value-type="string">
            <text:p text:style-name="Table_20_Contents">Memory Region 0</text:p>
          </table:table-cell>
          <table:table-cell table:style-name="TableRowCell" office:value-type="string">
            <text:p text:style-name="Table_20_Contents">000000~03FFFF</text:p>
          </table:table-cell>
        </table:table-row>
        <table:table-row>
          <table:table-cell table:style-name="TableRowCell" office:value-type="string">
            <text:p text:style-name="Table_20_Contents">Memory Region 1</text:p>
          </table:table-cell>
          <table:table-cell table:style-name="TableRowCell" office:value-type="string">
            <text:p text:style-name="Table_20_Contents">040000~07FFFF</text:p>
          </table:table-cell>
        </table:table-row>
        <table:table-row>
          <table:table-cell table:style-name="TableRowCell" office:value-type="string">
            <text:p text:style-name="Table_20_Contents">Memory Region 2</text:p>
          </table:table-cell>
          <table:table-cell table:style-name="TableRowCell" office:value-type="string">
            <text:p text:style-name="Table_20_Contents">080000~0BFFFF</text:p>
          </table:table-cell>
        </table:table-row>
        <table:table-row>
          <table:table-cell table:style-name="TableRowCell" office:value-type="string">
            <text:p text:style-name="Table_20_Contents">Memory Region 3</text:p>
          </table:table-cell>
          <table:table-cell table:style-name="TableRowCell" office:value-type="string">
            <text:p text:style-name="Table_20_Contents">0C0000~0FFFFF</text:p>
          </table:table-cell>
        </table:table-row>
        <table:table-row>
          <table:table-cell table:style-name="TableRowCell" office:value-type="string">
            <text:p text:style-name="Table_20_Contents">Memory Region 4</text:p>
          </table:table-cell>
          <table:table-cell table:style-name="TableRowCell" office:value-type="string">
            <text:p text:style-name="Table_20_Contents">100000~13FFFF</text:p>
          </table:table-cell>
        </table:table-row>
        <table:table-row>
          <table:table-cell table:style-name="TableRowCell" office:value-type="string">
            <text:p text:style-name="Table_20_Contents">Memory Region 5</text:p>
          </table:table-cell>
          <table:table-cell table:style-name="TableRowCell" office:value-type="string">
            <text:p text:style-name="Table_20_Contents">140000~17FFFF</text:p>
          </table:table-cell>
        </table:table-row>
        <table:table-row>
          <table:table-cell table:style-name="TableRowCell" office:value-type="string">
            <text:p text:style-name="Table_20_Contents">Memory Region 6</text:p>
          </table:table-cell>
          <table:table-cell table:style-name="TableRowCell" office:value-type="string">
            <text:p text:style-name="Table_20_Contents">180000~1BFFFF</text:p>
          </table:table-cell>
        </table:table-row>
        <table:table-row>
          <table:table-cell table:style-name="TableRowCell" office:value-type="string">
            <text:p text:style-name="Table_20_Contents">Memory Region 7</text:p>
          </table:table-cell>
          <table:table-cell table:style-name="TableRowCell" office:value-type="string">
            <text:p text:style-name="Table_20_Contents">1C0000~1FFFFF</text:p>
          </table:table-cell>
        </table:table-row>
      </table:table>
      <text:p text:style-name="First_20_paragraph">The above is valid when the optional 2M byte unit memory board is installed via the internal port connector. For example, in the case of expanding by 2M bytes, respond to each memory region 400000~5FFFFH and 600000~7FFFFH. Note: EAFP83H and EAFP85H may become inactive. Note) Models CZ-6BE2, 4/2/4M byte memory have the same port and function as the built-in ports.</text:p>
      <text:p text:style-name="Text_20_body">3-4. System Port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header-rows>
          <table:table-row>
            <table:table-cell table:style-name="TableHeaderRowCell" office:value-type="string">
              <text:p text:style-name="Table_20_Heading">No.</text:p>
            </table:table-cell>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8E001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E8E003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3DL</text:p>
          </table:table-cell>
          <table:table-cell table:style-name="TableRowCell" office:value-type="string">
            <text:p text:style-name="Table_20_Contents">3DR</text:p>
          </table:table-cell>
        </table:table-row>
        <table:table-row>
          <table:table-cell table:style-name="TableRowCell" office:value-type="string">
            <text:p text:style-name="Table_20_Contents">3</text:p>
          </table:table-cell>
          <table:table-cell table:style-name="TableRowCell" office:value-type="string">
            <text:p text:style-name="Table_20_Contents">E8E005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E8E007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HRL</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E8E00B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E8E00D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SRAM Write Enable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E8E00F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row>
      </table:table>
      <text:p text:style-name="First_20_paragraph">● System Port Register Address Map (* is invalid) ● System Port Register Details</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0</text:p>
          </table:table-cell>
          <table:table-cell table:style-name="TableRowCell" office:value-type="string">
            <text:p text:style-name="Table_20_Contents">3DR</text:p>
          </table:table-cell>
          <table:table-cell table:style-name="TableRowCell" office:value-type="string">
            <text:p text:style-name="Table_20_Contents">3DR</text:p>
          </table:table-cell>
        </table:table-row>
        <table:table-row>
          <table:table-cell table:style-name="TableRowCell" office:value-type="string">
            <text:p text:style-name="Table_20_Contents">D01</text:p>
          </table:table-cell>
          <table:table-cell table:style-name="TableRowCell" office:value-type="string">
            <text:p text:style-name="Table_20_Contents">3DL</text:p>
          </table:table-cell>
          <table:table-cell table:style-name="TableRowCell" office:value-type="string">
            <text:p text:style-name="Table_20_Contents">3DL</text:p>
          </table:table-cell>
        </table:table-row>
        <table:table-row>
          <table:table-cell table:style-name="TableRowCell" office:value-type="string">
            <text:p text:style-name="Table_20_Contents">D02</text:p>
          </table:table-cell>
          <table:table-cell table:style-name="TableRowCell" office:value-type="string">
    </table:table-cell>
          <table:table-cell table:style-name="TableRowCell" office:value-type="string">
            <text:p text:style-name="Table_20_Contents">FIELD</text:p>
          </table:table-cell>
        </table:table-row>
        <table:table-row>
          <table:table-cell table:style-name="TableRowCell" office:value-type="string">
            <text:p text:style-name="Table_20_Contents">D03</text:p>
          </table:table-cell>
          <table:table-cell table:style-name="TableRowCell" office:value-type="string">
            <text:p text:style-name="Table_20_Contents">TV Remote Signal</text:p>
          </table:table-cell>
          <table:table-cell table:style-name="TableRowCell" office:value-type="string">
            <text:p text:style-name="Table_20_Contents">TV ON/OFF Status</text:p>
          </table:table-cell>
        </table:table-row>
      </table:table>
      <text:list text:style-name="Numbering_20_1">
        <text:list-item>
          <text:p text:style-name="List_20_Number">E8E001H[READ/WRITE]</text:p>
          <text:list text:style-name="List_20_1">
            <text:list-item>
              <text:p text:style-name="List_20_Bullet_20_Tight">16-level contrast adjustment for the computer screen (value from 0H[dark]—FH[bright]).</text:p>
            </text:list-item>
          </text:list>
        </text:list-item>
        <text:list-item>
          <text:p text:style-name="List_20_Number">E8E003H[READ/WRITE]</text:p>
          <text:list text:style-name="List_20_1">
            <text:list-item>
              <text:p text:style-name="List_20_Bullet_20_Tight">D03 WRITE MODE: By controlling “0” and “1”, it can be used as a TV remote signal. In READ MODE, you can know the TV ON/OFF status (0 for TV ON, 1 for TV OFF). However, it cannot be used simultaneously with the TV remote from the keyboard.</text:p>
            </text:list-item>
          </text:list>
        </text:list-item>
        <text:list-item>
          <text:p text:style-name="List_20_Number">E8E005H[WRITE]</text:p>
          <text:list text:style-name="List_20_1">
            <text:list-item>
              <text:p text:style-name="List_20_Bullet_20_Tight">A system port for computer control of the optional "Digital Tape Recorder".</text:p>
            </text:list-item>
          </text:list>
        </text:list-item>
        <text:list-item>
          <text:p text:style-name="List_20_Number">E8E007H[READ/WRITE]</text:p>
        </text:list-item>
      </text:list>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1</text:p>
          </table:table-cell>
          <table:table-cell table:style-name="TableRowCell" office:value-type="string">
            <text:p text:style-name="Table_20_Contents">HRL</text:p>
          </table:table-cell>
          <table:table-cell table:style-name="TableRowCell" office:value-type="string">
            <text:p text:style-name="Table_20_Contents">HRL Status</text:p>
          </table:table-cell>
        </table:table-row>
        <table:table-row>
          <table:table-cell table:style-name="TableRowCell" office:value-type="string">
            <text:p text:style-name="Table_20_Contents">D02</text:p>
          </table:table-cell>
          <table:table-cell table:style-name="TableRowCell" office:value-type="string">
            <text:p text:style-name="Table_20_Contents">NMI Reset</text:p>
          </table:table-cell>
          <table:table-cell table:style-name="TableRowCell" office:value-type="string">
    </table:table-cell>
        </table:table-row>
        <table:table-row>
          <table:table-cell table:style-name="TableRowCell" office:value-type="string">
            <text:p text:style-name="Table_20_Contents">D03</text:p>
          </table:table-cell>
          <table:table-cell table:style-name="TableRowCell" office:value-type="string">
            <text:p text:style-name="Table_20_Contents">Key Ready</text:p>
          </table:table-cell>
          <table:table-cell table:style-name="TableRowCell" office:value-type="string">
            <text:p text:style-name="Table_20_Contents">Key Jack Status</text:p>
          </table:table-cell>
        </table:table-row>
      </table:table>
      <text:p text:style-name="First_20_paragraph">Page -20-</text:p>
      <text:p text:style-name="Text_20_body">.D01 is usually used for switching the dot clock, so usually set it to “0.” Turn the NMI switch ON, and the MPU processes the highest priority interrupt (NMI interrupt). This NMI interrupt processing can be processed until the next clock interruption only when a reset is issued. So, if “1” is written to D02 after the CPU processing in the NMI interrupt routine, there is no need to reset this NMI. Also, if “1” is not written to D02, the NMI interrupt processing will not return, and the NMI switch will not function.</text:p>
      <text:p text:style-name="Text_20_body">.D03 is used for WRITE MODE. During this mode, data can be sent from the CPU80C51 on the board to the MFPR (terminal). The written data cannot be sent to the keyboard or the printer when “1” is written. In READ MODE, you can know whether the keyboard jack is connected to the keyboard by seeing if it is in a floating state ("1" when there is no connection and "0" when there is a connection).</text:p>
      <text:list text:style-name="Numbering_20_1" text:start-value="5">
        <text:list-item>
          <text:p text:style-name="List_20_Number_20_Tight">E8E00BH[READ]</text:p>
        </text:list-item>
      </text:list>
      <text:p text:style-name="First_20_paragraph">This port is used to determine the current operation mode of the MPU by setting it to Read Only. Among the 8-bit data read to the port, only the value of bit 0 is valid (all other bits remain “1”). When bit 0 is “1,” the MPU is in 10MHz operation mode, and when bit 0 is “0,” the MPU is in 16MHz operation mode (MPU operates at a clock frequency of 16.67MHz).</text:p>
      <text:p text:style-name="Text_20_body">Note 1: For the 10MHz operation mode of CZ-600C series only, if this port is accessed, all bits other than bit 0 will remain “1.”</text:p>
      <text:list text:style-name="Numbering_20_1" text:start-value="6">
        <text:list-item>
          <text:p text:style-name="List_20_Number_20_Tight">E8E00DH[WRITE]</text:p>
        </text:list-item>
      </text:list>
      <text:p text:style-name="First_20_paragraph">Usually used for SRAM. It is set to Read Only, protecting the SRAM contents from being destroyed due to program runaway. When “1" is written, SRAM Write Enable is set, and by writing any other value, it will be in Read Only mode.</text:p>
      <text:list text:style-name="Numbering_20_1" text:start-value="7">
        <text:list-item>
          <text:p text:style-name="List_20_Number_20_Tight">E8E00FH[WRITE]</text:p>
        </text:list-item>
      </text:list>
      <text:p text:style-name="First_20_paragraph">When entering 00H --&gt; 0FH ---&gt; 0FH in that sequence, the power (Vcc1 OFF) will be turned off. Any other code sequence will be invalid. By doing so, it ensures that the power is not easily turned off.</text:p>
      <text:h text:style-name="Heading_20_1" text:outline-level="1"><text:bookmark-start text:name="id_3-5-interrupts"/>3-5 Interrupts<text:bookmark-end text:name="id_3-5-interrupts"/></text:h>
      <text:p text:style-name="First_20_paragraph">&lt; MPU68000 Interrupts &gt;</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Level</text:p>
            </table:table-cell>
            <table:table-cell table:style-name="TableHeaderRowCell" office:value-type="string">
              <text:p text:style-name="Table_20_Heading">Source</text:p>
            </table:table-cell>
            <table:table-cell table:style-name="TableHeaderRowCell" office:value-type="string">
              <text:p text:style-name="Table_20_Heading">Description</text:p>
            </table:table-cell>
            <table:table-cell table:style-name="TableHeaderRowCell" office:value-type="string">
              <text:p text:style-name="Table_20_Heading">Reason</text:p>
            </table:table-cell>
          </table:table-row>
        </table:table-header-rows>
        <table:table-row>
          <table:table-cell table:style-name="TableRowCell" office:value-type="string">
            <text:p text:style-name="Table_20_Contents">High 7</text:p>
          </table:table-cell>
          <table:table-cell table:style-name="TableRowCell" office:value-type="string">
            <text:p text:style-name="Table_20_Contents">NMI</text:p>
          </table:table-cell>
          <table:table-cell table:style-name="TableRowCell" office:value-type="string">
            <text:p text:style-name="Table_20_Contents">Interrupt by external NMISW etc. (auto vector interrupt)</text:p>
          </table:table-cell>
          <table:table-cell table:style-name="TableRowCell" office:value-type="string">
            <text:p text:style-name="Table_20_Contents">Auto vector interrupt</text:p>
          </table:table-cell>
        </table:table-row>
        <table:table-row>
          <table:table-cell table:style-name="TableRowCell" office:value-type="string">
            <text:p text:style-name="Table_20_Contents">High 6</text:p>
          </table:table-cell>
          <table:table-cell table:style-name="TableRowCell" office:value-type="string">
            <text:p text:style-name="Table_20_Contents">MFP</text:p>
          </table:table-cell>
          <table:table-cell table:style-name="TableRowCell" office:value-type="string">
            <text:p text:style-name="Table_20_Contents">Various timers, KEY data reception, H-SYNC, V-DISP interrupts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5</text:p>
          </table:table-cell>
          <table:table-cell table:style-name="TableRowCell" office:value-type="string">
            <text:p text:style-name="Table_20_Contents">SCC</text:p>
          </table:table-cell>
          <table:table-cell table:style-name="TableRowCell" office:value-type="string">
            <text:p text:style-name="Table_20_Contents">RS-232C, mouse data reception interrupt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4</text:p>
          </table:table-cell>
          <table:table-cell table:style-name="TableRowCell" office:value-type="string">
            <text:p text:style-name="Table_20_Contents">Expansion</text:p>
          </table:table-cell>
          <table:table-cell table:style-name="TableRowCell" office:value-type="string">
            <text:p text:style-name="Table_20_Contents">Expansion I/O slot</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DMAC</text:p>
          </table:table-cell>
          <table:table-cell table:style-name="TableRowCell" office:value-type="string">
            <text:p text:style-name="Table_20_Contents">Interrupts by data transfer etc.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2</text:p>
          </table:table-cell>
          <table:table-cell table:style-name="TableRowCell" office:value-type="string">
            <text:p text:style-name="Table_20_Contents">Expansion</text:p>
          </table:table-cell>
          <table:table-cell table:style-name="TableRowCell" office:value-type="string">
            <text:p text:style-name="Table_20_Contents">Expansion I/O slot</text:p>
          </table:table-cell>
          <table:table-cell table:style-name="TableRowCell" office:value-type="string">
            <text:p text:style-name="Table_20_Contents">-</text:p>
          </table:table-cell>
        </table:table-row>
        <table:table-row>
          <table:table-cell table:style-name="TableRowCell" office:value-type="string">
            <text:p text:style-name="Table_20_Contents">Low 1</text:p>
          </table:table-cell>
          <table:table-cell table:style-name="TableRowCell" office:value-type="string">
            <text:p text:style-name="Table_20_Contents">Floppy</text:p>
          </table:table-cell>
          <table:table-cell table:style-name="TableRowCell" office:value-type="string">
            <text:p text:style-name="Table_20_Contents">FDC, FDD, hard disk, printer BUSY etc. interrupt</text:p>
          </table:table-cell>
          <table:table-cell table:style-name="TableRowCell" office:value-type="string">
            <text:p text:style-name="Table_20_Contents">Printer (FDC &gt; FDD &gt; HD &gt; Printer order of priority is configured)</text:p>
          </table:table-cell>
        </table:table-row>
      </table:table>
      <text:p text:style-name="First_20_paragraph">&lt; MFP (Multi-Function Peripheral) Interrupts, read-out ports &gt;</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Priority</text:p>
            </table:table-cell>
            <table:table-cell table:style-name="TableHeaderRowCell" office:value-type="string">
              <text:p text:style-name="Table_20_Heading">Channel</text:p>
            </table:table-cell>
            <table:table-cell table:style-name="TableHeaderRowCell" office:value-type="string">
              <text:p text:style-name="Table_20_Heading">Description</text:p>
            </table:table-cell>
            <table:table-cell table:style-name="TableHeaderRowCell" office:value-type="string">
              <text:p text:style-name="Table_20_Heading">General Name</text:p>
            </table:table-cell>
          </table:table-row>
        </table:table-header-rows>
        <table:table-row>
          <table:table-cell table:style-name="TableRowCell" office:value-type="string">
            <text:p text:style-name="Table_20_Contents">High 15</text:p>
          </table:table-cell>
          <table:table-cell table:style-name="TableRowCell" office:value-type="string">
            <text:p text:style-name="Table_20_Contents">1111</text:p>
          </table:table-cell>
          <table:table-cell table:style-name="TableRowCell" office:value-type="string">
            <text:p text:style-name="Table_20_Contents">H-SYNC signal from CRTC</text:p>
          </table:table-cell>
          <table:table-cell table:style-name="TableRowCell" office:value-type="string">
            <text:p text:style-name="Table_20_Contents">General Purpose Interrupt 7(7)</text:p>
          </table:table-cell>
        </table:table-row>
        <table:table-row>
          <table:table-cell table:style-name="TableRowCell" office:value-type="string">
            <text:p text:style-name="Table_20_Contents">High 14</text:p>
          </table:table-cell>
          <table:table-cell table:style-name="TableRowCell" office:value-type="string">
            <text:p text:style-name="Table_20_Contents">1110</text:p>
          </table:table-cell>
          <table:table-cell table:style-name="TableRowCell" office:value-type="string">
            <text:p text:style-name="Table_20_Contents">IRQ signal from CRTC (any raster selectable)</text:p>
          </table:table-cell>
          <table:table-cell table:style-name="TableRowCell" office:value-type="string">
            <text:p text:style-name="Table_20_Contents">General Purpose Interrupt 6(6)</text:p>
          </table:table-cell>
        </table:table-row>
        <table:table-row>
          <table:table-cell table:style-name="TableRowCell" office:value-type="string">
            <text:p text:style-name="Table_20_Contents">13</text:p>
          </table:table-cell>
          <table:table-cell table:style-name="TableRowCell" office:value-type="string">
            <text:p text:style-name="Table_20_Contents">1101</text:p>
          </table:table-cell>
          <table:table-cell table:style-name="TableRowCell" office:value-type="string">
            <text:p text:style-name="Table_20_Contents">V-DISP signal from CRTC</text:p>
          </table:table-cell>
          <table:table-cell table:style-name="TableRowCell" office:value-type="string">
            <text:p text:style-name="Table_20_Contents">Timer A</text:p>
          </table:table-cell>
        </table:table-row>
        <table:table-row>
          <table:table-cell table:style-name="TableRowCell" office:value-type="string">
            <text:p text:style-name="Table_20_Contents">12</text:p>
          </table:table-cell>
          <table:table-cell table:style-name="TableRowCell" office:value-type="string">
            <text:p text:style-name="Table_20_Contents">1100</text:p>
          </table:table-cell>
          <table:table-cell table:style-name="TableRowCell" office:value-type="string">
            <text:p text:style-name="Table_20_Contents">KEY data reception completion</text:p>
          </table:table-cell>
          <table:table-cell table:style-name="TableRowCell" office:value-type="string">
            <text:p text:style-name="Table_20_Contents">Receiver Buffer Full</text:p>
          </table:table-cell>
        </table:table-row>
        <table:table-row>
          <table:table-cell table:style-name="TableRowCell" office:value-type="string">
            <text:p text:style-name="Table_20_Contents">11</text:p>
          </table:table-cell>
          <table:table-cell table:style-name="TableRowCell" office:value-type="string">
            <text:p text:style-name="Table_20_Contents">1011</text:p>
          </table:table-cell>
          <table:table-cell table:style-name="TableRowCell" office:value-type="string">
            <text:p text:style-name="Table_20_Contents">KEY data reception error</text:p>
          </table:table-cell>
          <table:table-cell table:style-name="TableRowCell" office:value-type="string">
            <text:p text:style-name="Table_20_Contents">Receive Error</text:p>
          </table:table-cell>
        </table:table-row>
        <table:table-row>
          <table:table-cell table:style-name="TableRowCell" office:value-type="string">
            <text:p text:style-name="Table_20_Contents">10</text:p>
          </table:table-cell>
          <table:table-cell table:style-name="TableRowCell" office:value-type="string">
            <text:p text:style-name="Table_20_Contents">1010</text:p>
          </table:table-cell>
          <table:table-cell table:style-name="TableRowCell" office:value-type="string">
            <text:p text:style-name="Table_20_Contents">KEY data transmission completion</text:p>
          </table:table-cell>
          <table:table-cell table:style-name="TableRowCell" office:value-type="string">
            <text:p text:style-name="Table_20_Contents">Transmit Buffer Empty</text:p>
          </table:table-cell>
        </table:table-row>
        <table:table-row>
          <table:table-cell table:style-name="TableRowCell" office:value-type="string">
            <text:p text:style-name="Table_20_Contents">9</text:p>
          </table:table-cell>
          <table:table-cell table:style-name="TableRowCell" office:value-type="string">
            <text:p text:style-name="Table_20_Contents">1001</text:p>
          </table:table-cell>
          <table:table-cell table:style-name="TableRowCell" office:value-type="string">
            <text:p text:style-name="Table_20_Contents">KEY data transmission error</text:p>
          </table:table-cell>
          <table:table-cell table:style-name="TableRowCell" office:value-type="string">
            <text:p text:style-name="Table_20_Contents">Transmit Error</text:p>
          </table:table-cell>
        </table:table-row>
        <table:table-row>
          <table:table-cell table:style-name="TableRowCell" office:value-type="string">
            <text:p text:style-name="Table_20_Contents">8</text:p>
          </table:table-cell>
          <table:table-cell table:style-name="TableRowCell" office:value-type="string">
            <text:p text:style-name="Table_20_Contents">1000</text:p>
          </table:table-cell>
          <table:table-cell table:style-name="TableRowCell" office:value-type="string">
            <text:p text:style-name="Table_20_Contents">USART (keyboard) serial clock</text:p>
          </table:table-cell>
          <table:table-cell table:style-name="TableRowCell" office:value-type="string">
            <text:p text:style-name="Table_20_Contents">Timer B</text:p>
          </table:table-cell>
        </table:table-row>
        <table:table-row>
          <table:table-cell table:style-name="TableRowCell" office:value-type="string">
            <text:p text:style-name="Table_20_Contents">7</text:p>
          </table:table-cell>
          <table:table-cell table:style-name="TableRowCell" office:value-type="string">
            <text:p text:style-name="Table_20_Contents">0111</text:p>
          </table:table-cell>
          <table:table-cell table:style-name="TableRowCell" office:value-type="string">
            <text:p text:style-name="Table_20_Contents">CLKOUT signal from RTC (1Hz)</text:p>
          </table:table-cell>
          <table:table-cell table:style-name="TableRowCell" office:value-type="string">
            <text:p text:style-name="Table_20_Contents">General Purpose Interrupt 5(5)</text:p>
          </table:table-cell>
        </table:table-row>
        <table:table-row>
          <table:table-cell table:style-name="TableRowCell" office:value-type="string">
            <text:p text:style-name="Table_20_Contents">6</text:p>
          </table:table-cell>
          <table:table-cell table:style-name="TableRowCell" office:value-type="string">
            <text:p text:style-name="Table_20_Contents">0110</text:p>
          </table:table-cell>
          <table:table-cell table:style-name="TableRowCell" office:value-type="string">
            <text:p text:style-name="Table_20_Contents">V-DISP signal status from CRTC</text:p>
          </table:table-cell>
          <table:table-cell table:style-name="TableRowCell" office:value-type="string">
            <text:p text:style-name="Table_20_Contents">General Purpose Interrupt 4(4)</text:p>
          </table:table-cell>
        </table:table-row>
        <table:table-row>
          <table:table-cell table:style-name="TableRowCell" office:value-type="string">
            <text:p text:style-name="Table_20_Contents">5</text:p>
          </table:table-cell>
          <table:table-cell table:style-name="TableRowCell" office:value-type="string">
            <text:p text:style-name="Table_20_Contents">0101</text:p>
          </table:table-cell>
          <table:table-cell table:style-name="TableRowCell" office:value-type="string">
            <text:p text:style-name="Table_20_Contents">8-bit general purpose timer (input clock 4MHz)</text:p>
          </table:table-cell>
          <table:table-cell table:style-name="TableRowCell" office:value-type="string">
            <text:p text:style-name="Table_20_Contents">Timer C</text:p>
          </table:table-cell>
        </table:table-row>
        <table:table-row>
          <table:table-cell table:style-name="TableRowCell" office:value-type="string">
            <text:p text:style-name="Table_20_Contents">4</text:p>
          </table:table-cell>
          <table:table-cell table:style-name="TableRowCell" office:value-type="string">
            <text:p text:style-name="Table_20_Contents">0100</text:p>
          </table:table-cell>
          <table:table-cell table:style-name="TableRowCell" office:value-type="string">
            <text:p text:style-name="Table_20_Contents">8-bit general purpose timer (input clock 4MHz)</text:p>
          </table:table-cell>
          <table:table-cell table:style-name="TableRowCell" office:value-type="string">
            <text:p text:style-name="Table_20_Contents">Timer D</text:p>
          </table:table-cell>
        </table:table-row>
        <table:table-row>
          <table:table-cell table:style-name="TableRowCell" office:value-type="string">
            <text:p text:style-name="Table_20_Contents">3</text:p>
          </table:table-cell>
          <table:table-cell table:style-name="TableRowCell" office:value-type="string">
            <text:p text:style-name="Table_20_Contents">0011</text:p>
          </table:table-cell>
          <table:table-cell table:style-name="TableRowCell" office:value-type="string">
            <text:p text:style-name="Table_20_Contents">Interrupt detection from FM sound source</text:p>
          </table:table-cell>
          <table:table-cell table:style-name="TableRowCell" office:value-type="string">
            <text:p text:style-name="Table_20_Contents">General Purpose Interrupt 3(3)</text:p>
          </table:table-cell>
        </table:table-row>
        <table:table-row>
          <table:table-cell table:style-name="TableRowCell" office:value-type="string">
            <text:p text:style-name="Table_20_Contents">2</text:p>
          </table:table-cell>
          <table:table-cell table:style-name="TableRowCell" office:value-type="string">
            <text:p text:style-name="Table_20_Contents">0010</text:p>
          </table:table-cell>
          <table:table-cell table:style-name="TableRowCell" office:value-type="string">
            <text:p text:style-name="Table_20_Contents">ON/OFF detection by POWER switch</text:p>
          </table:table-cell>
          <table:table-cell table:style-name="TableRowCell" office:value-type="string">
            <text:p text:style-name="Table_20_Contents">General Purpose Interrupt 2(2)</text:p>
          </table:table-cell>
        </table:table-row>
        <table:table-row>
          <table:table-cell table:style-name="TableRowCell" office:value-type="string">
            <text:p text:style-name="Table_20_Contents">1</text:p>
          </table:table-cell>
          <table:table-cell table:style-name="TableRowCell" office:value-type="string">
            <text:p text:style-name="Table_20_Contents">0001</text:p>
          </table:table-cell>
          <table:table-cell table:style-name="TableRowCell" office:value-type="string">
            <text:p text:style-name="Table_20_Contents">ON/OFF detection by EXPWON signal from expansion I/O slot</text:p>
          </table:table-cell>
          <table:table-cell table:style-name="TableRowCell" office:value-type="string">
            <text:p text:style-name="Table_20_Contents">General Purpose Interrupt 1(1)</text:p>
          </table:table-cell>
        </table:table-row>
        <table:table-row>
          <table:table-cell table:style-name="TableRowCell" office:value-type="string">
            <text:p text:style-name="Table_20_Contents">Low 0</text:p>
          </table:table-cell>
          <table:table-cell table:style-name="TableRowCell" office:value-type="string">
            <text:p text:style-name="Table_20_Contents">0000</text:p>
          </table:table-cell>
          <table:table-cell table:style-name="TableRowCell" office:value-type="string">
            <text:p text:style-name="Table_20_Contents">ON/OFF detection by ALARM signal from RTC</text:p>
          </table:table-cell>
          <table:table-cell table:style-name="TableRowCell" office:value-type="string">
            <text:p text:style-name="Table_20_Contents">General Purpose Interrupt 0(0)</text:p>
          </table:table-cell>
        </table:table-row>
      </table:table>
      <text:p text:style-name="First_20_paragraph">Breakdown Register Address D07 D06 D05 D04 D03 D02 D01 D00 MFP E88017H Set</text:p>
      <text:p text:style-name="Preformatted_20_Text"><text:s text:c="52"/>0 - Automatic interrupt end mode</text:p>
      <text:p text:style-name="Preformatted_20_Text"><text:s text:c="52"/>1 - Software interrupt end mode</text:p>
      <text:p text:style-name="First_20_paragraph">SCC (Channels A and B shared) Set in Register 2 for write</text:p>
      <text:p text:style-name="Text_20_body">DMAC E84025H Set (Channel 0) (Normal Interrupt Vector) (Internal 2HD) E84027H Set (Error Interrupt Vector)</text:p>
      <text:p text:style-name="Text_20_body">DMAC E84065H Set (Channel 1) (Normal Interrupt Vector) (Hard Disk) E84067H Set</text:p>
      <text:p text:style-name="Text_20_body">DMAC E840E5H Set (Channel 2) (Normal Interrupt Vector) (Memory) E840A7H Set (Memory) (Error Interrupt Vector)</text:p>
      <text:p text:style-name="Text_20_body">DMAC E840A5H Set (Channel 3) (Normal Interrupt Vector) (Audio Synthesis) E840E7H Set</text:p>
      <text:p text:style-name="Text_20_body">Floppy E9C003H Set ·Printer FDC Interrupt 0 0</text:p>
      <text:p text:style-name="Preformatted_20_Text"><text:s text:c="48"/>FDD Interrupt <text:s text:c="6"/>0 1</text:p>
      <text:p text:style-name="Preformatted_20_Text"><text:s text:c="48"/>Hard Disk Interrupt <text:s text:c="2"/>1 0</text:p>
      <text:p text:style-name="Preformatted_20_Text"><text:s text:c="48"/>Printer Interrupt <text:s text:c="2"/>1 1</text:p>
      <text:p text:style-name="First_20_paragraph">(Note: "MFP," "SCC," "DMAC," "FDC," "FDD," and the like typically refer to specific hardware components or functionalities in computing, e.g., Multi-Function Peripheral, Serial Communication Controller, Direct Memory Access Controller, Floppy Disk Controller, Floppy Disk Drive, etc.)</text:p>
      <text:h text:style-name="Heading_20_1" text:outline-level="1"><text:bookmark-start text:name="id_3-6-ipl"/>3-6. IPL<text:bookmark-end text:name="id_3-6-ipl"/></text:h>
      <text:list text:style-name="List_20_1">
        <text:list-item>
          <text:p text:style-name="List_20_Bullet_20_Tight"><text:span text:style-name="Strong_20_Emphasis">IPL ROM address</text:span>: FC0000H - FFFFFFFH (256 KB)</text:p>
        </text:list-item>
        <text:list-item>
          <text:p text:style-name="List_20_Bullet_20_Tight"><text:span text:style-name="Strong_20_Emphasis">Access</text:span>:</text:p>
        </text:list-item>
      </text:list>
      <text:p text:style-name="Preformatted_20_Text"><text:s text:c="2"/>1. Supervisor program, data area</text:p>
      <text:p text:style-name="Preformatted_20_Text"><text:s text:c="2"/>2. Read-only</text:p>
      <text:p text:style-name="First_20_paragraph">Reset Sequence:</text:p>
      <text:list text:style-name="Numbering_20_1">
        <text:list-item>
          <text:p text:style-name="List_20_Number_20_Tight">Upon reset, part of IPL ROM 1 (F******H) appears in the top 64 KB of the memory map (000000H-00FFFFH).</text:p>
        </text:list-item>
        <text:list-item>
          <text:p text:style-name="List_20_Number_20_Tight">At the beginning of the IPL ROM 1, there are two long words that store the program counter and stack pointer values for the 68000 MPU reset exception process.</text:p>
        </text:list-item>
        <text:list-item>
          <text:p text:style-name="List_20_Number_20_Tight">Once the reset signal is removed, the MPU fetches the long word data from the ROMs shown at the top of the memory map.</text:p>
        </text:list-item>
        <text:list-item>
          <text:p text:style-name="List_20_Number_20_Tight">At this time, the MPU executes instructions based on the program counter. Meanwhile, the IPL ROM 1 image disappears, and the system goes into the state shown in figure 3-2.</text:p>
        </text:list-item>
      </text:list>
      <text:p text:style-name="First_20_paragraph"><draw:frame draw:name="img3" svg:width="480.0pt" svg:height="216.48pt"><draw:image xlink:href="Pictures/2.png" xlink:type="simple" xlink:show="embed" xlink:actuate="onLoad"/></draw:frame></text:p>
      <text:p text:style-name="Quotations">Note: The value of the program counter stored in the IPL ROM 1 must point within the address range of IPL ROM 1. This is because the hardware is designed so that accessing addresses (FF0000H-FFFFFFFH) makes the IPL ROM 1 image disappear from the top of the memory map. The ROM image appears in the memory map upon power-on reset or manual reset (Figure 3-1). (The ROM image does not appear for the 68000 MPU reset command execution.)</text:p>
      <text:p text:style-name="First_20_paragraph">Diagram 3-1 Diagram 3-2 | FC0000H ---- | | IPL ROM1 ----------------| ------- IPL ROM1 | | 00000H | --| | 00FFFFEH | Main Memory</text:p>
      <text:p text:style-name="Text_20_body"><text:span text:style-name="Strong_20_Emphasis">4. Screen Configuration and Control</text:span><text:line-break/><text:span text:style-name="Strong_20_Emphasis">4-1. Screen Configuration</text:span></text:p>
      <text:p text:style-name="Text_20_body">This machine has three independent screens: text, graphics, and sprite. Control of the text screen and graphics screen is carried out by the CRTC, and control of the sprite screen is carried out by the sprite controller. Additionally, various functions such as text screen, graphics screen, sprite screen priorities, .transparency, special priority functions, window functions on each screen, and screen blanking functions are controlled by the video controller.<text:line-break/>When accessing the screen, set the CRTC and sprite controller numbers regardless of whether they are used or not.</text:p>
      <text:p text:style-name="Text_20_body">(Figure showing screen control block diagram)</text:p>
      <text:p text:style-name="Text_20_body"><draw:frame draw:name="img4" svg:width="480.0pt" svg:height="493.44pt"><draw:image xlink:href="Pictures/3.png" xlink:type="simple" xlink:show="embed" xlink:actuate="onLoad"/></draw:frame></text:p>
      <text:p text:style-name="Text_20_body"><text:span text:style-name="Strong_20_Emphasis">1) Text Screen (Bitmap Method)</text:span></text:p>
      <text:list text:style-name="List_20_1">
        <text:list-item>
          <text:p text:style-name="List_20_Bullet_20_Tight">Screen used for displaying ANK characters and kanji characters</text:p>
        </text:list-item>
        <text:list-item>
          <text:p text:style-name="List_20_Bullet_20_Tight">Similar to the graphics screen setting of the conventional X1 &amp; X1turbo series, the display data direction is horizontal</text:p>
        </text:list-item>
        <text:list-item>
          <text:p text:style-name="List_20_Bullet_20_Tight">Scrolling of the text screen is cylindrical scrolling</text:p>
        </text:list-item>
        <text:list-item>
          <text:p text:style-name="List_20_Bullet_20_Tight">As a display mode, it supports both high resolution (horizontal scan frequency 31.5kHz) and low resolution (horizontal scan frequency 15.98kHz)</text:p>
        </text:list-item>
      </text:list>
      <text:list text:style-name="Pandoc_5f_Numbering_5f_1" text:start-value="2">
        <text:list-item>
          <text:p text:style-name="List_20_Number_20_Tight">Graphics Screen</text:p>
        </text:list-item>
      </text:list>
      <text:list text:style-name="List_20_1">
        <text:list-item>
          <text:p text:style-name="List_20_Bullet_20_Tight">A screen for performing graphics processing such as line drawing or painting.</text:p>
        </text:list-item>
        <text:list-item>
          <text:p text:style-name="List_20_Bullet_20_Tight">The display data settings are performed in the background.</text:p>
        </text:list-item>
        <text:list-item>
          <text:p text:style-name="List_20_Bullet_20_Tight">The scrolling of the graphics screen is a dual screen scroll.</text:p>
        </text:list-item>
        <text:list-item>
          <text:p text:style-name="List_20_Bullet_20_Tight">As a display mode, it supports high-resolution (horizontal sync frequency 31.5kHz) and low-resolution (horizontal sync frequency 15.98kHz).</text:p>
        </text:list-item>
      </text:list>
      <text:p text:style-name="First_20_paragraph">[Illustration] Top Display Screen Left Right Bottom</text:p>
      <text:list text:style-name="Pandoc_5f_Numbering_5f_1" text:start-value="3">
        <text:list-item>
          <text:p text:style-name="List_20_Number_20_Tight">Sprite Screen</text:p>
        </text:list-item>
      </text:list>
      <text:list text:style-name="List_20_1">
        <text:list-item>
          <text:p text:style-name="List_20_Bullet_20_Tight">A screen for smoothly moving sprite patterns dot by dot, as used in NES or MSX.</text:p>
        </text:list-item>
        <text:list-item>
          <text:p text:style-name="List_20_Bullet_20_Tight">As a display mode, it supports high-resolution (horizontal sync frequency 31.5kHz) and low-resolution (horizontal sync frequency 15.98kHz).</text:p>
        </text:list-item>
      </text:list>
      <text:p text:style-name="First_20_paragraph">4-2. Control of Text Screen and Graphics Screen (CRTC) This CRTC has the capabilities to support the dual port DRAM (MB81461) used in the text and graphics VRAM and has internal registers unique to the custom CRTC-23, providing the following screen control functions: (1) Generation of horizontal and vertical sync signals (2) Generation of display start and display timing signals (3) Scrolling of text and graphics screens (4) Automatic data transfer functions to graphics VRAM (5) Line copy and bit mask functions for text VRAM (6) Display single/double switching function, simultaneous access, and switching function (7) Graphics VRAM high-speed access function (8) External sync signal control function (at superimpose time)</text:p>
      <text:p text:style-name="Text_20_body">Note that it can temporarily interrupt the CPU access to VRAM, depending on the need for V-DISP signal period (at MFPG0 GPIP4*="0"). Moreover, concerning DRAM's SAM (Serial and Control Merge) refresh cycle, it is controlled by the CRTC during the horizontal blanking period.</text:p>
      <text:p text:style-name="Text_20_body">Page 26</text:p>
      <text:p text:style-name="Text_20_body"><text:span text:style-name="Strong_20_Emphasis">● CRTC Specifications and Internal Registers</text:span></text:p>
      <text:p text:style-name="Text_20_body"><text:span text:style-name="Strong_20_Emphasis">Table 4-1 CRTC Specifications</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Summary</text:p>
            </table:table-cell>
            <table:table-cell table:style-name="TableHeaderRowCell" office:value-type="string">
              <text:p text:style-name="Table_20_Heading">High Resolution</text:p>
            </table:table-cell>
            <table:table-cell table:style-name="TableHeaderRowCell" office:value-type="string">
              <text:p text:style-name="Table_20_Heading">Low Resolution</text:p>
            </table:table-cell>
          </table:table-row>
        </table:table-header-rows>
        <table:table-row>
          <table:table-cell table:style-name="TableRowCell" office:value-type="string">
            <text:p text:style-name="Table_20_Contents">Display Mode</text:p>
          </table:table-cell>
          <table:table-cell table:style-name="TableRowCell" office:value-type="string">
            <text:p text:style-name="Table_20_Contents">Non-Interlace</text:p>
          </table:table-cell>
          <table:table-cell table:style-name="TableRowCell" office:value-type="string">
            <text:p text:style-name="Table_20_Contents">Interlace</text:p>
          </table:table-cell>
        </table:table-row>
      </table:table>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able:table-cell>
            <table:table-cell table:style-name="TableHeaderRowCell" office:value-type="string">
              <text:p text:style-name="P2">Horizontal (kHz)</text:p>
            </table:table-cell>
            <table:table-cell table:style-name="TableHeaderRowCell" office:value-type="string">
              <text:p text:style-name="P3">Horizontal (usec)</text:p>
            </table:table-cell>
            <table:table-cell table:style-name="TableHeaderRowCell" office:value-type="string">
              <text:p text:style-name="P4">Vertical (Hz)</text:p>
            </table:table-cell>
            <table:table-cell table:style-name="TableHeaderRowCell" office:value-type="string">
              <text:p text:style-name="P5">Vertical (msec)</text:p>
            </table:table-cell>
          </table:table-row>
        </table:table-header-rows>
        <table:table-row>
          <table:table-cell table:style-name="TableRowCell" office:value-type="string">
            <text:p text:style-name="P6">Synchronous Frequency</text:p>
          </table:table-cell>
          <table:table-cell table:style-name="TableRowCell" office:value-type="string">
            <text:p text:style-name="P7">31.5</text:p>
          </table:table-cell>
          <table:table-cell table:style-name="TableRowCell" office:value-type="string">
    </table:table-cell>
          <table:table-cell table:style-name="TableRowCell" office:value-type="string">
            <text:p text:style-name="P9">55.46</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P7">22.09</text:p>
          </table:table-cell>
          <table:table-cell table:style-name="TableRowCell" office:value-type="string">
            <text:p text:style-name="P8">16.25</text:p>
          </table:table-cell>
          <table:table-cell table:style-name="TableRowCell" office:value-type="string">
            <text:p text:style-name="P9">55.46</text:p>
          </table:table-cell>
          <table:table-cell table:style-name="TableRowCell" office:value-type="string">
            <text:p text:style-name="P10">16.25</text:p>
          </table:table-cell>
        </table:table-row>
        <table:table-row>
          <table:table-cell table:style-name="TableRowCell" office:value-type="string">
            <text:p text:style-name="P6">Data Display Period (1)</text:p>
          </table:table-cell>
          <table:table-cell table:style-name="TableRowCell" office:value-type="string">
            <text:p text:style-name="P7">31.75</text:p>
          </table:table-cell>
          <table:table-cell table:style-name="TableRowCell" office:value-type="string">
            <text:p text:style-name="P8">52.69</text:p>
          </table:table-cell>
          <table:table-cell table:style-name="TableRowCell" office:value-type="string">
            <text:p text:style-name="P9">16.25</text:p>
          </table:table-cell>
          <table:table-cell table:style-name="TableRowCell" office:value-type="string">
            <text:p text:style-name="P10">16.270</text:p>
          </table:table-cell>
        </table:table-row>
        <table:table-row>
          <table:table-cell table:style-name="TableRowCell" office:value-type="string">
            <text:p text:style-name="P6">Synchronization Period (2)</text:p>
          </table:table-cell>
          <table:table-cell table:style-name="TableRowCell" office:value-type="string">
            <text:p text:style-name="P7">31.75</text:p>
          </table:table-cell>
          <table:table-cell table:style-name="TableRowCell" office:value-type="string">
            <text:p text:style-name="P8">3.45</text:p>
          </table:table-cell>
          <table:table-cell table:style-name="TableRowCell" office:value-type="string">
            <text:p text:style-name="P9">18.03</text:p>
          </table:table-cell>
          <table:table-cell table:style-name="TableRowCell" office:value-type="string">
            <text:p text:style-name="P10">0.191</text:p>
          </table:table-cell>
        </table:table-row>
        <table:table-row>
          <table:table-cell table:style-name="TableRowCell" office:value-type="string">
            <text:p text:style-name="P6">Synchronization Retrace Width (3)</text:p>
          </table:table-cell>
          <table:table-cell table:style-name="TableRowCell" office:value-type="string">
            <text:p text:style-name="P7">3.45</text:p>
          </table:table-cell>
          <table:table-cell table:style-name="TableRowCell" office:value-type="string">
            <text:p text:style-name="P8">4.14</text:p>
          </table:table-cell>
          <table:table-cell table:style-name="TableRowCell" office:value-type="string">
            <text:p text:style-name="P9">0.191</text:p>
          </table:table-cell>
          <table:table-cell table:style-name="TableRowCell" office:value-type="string">
            <text:p text:style-name="P10">1.111</text:p>
          </table:table-cell>
        </table:table-row>
        <table:table-row>
          <table:table-cell table:style-name="TableRowCell" office:value-type="string">
            <text:p text:style-name="P6">Back Porch (4)</text:p>
          </table:table-cell>
          <table:table-cell table:style-name="TableRowCell" office:value-type="string">
            <text:p text:style-name="P7">4.14</text:p>
          </table:table-cell>
          <table:table-cell table:style-name="TableRowCell" office:value-type="string">
            <text:p text:style-name="P8">4.94</text:p>
          </table:table-cell>
          <table:table-cell table:style-name="TableRowCell" office:value-type="string">
            <text:p text:style-name="P9">1.111</text:p>
          </table:table-cell>
          <table:table-cell table:style-name="TableRowCell" office:value-type="string">
            <text:p text:style-name="P10">0.876</text:p>
          </table:table-cell>
        </table:table-row>
        <table:table-row>
          <table:table-cell table:style-name="TableRowCell" office:value-type="string">
            <text:p text:style-name="P6">Front Porch (5)</text:p>
          </table:table-cell>
          <table:table-cell table:style-name="TableRowCell" office:value-type="string">
            <text:p text:style-name="P7">2.07</text:p>
          </table:table-cell>
          <table:table-cell table:style-name="TableRowCell" office:value-type="string">
            <text:p text:style-name="P8">1.65</text:p>
          </table:table-cell>
          <table:table-cell table:style-name="TableRowCell" office:value-type="string">
            <text:p text:style-name="P9">0.476</text:p>
          </table:table-cell>
          <table:table-cell table:style-name="TableRowCell" office:value-type="string">
            <text:p text:style-name="P10">0.187</text:p>
          </table:table-cell>
        </table:table-row>
      </table:table>
      <text:p text:style-name="First_20_paragraph"><text:span text:style-name="Strong_20_Emphasis">[Diagram]</text:span></text:p>
      <text:p text:style-name="Text_20_body">(1) Video Signal (2) Synchronization Signal (3) Front Porch (4) Back Porch (5) Synchronization Retrace Width</text:p>
      <text:list text:style-name="List_20_1">
        <text:list-item>
          <text:p text:style-name="List_20_Bullet_20_Tight">Video Signal: Analog 0.7Vp-p (75Ω termination) positive polarity</text:p>
        </text:list-item>
        <text:list-item>
          <text:p text:style-name="List_20_Bullet_20_Tight">Synchronization Signal: TTL level negative polarity</text:p>
        </text:list-item>
      </text:list>
      <text:p text:style-name="First_20_paragraph"><text:span text:style-name="Strong_20_Emphasis">Note</text:span>: The numbers <text:span text:style-name="Source_20_Text">(1), (2), (3), (4), (5)</text:span> correspond to the parts of the diagram provided below the table in the original document.</text:p>
      <text:p text:style-name="Text_20_body"><text:span text:style-name="Strong_20_Emphasis">Special CRT Controller Features (Text)</text:span> The text screen has the following features: (1) Scroll Performs scrolling on the display screen. Specifically, setting the horizontal register for R10 (E80014H) and the vertical register for R11 (E80016H) in terms of dot units will perform scrolling in the corresponding location. (2) Simultaneous/Single Access In light pen mode, enables simultaneous access to each plane of the text VRAM, or single access mode to perform single access with multiple simultaneous access. Specifically, in the case of single access mode, setting R21 (E8002AH) D08 allows simultaneous/single access to multiple planes of text VRAM for each address on D07-D04, respectively. If simultaneous access mode is chosen, please note that the specified planes will be accessed simultaneously. (3) Raster Copy Any raster (raster unit = 4 raster units) can have its address (0-255) copied to another raster position as a 4 raster line segment (1024 raster lines in each direction - up and down). Specifically, setting the source address of the raster copy registers R21 (E8002AH) D03-D00 to define the plane to copy from, then setting the source address for the destination raster registers R22 (E80020CH) D15-D08 and the destination address for the destination raster registers R DO7-D00 as the address to where the raster copy is performed. Therefore, if R21 (E8002AH) D03-D00 is set to '0', raster copy will not be performed. For raster copying that uses the destination video RAM address during the horizontal blank period of the CRT controller source, once the raster line to be copied is allocated to the SAM (raster unit memory), and when the destination video RAM address is set, the horizontal blank period data is used to transfer the memory data to SAM. (4) Bit Mask The text VRAM read can be processed in 16-bit diagonal units in the horizontal direction. Specifically, a mask can be set for each 1 bit in the 16-b diagonal space (0-15) in 128X1 dot units. By setting bit D15-D08 in R23 (E8002EH) and bit mask 7 in D15-D00, then setting bit D09 in R21 (E8002AH) to '1' to use the bit mask. As for the speed in the text screen VRAM, uses simultaneous access and raster copy together. Be careful as using raster copy will have effects beyond mere display and can lead to actual data being affected.</text:p>
      <text:p text:style-name="Text_20_body"><text:span text:style-name="Strong_20_Emphasis">Special CRT Controller Features (Graphics)</text:span> The Graphics screen has the following features: (1) Scroll Performs scrolling on the display screen. Specifically, setting the names of R12 (E80018H) and R13 (E8001AH) for the actual display 1024x1024 in terms of left and right scroll registers and vertical register in terms of dot units, scrolling is performed at that location. In the case of actual screen size of 512x512, the register (R12-R19) data corresponding to the graphics screen data is set to perform scrolling.</text:p>
      <text:p text:style-name="Text_20_body">(2) High-Speed Clear</text:p>
      <text:p text:style-name="Text_20_body">A function to clear the contents of the graphic VRAM at high speed. Specifically, the graphic display plane for high-speed clear of D00 to D02 is selected by R21 (E8002AH), and the graphic VRAM is cleared at high speed using E80480H D01. In this high-speed clear, the rising edge of the VDISP signal of E80480H D01 is latched, and the CRTC writes '0' (that is, clears the data) to the memory in the graphic VRAM every 1 horizontal blanking period by using the SAM (raster unit of the memory) inside the CRTC, resulting in the end of the period (2 vertical periods in the case of interlace).</text:p>
      <text:p text:style-name="Text_20_body">(3) Image Capture</text:p>
      <text:p text:style-name="Text_20_body">The function to capture TV and video images by connecting a digital sync tip option and using E80480H D00. That is, this image input is latched on the rising edge of the VDISP signal of E80480H D00 bit and the CRTC writes the image data of 1 screen to the graphic VRAM in the memory SAM (raster unit) inside the CRTC every 1 horizontal blanking period, ending at 1 vertical period (2 vertical periods in the case of interlace). However, this image input will not stop unless '0' is written to E80480H D00.</text:p>
      <text:p text:style-name="Text_20_body">Page 29</text:p>
      <text:p text:style-name="Text_20_body">4-3. Sprite This device is equipped with a unique sprite IC, and the sprite screen is independent of the text screen and graphics screen. By using this sprite hardware, you can move any sprite pattern smoothly on a dot-by-dot basis. You can also use it in combination with the text and graphics screen's priority to configure various game screen structures. Table 4-2 shows the specifications of the sprite IC and address map.</text:p>
      <text:p text:style-name="Text_20_body">Table 4-2 Sprite Specification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Item</text:p>
            </table:table-cell>
            <table:table-cell table:style-name="TableHeaderRowCell" office:value-type="string">
              <text:p text:style-name="Table_20_Heading">Details</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Sprite Patter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fini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ze</text:p>
          </table:table-cell>
          <table:table-cell table:style-name="TableRowCell" office:value-type="string">
            <text:p text:style-name="Table_20_Contents">16x16 dot pattern</text:p>
          </table:table-cell>
          <table:table-cell table:style-name="TableRowCell" office:value-type="string">
    </table:table-cell>
        </table:table-row>
        <table:table-row>
          <table:table-cell table:style-name="TableRowCell" office:value-type="string">
            <text:p text:style-name="Table_20_Contents">Fixed Number</text:p>
          </table:table-cell>
          <table:table-cell table:style-name="TableRowCell" office:value-type="string">
            <text:p text:style-name="Table_20_Contents">128 patterns in general</text:p>
          </table:table-cell>
          <table:table-cell table:style-name="TableRowCell" office:value-type="string">
            <text:p text:style-name="Table_20_Contents">BG is not displayed</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an define up to max 256 patterns</text:p>
          </table:table-cell>
        </table:table-row>
        <table:table-row>
          <table:table-cell table:style-name="TableRowCell" office:value-type="string">
            <text:p text:style-name="Table_20_Contents">Colors</text:p>
          </table:table-cell>
          <table:table-cell table:style-name="TableRowCell" office:value-type="string">
            <text:p text:style-name="Table_20_Contents">16 colors per 1 pattern</text:p>
          </table:table-cell>
          <table:table-cell table:style-name="TableRowCell" office:value-type="string">
            <text:p text:style-name="Table_20_Contents">16/65536 colors (dot units)</text:p>
          </table:table-cell>
        </table:table-row>
        <table:table-row>
          <table:table-cell table:style-name="TableRowCell" office:value-type="string">
    </table:table-cell>
          <table:table-cell table:style-name="TableRowCell" office:value-type="string">
            <text:p text:style-name="Table_20_Contents">Total for screen</text:p>
          </table:table-cell>
          <table:table-cell table:style-name="TableRowCell" office:value-type="string">
            <text:p text:style-name="Table_20_Contents">256 colors/65536 colors</text:p>
          </table:table-cell>
        </table:table-row>
        <table:table-row>
          <table:table-cell table:style-name="TableRowCell" office:value-type="string">
            <text:p text:style-name="Table_20_Contents">Displa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 Displa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 Display High Resolution</text:p>
          </table:table-cell>
          <table:table-cell table:style-name="TableRowCell" office:value-type="string">
            <text:p text:style-name="Table_20_Contents">1024x1024 dots</text:p>
          </table:table-cell>
          <table:table-cell table:style-name="TableRowCell" office:value-type="string">
    </table:table-cell>
        </table:table-row>
        <table:table-row>
          <table:table-cell table:style-name="TableRowCell" office:value-type="string">
            <text:p text:style-name="Table_20_Contents">Display Uni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splay Control</text:p>
          </table:table-cell>
          <table:table-cell table:style-name="TableRowCell" office:value-type="string">
            <text:p text:style-name="Table_20_Contents">Horizontal: 512 dots or 256 dot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Vertical: 512 lines or 256 lines</text:p>
          </table:table-cell>
          <table:table-cell table:style-name="TableRowCell" office:value-type="string">
    </table:table-cell>
        </table:table-row>
        <table:table-row>
          <table:table-cell table:style-name="TableRowCell" office:value-type="string">
            <text:p text:style-name="Table_20_Contents">Display Units</text:p>
          </table:table-cell>
          <table:table-cell table:style-name="TableRowCell" office:value-type="string">
            <text:p text:style-name="Table_20_Contents">128 SP/scree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32 SP/line</text:p>
          </table:table-cell>
          <table:table-cell table:style-name="TableRowCell" office:value-type="string">
    </table:table-cell>
        </table:table-row>
        <table:table-row>
          <table:table-cell table:style-name="TableRowCell" office:value-type="string">
            <text:p text:style-name="Table_20_Contents">Additional Features</text:p>
          </table:table-cell>
          <table:table-cell table:style-name="TableRowCell" office:value-type="string">
            <text:p text:style-name="Table_20_Contents">H-Flip, V-Flip, BG Priority</text:p>
          </table:table-cell>
          <table:table-cell table:style-name="TableRowCell" office:value-type="string">
            <text:p text:style-name="Table_20_Contents">Priority (BG0&gt;BG1)</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P Priority (SP0&gt;SPn&gt;SP127)</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These features can be set</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on a per SP basis.)</text:p>
          </table:table-cell>
        </table:table-row>
      </table:table>
      <text:p text:style-name="First_20_paragraph">| Background Pattern | | | | Display | | | | Size | 8x8 dot pattern | | | | 16x16 dot pattern | | | Fixed Number | 8x8 dot pattern | max 256 patterns | | Colors | Shared with BG pattern and | | | | sprite patterns | | | | 16 colors per 1 pattern | 16/65536 colors (dot units) | | | Total for screen | 256 colors/65536 colors | | Display | | | | BG Display | Text scroll type | max 1024x1024 dots | | Max Screens | Can display max 2 screens | (2 independent scrolls possible) | | Display Units | | | | Display Control | Horizontal: 512 dots or 256 dots | | | | Vertical: 512 lines or 256 lines | | | | When BG1 is displayed with 512 lines | (BG2 pattern size is fixed | | | 16x16 dots | to 16x16 dots for display) | | | 256 dots fixed when displayed with BG2 | BG2 is also displayed in 8x8 dots fixed |</text:p>
      <text:p text:style-name="Text_20_body">| Additional Features | H-Flip, V-Flip | | | | (These features can be set | | | | on a per BG basis.) | |</text:p>
      <text:p text:style-name="Text_20_body">4-4. Video Controller This device's video controller has three internal registers, each having the following functions:</text:p>
      <text:p text:style-name="Text_20_body">● Reg.1 · Setting the screen size of the graphics · Setting the color mode of the graphics memory</text:p>
      <text:p text:style-name="Text_20_body">● Reg.2 · Setting the priority between graphics, text, and sprites on the screen · Setting the priority of the graphics screen</text:p>
      <text:p text:style-name="Text_20_body">● Reg.3 · Setting the semi-transparent mode (This function enhances the priority of the graphics screen in a specified area on the display screen.) · Setting the display mode of graphics, text, and sprites</text:p>
      <text:p text:style-name="Text_20_body">When accessing the registers inside the video controller, please follow the same procedure as when accessing the CRTC signal, ensuring that the V-DISP signal within the MFP0 GPIP4 is set to "0".</text:p>
      <text:p text:style-name="Text_20_body">4-5. Super Impose and Over Scan This device supports the following two display modes:</text:p>
      <text:p text:style-name="Text_20_body">(1) Low-resolution mode (Horizontal scan frequency 15.98kHz, Vertical scan frequency 60.52Hz) · As a display mode, it supports two modes: Copy screen and Super Imposed screen. (When connected to a home-use display.) · In Over Scan mode, the physical screen size displayed on the screen may decrease due to over scanning. (The screen size will largely remain the same both horizontally and vertically.) (Interlace)</text:p>
      <table:table table:name="Table16" table:style-name="Table16">
        <table:table-column table:style-name="Table16.A"/>
        <table:table-column table:style-name="Table16.B"/>
        <table:table-header-rows>
          <table:table-row>
            <table:table-cell table:style-name="TableHeaderRowCell" office:value-type="string">
              <text:p text:style-name="Table_20_Heading">Physical Screen Size in Low-Resolution Mode</text:p>
            </table:table-cell>
            <table:table-cell table:style-name="TableHeaderRowCell" office:value-type="string">
              <text:p text:style-name="Table_20_Heading">Actual Display Screen Size</text:p>
            </table:table-cell>
          </table:table-row>
        </table:table-header-rows>
        <table:table-row>
          <table:table-cell table:style-name="TableRowCell" office:value-type="string">
            <text:p text:style-name="Table_20_Contents">256×256</text:p>
          </table:table-cell>
          <table:table-cell table:style-name="TableRowCell" office:value-type="string">
            <text:p text:style-name="Table_20_Contents">Approximately 236×236</text:p>
          </table:table-cell>
        </table:table-row>
        <table:table-row>
          <table:table-cell table:style-name="TableRowCell" office:value-type="string">
            <text:p text:style-name="Table_20_Contents">512×512</text:p>
          </table:table-cell>
          <table:table-cell table:style-name="TableRowCell" office:value-type="string">
            <text:p text:style-name="Table_20_Contents">Approximately 471×471</text:p>
          </table:table-cell>
        </table:table-row>
      </table:table>
      <text:p text:style-name="First_20_paragraph">[Overscan] | [Normal Scan] (Traditional Display Method)</text:p>
      <text:p text:style-name="Text_20_body">(Note: The dotted line represents the overscanned computer screen.)</text:p>
      <text:list text:style-name="List_20_1">
        <text:list-item>
          <text:p text:style-name="List_20_Bullet_20_Tight">In this mode, in addition to the traditional superimpose modes from the X1 and X1turbo series, interlace-method pseudo high-resolution superimpose modes are also supported. In either case, it's overscan.</text:p>
        </text:list-item>
      </text:list>
      <text:p text:style-name="Preformatted_20_Text"><text:s text:c="2"/>Traditional Superimpose Mode:</text:p>
      <text:p text:style-name="Preformatted_20_Text"><text:s text:c="2"/>- Pseudo High-Resolution Superimpose Mode</text:p>
      <text:p text:style-name="Preformatted_20_Text"><text:s text:c="2"/>- 256x256</text:p>
      <text:p text:style-name="Preformatted_20_Text"><text:s text:c="2"/>- 512x512 (Interlace)</text:p>
      <text:p text:style-name="First_20_paragraph">[Traditional Superimpose Mode] [Pseudo High-Resolution Superimpose Mode]</text:p>
      <text:p text:style-name="Text_20_body">(Note: The dotted line represents the overscanned computer screen.) Access the same memory data in both the odd and even fields of television scan lines. Access different memory data in the odd and even fields of television scan lines.</text:p>
      <text:p text:style-name="Text_20_body">(2) High-resolution image mode (horizontal sync frequency: 31.5kHz, vertical sync frequency: 55.46Hz)</text:p>
      <text:list text:style-name="List_20_1">
        <text:list-item>
          <text:p text:style-name="List_20_Bullet_20_Tight">As a display mode, the computer screen is supported, but the superimposed screen is not supported.</text:p>
        </text:list-item>
        <text:list-item>
          <text:p text:style-name="List_20_Bullet_20_Tight">The computer screen only displays in normal scan.</text:p>
        </text:list-item>
      </text:list>
      <text:p text:style-name="First_20_paragraph">[NORMAL SCAN]</text:p>
      <text:p text:style-name="Text_20_body">CRT screen display area</text:p>
      <text:p text:style-name="Text_20_body">Border</text:p>
      <text:p text:style-name="Text_20_body">Computer screen</text:p>
      <text:p text:style-name="Text_20_body">The 256 x 256 two-tone reading mode is performed in the same way as the X1turbo high resolution 200-line mode. (However, the horizontal and vertical sync frequencies are different.)</text:p>
      <text:list text:style-name="Numbering_20_1" text:start-value="5">
        <text:list-item>
          <text:p text:style-name="List_20_Number_20_Tight">Miscellaneous Switches (1) This unit is equipped with the following 3 types of switches.</text:p>
        </text:list-item>
      </text:list>
      <text:p text:style-name="First_20_paragraph">(A) Reset Switch</text:p>
      <text:list text:style-name="List_20_1">
        <text:list-item>
          <text:p text:style-name="List_20_Bullet_20_Tight">When you press this switch, a hardware reset is performed, and the processing begins at the address written in main memory 00000H.</text:p>
        </text:list-item>
      </text:list>
      <text:p text:style-name="First_20_paragraph">(B) Interrupt Switch</text:p>
      <text:list text:style-name="List_20_1">
        <text:list-item>
          <text:p text:style-name="List_20_Bullet_20_Tight">When you press this switch, the lowest bit of the status register and the NMI (non-maskable interrupt) signal come in, an external interrupt request is made to the address written in main memory 00007CH. The NMI processing routine writes 1 to E8E007H D02 and then performs an NMI reset. If D02 is not written to 1, the NMI processing routine is exited, and the NMI process is invoked again.</text:p>
        </text:list-item>
      </text:list>
      <text:p text:style-name="First_20_paragraph">(C) POWER Switch</text:p>
      <text:list text:style-name="List_20_1">
        <text:list-item>
          <text:p text:style-name="List_20_Bullet_20_Tight">The POWER switch has two modes: ON and OFF. When on (Vcc1 ON), the circuit operates at one stage. In the OFF mode, MPFP = POWER SW is in "OFF" (MPFP level 2 interruption), processing before sending MPFP to the MPU. If the MPU does not detect this condition within a control processing routine, it sends a stern instruction "OFF" "ON", "OFF" to the status register E8E00FH and prevents the missing detection. This prevents access to floppy disks and whenever the power is turned off.</text:p>
        </text:list-item>
      </text:list>
      <text:p text:style-name="First_20_paragraph">(D) CLOCK SPEED Switch</text:p>
      <text:list text:style-name="List_20_1">
        <text:list-item>
          <text:p text:style-name="List_20_Bullet_20_Tight">By this switch, you can set the clock speed of the MPU to either 10MHz or 16MHz.</text:p>
        </text:list-item>
        <text:list-item>
          <text:p text:style-name="List_20_Bullet_20_Tight">When operating (in Vcc1 ON state) change the clock speed, turn POWER OFF once, then switch and turn the power back on after switching.</text:p>
        </text:list-item>
      </text:list>
      <text:p text:style-name="First_20_paragraph">Notes:</text:p>
      <text:list text:style-name="Pandoc_5f_Numbering_5f_1">
        <text:list-item>
          <text:p text:style-name="List_20_Number_20_Tight">If you switch during operation (Vcc1 ON), the mode does not change.</text:p>
        </text:list-item>
        <text:list-item>
          <text:p text:style-name="List_20_Number_20_Tight">When you perform a reset switch during operation, you can change the mode, but normal operation of the system thereafter is not guaranteed.</text:p>
        </text:list-item>
        <text:list-item>
          <text:p text:style-name="List_20_Number_20_Tight">The reset operation by software cannot change the mode.</text:p>
        </text:list-item>
      </text:list>
      <text:p text:style-name="First_20_paragraph">Inspection results of power supply systems: In particular, the V1c1 may be turned ON due to the MPF1C failure and can be recognized.</text:p>
      <text:p text:style-name="Text_20_body">(A) Vcc2 (RTC, SRAM, supply power for various circuits)</text:p>
      <text:list text:style-name="List_20_1">
        <text:list-item>
          <text:p text:style-name="List_20_Bullet_20_Tight">Controlled by the rear power switch, can be turned ON and OFF. Do not use with timers and TV controls. Turn OFF the rear power switch after use.</text:p>
        </text:list-item>
      </text:list>
      <text:p text:style-name="First_20_paragraph">(B) Vcc1 (RTC, SRAM, EXCLUDING key switches, supply power for almost all other circuits)</text:p>
      <text:list text:style-name="List_20_1">
        <text:list-item>
          <text:p text:style-name="List_20_Bullet_20_Tight">The POWER2 switch is subject to an ON and OFF setting in reverse order of the rear power switch.</text:p>
        </text:list-item>
        <text:list-item>
          <text:p text:style-name="List_20_Bullet_20_Tight">The rear power switch being ON sets the front POWER switch to ON.</text:p>
        </text:list-item>
        <text:list-item>
          <text:p text:style-name="List_20_Bullet_20_Tight">The rear power switch being ON enables the expansion EXPWON signal in the expansion I/O slot.</text:p>
        </text:list-item>
        <text:list-item>
          <text:p text:style-name="List_20_Bullet_20_Tight">The rear power switch being ON enables the RTC2/ALARM timer signal in RTC ALARM time. However, regarding Vcc1OFF, software system board E8E00FH having the value of "00", "OFF" and "OP" are meaningless.</text:p>
        </text:list-item>
      </text:list>
      <text:p text:style-name="First_20_paragraph">(C) Backup power supply</text:p>
      <text:list text:style-name="List_20_1">
        <text:list-item>
          <text:p text:style-name="List_20_Bullet_20_Tight">The rear power switch being OFF backs up the RTC SRAM. The backup power supply used to use two manganese dioxide LR batteries, but now it is using primary lithium batteries. Do not operate while charging the batteries.</text:p>
        </text:list-item>
      </text:list>
      <text:p text:style-name="First_20_paragraph">(3) The LEDs on the front panel light up as follows (assuming Vcc2 is ON).</text:p>
      <text:p text:style-name="Text_20_body">(A) 16MHz LED and 10MHz LED</text:p>
      <text:list text:style-name="List_20_1">
        <text:list-item>
          <text:p text:style-name="List_20_Bullet_20_Tight">When the front POWER switch is ON and both Vcc1 and Vcc2 are ON, the LEDs correspond according to the MPU operation mode.</text:p>
        </text:list-item>
        <text:list-item>
          <text:p text:style-name="List_20_Bullet_20_Tight">If the POWER2 switch is OFF, it does not correspond to the LED.</text:p>
        </text:list-item>
        <text:list-item>
          <text:p text:style-name="List_20_Bullet_20_Tight">When turning OFF the system with the front POWER switch ON, the LED remains in the state for a few seconds before the 10s internal processing is finished and it turns OFF.</text:p>
        </text:list-item>
        <text:list-item>
          <text:p text:style-name="List_20_Bullet_20_Tight">When Vcc1 is OFF but only Vcc2 is ON, the CLOCK SPEED switching state is shown on the LED as RED.</text:p>
        </text:list-item>
      </text:list>
      <text:p text:style-name="First_20_paragraph">Vcc2 Vcc1 MPU CLOCK 10MHz LED 16MHz LED operation SPEED SW ON ON 10MHz x GREEN OFF 16MHz x OFF GREEN OFF 10MHz RED OFF OFF 16MHz OFF RED OFF OFF OFF</text:p>
      <text:p text:style-name="Text_20_body">(B) TIMER LED</text:p>
      <text:list text:style-name="List_20_1">
        <text:list-item>
          <text:p text:style-name="List_20_Bullet_20_Tight">Using RTC and ALARM timer function to set RTC's register address, E8A00H's D04<text:span text:style-name="Emphasis">1 sets "1" and turns the TIMER LED on. Conversely, when using the timer function, writing "0" turns it off. That is, this corresponds to D04</text:span>1, D04 is reset, and when Vcc2 is OFF, it is cut off, and the TIMER LED does not light even though the front POWER switch is ON.</text:p>
        </text:list-item>
      </text:list>
      <text:p text:style-name="First_20_paragraph">(C) HD BUSY LED</text:p>
      <text:list text:style-name="List_20_1">
        <text:list-item>
          <text:p text:style-name="List_20_Bullet_20_Tight">Indicating the internal hard disk access. It lights up during read/write operations of the hard disk.</text:p>
        </text:list-item>
      </text:list>
      <text:p text:style-name="First_20_paragraph">Page - 34 -</text:p>
      <text:p text:style-name="Text_20_body">(D) Floppy Disk Drive LED</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Front</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POWER Switc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N State</text:p>
          </table:table-cell>
          <table:table-cell table:style-name="TableRowCell" office:value-type="string">
            <text:p text:style-name="Table_20_Contents">- When media is in the FDDGreen lights up- When there is no media in the FDD and the LED flashing function is ONGreen blinks- When there is no media in the FDD and the LED flashing function is OFFTurns off↓If the FDD is read/written (drive present ON, read/write ON)Green changes to red</text:p>
          </table:table-cell>
          <table:table-cell table:style-name="TableRowCell" office:value-type="string">
            <text:p text:style-name="Table_20_Contents">- When the eject switch mask function is ONTurns off- When there is media in the FDD and the eject switch mask function is OFFGreen lights up</text:p>
          </table:table-cell>
        </table:table-row>
      </table:table>
      <text:p text:style-name="First_20_paragraph">| OFF State | - When there is media in the FDDGreen lights up- When there is no media in the FDDTurns off | - When there is media in the FDDGreen lights up- When there is no media in the FDDTurns off |</text:p>
      <text:p text:style-name="Text_20_body">(4) This machine uses ports A and B of the 8255 as input ports for two joysticks, and also uses port C as a switching port for controlling the two joysticks, controlling the sound synthesis output and sampling rate switching. Therefore, by using the control word register of this 8255, it is necessary to specify port A and B as input and port C as output.<text:line-break/>&lt;8255 Control Word Register (E9A007H)&gt;</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header-rows>
          <table:table-row>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
      <text:p text:style-name="Preformatted_20_Text">0 - Port C (lower 4 bits) output (sound synthesis) <text:s text:c="1"/></text:p>
      <text:p text:style-name="Preformatted_20_Text">1 - Port B input (joystick No.2) <text:s text:c="1"/></text:p>
      <text:p text:style-name="Preformatted_20_Text">0 - Port C (upper 4 bits) output (joystick control) <text:s text:c="1"/></text:p>
      <text:p text:style-name="Preformatted_20_Text">1 - Port A input (joystick No.1)</text:p>
      <text:p text:style-name="First_20_paragraph">Page 35</text:p>
      <text:h text:style-name="Heading_20_1" text:outline-level="1"><text:bookmark-start text:name="id_6-keyboard-and-mouse"/>6. Keyboard and Mouse<text:bookmark-end text:name="id_6-keyboard-and-mouse"/></text:h>
      <text:p text:style-name="First_20_paragraph">This device uses the keyboard and mouse in the following block configuration.</text:p>
      <text:p text:style-name="Text_20_body">CPU System Board (EBE007H) Control Bus</text:p>
      <text:p text:style-name="Text_20_body">MFP RR SO SI GND TV Controller Remote Signal Dedicated Disk Display</text:p>
      <text:p text:style-name="Text_20_body">80C51 Vcc2 GND TO RxD TxD T1 80C51 Send Data&gt; &lt;80C51-&gt;MFP Receive Data&gt;</text:p>
      <text:p text:style-name="Text_20_body">GND Vcc2</text:p>
      <text:p text:style-name="Text_20_body">(CPU System Board (EBE003H))</text:p>
      <text:p text:style-name="Text_20_body">Notes: Regarding the control of the mouse and TV control, please use either control on the main unit or control on the keyboard side, or use them independently.</text:p>
      <text:p text:style-name="Text_20_body">Figure 6-1 Keyboard and Mouse Surrounding Block Diagram</text:p>
      <text:p text:style-name="Text_20_body"><draw:frame draw:name="img5" svg:width="480.0pt" svg:height="391.2pt"><draw:image xlink:href="Pictures/4.png" xlink:type="simple" xlink:show="embed" xlink:actuate="onLoad"/></draw:frame></text:p>
      <text:p text:style-name="Text_20_body">(1) Transformation and transmission of key scan data to MFPA (refer to Table 1-3) Unlike the X18&amp;X1turbo series, this keyboard transmits the scanned key data to the sub-CPU without converting it to ASCII code. The serial data of one byte is then sent with information on whether the key was pressed or released. Regarding repeat functionality, this keyboard has the capability to control the start time (Delay 1) and the repeat interval (Speed), as well as the functionality to send the data of the pressed key (MSB) after the delay. This repeat functionality is valid for all keys (refer to Table 6-2).</text:p>
      <text:p text:style-name="Text_20_body">(2) Transmission of TV control remote control signals In the X18&amp;X1turbo series, the TV control remote control signals are output to P27 (pin 38) of the main unit's 80C49 or P27 through 80C51 (port 1 TI). However, this keyboard has two ways to transmit these TV remote control signals from the main unit's MFPA: via software method and 1-byte data transfer from 80C51. Especially for this keyboard’s own TV remote control mode, sending the 1-byte data to MFPA through 80C51 validates the data as a TV control remote command sent from the main unit. Additionally, other system mode management is handled by the system board E8E003HJ D03. By this, the TV control remote signal can be sent through software timers. The commands valid for repeat control are TV Volume Up, Volume Down, Channel Up, and Channel Down.</text:p>
      <text:p text:style-name="Text_20_body">(3) LED Lighting Control on the Keyboard The illumination of the seven LEDs on the keyboard can be controlled via software. In other words, it’s possible to turn on, off, or flash arbitrary LEDs based on one-byte data transmitted from MFPA to 80C51. Moreover, LEDs are lit up when a specific key code generated by the keyboard reset signal is received; thus, it is possible to ascertain that the keyboard has been initialized by the main unit. Additionally, when the keyboard is reset (e.g., during power-up reset or keyboard replacement), the key code transmitted to the main unit indicates the LED status which is used to inform that the keyboard has been reset.</text:p>
      <text:p text:style-name="Text_20_body">(4) Mask Control Signal (MSCTRL) Control Transmitting one-byte data from the keyboard’s MFPA to 80C51 allows control of the MSCTRL signal. This is significant when the keyboard's mouse connector is used.</text:p>
      <text:p text:style-name="Text_20_body">(5) Key Scan Data Transmission Error Code 80C51 outputs scan data directly via main and interrupt loops. However, if certain error prevention mechanisms within the MFPA or during the RR signal for data reading are unsuitable (triggering issues such as the system board E8E007HJ D01 becoming inactive), then key data transmission by 80C51 is invalid. In such a case, the keyboard enters an idle state until the data becomes acceptable for system board E8E007HJ D01 acknowledgment. This error state is resolved when the RDY signal transitions from a "0" state, in which 1-byte data transmission is permissible.</text:p>
      <text:p text:style-name="Text_20_body">Table 6-1 Key Data Transmission Format</text:p>
      <text:p text:style-name="Text_20_body">Baud Rate: 2400 baud</text:p>
      <text:p text:style-name="Text_20_body">Key Data Transmission Sequence (Serial Transmission Asynchronous Communication)</text:p>
      <text:p text:style-name="Text_20_body">| Start Bit | 1 | | Data Length | 8 | | Stop Bit | 1 | | Parity None | |</text:p>
      <text:p text:style-name="Text_20_body">(6) Key Assignment for X1 Control in Designated TV Control Keys</text:p>
      <text:p text:style-name="Text_20_body">For the following TV control keys, sending 1-byte data from MFP to 80C51 allows them to be used as TV control keys for X1 punch.</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Operation Key</text:p>
            </table:table-cell>
            <table:table-cell table:style-name="TableHeaderRowCell" office:value-type="string">
              <text:p text:style-name="Table_20_Heading">CZ-600C</text:p>
            </table:table-cell>
            <table:table-cell table:style-name="TableHeaderRowCell" office:value-type="string">
              <text:p text:style-name="Table_20_Heading">X1 Punch Mode</text:p>
            </table:table-cell>
          </table:table-row>
        </table:table-header-rows>
        <table:table-row>
          <table:table-cell table:style-name="TableRowCell" office:value-type="string">
            <text:p text:style-name="Table_20_Contents">TV Control Key ++</text:p>
          </table:table-cell>
          <table:table-cell table:style-name="TableRowCell" office:value-type="string">
            <text:p text:style-name="Table_20_Contents">Superimpose/Superimpose Toggle Key</text:p>
          </table:table-cell>
          <table:table-cell table:style-name="TableRowCell" office:value-type="string">
            <text:p text:style-name="Table_20_Contents">Superimpose</text:p>
          </table:table-cell>
        </table:table-row>
        <table:table-row>
          <table:table-cell table:style-name="TableRowCell" office:value-type="string">
            <text:p text:style-name="Table_20_Contents">TV Control Key +=</text:p>
          </table:table-cell>
          <table:table-cell table:style-name="TableRowCell" office:value-type="string">
            <text:p text:style-name="Table_20_Contents">TV/External Input Toggle Key</text:p>
          </table:table-cell>
          <table:table-cell table:style-name="TableRowCell" office:value-type="string">
            <text:p text:style-name="Table_20_Contents">TV</text:p>
          </table:table-cell>
        </table:table-row>
        <table:table-row>
          <table:table-cell table:style-name="TableRowCell" office:value-type="string">
            <text:p text:style-name="Table_20_Contents">TV Control Key +</text:p>
          </table:table-cell>
          <table:table-cell table:style-name="TableRowCell" office:value-type="string">
            <text:p text:style-name="Table_20_Contents">TV/Computer Screen Toggle Key</text:p>
          </table:table-cell>
          <table:table-cell table:style-name="TableRowCell" office:value-type="string">
            <text:p text:style-name="Table_20_Contents">Computer Email</text:p>
          </table:table-cell>
        </table:table-row>
      </table:table>
      <text:p text:style-name="First_20_paragraph">(7) Control of TV Control Mode and Mouse Control Mode</text:p>
      <text:p text:style-name="Text_20_body">By sending 1-byte data from this MFP to the 80C51, you can toggle the ON/OFF state of the keyboard's TV control key or mouse control key, respectively. Typically, like the SHIFT key, if you hold down a TV control key or mouse control key while pressing another key, the key will be controlled. In this control mode, these toggle operations retain their state until pressed again for the second time, which cancels the previous key state. In this mode, once the TV control key or mouse control key turns ON, it will remain ON until turned OFF, and it keeps holding the key down functionality. Standard key codes are sent from the MFP.</text:p>
      <text:p text:style-name="Text_20_body">Table 6-2 Key Scan Data Format:</text:p>
      <text:p text:style-name="Text_20_body">D7 D6 D5 D4 D3 D2 D1 D0 | Key Scan Code |</text:p>
      <text:p text:style-name="Preformatted_20_Text">0 - Key pressed state</text:p>
      <text:p text:style-name="Preformatted_20_Text">1 - Key not pressed state</text:p>
      <text:p text:style-name="First_20_paragraph">1-byte data from 80C51 to MFP Key code reference is in figure 3-2</text:p>
      <text:p text:style-name="Text_20_body"><draw:frame draw:name="img6" svg:width="480.0pt" svg:height="157.44pt"><draw:image xlink:href="Pictures/5.png" xlink:type="simple" xlink:show="embed" xlink:actuate="onLoad"/></draw:frame></text:p>
      <text:p text:style-name="Text_20_body">CZ-634C-TN CZ-644C-TN</text:p>
      <text:list text:style-name="Numbering_20_1" text:start-value="7">
        <text:list-item>
          <text:p text:style-name="List_20_Number_20_Tight">Sound Function</text:p>
        </text:list-item>
      </text:list>
      <text:p text:style-name="First_20_paragraph">This machine uses the YM2151 as the FM sound source LSI and the MSM6258 as the voice synthesis LSI.</text:p>
      <text:p text:style-name="Text_20_body">Fig. 7-1 Sound System Block Diagram</text:p>
      <text:p text:style-name="Text_20_body"><draw:frame draw:name="img7" svg:width="480.0pt" svg:height="329.28pt"><draw:image xlink:href="Pictures/6.png" xlink:type="simple" xlink:show="embed" xlink:actuate="onLoad"/></draw:frame></text:p>
      <text:p text:style-name="Text_20_body">Labels in the diagram:</text:p>
      <text:list text:style-name="List_20_1">
        <text:list-item>
          <text:p text:style-name="List_20_Bullet_20_Tight">Data</text:p>
        </text:list-item>
        <text:list-item>
          <text:p text:style-name="List_20_Bullet_20_Tight">Address</text:p>
        </text:list-item>
        <text:list-item>
          <text:p text:style-name="List_20_Bullet_20_Tight">Control</text:p>
        </text:list-item>
        <text:list-item>
          <text:p text:style-name="List_20_Bullet_20_Tight">Buffer</text:p>
        </text:list-item>
        <text:list-item>
          <text:p text:style-name="List_20_Bullet_20_Tight">Decoder</text:p>
        </text:list-item>
        <text:list-item>
          <text:p text:style-name="List_20_Bullet_20_Tight">FM Sound Source (YM2151) Vcc1 Vss CLK(4MHz)</text:p>
        </text:list-item>
        <text:list-item>
          <text:p text:style-name="List_20_Bullet_20_Tight">µPD8255 PC Vcc1 Vss</text:p>
        </text:list-item>
        <text:list-item>
          <text:p text:style-name="List_20_Bullet_20_Tight">ADPCM (MSM6258) Vcc1 Vss CLK(4MHz)</text:p>
        </text:list-item>
        <text:list-item>
          <text:p text:style-name="List_20_Bullet_20_Tight">PCM PAN</text:p>
        </text:list-item>
        <text:list-item>
          <text:p text:style-name="List_20_Bullet_20_Tight">Built-in Speaker</text:p>
        </text:list-item>
        <text:list-item>
          <text:p text:style-name="List_20_Bullet_20_Tight">Headphone Out</text:p>
        </text:list-item>
        <text:list-item>
          <text:p text:style-name="List_20_Bullet_20_Tight">Amp</text:p>
        </text:list-item>
        <text:list-item>
          <text:p text:style-name="List_20_Bullet_20_Tight">L line Out</text:p>
        </text:list-item>
        <text:list-item>
          <text:p text:style-name="List_20_Bullet_20_Tight">R line Out</text:p>
        </text:list-item>
        <text:list-item>
          <text:p text:style-name="List_20_Bullet_20_Tight">R TV AUDIO</text:p>
        </text:list-item>
        <text:list-item>
          <text:p text:style-name="List_20_Bullet_20_Tight">L TV AUDIO</text:p>
        </text:list-item>
        <text:list-item>
          <text:p text:style-name="List_20_Bullet_20_Tight">line In</text:p>
        </text:list-item>
      </text:list>
      <text:p text:style-name="First_20_paragraph">7-1. FM Tone Generation</text:p>
      <text:p text:style-name="Text_20_body">● LSI YM2151 (1) Up to 8 tones can be generated. However, for sinusoidal waves, up to a maximum of 32 tones can be generated. (2) Noise generation. (3) Pitch and time modulation. (4) In addition to the fundamental wave, allows irregular modulation of the upper harmonics. (5) Allows detuning of the 7th harmonic. (6) Adjustment of pitch with 1.6 cent accuracy. (7) Vibrato and tremolo operation. (8) Enables various sound effects due to deep vibrato and frequency modulation as well as detuning of the upper harmonics along with the fundamental wave. (9) Includes two types of timers.</text:p>
      <text:p text:style-name="Text_20_body">7-2. Voice Synthesis</text:p>
      <text:p text:style-name="Text_20_body">This system uses MSM6258 in ADPCM method as the voice synthesis LSI. PCM's output control, sample frequency conversion, and switching are performed by the 8255's ports and Ck. The LSI converts voice input to digital via S&amp;H (Sampling &amp; Hold) and AD converter, and when using the PCM (Pulse Code Modulation) code, the difference between the predicted value and the actual value is quantized using the ADPCM (Adaptive Differential PCM) method, reducing the amount of information. Additionally, through the above process, the resulting output is converted back to its original form using a digital-to-analog converter (DAC).</text:p>
      <text:p text:style-name="Text_20_body">(End of page 41)</text:p>
      <text:p text:style-name="Text_20_body"><text:span text:style-name="Strong_20_Emphasis">CZ-634C-TN</text:span><text:line-break/><text:span text:style-name="Strong_20_Emphasis">CZ-644C-TN</text:span></text:p>
      <text:p text:style-name="Text_20_body"><text:span text:style-name="Strong_20_Emphasis">8. Peripheral LSI</text:span><text:line-break/><text:span text:style-name="Strong_20_Emphasis">8-1. DMAC</text:span></text:p>
      <text:p text:style-name="Text_20_body">In this book, the 63450 is used as the DMAC. This is an independent 4-channel DMAC, and in this machine, it is allocated as shown in Table 8-1.</text:p>
      <text:p text:style-name="Text_20_body"><text:span text:style-name="Strong_20_Emphasis">Table 8-1 Allocation of each DMAC channel</text:span></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HeaderRowCell" office:value-type="string">
              <text:p text:style-name="Table_20_Heading">Channel No.</text:p>
            </table:table-cell>
            <table:table-cell table:style-name="TableHeaderRowCell" office:value-type="string">
              <text:p text:style-name="Table_20_Heading">Allocation</text:p>
            </table:table-cell>
            <table:table-cell table:style-name="TableHeaderRowCell" office:value-type="string">
              <text:p text:style-name="Table_20_Heading">Transfer Demand</text:p>
            </table:table-cell>
            <table:table-cell table:style-name="TableHeaderRowCell" office:value-type="string">
              <text:p text:style-name="Table_20_Heading">Block Transfer</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Internal 2HD</text:p>
          </table:table-cell>
          <table:table-cell table:style-name="TableRowCell" office:value-type="string">
            <text:p text:style-name="Table_20_Contents">External Transfer Request</text:p>
          </table:table-cell>
          <table:table-cell table:style-name="TableRowCell" office:value-type="string">
            <text:p text:style-name="Table_20_Contents">Cycle Steal Mode</text:p>
          </table:table-cell>
        </table:table-row>
        <table:table-row>
          <table:table-cell table:style-name="TableRowCell" office:value-type="string">
            <text:p text:style-name="Table_20_Contents">1</text:p>
          </table:table-cell>
          <table:table-cell table:style-name="TableRowCell" office:value-type="string">
            <text:p text:style-name="Table_20_Contents">SCSI Device</text:p>
          </table:table-cell>
          <table:table-cell table:style-name="TableRowCell" office:value-type="string">
            <text:p text:style-name="Table_20_Contents">Auto Request</text:p>
          </table:table-cell>
          <table:table-cell table:style-name="TableRowCell" office:value-type="string">
            <text:p text:style-name="Table_20_Contents">Full Channel Dual Address Mod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ax Speed</text:p>
          </table:table-cell>
          <table:table-cell table:style-name="TableRowCell" office:value-type="string">
            <text:p text:style-name="Table_20_Contents">Full Channel (programmable)</text:p>
          </table:table-cell>
        </table:table-row>
        <table:table-row>
          <table:table-cell table:style-name="TableRowCell" office:value-type="string">
            <text:p text:style-name="Table_20_Contents">2</text:p>
          </table:table-cell>
          <table:table-cell table:style-name="TableRowCell" office:value-type="string">
            <text:p text:style-name="Table_20_Contents">Memory Memory</text:p>
          </table:table-cell>
          <table:table-cell table:style-name="TableRowCell" office:value-type="string">
            <text:p text:style-name="Table_20_Contents">Auto Request</text:p>
          </table:table-cell>
          <table:table-cell table:style-name="TableRowCell" office:value-type="string">
            <text:p text:style-name="Table_20_Contents">Continue Mod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Limited Speed and Max Speed</text:p>
          </table:table-cell>
          <table:table-cell table:style-name="TableRowCell" office:value-type="string">
            <text:p text:style-name="Table_20_Contents">Array Chain Mode</text:p>
          </table:table-cell>
        </table:table-row>
        <table:table-row>
          <table:table-cell table:style-name="TableRowCell" office:value-type="string">
            <text:p text:style-name="Table_20_Contents">3</text:p>
          </table:table-cell>
          <table:table-cell table:style-name="TableRowCell" office:value-type="string">
            <text:p text:style-name="Table_20_Contents">Sound Synthesis</text:p>
          </table:table-cell>
          <table:table-cell table:style-name="TableRowCell" office:value-type="string">
            <text:p text:style-name="Table_20_Contents">External Transfer Request</text:p>
          </table:table-cell>
          <table:table-cell table:style-name="TableRowCell" office:value-type="string">
            <text:p text:style-name="Table_20_Contents">Cycle Steal Mod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ink Array Chain Mode</text:p>
          </table:table-cell>
        </table:table-row>
      </table:table>
      <text:p text:style-name="First_20_paragraph"><text:span text:style-name="Strong_20_Emphasis">Figure 8-1 DMAC Block Diagram</text:span></text:p>
      <text:p text:style-name="Text_20_body"><draw:frame draw:name="img8" svg:width="480.0pt" svg:height="255.84pt"><draw:image xlink:href="Pictures/7.png" xlink:type="simple" xlink:show="embed" xlink:actuate="onLoad"/></draw:frame></text:p>
      <text:list text:style-name="List_20_1">
        <text:list-item>
          <text:p text:style-name="List_20_Bullet">68000</text:p>
        </text:list-item>
        <text:list-item>
          <text:p text:style-name="List_20_Bullet">Address Bus</text:p>
        </text:list-item>
        <text:list-item>
          <text:p text:style-name="List_20_Bullet">Data Bus</text:p>
        </text:list-item>
        <text:list-item>
          <text:p text:style-name="List_20_Bullet">Control Bus</text:p>
        </text:list-item>
        <text:list-item>
          <text:p text:style-name="List_20_Bullet">CLK (10/16MHz)</text:p>
        </text:list-item>
        <text:list-item>
          <text:p text:style-name="List_20_Bullet">Vcc1</text:p>
        </text:list-item>
        <text:list-item>
          <text:p text:style-name="List_20_Bullet">Vss</text:p>
        </text:list-item>
        <text:list-item>
          <text:p text:style-name="List_20_Bullet">63450</text:p>
        </text:list-item>
        <text:list-item>
          <text:p text:style-name="List_20_Bullet">CLK (10MHz)</text:p>
        </text:list-item>
        <text:list-item>
          <text:p text:style-name="List_20_Bullet">Vcc1</text:p>
        </text:list-item>
        <text:list-item>
          <text:p text:style-name="List_20_Bullet">Vss</text:p>
        </text:list-item>
        <text:list-item>
          <text:p text:style-name="List_20_Bullet">Ch0 Internal 2HD</text:p>
        </text:list-item>
        <text:list-item>
          <text:p text:style-name="List_20_Bullet">Ch1 SCSI Device</text:p>
        </text:list-item>
        <text:list-item>
          <text:p text:style-name="List_20_Bullet">Ch2 Memory Memory</text:p>
        </text:list-item>
        <text:list-item>
          <text:p text:style-name="List_20_Bullet">Ch3 Sound Synthesis</text:p>
        </text:list-item>
      </text:list>
      <text:p text:style-name="First_20_paragraph"> This DMAC has the following features. Also, Table 8-2 shows the DMAC transfer request methods, and Table 8-3 shows the DMAC data block transfer.</text:p>
      <text:p text:style-name="Text_20_body">(1) Equipped with 4 independent DMA channels (priority is programmable). (2) Enables transfers between memory to memory, and memory to I/O devices. (3) Supports block transfer functions of Continue Mode, Array Chain Mode, and Link Array Chain Mode. (4) Programmable transfer using internal registers. (5) Supports error detection and high-reliability data transfer functions with vector error splitting and exception handling. (6) Maximum 5 MBytes/sec. (10MHz) (7) Compatible with the 68000 bus.</text:p>
      <text:p text:style-name="Text_20_body"><text:span text:style-name="Strong_20_Emphasis">Table 8-2: DMAC Transfer Request Methods</text:span></text:p>
      <text:p text:style-name="Text_20_body">Transfer Request Methods</text:p>
      <text:list text:style-name="List_20_1">
        <text:list-item>
          <text:p text:style-name="List_20_Bullet_20_Tight">External Transfer Request (using the REQ pin)</text:p>
        </text:list-item>
      </text:list>
      <text:p text:style-name="Preformatted_20_Text"><text:s text:c="2"/>- Cycle Steal Mode</text:p>
      <text:p text:style-name="Preformatted_20_Text"><text:s text:c="4"/>- Transfers at each operation's timing. Releases the bus at each transfer completion.</text:p>
      <text:p text:style-name="Preformatted_20_Text"/>
      <text:p text:style-name="Preformatted_20_Text"><text:s text:c="2"/>- Cycle Steal Burst Hold Mode</text:p>
      <text:p text:style-name="Preformatted_20_Text"><text:s text:c="4"/>- Transfers at each operation's timing. However, does not release the bus for a fixed period after transfer.</text:p>
      <text:p text:style-name="Preformatted_20_Text"/>
      <text:p text:style-name="Preformatted_20_Text"><text:s text:c="2"/>- Burst Mode</text:p>
      <text:p text:style-name="Preformatted_20_Text"><text:s text:c="4"/>- Transfers multiple operations consecutively.</text:p>
      <text:list text:style-name="List_20_1">
        <text:list-item>
          <text:p text:style-name="List_20_Bullet_20_Tight">Auto Request (not using the REQ pin)</text:p>
        </text:list-item>
      </text:list>
      <text:p text:style-name="Preformatted_20_Text"><text:s text:c="2"/>- Fixed Speed</text:p>
      <text:p text:style-name="Preformatted_20_Text"><text:s text:c="4"/>- Transfers multiple operations consecutively. However, periodically releases the bus during certain intervals and does not monopolize the device.</text:p>
      <text:p text:style-name="Preformatted_20_Text"/>
      <text:p text:style-name="Preformatted_20_Text"><text:s text:c="2"/>- Maximum Speed</text:p>
      <text:p text:style-name="Preformatted_20_Text"><text:s text:c="4"/>- Transfers multiple operations consecutively. However, releases the bus during certain intervals and monopolizes the device until the transfer is completed.</text:p>
      <text:list text:style-name="List_20_1">
        <text:list-item>
          <text:p text:style-name="List_20_Bullet_20_Tight">Auto Request (only transfers the first operand) + External Transfer Request (transfers operand from the 2nd one onward)</text:p>
        </text:list-item>
      </text:list>
      <text:p text:style-name="First_20_paragraph"><text:span text:style-name="Strong_20_Emphasis">Table 8-3: DMAC Data Block Transfer Methods</text:span></text:p>
      <text:list text:style-name="List_20_1">
        <text:list-item>
          <text:p text:style-name="List_20_Bullet">Single Data Block Transfer</text:p>
          <text:list text:style-name="List_20_1">
            <text:list-item>
              <text:p text:style-name="List_20_Bullet_20_Tight">Assigns the transfer address and transfer word count to internal DMAC registers.</text:p>
            </text:list-item>
          </text:list>
        </text:list-item>
        <text:list-item>
          <text:p text:style-name="List_20_Bullet">Multiple Data Block Transfer</text:p>
        </text:list-item>
      </text:list>
      <text:p text:style-name="Preformatted_20_Text"><text:s text:c="2"/>- Continue Mode</text:p>
      <text:p text:style-name="Preformatted_20_Text"><text:s text:c="4"/>- Assigns the transfer address and transfer word count to internal DMAC registers, and sets the CNT bit to indicate the presence of the next data block.</text:p>
      <text:p text:style-name="Preformatted_20_Text"/>
      <text:p text:style-name="Preformatted_20_Text"><text:s text:c="2"/>- Array Chain Mode</text:p>
      <text:p text:style-name="Preformatted_20_Text"><text:s text:c="4"/>- Creates an array table in main memory.</text:p>
      <text:p text:style-name="Preformatted_20_Text"/>
      <text:p text:style-name="Preformatted_20_Text"><text:s text:c="2"/>- Link Array Chain Mode</text:p>
      <text:p text:style-name="Preformatted_20_Text"><text:s text:c="4"/>- Creates a link array table in main memory.</text:p>
      <text:p text:style-name="First_20_paragraph">8-2. Floating-Point Arithmetic Co-Processor</text:p>
      <text:p text:style-name="Text_20_body">In this device, it is possible to optionally use the floating-point arithmetic co-processor (hereinafter abbreviated as FPU) MC68881 (16.67MHz).</text:p>
      <text:p text:style-name="Text_20_body">![Diagram of FPU signal block]</text:p>
      <text:p text:style-name="Text_20_body"><draw:frame draw:name="img9" svg:width="480.0pt" svg:height="243.84pt"><draw:image xlink:href="Pictures/8.png" xlink:type="simple" xlink:show="embed" xlink:actuate="onLoad"/></draw:frame></text:p>
      <text:p text:style-name="Text_20_body"><text:span text:style-name="Strong_20_Emphasis">MC68881 Main Features</text:span> ● 8 80-bit floating-point data registers ● 67-bit arithmetic device ● 67-bit barrel shifter and high-speed shifter ● 46 instructions ● Complete compliance with the IEEE 754 standard ● Support for functions not defined by the IEEE standard (transcendental functions such as trigonometric and logarithmic functions) ● 7 types of data types (byte, word and longword integer, single-precision real number, double-precision real number, extended-precision real number, packed BCD real number) ● Support for 22 constants in on-chip ROM (including π) ● Virtual memory compatible operation ● Efficient handling of exceptions, interrupts, and inserted processing mechanisms ● Parallel execution of main processor commands ● Compatible with hosts with 8-bit, 16-bit, or 32-bit data buses The IC slots on the FPU-compatible motherboards detect the presence of an FPU or not, and automatically judge whether an FPU is installed in the motherboard IC slot. If the FPU is not installed in the motherboard IC slot, connecting it to the corresponding CPU socket on the CZ-6BP1 expansion slot will enable proper function. However, if the FPU is installed on both the motherboard and the I/O slot processor board, the system will recognize the FPU on the motherboard as the priority and operate accordingly. Therefore, ensure not to have duplicate installations.</text:p>
      <text:p text:style-name="Text_20_body">8-3 Expansion Main Memory (1) Internal Expansion Board (CZ-6BE2A, CZ-6BE2B)</text:p>
      <text:list text:style-name="List_20_1">
        <text:list-item>
          <text:p text:style-name="List_20_Bullet">Expansion by 2MB units up to a maximum of 6MB (Actual maximum with internal extension of 8MB) Installed on expansion board</text:p>
        </text:list-item>
        <text:list-item>
          <text:p text:style-name="List_20_Bullet">2MB Memory Install Range Installation range: 200000~3FFFFF H</text:p>
        </text:list-item>
        <text:list-item>
          <text:p text:style-name="List_20_Bullet">Connector for 2MB Memory Module</text:p>
        </text:list-item>
      </text:list>
      <text:p text:style-name="Preformatted_20_Text"><text:s text:c="3"/>Connector 1: 400000~5FFFFF H</text:p>
      <text:p text:style-name="Preformatted_20_Text"><text:s text:c="3"/>Connector 2: 600000~7FFFFF H</text:p>
      <text:list text:style-name="List_20_1">
        <text:list-item>
          <text:p text:style-name="List_20_Bullet">BIOS ROM Mount IC Socket (2 of 1MB EPROM)</text:p>
        </text:list-item>
        <text:list-item>
          <text:p text:style-name="List_20_Bullet">BIOS ROM Replacement Switch</text:p>
        </text:list-item>
        <text:list-item>
          <text:p text:style-name="List_20_Bullet">The memory controller automatically determines the presence or absence of the above three 2MB memory boards by checking the following three signals (Each signal is enabled when LOW level):</text:p>
        </text:list-item>
      </text:list>
      <text:p text:style-name="Preformatted_20_Text"><text:s text:c="3"/>DRAMSENSE1 Signal: 200000~3FFFFF H Memory</text:p>
      <text:p text:style-name="Preformatted_20_Text"><text:s text:c="3"/>DRAMSENSE2 Signal: 400000~5FFFFF H Memory</text:p>
      <text:p text:style-name="Preformatted_20_Text"><text:s text:c="3"/>DRAMSENSE3 Signal: 600000~7FFFFF H Memory</text:p>
      <text:p text:style-name="First_20_paragraph">If this function is not used and the internal expansion board is not used, the previously used IO slot 2.4MB memory board attachment is enabled. (CZ-6BE2,4)</text:p>
      <text:list text:style-name="List_20_1">
        <text:list-item>
          <text:p text:style-name="List_20_Bullet_20_Tight">Accessible in sync wait at both 16/10MHz.</text:p>
        </text:list-item>
      </text:list>
      <text:p text:style-name="First_20_paragraph">(2) Adding memory on IO slot</text:p>
      <text:p text:style-name="Preformatted_20_Text"><text:s text:c="3"/>Possible to expand memory according to internal switching range</text:p>
      <text:p text:style-name="Preformatted_20_Text"><text:s text:c="3"/>* In the case of 8MB installed, 4MB can be expanded on the IO slot</text:p>
      <text:p text:style-name="Preformatted_20_Text"><text:s text:c="3"/>* In the case of 6MB installed, 6MB can be expanded on the IO slot</text:p>
      <text:p text:style-name="Preformatted_20_Text"><text:s text:c="3"/>* In the case of 4MB installed, 8MB can be expanded on the IO slot</text:p>
      <text:p text:style-name="Preformatted_20_Text"><text:s text:c="3"/>* In the case of 2MB installed, 10MB can be expanded on the IO slot</text:p>
      <text:p text:style-name="First_20_paragraph">(Note) IO slot memory boards are inaccessible in non-wait state at 16MHz mode. (Possible at 10MHz mode)</text:p>
      <text:h text:style-name="Heading_20_1" text:outline-level="1"><text:bookmark-start text:name="id_8-4-mfp"/>8-4. MFP<text:bookmark-end text:name="id_8-4-mfp"/></text:h>
      <text:p text:style-name="First_20_paragraph">In this unit, we use the 68901 from the 68000 family for data transmission and reception with the keyboard, timer functions, and various interrupt controls.</text:p>
      <text:p text:style-name="Text_20_body"><text:span text:style-name="Strong_20_Emphasis">CLK RESET Vcc1 Vss (4MHz)</text:span></text:p>
      <text:p text:style-name="Text_20_body"><text:span text:style-name="Strong_20_Emphasis">Internal Control Logic</text:span></text:p>
      <text:p text:style-name="Text_20_body"><text:span text:style-name="Strong_20_Emphasis">Timer C, D</text:span> (Delay Mode)</text:p>
      <text:list text:style-name="List_20_1">
        <text:list-item>
          <text:p text:style-name="List_20_Bullet_20_Tight">XTAL1 (4MHz)</text:p>
        </text:list-item>
        <text:list-item>
          <text:p text:style-name="List_20_Bullet_20_Tight">XTAL2 (4MHz)</text:p>
        </text:list-item>
        <text:list-item>
          <text:p text:style-name="List_20_Bullet_20_Tight">TCO (N C)</text:p>
        </text:list-item>
        <text:list-item>
          <text:p text:style-name="List_20_Bullet_20_Tight">TDO (N C)</text:p>
        </text:list-item>
      </text:list>
      <text:p text:style-name="First_20_paragraph"><text:span text:style-name="Strong_20_Emphasis">Timer A</text:span> (Event Count Mode)</text:p>
      <text:list text:style-name="List_20_1">
        <text:list-item>
          <text:p text:style-name="List_20_Bullet_20_Tight">TAO (N C)</text:p>
        </text:list-item>
        <text:list-item>
          <text:p text:style-name="List_20_Bullet_20_Tight">TAI (CRT0 V-DISP signal)</text:p>
        </text:list-item>
      </text:list>
      <text:p text:style-name="First_20_paragraph"><text:span text:style-name="Strong_20_Emphasis">Timer B</text:span>, (Delay Mode)</text:p>
      <text:list text:style-name="List_20_1">
        <text:list-item>
          <text:p text:style-name="List_20_Bullet_20_Tight">TBO (USART serial clock)</text:p>
        </text:list-item>
        <text:list-item>
          <text:p text:style-name="List_20_Bullet_20_Tight">TBI (N C)</text:p>
        </text:list-item>
      </text:list>
      <text:p text:style-name="First_20_paragraph"><text:span text:style-name="Strong_20_Emphasis">USART</text:span> (Keyboard)</text:p>
      <text:list text:style-name="List_20_1">
        <text:list-item>
          <text:p text:style-name="List_20_Bullet_20_Tight">Rx (Reception Data)</text:p>
        </text:list-item>
        <text:list-item>
          <text:p text:style-name="List_20_Bullet_20_Tight">SI (Keyboard/Reception Data)</text:p>
        </text:list-item>
        <text:list-item>
          <text:p text:style-name="List_20_Bullet_20_Tight">RC (TBO input)</text:p>
        </text:list-item>
        <text:list-item>
          <text:p text:style-name="List_20_Bullet_20_Tight">SO (Keyboard send data)</text:p>
        </text:list-item>
        <text:list-item>
          <text:p text:style-name="List_20_Bullet_20_Tight">TC (TBO input)</text:p>
        </text:list-item>
        <text:list-item>
          <text:p text:style-name="List_20_Bullet_20_Tight">Tx (Send Data)</text:p>
        </text:list-item>
      </text:list>
      <text:p text:style-name="First_20_paragraph"><text:span text:style-name="Strong_20_Emphasis">GPIP</text:span></text:p>
      <text:list text:style-name="List_20_1">
        <text:list-item>
          <text:p text:style-name="List_20_Bullet_20_Tight">GPIP0 (RTC Alarm signal based on detection of ON/OFF)</text:p>
        </text:list-item>
        <text:list-item>
          <text:p text:style-name="List_20_Bullet_20_Tight">GPIP1 (EXPWON signal based on detection of ON/OFF)</text:p>
        </text:list-item>
        <text:list-item>
          <text:p text:style-name="List_20_Bullet_20_Tight">GPIP2 (POWER SW signal based on detection of ON/OFF)</text:p>
        </text:list-item>
        <text:list-item>
          <text:p text:style-name="List_20_Bullet_20_Tight">GPIP3(VCC2 drop signal detection)</text:p>
        </text:list-item>
        <text:list-item>
          <text:p text:style-name="List_20_Bullet_20_Tight">GPIP4 (CRT0 V-DISP signal detection)</text:p>
        </text:list-item>
        <text:list-item>
          <text:p text:style-name="List_20_Bullet_20_Tight">GPIP5 (RTC CLKOUT (1Hz) signal)</text:p>
        </text:list-item>
        <text:list-item>
          <text:p text:style-name="List_20_Bullet_20_Tight">GPIP6 (RTC 1QR signal)</text:p>
        </text:list-item>
        <text:list-item>
          <text:p text:style-name="List_20_Bullet_20_Tight">GPIP7 (CRT0 H-SYNC signal)</text:p>
        </text:list-item>
      </text:list>
      <text:p text:style-name="First_20_paragraph"><text:span text:style-name="Strong_20_Emphasis">Interrupt Control</text:span></text:p>
      <text:list text:style-name="List_20_1">
        <text:list-item>
          <text:p text:style-name="List_20_Bullet_20_Tight">IRQ</text:p>
        </text:list-item>
        <text:list-item>
          <text:p text:style-name="List_20_Bullet_20_Tight">IEI</text:p>
        </text:list-item>
        <text:list-item>
          <text:p text:style-name="List_20_Bullet_20_Tight">IEO</text:p>
        </text:list-item>
        <text:list-item>
          <text:p text:style-name="List_20_Bullet_20_Tight">IACK</text:p>
        </text:list-item>
      </text:list>
      <text:p text:style-name="First_20_paragraph"><text:span text:style-name="Strong_20_Emphasis">Data</text:span> (8) <text:span text:style-name="Strong_20_Emphasis">Register</text:span> select (5) <text:span text:style-name="Strong_20_Emphasis">CS R/W DS DTACK</text:span></text:p>
      <text:p text:style-name="Text_20_body"><text:span text:style-name="Strong_20_Emphasis">CPU Bus I/O</text:span></text:p>
      <text:p text:style-name="Text_20_body"><text:span text:style-name="Strong_20_Emphasis">Figure 8-3 MFP Block Diagram</text:span></text:p>
      <text:p text:style-name="Text_20_body"><draw:frame draw:name="img10" svg:width="480.0pt" svg:height="141.12pt"><draw:image xlink:href="Pictures/9.png" xlink:type="simple" xlink:show="embed" xlink:actuate="onLoad"/></draw:frame></text:p>
      <text:p text:style-name="Text_20_body">Page 46</text:p>
      <text:p text:style-name="Text_20_body">&lt;68901MFP Interrupts, Read Address Channel&gt;</text:p>
      <text:p text:style-name="Text_20_body">Decoder</text:p>
      <text:p text:style-name="Text_20_body">68000MPU</text:p>
      <text:p text:style-name="Text_20_body">| High | INT7 IPL0 | Priority | INT6 IPL1 | Priority | INT5 IPL2 | Priority | INT4 | Low | INT3 | | INT2 | | INT1</text:p>
      <text:p text:style-name="Text_20_body">| Priority bits: High | 15 | GPIP7 (CRTC's H-SYNC signal)</text:p>
      <text:p text:style-name="Preformatted_20_Text"><text:s text:c="14"/>14 <text:s text:c="2"/>| GPIP6 (CPTC's IRQ signal)</text:p>
      <text:p text:style-name="Preformatted_20_Text"><text:s text:c="14"/>13 <text:s text:c="2"/>| TimerA (CPTC V-DISP signal)</text:p>
      <text:p text:style-name="Preformatted_20_Text"><text:s text:c="14"/>12 <text:s text:c="2"/>| Receive Buffer Full (Data reception)</text:p>
      <text:p text:style-name="Preformatted_20_Text"><text:s text:c="14"/>11 <text:s text:c="2"/>| Receive Error (Data reception error)</text:p>
      <text:p text:style-name="Preformatted_20_Text"><text:s text:c="14"/>10 <text:s text:c="2"/>| Transmit Buffer Empty (Data transmission)</text:p>
      <text:p text:style-name="Preformatted_20_Text"><text:s text:c="15"/>9 <text:s text:c="2"/>| Transmit Error (Data transmission error)</text:p>
      <text:p text:style-name="Preformatted_20_Text"><text:s text:c="15"/>8 <text:s text:c="2"/>| TimerB (USART serial clock)</text:p>
      <text:p text:style-name="Preformatted_20_Text"><text:s text:c="15"/>7 <text:s text:c="2"/>| GPIP5 (RTC 1Hz clock signal)</text:p>
      <text:p text:style-name="Preformatted_20_Text"><text:s text:c="15"/>6 <text:s text:c="2"/>| GPIP4 (CRTC V-DISP signal monitor)</text:p>
      <text:p text:style-name="Preformatted_20_Text"><text:s text:c="15"/>5 <text:s text:c="2"/>| TimerC (General 8-bit timer)</text:p>
      <text:p text:style-name="Preformatted_20_Text"><text:s text:c="15"/>4 <text:s text:c="2"/>| TimerD (General 8-bit timer)</text:p>
      <text:p text:style-name="Preformatted_20_Text"><text:s text:c="15"/>3 <text:s text:c="2"/>| GPIP3 (Power supply detection)</text:p>
      <text:p text:style-name="Preformatted_20_Text"><text:s text:c="15"/>2 <text:s text:c="2"/>| GPIP2 (POWER SW ON/OFF detection)</text:p>
      <text:p text:style-name="Preformatted_20_Text"><text:s text:c="15"/>1 <text:s text:c="2"/>| GPIP1 (Expansion slot detection or EXPWON signal ON/OFF detection)</text:p>
      <text:p text:style-name="First_20_paragraph">Low | 0 | GPIP0 (RTC ALARM signal ON/OFF detection)</text:p>
      <text:p text:style-name="Text_20_body">Figure 8-4 MFP interrupt block diagram</text:p>
      <text:p text:style-name="Text_20_body">(TAI) (CRTC's V-DISP signal)</text:p>
      <text:p text:style-name="Text_20_body">(4MHz)</text:p>
      <text:p text:style-name="Text_20_body">Figure 8-5 MFP timer block diagram</text:p>
      <text:p text:style-name="Text_20_body">CZ-634C-TN CZ-644C-TN</text:p>
      <text:p text:style-name="Text_20_body">Inside the main diagram:</text:p>
      <text:p text:style-name="Text_20_body">TBO terminal RC terminal TC terminal</text:p>
      <text:p text:style-name="Text_20_body">USART (x16)</text:p>
      <text:p text:style-name="Text_20_body">SI (Keyboard receive data) SO (Keyboard send data) RR (Receive status) TR (Transmit status)</text:p>
      <text:p text:style-name="Text_20_body">Box on the right side of the diagram:</text:p>
      <text:p text:style-name="Text_20_body">Asynchronous communication 2400 baud Start 1 bit, Data 8 bits No parity, Stop 1 bit</text:p>
      <text:p text:style-name="Text_20_body">Fig. 8-6 MFP USART System Block Diagram</text:p>
      <text:p text:style-name="Text_20_body"><draw:frame draw:name="img11" svg:width="480.0pt" svg:height="203.04pt"><draw:image xlink:href="Pictures/10.png" xlink:type="simple" xlink:show="embed" xlink:actuate="onLoad"/></draw:frame></text:p>
      <text:p text:style-name="Text_20_body">Table 8-4 Details of MFP Channels</text:p>
      <table:table table:name="Table21" table:style-name="Table21">
        <table:table-column table:style-name="Table21.A"/>
        <table:table-column table:style-name="Table21.B"/>
        <table:table-header-rows>
          <table:table-row>
            <table:table-cell table:style-name="TableHeaderRowCell" office:value-type="string">
              <text:p text:style-name="Table_20_Heading">Channel No.</text:p>
            </table:table-cell>
            <table:table-cell table:style-name="TableHeaderRowCell" office:value-type="string">
              <text:p text:style-name="Table_20_Heading">Function Details</text:p>
            </table:table-cell>
          </table:table-row>
        </table:table-header-rows>
        <table:table-row>
          <table:table-cell table:style-name="TableRowCell" office:value-type="string">
            <text:p text:style-name="Table_20_Contents">QPIP7</text:p>
          </table:table-cell>
          <table:table-cell table:style-name="TableRowCell" office:value-type="string">
            <text:p text:style-name="Table_20_Contents">Generates an interrupt when a rising edge of the CRTC H-SYNC signal is detected. (Set "0" to the active edge register bit) H-SYNC</text:p>
          </table:table-cell>
        </table:table-row>
        <table:table-row>
          <table:table-cell table:style-name="TableRowCell" office:value-type="string">
            <text:p text:style-name="Table_20_Contents">QPIP6</text:p>
          </table:table-cell>
          <table:table-cell table:style-name="TableRowCell" office:value-type="string">
            <text:p text:style-name="Table_20_Contents">Generates an interrupt when the programmed edge (R09(E80012H)) of the CRTC is detected, or generates an interrupt when the falling edge of the CRTC IRQ signal is detected. (Set "0" to the active edge register bit)</text:p>
          </table:table-cell>
        </table:table-row>
        <table:table-row>
          <table:table-cell table:style-name="TableRowCell" office:value-type="string">
            <text:p text:style-name="Table_20_Contents">TimerA</text:p>
          </table:table-cell>
          <table:table-cell table:style-name="TableRowCell" office:value-type="string">
            <text:p text:style-name="Table_20_Contents">Generates an interrupt when the rising edge of the CRTC V-DISP signal is detected. In Pulse Width Count Mode, generates an interrupt when the counter overflows and sets the BCD counter overflow flag.</text:p>
          </table:table-cell>
        </table:table-row>
        <table:table-row>
          <table:table-cell table:style-name="TableRowCell" office:value-type="string">
            <text:p text:style-name="Table_20_Contents">Receive Buffer Full</text:p>
          </table:table-cell>
          <table:table-cell table:style-name="TableRowCell" office:value-type="string">
            <text:p text:style-name="Table_20_Contents">Generates an interrupt when data is received by the keyboard (when reception data is transferred from the reception shift register to the reception buffer, and D07 of the reception status register is set to 1).</text:p>
          </table:table-cell>
        </table:table-row>
        <table:table-row>
          <table:table-cell table:style-name="TableRowCell" office:value-type="string">
            <text:p text:style-name="Table_20_Contents">Receive Error</text:p>
          </table:table-cell>
          <table:table-cell table:style-name="TableRowCell" office:value-type="string">
            <text:p text:style-name="Table_20_Contents">Generates an interrupt when an error occurs during data reception by the keyboard (overrun error, parity error, or frame error) and sets D06 to 1, D05 to 1, or D03 to 1 of the reception status register.</text:p>
          </table:table-cell>
        </table:table-row>
        <table:table-row>
          <table:table-cell table:style-name="TableRowCell" office:value-type="string">
            <text:p text:style-name="Table_20_Contents">Transmit Buffer Empty</text:p>
          </table:table-cell>
          <table:table-cell table:style-name="TableRowCell" office:value-type="string">
            <text:p text:style-name="Table_20_Contents">Generates an interrupt when data is transmitted from the keyboard (when transmission data is transferred from the transmission buffer to the transmission shift register, and D07 of the transmission status register is set to 1).</text:p>
          </table:table-cell>
        </table:table-row>
        <table:table-row>
          <table:table-cell table:style-name="TableRowCell" office:value-type="string">
            <text:p text:style-name="Table_20_Contents">Transmit Error</text:p>
          </table:table-cell>
          <table:table-cell table:style-name="TableRowCell" office:value-type="string">
            <text:p text:style-name="Table_20_Contents">Generates an interrupt when an error occurs during data transmission by the keyboard (unexpected acknowledgment or completion of asynchronous transmission) and sets D06 to 1 or D04 to 1 of the transmission status register.</text:p>
          </table:table-cell>
        </table:table-row>
        <table:table-row>
          <table:table-cell table:style-name="TableRowCell" office:value-type="string">
            <text:p text:style-name="Table_20_Contents">TimerB</text:p>
          </table:table-cell>
          <table:table-cell table:style-name="TableRowCell" office:value-type="string">
            <text:p text:style-name="Table_20_Contents">Generates an interrupt when the internal clock (4MHz) is input (delay mode), and changes the MFP USART (keyboard) input clock from 38400Hz to match. However, it is not used when the keyboard is utilized in serial clock mode.</text:p>
          </table:table-cell>
        </table:table-row>
        <table:table-row>
          <table:table-cell table:style-name="TableRowCell" office:value-type="string">
            <text:p text:style-name="Table_20_Contents">QPIP5</text:p>
          </table:table-cell>
          <table:table-cell table:style-name="TableRowCell" office:value-type="string">
            <text:p text:style-name="Table_20_Contents">Generates an interrupt when the state change is detected on the signal of the RTC CLKOUT(1Hz).</text:p>
          </table:table-cell>
        </table:table-row>
        <table:table-row>
          <table:table-cell table:style-name="TableRowCell" office:value-type="string">
            <text:p text:style-name="Table_20_Contents">QPIP4</text:p>
          </table:table-cell>
          <table:table-cell table:style-name="TableRowCell" office:value-type="string">
            <text:p text:style-name="Table_20_Contents">Reads the state of the CRTC V-DISP signal. When "1" and "2", it indicates the vertical sync period, and "0" when "L" indicates the vertical display period. (Interrupt cannot be generated)</text:p>
          </table:table-cell>
        </table:table-row>
        <table:table-row>
          <table:table-cell table:style-name="TableRowCell" office:value-type="string">
            <text:p text:style-name="Table_20_Contents">TimerC</text:p>
          </table:table-cell>
          <table:table-cell table:style-name="TableRowCell" office:value-type="string">
            <text:p text:style-name="Table_20_Contents">Generates an interrupt when the internal clock (4MHz) is input (delay mode), and uses the arbitrary set prescaler and BCD counter when the BCD counter reaches 00H.</text:p>
          </table:table-cell>
        </table:table-row>
        <table:table-row>
          <table:table-cell table:style-name="TableRowCell" office:value-type="string">
            <text:p text:style-name="Table_20_Contents">TimerD</text:p>
          </table:table-cell>
          <table:table-cell table:style-name="TableRowCell" office:value-type="string">
            <text:p text:style-name="Table_20_Contents">Generates an interrupt when the internal clock (4MHz) is input (delay mode), and uses the arbitrary set prescaler and BCD counter when the BCD counter reaches 00H.</text:p>
          </table:table-cell>
        </table:table-row>
      </table:table>
      <text:p text:style-name="First_20_paragraph">Channel No. / Function Details</text:p>
      <text:p text:style-name="Text_20_body">GPIP3 When Vcc2 (secondary main power source) is detected, it reads whether it has been reinserted. An "H" indicates detection of Vcc2, while a "0" indicates "L". When Vcc2 is detected, GPIP3 automatically becomes "0". However, if Vcc2 is detected again after being cut off, GPIP3 will change to "1". If GPIP3 remains "0" even after Vcc2 is detected, it signifies that the front power (POWER switch) is ON. When the POWER switch is ON, all subsequent detections will show "12" on GPIP3 instead of "0". The MPU will determine if Vcc2 is inserted and must set GPIP3 to "1" by writing "12" to E8A0 and D056 registers. Access the RTC registers with the previously saved values. Generally, reading will prevent using the port report.</text:p>
      <text:p text:style-name="Text_20_body">GPIP2<text:line-break/>The POWER switch reads whether the computer power (Vcc1) is ON or OFF. Normally, the switch state is "0" or "L" (OFF), but pressing it changes it to "1" or "H". When pressing the switch again, it reverts. Ensure the signal step prevents the malfunction.</text:p>
      <text:p text:style-name="Text_20_body">GPIP1<text:line-break/>Reads whether the computer power (Vcc1) is ON by using the EXPWON signal from the expansion bus slot. When external sources except EXPWON are given, it is "0" or "L". Verify if the computer power is ON by checking GPIP1.</text:p>
      <text:p text:style-name="Text_20_body">GPIPO<text:line-break/>Uses RTC ALARM timer to generate ALARM signals, and determines if the computer's power (Vcc1) is ON with the ALARM signal. "H" on power ON remains "H" without ALARM signals. After a minute, it goes "L". Monitoring GPIP0 within 1 minute reveals if power was ON or OFF. This signal, combinable with 1Hz and 16Hz clock pulses, can generate any status changes based on the signal power.</text:p>
      <text:p text:style-name="Text_20_body">Additionally, regarding GPIP0 to GPIP3, it checks from where the computer power was turned ON. The flowchart is shown below.</text:p>
      <text:p text:style-name="Text_20_body">[Power ON/OFF]</text:p>
      <text:p text:style-name="Text_20_body">When Vcc1 turns ON Check MFP's GPIP2</text:p>
      <text:p text:style-name="Preformatted_20_Text"><text:s text:c="20"/>"0" <text:s text:c="20"/>"1"</text:p>
      <text:p text:style-name="Preformatted_20_Text"><text:s text:c="23"/>↓ <text:s text:c="23"/>↓</text:p>
      <text:p text:style-name="First_20_paragraph">Power switch is turned ON Check MFP's GPIP1</text:p>
      <text:p text:style-name="Preformatted_20_Text"><text:s text:c="25"/>"0" <text:s text:c="26"/>"1"</text:p>
      <text:p text:style-name="Preformatted_20_Text"><text:s text:c="23"/>↓ <text:s text:c="31"/>↓</text:p>
      <text:p text:style-name="First_20_paragraph">Turned ON by the EXPWON signal from the expansion I/O slot Check MFP's GPIP0</text:p>
      <text:p text:style-name="Preformatted_20_Text"><text:s text:c="25"/>"0" <text:s text:c="45"/>"1"</text:p>
      <text:p text:style-name="Preformatted_20_Text"><text:s text:c="23"/>↓ <text:s text:c="51"/>↓</text:p>
      <text:p text:style-name="First_20_paragraph">Turned ON by the ALARM signal from the RTC ALARM timer Recheck GPIP2, GPIP1, and GPIP0. After final verification, write “00H” to system port E8E00FH to “OFF” and turn off power</text:p>
      <text:p text:style-name="Text_20_body">The page number at the bottom reads "51." The model numbers mentioned at the top right are CZ-634C-TN and CZ-644C-TN.</text:p>
      <text:p text:style-name="Text_20_body">Top Left: CZ-634C-TN CZ-644C-TN</text:p>
      <text:p text:style-name="Text_20_body">Middle Right: RS-232C Mouse Connector Pinout</text:p>
      <text:p text:style-name="Text_20_body">Bottom Center: Fig. 8-7 SCC Block Diagram</text:p>
      <text:p text:style-name="Text_20_body"><draw:frame draw:name="img12" svg:width="480.0pt" svg:height="308.16pt"><draw:image xlink:href="Pictures/11.png" xlink:type="simple" xlink:show="embed" xlink:actuate="onLoad"/></draw:frame></text:p>
      <text:p text:style-name="Text_20_body">Bottom Center:</text:p>
      <text:p text:style-name="Text_20_body">Other Labels in the Diagram: TxDA, RTSA, DTRA, D/C, A/B, RxDA, CTSA, DCDA, RxCA, CTCA, CTCS, DCDB, DTRB, CE, RD, WR, DO-D7, PCLK, TRxCA, RTSB, RxDB, IRQ, INT, INT ACK, IEI, GND, Vcc</text:p>
      <text:p text:style-name="Text_20_body">(5MHz) Vcc2, 4.7 kΩ, Vcc1, GND RTC, CTS, DSR, ST1, ST2, CI, CD, SG, FG Mouse MSCCTRL, MSDATA, GND</text:p>
      <text:p text:style-name="Text_20_body">75188 +12V, -12V, Vcc, TxD, RTS, DTR, ST1</text:p>
      <text:p text:style-name="Text_20_body">75189A (290pF × 4), RxD, CTS, DSR, RT</text:p>
      <text:p text:style-name="Text_20_body">75189A (290pF × 3), ST2, CI, CD, SG, FG</text:p>
      <text:p text:style-name="Text_20_body">Keyboard MSDATA</text:p>
      <text:p text:style-name="Text_20_body"><text:span text:style-name="Strong_20_Emphasis">8-5. SCC</text:span></text:p>
      <text:p text:style-name="Text_20_body">In this manual, the RS-232C serial communication controller is used to support the mouse. We use the Z8530 SCC for the Z8000 family. The block diagram is shown in Fig. 8-7.</text:p>
      <text:p text:style-name="Text_20_body"><draw:frame draw:name="img13" svg:width="480.0pt" svg:height="541.92pt"><draw:image xlink:href="Pictures/12.png" xlink:type="simple" xlink:show="embed" xlink:actuate="onLoad"/></draw:frame></text:p>
      <text:p text:style-name="Text_20_body">(1) Channel A (RS-232C)</text:p>
      <text:p text:style-name="Preformatted_20_Text"><text:s text:c="2"/>* Asynchronous Mode</text:p>
      <text:p text:style-name="Preformatted_20_Text"><text:s text:c="4"/>- 5, 6, 7, 8-bit character</text:p>
      <text:p text:style-name="Preformatted_20_Text"><text:s text:c="4"/>- 1, 1.5, 2 stop bits per character</text:p>
      <text:p text:style-name="Preformatted_20_Text"><text:s text:c="4"/>- Even parity, odd parity, no parity</text:p>
      <text:p text:style-name="Preformatted_20_Text"><text:s text:c="4"/>- x1, x16, x32, x64 clock rate</text:p>
      <text:p text:style-name="Preformatted_20_Text"><text:s text:c="4"/>- Block generation and detection</text:p>
      <text:p text:style-name="Preformatted_20_Text"><text:s text:c="4"/>- Parity, overrun, and framing error detection</text:p>
      <text:p text:style-name="Preformatted_20_Text"/>
      <text:p text:style-name="Preformatted_20_Text"><text:s text:c="2"/>* Synchronous Mode</text:p>
      <text:p text:style-name="Preformatted_20_Text"><text:s text:c="4"/>- Byte-oriented synchronous mode: The character synchronization can be internal, external, or either</text:p>
      <text:p text:style-name="Preformatted_20_Text"><text:s text:c="6"/>1 to 2-character synchronization</text:p>
      <text:p text:style-name="Preformatted_20_Text"><text:s text:c="6"/>The synchronization character can be 6 to 8 bits</text:p>
      <text:p text:style-name="Preformatted_20_Text"><text:s text:c="6"/>The automatic insertion or exclusion of synchronization characters</text:p>
      <text:p text:style-name="Preformatted_20_Text"><text:s text:c="6"/>CRC generation and verification</text:p>
      <text:p text:style-name="Preformatted_20_Text"><text:s text:c="4"/>- SDLC/HDLC mode: Generation and detection of address field</text:p>
      <text:p text:style-name="Preformatted_20_Text"><text:s text:c="6"/>Automatic zero insertion and deletion</text:p>
      <text:p text:style-name="Preformatted_20_Text"><text:s text:c="6"/>Automatic flag insertion between messages</text:p>
      <text:p text:style-name="Preformatted_20_Text"><text:s text:c="6"/>Detection of address field</text:p>
      <text:p text:style-name="Preformatted_20_Text"><text:s text:c="6"/>Information field protection</text:p>
      <text:p text:style-name="Preformatted_20_Text"><text:s text:c="6"/>CRC generation and verification</text:p>
      <text:p text:style-name="Preformatted_20_Text"><text:s text:c="6"/>EOP detection and escape (online escape) in SDLC loop mode</text:p>
      <text:p text:style-name="Preformatted_20_Text"/>
      <text:p text:style-name="Preformatted_20_Text"><text:s text:c="2"/>* Data Transfer Rate</text:p>
      <text:p text:style-name="Preformatted_20_Text"><text:s text:c="4"/>- Maximum 1.5 Mbits/sec (NRZ signal mode)</text:p>
      <text:p text:style-name="Preformatted_20_Text"><text:s text:c="4"/>- Maximum 375 Kbits/sec (FM encoding mode using DPLL)</text:p>
      <text:p text:style-name="Preformatted_20_Text"><text:s text:c="4"/>- Maximum 187 Kbits/sec (NRZI encoding mode using DPLL)</text:p>
      <text:p text:style-name="First_20_paragraph">(2) Channel B (Mouse)</text:p>
      <text:p text:style-name="Preformatted_20_Text"><text:s text:c="2"/>* Asynchronous Communication</text:p>
      <text:p text:style-name="Preformatted_20_Text"><text:s text:c="4"/>- Baud Rate: 4800 baud</text:p>
      <text:p text:style-name="Preformatted_20_Text"><text:s text:c="4"/>- Start Bit: 1 bit</text:p>
      <text:p text:style-name="Preformatted_20_Text"><text:s text:c="4"/>- Data Bits: 8 bits</text:p>
      <text:p text:style-name="Preformatted_20_Text"><text:s text:c="4"/>- Parity: None</text:p>
      <text:p text:style-name="Preformatted_20_Text"><text:s text:c="4"/>- Stop Bits: 2 bits</text:p>
      <text:p text:style-name="Preformatted_20_Text"><text:s text:c="4"/>- Data Bus: RXDB</text:p>
      <text:p text:style-name="Preformatted_20_Text"><text:s text:c="4"/>- Control Bus: RTSB</text:p>
      <text:p text:style-name="First_20_paragraph"><text:span text:style-name="Strong_20_Emphasis">(3) SCC Register Details</text:span></text:p>
      <text:p text:style-name="Text_20_body">For the access to each write/read register (write-only register WR3 and read/write register RR8 are excluded), “Command Mode” must be utilized. First, select the register to access using bits D00- D02 of WR0. After designating the accessed register, reading/writing to the data register will allow you to read/write data. Here, access to each register is configured through the reading/writing of the data.</text:p>
      <text:p text:style-name="Text_20_body">Also, concerning the access to write-only register WR8 and read/write register RR8, you can read/write data by accessing the Data Port. Table 8-5 shows the baud rate generator clock number for each baud rate.</text:p>
      <text:p text:style-name="Text_20_body"><text:span text:style-name="Strong_20_Emphasis">Table 8-5 Clock number for each baud rat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Baud Rate</text:p>
            </table:table-cell>
            <table:table-cell table:style-name="TableHeaderRowCell" office:value-type="string">
              <text:p text:style-name="Table_20_Heading">Clock for 5MHz (in hexadecimal)</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9600</text:p>
          </table:table-cell>
          <table:table-cell table:style-name="TableRowCell" office:value-type="string">
            <text:p text:style-name="Table_20_Contents">(14(000EH))</text:p>
          </table:table-cell>
          <table:table-cell table:style-name="TableRowCell" office:value-type="string">
            <text:p text:style-name="Table_20_Contents">5×10^6</text:p>
          </table:table-cell>
        </table:table-row>
        <table:table-row>
          <table:table-cell table:style-name="TableRowCell" office:value-type="string">
            <text:p text:style-name="Table_20_Contents">4800</text:p>
          </table:table-cell>
          <table:table-cell table:style-name="TableRowCell" office:value-type="string">
            <text:p text:style-name="Table_20_Contents">(31(001FH))</text:p>
          </table:table-cell>
          <table:table-cell table:style-name="TableRowCell" office:value-type="string">
            <text:p text:style-name="Table_20_Contents">Clock number = ---------</text:p>
          </table:table-cell>
        </table:table-row>
        <table:table-row>
          <table:table-cell table:style-name="TableRowCell" office:value-type="string">
            <text:p text:style-name="Table_20_Contents">2400</text:p>
          </table:table-cell>
          <table:table-cell table:style-name="TableRowCell" office:value-type="string">
            <text:p text:style-name="Table_20_Contents">(63(003FH))</text:p>
          </table:table-cell>
          <table:table-cell table:style-name="TableRowCell" office:value-type="string">
            <text:p text:style-name="Table_20_Contents">2</text:p>
          </table:table-cell>
        </table:table-row>
        <table:table-row>
          <table:table-cell table:style-name="TableRowCell" office:value-type="string">
            <text:p text:style-name="Table_20_Contents">1200</text:p>
          </table:table-cell>
          <table:table-cell table:style-name="TableRowCell" office:value-type="string">
            <text:p text:style-name="Table_20_Contents">(128(0080H))</text:p>
          </table:table-cell>
          <table:table-cell table:style-name="TableRowCell" office:value-type="string">
            <text:p text:style-name="Table_20_Contents">2 × (Baud rate × 16)</text:p>
          </table:table-cell>
        </table:table-row>
        <table:table-row>
          <table:table-cell table:style-name="TableRowCell" office:value-type="string">
            <text:p text:style-name="Table_20_Contents">600</text:p>
          </table:table-cell>
          <table:table-cell table:style-name="TableRowCell" office:value-type="string">
            <text:p text:style-name="Table_20_Contents">(258(0102H))</text:p>
          </table:table-cell>
          <table:table-cell table:style-name="TableRowCell" office:value-type="string">
    </table:table-cell>
        </table:table-row>
        <table:table-row>
          <table:table-cell table:style-name="TableRowCell" office:value-type="string">
            <text:p text:style-name="Table_20_Contents">300</text:p>
          </table:table-cell>
          <table:table-cell table:style-name="TableRowCell" office:value-type="string">
            <text:p text:style-name="Table_20_Contents">(519(0207H))</text:p>
          </table:table-cell>
          <table:table-cell table:style-name="TableRowCell" office:value-type="string">
            <text:p text:style-name="Table_20_Contents">However, when the input clock (PCLK) is 5MHz</text:p>
          </table:table-cell>
        </table:table-row>
        <table:table-row>
          <table:table-cell table:style-name="TableRowCell" office:value-type="string">
            <text:p text:style-name="Table_20_Contents">150</text:p>
          </table:table-cell>
          <table:table-cell table:style-name="TableRowCell" office:value-type="string">
            <text:p text:style-name="Table_20_Contents">(1040(0410H))</text:p>
          </table:table-cell>
          <table:table-cell table:style-name="TableRowCell" office:value-type="string">
            <text:p text:style-name="Table_20_Contents">and data speed uses a 16x clock.</text:p>
          </table:table-cell>
        </table:table-row>
        <table:table-row>
          <table:table-cell table:style-name="TableRowCell" office:value-type="string">
            <text:p text:style-name="Table_20_Contents">75</text:p>
          </table:table-cell>
          <table:table-cell table:style-name="TableRowCell" office:value-type="string">
            <text:p text:style-name="Table_20_Contents">(2081(0821H))</text:p>
          </table:table-cell>
          <table:table-cell table:style-name="TableRowCell" office:value-type="string">
    </table:table-cell>
        </table:table-row>
      </table:table>
      <text:p text:style-name="First_20_paragraph"><text:span text:style-name="Strong_20_Emphasis">8-6. RTC</text:span> This machine uses RP5C15 as the Real-Time Clock (RTC).</text:p>
      <text:p text:style-name="Text_20_body"><text:span text:style-name="Strong_20_Emphasis">RTC Block Diagram</text:span></text:p>
      <text:p text:style-name="Text_20_body">+-----------------------------+ | RP5C15 | | | | +-------------------------+ | | | Address (4-bit) | | | | Data (4-bit) | | | | Control | | | | Battery Backup/Vcc2 | | | +-------------------------+ | | | | | +---------------+ | | |CKOUT (1Hz) Clock | | +---------------+ | | | | | ALARM (Alarm signal, 1Hz, | | 16Hz Clock) | | | | +-------------|---------------+</text:p>
      <text:p text:style-name="Text_20_body">| | | | | +------------------------+ | | GPI(PF) | | | Write/Read | | +------------------------+ | | +------- POWER LED &amp; TIMER LED ON/OFF</text:p>
      <text:p text:style-name="Text_20_body">| | | | | +------------------------+ | | GPI(PF) | | | Read | | +------------------------+ | | +--------+</text:p>
      <text:p text:style-name="Text_20_body"/>
      <text:p text:style-name="Text_20_body">This RP5C15 has the following features with the same READ/WRITE sequence of the memory providing the settings and reading outputs of time using real-time clock.</text:p>
      <text:p text:style-name="Text_20_body">(1) Possible to connect directly to the 16-bit CPU and allows high-speed access (2) Address and data bus (D00-D03) (3) 4-bit address input (4) Embedded counter (year, month, day, hour, minute, second) calendar (supports until the year 2099) (5) Internal alarm function (6) All time data can be displayed in BCD code (7) Internal 30 seconds adjust function (8) Battery backup possibility (requires 2.0V) (9) The alarm signal or 1Hz timing pulse can be output as 16Hz</text:p>
      <text:p text:style-name="Text_20_body"><text:span text:style-name="Emphasis">Figure 8-9 RTC Block Diagram</text:span></text:p>
      <text:p text:style-name="Text_20_body"><draw:frame draw:name="img14" svg:width="480.0pt" svg:height="375.36pt"><draw:image xlink:href="Pictures/13.png" xlink:type="simple" xlink:show="embed" xlink:actuate="onLoad"/></draw:frame></text:p>
      <text:p text:style-name="Text_20_body"><text:span text:style-name="Emphasis">Page -54-</text:span></text:p>
      <text:p text:style-name="Text_20_body">(10) 1Hz Clock Output In particular, this device uses the RP5C15’s alarm feature and clock output as follows.</text:p>
      <text:list text:style-name="List_20_1">
        <text:list-item>
          <text:p text:style-name="List_20_Bullet_20_Tight">Alarm Feature (Alarm Interrupt) It is used for setting the scheduled timer for turning on the computer's power (Vcc1 ON). When the set date and time match the current date and time, the power to the computer is turned on and the ALARM signal is output, triggering the alarm interrupt. Furthermore, the 1Hz clock output is sent to MFPO/GPIO ● input (used to divide MPFPI). Specifically, the output from ALARM is software selectable and can be executed by capturing the software interrupt signal to divide the MPFP. Also, when setting the alarm timer, the TIMER LED lights up (write “1H” in E8A0<text:span text:style-name="Strong_20_Emphasis">H's D04=1*), additionally, after writing “31H” to the system port EB800DH and enabling WRITE ENABLE, write to SRAM, then turn on the TIMER LED and finally write “0D04=1H” to E8A0</text:span>H. Set the system port EB800DH to OFF. Be sure to write SRW=READ ONLY=K, otherwise processing will be needed. (For MPFPK, re-process when Vcc2 is re-inserted).</text:p>
        </text:list-item>
        <text:list-item>
          <text:p text:style-name="List_20_Bullet_20_Tight">1Hz Clock Output The 1Hz clock is output from the CLK OUT terminal and connected to the MFPO/GPIO P5 (used to divide the 7-level interrupt input). By doing this, MPFPK division can be performed. This 1Hz signal is also used to turn on the POWER LED and the TIMER LED on the front panel. Normally, the power backup for the RP5C15 internal power is connected to Vcc2, so please make sure the power switch is absolutely OFF when using timing functions.</text:p>
        </text:list-item>
      </text:list>
      <text:list text:style-name="Numbering_20_1" text:start-value="9">
        <text:list-item>
          <text:p text:style-name="List_20_Number_20_Tight">Peripheral 9-1. Disk The device is equipped with two data-sided FDD (floppy disk drives). This FDD is controlled by FDC and µPD72065 is used. For SCSI interface machines, 80MBHDD is controlled by SCSI controller MB89352. Please refer to figure 9-1.</text:p>
        </text:list-item>
      </text:list>
      <text:p text:style-name="First_20_paragraph"><draw:frame draw:name="img15" svg:width="480.0pt" svg:height="277.92pt"><draw:image xlink:href="Pictures/14.png" xlink:type="simple" xlink:show="embed" xlink:actuate="onLoad"/></draw:frame></text:p>
      <text:p text:style-name="Text_20_body">Table 9-1 Floppy Disk Specifications</text:p>
      <text:p text:style-name="Text_20_body">| 128, 256, 512, 1,024Bytes/sector | FDCA Input Clock | Formatting Method | | 26, 16, 8 Sectors/track | 2HD(8MHz) | MFM | | 77Track/side | 2DD-2D(4MHz) | FM | | 154Track/disk | | Switchable | | (When formatted: 1.28MBytes) | | |</text:p>
      <text:p text:style-name="Text_20_body">CZ-634C-TN CZ-644C-T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Front POWER SW</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ON State</text:p>
          </table:table-cell>
          <table:table-cell table:style-name="TableRowCell" office:value-type="string">
            <text:p text:style-name="Table_20_Contents">- Green light is on when media is in FDD - Green light blinks when media is not in FDD, and LED blinking feature is ON - Off when media is not in FDD, and LED blinking feature is OFF *Note: When reading/writing to FDD (Drive Select ON, Layer ON), green changes to red</text:p>
          </table:table-cell>
          <table:table-cell table:style-name="TableRowCell" office:value-type="string">
            <text:p text:style-name="Table_20_Contents">- Off when eject switch masking feature is ON - Green light is on when media is in FDD, and eject switch masking feature is OFF</text:p>
          </table:table-cell>
        </table:table-row>
        <table:table-row>
          <table:table-cell table:style-name="TableRowCell" office:value-type="string">
            <text:p text:style-name="Table_20_Contents">OFF State</text:p>
          </table:table-cell>
          <table:table-cell table:style-name="TableRowCell" office:value-type="string">
            <text:p text:style-name="Table_20_Contents">- Green light is on when media is in FDD - Off when media is not in FDD</text:p>
          </table:table-cell>
          <table:table-cell table:style-name="TableRowCell" office:value-type="string">
            <text:p text:style-name="Table_20_Contents">- Green light is on when media is in FDD - Off when media is not in FDD</text:p>
          </table:table-cell>
        </table:table-row>
      </table:table>
      <text:list text:style-name="Numbering_20_1" text:start-value="3">
        <text:list-item>
          <text:p text:style-name="List_20_Number">Eject SW Mask Function Eject function masking feature to prevent ejection during access</text:p>
        </text:list-item>
        <text:list-item>
          <text:p text:style-name="List_20_Number">Media Insert/Eject Detection Feature Function to constantly monitor insertion and ejection of each drive</text:p>
        </text:list-item>
        <text:list-item>
          <text:p text:style-name="List_20_Number">Media Mis-insertion Detection Feature Function to detect mis-insertion of media for each drive</text:p>
        </text:list-item>
        <text:list-item>
          <text:p text:style-name="List_20_Number">Interruption Feature Function for interruption during media insertion or ejection</text:p>
        </text:list-item>
      </text:list>
      <text:p text:style-name="First_20_paragraph">Address Bus Data Bus SCSI Controller Hard Disk Control Hard Disk Data Bus</text:p>
      <text:p text:style-name="Text_20_body">HD (Hard Disk) FD (Floppy Disk)</text:p>
      <text:p text:style-name="Text_20_body">I/O Controller FDD Option Control</text:p>
      <text:p text:style-name="Text_20_body">OPTION SELECT 0~3 EJECT EJECT MASK LED BLINK FDD INT ERR DISK DISK IN TRKO6 WRITE PROTECT DRIVE SELECT 0~3</text:p>
      <text:p text:style-name="Text_20_body">FDC (µPD72065) READY INDEX DISK TYPE SELECT DIRECTION STEP WRITE GATE WRITE DATA SIDE SELECT</text:p>
      <text:p text:style-name="Text_20_body">2HD/2DD-2D Switch Vcc1 Vss 16MHz</text:p>
      <text:p text:style-name="Text_20_body">VFO Circuit (SED9420AC) MSN/STD MOTOR ON READ DATA</text:p>
      <text:p text:style-name="Text_20_body">Figure 9-1 FDD/HDD Peripheral Block Diagram</text:p>
      <text:p text:style-name="Text_20_body"><draw:frame draw:name="img16" svg:width="480.0pt" svg:height="601.92pt"><draw:image xlink:href="Pictures/15.png" xlink:type="simple" xlink:show="embed" xlink:actuate="onLoad"/></draw:frame></text:p>
      <text:p text:style-name="Text_20_body">The labels next to specific arrows relate to signals or commands connecting different components in a hard disk and floppy disk drive control system.</text:p>
      <text:p text:style-name="Text_20_body">Table 9-2 Internal FDD Specifications</text:p>
      <table:table table:name="Table24" table:style-name="Table24">
        <table:table-column table:style-name="Table24.A"/>
        <table:table-column table:style-name="Table24.B"/>
        <table:table-header-rows>
          <table:table-row>
            <table:table-cell table:style-name="TableHeaderRowCell" office:value-type="string">
              <text:p text:style-name="Table_20_Heading">Specification</text:p>
            </table:table-cell>
            <table:table-cell table:style-name="TableHeaderRowCell" office:value-type="string">
              <text:p text:style-name="Table_20_Heading">Details</text:p>
            </table:table-cell>
          </table:table-row>
        </table:table-header-rows>
        <table:table-row>
          <table:table-cell table:style-name="TableRowCell" office:value-type="string">
            <text:p text:style-name="Table_20_Contents">Memory Capacity (KBytes)</text:p>
          </table:table-cell>
          <table:table-cell table:style-name="TableRowCell" office:value-type="string">
            <text:p text:style-name="Table_20_Contents">Unformatted: 1667 Formatted: 1065 Track capacity: 10.42 IBM standard 26 sectors, 256 bytes/density mode</text:p>
          </table:table-cell>
        </table:table-row>
        <table:table-row>
          <table:table-cell table:style-name="TableRowCell" office:value-type="string">
            <text:p text:style-name="Table_20_Contents">Data Transfer Rate (Kbits/sec)</text:p>
          </table:table-cell>
          <table:table-cell table:style-name="TableRowCell" office:value-type="string">
            <text:p text:style-name="Table_20_Contents">500</text:p>
          </table:table-cell>
        </table:table-row>
        <table:table-row>
          <table:table-cell table:style-name="TableRowCell" office:value-type="string">
            <text:p text:style-name="Table_20_Contents">Access Time (msec)</text:p>
          </table:table-cell>
          <table:table-cell table:style-name="TableRowCell" office:value-type="string">
            <text:p text:style-name="Table_20_Contents">Track Read Time: 3 Seek and Settling Time: 15 Average Access Time: 95 Seek wait time during shifting = Track shift time + Seek and Settling Time Average Access Time = Average Track Shift Time + Seek and Settling Time</text:p>
          </table:table-cell>
        </table:table-row>
        <table:table-row>
          <table:table-cell table:style-name="TableRowCell" office:value-type="string">
            <text:p text:style-name="Table_20_Contents">Media Rotation Speed (rpm)</text:p>
          </table:table-cell>
          <table:table-cell table:style-name="TableRowCell" office:value-type="string">
            <text:p text:style-name="Table_20_Contents">360</text:p>
          </table:table-cell>
        </table:table-row>
        <table:table-row>
          <table:table-cell table:style-name="TableRowCell" office:value-type="string">
            <text:p text:style-name="Table_20_Contents">Spindle Motor Startup Time (sec)</text:p>
          </table:table-cell>
          <table:table-cell table:style-name="TableRowCell" office:value-type="string">
            <text:p text:style-name="Table_20_Contents">0.5</text:p>
          </table:table-cell>
        </table:table-row>
        <table:table-row>
          <table:table-cell table:style-name="TableRowCell" office:value-type="string">
            <text:p text:style-name="Table_20_Contents">Maximum Internal Recording Density (BPI)</text:p>
          </table:table-cell>
          <table:table-cell table:style-name="TableRowCell" office:value-type="string">
            <text:p text:style-name="Table_20_Contents">9870</text:p>
          </table:table-cell>
        </table:table-row>
        <table:table-row>
          <table:table-cell table:style-name="TableRowCell" office:value-type="string">
            <text:p text:style-name="Table_20_Contents">Number of Tracks</text:p>
          </table:table-cell>
          <table:table-cell table:style-name="TableRowCell" office:value-type="string">
            <text:p text:style-name="Table_20_Contents">TRACK/SIDE: 77 TRACK/DISK: 154</text:p>
          </table:table-cell>
        </table:table-row>
        <table:table-row>
          <table:table-cell table:style-name="TableRowCell" office:value-type="string">
            <text:p text:style-name="Table_20_Contents">Track Density (TPI)</text:p>
          </table:table-cell>
          <table:table-cell table:style-name="TableRowCell" office:value-type="string">
            <text:p text:style-name="Table_20_Contents">96</text:p>
          </table:table-cell>
        </table:table-row>
        <table:table-row>
          <table:table-cell table:style-name="TableRowCell" office:value-type="string">
            <text:p text:style-name="Table_20_Contents">Number of Heads</text:p>
          </table:table-cell>
          <table:table-cell table:style-name="TableRowCell" office:value-type="string">
            <text:p text:style-name="Table_20_Contents">2</text:p>
          </table:table-cell>
        </table:table-row>
        <table:table-row>
          <table:table-cell table:style-name="TableRowCell" office:value-type="string">
            <text:p text:style-name="Table_20_Contents">Encoding Method</text:p>
          </table:table-cell>
          <table:table-cell table:style-name="TableRowCell" office:value-type="string">
            <text:p text:style-name="Table_20_Contents">MFM FM method possible</text:p>
          </table:table-cell>
        </table:table-row>
        <table:table-row>
          <table:table-cell table:style-name="TableRowCell" office:value-type="string">
            <text:p text:style-name="Table_20_Contents">External Dimensions (mm)</text:p>
          </table:table-cell>
          <table:table-cell table:style-name="TableRowCell" office:value-type="string">
            <text:p text:style-name="Table_20_Contents">27.0 (H) × 148.0 (W) × 198.0 (D)</text:p>
          </table:table-cell>
        </table:table-row>
        <table:table-row>
          <table:table-cell table:style-name="TableRowCell" office:value-type="string">
            <text:p text:style-name="Table_20_Contents">Weight</text:p>
          </table:table-cell>
          <table:table-cell table:style-name="TableRowCell" office:value-type="string">
            <text:p text:style-name="Table_20_Contents">900g</text:p>
          </table:table-cell>
        </table:table-row>
        <table:table-row>
          <table:table-cell table:style-name="TableRowCell" office:value-type="string">
            <text:p text:style-name="Table_20_Contents">Others</text:p>
          </table:table-cell>
          <table:table-cell table:style-name="TableRowCell" office:value-type="string">
            <text:p text:style-name="Table_20_Contents">Auto Clamp Eject Mechanism, Auto Carriage Return Mechanism, VFO (SED9420AC)</text:p>
          </table:table-cell>
        </table:table-row>
      </table:table>
      <text:p text:style-name="First_20_paragraph">Table 9-3 Internal HDD Specifications</text:p>
      <text:p text:style-name="Text_20_body">Memory Capacity Formatted: 85,800 (kBytes) Track Capacity: Inner: 20,992 / Outer: 27,648</text:p>
      <text:p text:style-name="Text_20_body">Data Transfer Speed (Mbits/sec): Inner: 10 / Outer: 13</text:p>
      <text:p text:style-name="Text_20_body">Access Time (msec): Average Access Time: 19</text:p>
      <text:p text:style-name="Text_20_body">Disk Rotation Speed (rpm): 2,975 ±1%</text:p>
      <text:p text:style-name="Text_20_body">Recording Density (BPI): 31,500</text:p>
      <text:p text:style-name="Text_20_body">Number of Tracks:</text:p>
      <text:p text:style-name="Preformatted_20_Text"><text:s text:c="2"/>TRACK/SIDE: 868</text:p>
      <text:p text:style-name="Preformatted_20_Text"><text:s text:c="2"/>TRACK/DRIVE: 3,472</text:p>
      <text:p text:style-name="First_20_paragraph">Track Density (TPI): 1,300</text:p>
      <text:p text:style-name="Text_20_body">Number of Heads:</text:p>
      <text:p text:style-name="Text_20_body">Recording Method:</text:p>
      <text:p text:style-name="Preformatted_20_Text"><text:s text:c="2"/>RLL2-7</text:p>
      <text:p text:style-name="Preformatted_20_Text"/>
      <text:p text:style-name="Preformatted_20_Text">Other:</text:p>
      <text:p text:style-name="Preformatted_20_Text"><text:s text:c="2"/>Built-in Disk Controller</text:p>
      <text:p text:style-name="Preformatted_20_Text"><text:s text:c="2"/>Interface = SCSI</text:p>
      <text:p text:style-name="First_20_paragraph">(Page 59)</text:p>
      <text:p text:style-name="Text_20_body">&lt;CZ-634C-TN CZ-634C-TN</text:p>
      <text:p text:style-name="Text_20_body">Table 9-4 Comparison of µPD72065 and M88877A</text:p>
      <text:p text:style-name="Text_20_body">µPD72065 M88877A -checks for Read/Write execution result (status) -checks for Read/Write execution result (status) are performed by polling. are performed by polling. -requires I/O ports for driver select, head select -requires I/O ports for driver select, head select signal output. signal output. -each drive's current track position is maintained -each drive's current track position is maintained</text:p>
      <text:p text:style-name="Preformatted_20_Text"><text:s text:c="3"/>within the FD, making program handling easy. <text:s text:c="21"/>in the main RAM, necessitating allocation</text:p>
      <text:p text:style-name="Preformatted_20_Text"><text:s text:c="73"/>of track numbers, making program handling</text:p>
      <text:p text:style-name="Preformatted_20_Text"><text:s text:c="73"/>slightly more complex.</text:p>
      <text:p text:style-name="First_20_paragraph">-Formatting is possible simply by giving -For formatting, data for one track (6KB~8KB)</text:p>
      <text:p text:style-name="Preformatted_20_Text"><text:s text:c="3"/>a byte of data command to the FDC. <text:s text:c="31"/>is needed, making program handling slightly</text:p>
      <text:p text:style-name="Preformatted_20_Text"><text:s text:c="75"/>more complex.</text:p>
      <text:p text:style-name="First_20_paragraph">-Depending on the type of error, command -Depending on the type of error, it may not be reset,</text:p>
      <text:p text:style-name="Preformatted_20_Text"><text:s text:c="2"/>may not reset correctly. (e.g. EX) With <text:s text:c="28"/>e.g. EX) may not return from hang-up while reading,</text:p>
      <text:p text:style-name="Preformatted_20_Text"><text:s text:c="2"/>hang-ups in media, the drive may not return <text:s text:c="23"/>pulling out the media, etc.</text:p>
      <text:p text:style-name="Preformatted_20_Text"><text:s text:c="2"/>to normal state if ejected.</text:p>
      <text:p text:style-name="First_20_paragraph">9-2. Printer This machine, like the X1&amp;X1turbo series, is equipped with an 8-bit parallel printer I/F according to Centronics standard.</text:p>
      <text:p text:style-name="Text_20_body">To send a byte of data to the printer from this machine, control signals and BUSY signals use STROBE signals. The BUSY signal is active low, preventing data transmission when the level is "H". That is, it waits until the BUSY signal goes "L" for transmission. Also, the STROBE signal is the output signal to the printer. The printer samples data on the rising edge of this STROBE signal. Therefore, be careful when issuing the STROBE signal as before issuing, it is not possible to guarantee the data will be latched in the ECO011 Data Latch Register.</text:p>
      <text:p text:style-name="Text_20_body">This machine can accept BUSY signal interrupt requests, allowing software masks. Using this function avoids the need to request BUSY signal checks, knowing printer status through interrupts.</text:p>
      <text:p text:style-name="Text_20_body">Table 9-5 Printer Register Map</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column table:style-name="Table25.I"/>
        <table:table-column table:style-name="Table25.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8C001H</text:p>
          </table:table-cell>
          <table:table-cell table:style-name="TableRowCell" office:value-type="string">
            <text:p text:style-name="Table_20_Contents">←-------- Printer Output Data --------→</text:p>
          </table:table-cell>
          <table:table-cell table:style-name="TableRowCell" office:value-type="string">
            <text:p text:style-name="Table_20_Contents">Printer Data Register (Write Operation Onl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C00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STRO</text:p>
          </table:table-cell>
          <table:table-cell table:style-name="TableRowCell" office:value-type="string">
            <text:p text:style-name="Table_20_Contents">Printer Strobe Register (Write Operation Only)</text:p>
          </table:table-cell>
          <table:table-cell table:style-name="TableRowCell" office:value-type="string">
    </table:table-cell>
        </table:table-row>
        <table:table-row>
          <table:table-cell table:style-name="TableRowCell" office:value-type="string">
            <text:p text:style-name="Table_20_Contents">E9C**1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Write Operation Onl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Preformatted_20_Text"><text:s text:c="3"/>| | | | | 0 - Printer Busy Interrupt Mask</text:p>
      <text:p text:style-name="Preformatted_20_Text"><text:s text:c="3"/>| | | | | 1 - Printer Busy Interrupt Mask Disable</text:p>
      <text:p text:style-name="Preformatted_20_Text"><text:s text:c="3"/>| | | | | 0 - FDD Interrupt Mask</text:p>
      <text:p text:style-name="Preformatted_20_Text"><text:s text:c="3"/>| | | | | 1 - FDD Interrupt Mask Disable</text:p>
      <text:p text:style-name="Preformatted_20_Text"><text:s text:c="3"/>| | | | | 0 - FDC Interrupt Mask</text:p>
      <text:p text:style-name="Preformatted_20_Text"><text:s text:c="3"/>| | | | | 1 - FDC Interrupt Mask Disable</text:p>
      <text:p text:style-name="First_20_paragraph">E9C**1H | | | | | (Read Operation Only)</text:p>
      <text:p text:style-name="Preformatted_20_Text"><text:s text:c="3"/>| | | | | 0 - Printer Busy Interrupt Mask Enabled</text:p>
      <text:p text:style-name="Preformatted_20_Text"><text:s text:c="3"/>| | | | | 1 - Printer Busy Interrupt Mask Disabled</text:p>
      <text:p text:style-name="Preformatted_20_Text"><text:s text:c="3"/>| | | | | 0 - FDD Interrupt Mask Enabled</text:p>
      <text:p text:style-name="Preformatted_20_Text"><text:s text:c="3"/>| | | | | 1 - FDD Interrupt Mask Disabled</text:p>
      <text:p text:style-name="Preformatted_20_Text"><text:s text:c="3"/>| | | | | 0 - FDC Interrupt Mask Enabled</text:p>
      <text:p text:style-name="Preformatted_20_Text"><text:s text:c="3"/>| | | | | 1 - FDC Interrupt Mask Disabled</text:p>
      <text:p text:style-name="Preformatted_20_Text"/>
      <text:p text:style-name="Preformatted_20_Text"><text:s text:c="3"/>| | | | → 0 - Printer Busy Interrupt ON (BUSY=0) - Printer Data Transmission Permitted</text:p>
      <text:p text:style-name="Preformatted_20_Text"><text:s text:c="3"/>| | | | → 1 - Printer Busy Interrupt OFF (BUSY=1) - Printer Data Transmission Not Permitted</text:p>
      <text:p text:style-name="Preformatted_20_Text"><text:s text:c="3"/>| | | | → 0 - FDD Interrupt ON</text:p>
      <text:p text:style-name="Preformatted_20_Text"><text:s text:c="3"/>| | | | → 1 - FDD Interrupt OFF</text:p>
      <text:p text:style-name="Preformatted_20_Text"><text:s text:c="3"/>| | | | → 0 - FDC Interrupt ON</text:p>
      <text:p text:style-name="Preformatted_20_Text"><text:s text:c="3"/>| | | | → 1 - FDC Interrupt OFF</text:p>
      <text:p text:style-name="First_20_paragraph">E9C**3H | Interrupt Vector | → | 1 | 1 | Printer Busy Interrupt Vector</text:p>
      <text:p text:style-name="Text_20_body">9-3. Joystick</text:p>
      <text:p text:style-name="Preformatted_20_Text"><text:s text:c="4"/>On X1, X1turbo series, PSG register 14, 15 were used to access two joysticks, but this machine uses the 8255 port and can use two joysticks. Note, if using two joystick inputs, set the upper 4 bits (D04-D07) of E9A005H to "0" as shown below:</text:p>
      <text:p text:style-name="Preformatted_20_Text"/>
      <text:p text:style-name="Preformatted_20_Text"><text:s text:c="14"/>mPD8255</text:p>
      <text:p text:style-name="First_20_paragraph">Address -------&gt; portA ------------&gt; Joystick No.1</text:p>
      <text:p text:style-name="Preformatted_20_Text"><text:s text:c="18"/>portB ------------&gt; Joystick No.2</text:p>
      <text:p text:style-name="Preformatted_20_Text"><text:s text:c="18"/>portC ------------&gt; Sound Synthesis PCM Control</text:p>
      <text:p text:style-name="First_20_paragraph">Figure 9-2 Joystick Block Diagram</text:p>
      <text:p text:style-name="Text_20_body"><draw:frame draw:name="img17" svg:width="480.0pt" svg:height="363.84pt"><draw:image xlink:href="Pictures/16.png" xlink:type="simple" xlink:show="embed" xlink:actuate="onLoad"/></draw:frame></text:p>
      <table:table table:name="Table26" table:style-name="Table26">
        <table:table-column table:style-name="Table26.A"/>
        <table:table-column table:style-name="Table26.B"/>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7 D6 D5 D4 D3 D2 D1 D0</text:p>
            </table:table-cell>
          </table:table-row>
        </table:table-header-rows>
        <table:table-row>
          <table:table-cell table:style-name="TableRowCell" office:value-type="string">
            <text:p text:style-name="Table_20_Contents">E9A001H</text:p>
          </table:table-cell>
          <table:table-cell table:style-name="TableRowCell" office:value-type="string">
            <text:p text:style-name="Table_20_Contents">* &lt;--- Joystick No.1</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3H</text:p>
          </table:table-cell>
          <table:table-cell table:style-name="TableRowCell" office:value-type="string">
            <text:p text:style-name="Table_20_Contents">* &lt;--- Joystick No.2</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5H</text:p>
          </table:table-cell>
          <table:table-cell table:style-name="TableRowCell" office:value-type="string">
            <text:p text:style-name="Table_20_Contents">IOC7 IOC6 IOC5 IOC4 Sampling Rate PCM PAN</text:p>
          </table:table-cell>
        </table:table-row>
      </table:table>
      <text:p text:style-name="First_20_paragraph">Table 9-6 Joystick Register Address Map</text:p>
      <text:p text:style-name="Text_20_body">(1) Set 8255 to mode 92H to specify E9A007H B921. (2) Set the joystick standard mode A to specify all 0 with E9A005H (Port C) higher 4 bits (D04~D07) as 0. (3) Read Joystick Input Data No. 1 from E9A001H. Also, if reading Joystick Input Data No. 2, read from E9A003H.</text:p>
      <text:p text:style-name="Text_20_body">9-4 Expansion I/O Slot</text:p>
      <text:p text:style-name="Text_20_body">(1) Most of the signals that appear on the expansion I/O slot are signals of the same timing when the MPU operates in 16MHz mode or in 10MHz mode.</text:p>
      <text:p text:style-name="Preformatted_20_Text"><text:s text:c="2"/>- This makes it possible to use peripheral boards for the X68000 even in 16MHz mode.</text:p>
      <text:p text:style-name="Preformatted_20_Text"><text:s text:c="2"/>- However, depending on the board, subtle timing differences in the hardware and software might cause operational issues, so caution is necessary.</text:p>
      <text:p text:style-name="First_20_paragraph">(2) If the device on the expansion I/O slot becomes bus master and accesses the system's devices, all signals given by the board to the system must be in the same timing as at the time of 10MHz mode.</text:p>
      <text:p text:style-name="Text_20_body">Extension I/O Socket Terminal (A)</text:p>
      <table:table table:name="Table27" table:style-name="Table27">
        <table:table-column table:style-name="Table27.A"/>
        <table:table-column table:style-name="Table27.B"/>
        <table:table-column table:style-name="Table27.C"/>
        <table:table-column table:style-name="Table27.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20M</text:p>
          </table:table-cell>
          <table:table-cell table:style-name="TableRowCell" office:value-type="string">
            <text:p text:style-name="Table_20_Contents">Out</text:p>
          </table:table-cell>
          <table:table-cell table:style-name="TableRowCell" office:value-type="string">
            <text:p text:style-name="Table_20_Contents">20MHz Clock</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text:p>
          </table:table-cell>
          <table:table-cell table:style-name="TableRowCell" office:value-type="string">
            <text:p text:style-name="Table_20_Contents">DB0</text:p>
          </table:table-cell>
          <table:table-cell table:style-name="TableRowCell" office:value-type="string">
            <text:p text:style-name="Table_20_Contents">I/O</text:p>
          </table:table-cell>
          <table:table-cell table:style-name="TableRowCell" office:value-type="string">
            <text:p text:style-name="Table_20_Contents">Data</text:p>
          </table:table-cell>
        </table:table-row>
        <table:table-row>
          <table:table-cell table:style-name="TableRowCell" office:value-type="string">
            <text:p text:style-name="Table_20_Contents">5</text:p>
          </table:table-cell>
          <table:table-cell table:style-name="TableRowCell" office:value-type="string">
            <text:p text:style-name="Table_20_Contents">DB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DB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DB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DB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DB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DB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DB7</text:p>
          </table:table-cell>
          <table:table-cell table:style-name="TableRowCell" office:value-type="string">
            <text:p text:style-name="Table_20_Contents">I/O</text:p>
          </table:table-cell>
          <table:table-cell table:style-name="TableRowCell" office:value-type="string">
            <text:p text:style-name="Table_20_Contents">Data</text:p>
          </table:table-cell>
        </table:table-row>
        <table:table-row>
          <table:table-cell table:style-name="TableRowCell" office:value-type="string">
            <text:p text:style-name="Table_20_Contents">13</text:p>
          </table:table-cell>
          <table:table-cell table:style-name="TableRowCell" office:value-type="string">
            <text:p text:style-name="Table_20_Contents">DB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4</text:p>
          </table:table-cell>
          <table:table-cell table:style-name="TableRowCell" office:value-type="string">
            <text:p text:style-name="Table_20_Contents">DB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5</text:p>
          </table:table-cell>
          <table:table-cell table:style-name="TableRowCell" office:value-type="string">
            <text:p text:style-name="Table_20_Contents">DB1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6</text:p>
          </table:table-cell>
          <table:table-cell table:style-name="TableRowCell" office:value-type="string">
            <text:p text:style-name="Table_20_Contents">DB1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7</text:p>
          </table:table-cell>
          <table:table-cell table:style-name="TableRowCell" office:value-type="string">
            <text:p text:style-name="Table_20_Contents">DB1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8</text:p>
          </table:table-cell>
          <table:table-cell table:style-name="TableRowCell" office:value-type="string">
            <text:p text:style-name="Table_20_Contents">DB1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9</text:p>
          </table:table-cell>
          <table:table-cell table:style-name="TableRowCell" office:value-type="string">
            <text:p text:style-name="Table_20_Contents">DB1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0</text:p>
          </table:table-cell>
          <table:table-cell table:style-name="TableRowCell" office:value-type="string">
            <text:p text:style-name="Table_20_Contents">DB1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4</text:p>
          </table:table-cell>
          <table:table-cell table:style-name="TableRowCell" office:value-type="string">
            <text:p text:style-name="Table_20_Contents">FC0</text:p>
          </table:table-cell>
          <table:table-cell table:style-name="TableRowCell" office:value-type="string">
            <text:p text:style-name="Table_20_Contents">I/O</text:p>
          </table:table-cell>
          <table:table-cell table:style-name="TableRowCell" office:value-type="string">
            <text:p text:style-name="Table_20_Contents">Function Code (Indicates the state of MPU execution)</text:p>
          </table:table-cell>
        </table:table-row>
        <table:table-row>
          <table:table-cell table:style-name="TableRowCell" office:value-type="string">
            <text:p text:style-name="Table_20_Contents">25</text:p>
          </table:table-cell>
          <table:table-cell table:style-name="TableRowCell" office:value-type="string">
            <text:p text:style-name="Table_20_Contents">FC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6</text:p>
          </table:table-cell>
          <table:table-cell table:style-name="TableRowCell" office:value-type="string">
            <text:p text:style-name="Table_20_Contents">FC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7</text:p>
          </table:table-cell>
          <table:table-cell table:style-name="TableRowCell" office:value-type="string">
            <text:p text:style-name="Table_20_Contents">AS</text:p>
          </table:table-cell>
          <table:table-cell table:style-name="TableRowCell" office:value-type="string">
            <text:p text:style-name="Table_20_Contents">"</text:p>
          </table:table-cell>
          <table:table-cell table:style-name="TableRowCell" office:value-type="string">
            <text:p text:style-name="Table_20_Contents">Indicates valid data on address bus</text:p>
          </table:table-cell>
        </table:table-row>
        <table:table-row>
          <table:table-cell table:style-name="TableRowCell" office:value-type="string">
            <text:p text:style-name="Table_20_Contents">28</text:p>
          </table:table-cell>
          <table:table-cell table:style-name="TableRowCell" office:value-type="string">
            <text:p text:style-name="Table_20_Contents">LDS</text:p>
          </table:table-cell>
          <table:table-cell table:style-name="TableRowCell" office:value-type="string">
            <text:p text:style-name="Table_20_Contents">"</text:p>
          </table:table-cell>
          <table:table-cell table:style-name="TableRowCell" office:value-type="string">
            <text:p text:style-name="Table_20_Contents">Lower data strobe</text:p>
          </table:table-cell>
        </table:table-row>
        <table:table-row>
          <table:table-cell table:style-name="TableRowCell" office:value-type="string">
            <text:p text:style-name="Table_20_Contents">29</text:p>
          </table:table-cell>
          <table:table-cell table:style-name="TableRowCell" office:value-type="string">
            <text:p text:style-name="Table_20_Contents">UDS</text:p>
          </table:table-cell>
          <table:table-cell table:style-name="TableRowCell" office:value-type="string">
            <text:p text:style-name="Table_20_Contents">"</text:p>
          </table:table-cell>
          <table:table-cell table:style-name="TableRowCell" office:value-type="string">
            <text:p text:style-name="Table_20_Contents">Upper data strobe</text:p>
          </table:table-cell>
        </table:table-row>
        <table:table-row>
          <table:table-cell table:style-name="TableRowCell" office:value-type="string">
            <text:p text:style-name="Table_20_Contents">30</text:p>
          </table:table-cell>
          <table:table-cell table:style-name="TableRowCell" office:value-type="string">
            <text:p text:style-name="Table_20_Contents">R/W</text:p>
          </table:table-cell>
          <table:table-cell table:style-name="TableRowCell" office:value-type="string">
            <text:p text:style-name="Table_20_Contents">"</text:p>
          </table:table-cell>
          <table:table-cell table:style-name="TableRowCell" office:value-type="string">
            <text:p text:style-name="Table_20_Contents">Indicates the direction of data transfer based on MPU</text:p>
          </table:table-cell>
        </table:table-row>
        <table:table-row>
          <table:table-cell table:style-name="TableRowCell" office:value-type="string">
            <text:p text:style-name="Table_20_Contents">31</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2</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3</text:p>
          </table:table-cell>
          <table:table-cell table:style-name="TableRowCell" office:value-type="string">
            <text:p text:style-name="Table_20_Contents">VMA</text:p>
          </table:table-cell>
          <table:table-cell table:style-name="TableRowCell" office:value-type="string">
            <text:p text:style-name="Table_20_Contents">I/O</text:p>
          </table:table-cell>
          <table:table-cell table:style-name="TableRowCell" office:value-type="string">
            <text:p text:style-name="Table_20_Contents">Indicates valid data on address bus</text:p>
          </table:table-cell>
        </table:table-row>
        <table:table-row>
          <table:table-cell table:style-name="TableRowCell" office:value-type="string">
            <text:p text:style-name="Table_20_Contents">34</text:p>
          </table:table-cell>
          <table:table-cell table:style-name="TableRowCell" office:value-type="string">
            <text:p text:style-name="Table_20_Contents">EXVPA</text:p>
          </table:table-cell>
          <table:table-cell table:style-name="TableRowCell" office:value-type="string">
            <text:p text:style-name="Table_20_Contents">In</text:p>
          </table:table-cell>
          <table:table-cell table:style-name="TableRowCell" office:value-type="string">
            <text:p text:style-name="Table_20_Contents">Indicates address is verified by surrounding 68000 family peripheral devices</text:p>
          </table:table-cell>
        </table:table-row>
        <table:table-row>
          <table:table-cell table:style-name="TableRowCell" office:value-type="string">
            <text:p text:style-name="Table_20_Contents">35</text:p>
          </table:table-cell>
          <table:table-cell table:style-name="TableRowCell" office:value-type="string">
            <text:p text:style-name="Table_20_Contents">DTACK</text:p>
          </table:table-cell>
          <table:table-cell table:style-name="TableRowCell" office:value-type="string">
            <text:p text:style-name="Table_20_Contents">I/O</text:p>
          </table:table-cell>
          <table:table-cell table:style-name="TableRowCell" office:value-type="string">
            <text:p text:style-name="Table_20_Contents">Data transfer acknowledgment complete</text:p>
          </table:table-cell>
        </table:table-row>
        <table:table-row>
          <table:table-cell table:style-name="TableRowCell" office:value-type="string">
            <text:p text:style-name="Table_20_Contents">36</text:p>
          </table:table-cell>
          <table:table-cell table:style-name="TableRowCell" office:value-type="string">
            <text:p text:style-name="Table_20_Contents">EXRESET</text:p>
          </table:table-cell>
          <table:table-cell table:style-name="TableRowCell" office:value-type="string">
            <text:p text:style-name="Table_20_Contents">Out</text:p>
          </table:table-cell>
          <table:table-cell table:style-name="TableRowCell" office:value-type="string">
            <text:p text:style-name="Table_20_Contents">External reset</text:p>
          </table:table-cell>
        </table:table-row>
        <table:table-row>
          <table:table-cell table:style-name="TableRowCell" office:value-type="string">
            <text:p text:style-name="Table_20_Contents">37</text:p>
          </table:table-cell>
          <table:table-cell table:style-name="TableRowCell" office:value-type="string">
            <text:p text:style-name="Table_20_Contents">HALT</text:p>
          </table:table-cell>
          <table:table-cell table:style-name="TableRowCell" office:value-type="string">
            <text:p text:style-name="Table_20_Contents">I/O</text:p>
          </table:table-cell>
          <table:table-cell table:style-name="TableRowCell" office:value-type="string">
            <text:p text:style-name="Table_20_Contents">In: MPU halt request, Out: System halt</text:p>
          </table:table-cell>
        </table:table-row>
        <table:table-row>
          <table:table-cell table:style-name="TableRowCell" office:value-type="string">
            <text:p text:style-name="Table_20_Contents">38</text:p>
          </table:table-cell>
          <table:table-cell table:style-name="TableRowCell" office:value-type="string">
            <text:p text:style-name="Table_20_Contents">EXBERR</text:p>
          </table:table-cell>
          <table:table-cell table:style-name="TableRowCell" office:value-type="string">
            <text:p text:style-name="Table_20_Contents">I/O</text:p>
          </table:table-cell>
          <table:table-cell table:style-name="TableRowCell" office:value-type="string">
            <text:p text:style-name="Table_20_Contents">Indicates abnormality on external bus operation</text:p>
          </table:table-cell>
        </table:table-row>
        <table:table-row>
          <table:table-cell table:style-name="TableRowCell" office:value-type="string">
            <text:p text:style-name="Table_20_Contents">39</text:p>
          </table:table-cell>
          <table:table-cell table:style-name="TableRowCell" office:value-type="string">
            <text:p text:style-name="Table_20_Contents">EXPWON</text:p>
          </table:table-cell>
          <table:table-cell table:style-name="TableRowCell" office:value-type="string">
            <text:p text:style-name="Table_20_Contents">In</text:p>
          </table:table-cell>
          <table:table-cell table:style-name="TableRowCell" office:value-type="string">
            <text:p text:style-name="Table_20_Contents">External bus on</text:p>
          </table:table-cell>
        </table:table-row>
        <table:table-row>
          <table:table-cell table:style-name="TableRowCell" office:value-type="string">
            <text:p text:style-name="Table_20_Contents">40</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1</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2</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3</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4</text:p>
          </table:table-cell>
          <table:table-cell table:style-name="TableRowCell" office:value-type="string">
            <text:p text:style-name="Table_20_Contents">SELEN</text:p>
          </table:table-cell>
          <table:table-cell table:style-name="TableRowCell" office:value-type="string">
            <text:p text:style-name="Table_20_Contents">Out</text:p>
          </table:table-cell>
          <table:table-cell table:style-name="TableRowCell" office:value-type="string">
            <text:p text:style-name="Table_20_Contents">Main memory address row/column switch signal</text:p>
          </table:table-cell>
        </table:table-row>
        <table:table-row>
          <table:table-cell table:style-name="TableRowCell" office:value-type="string">
            <text:p text:style-name="Table_20_Contents">45</text:p>
          </table:table-cell>
          <table:table-cell table:style-name="TableRowCell" office:value-type="string">
            <text:p text:style-name="Table_20_Contents">CASRDEN</text:p>
          </table:table-cell>
          <table:table-cell table:style-name="TableRowCell" office:value-type="string">
            <text:p text:style-name="Table_20_Contents">Out</text:p>
          </table:table-cell>
          <table:table-cell table:style-name="TableRowCell" office:value-type="string">
            <text:p text:style-name="Table_20_Contents">Main memory CAS signal (during read)</text:p>
          </table:table-cell>
        </table:table-row>
        <table:table-row>
          <table:table-cell table:style-name="TableRowCell" office:value-type="string">
            <text:p text:style-name="Table_20_Contents">46</text:p>
          </table:table-cell>
          <table:table-cell table:style-name="TableRowCell" office:value-type="string">
            <text:p text:style-name="Table_20_Contents">CASWRL</text:p>
          </table:table-cell>
          <table:table-cell table:style-name="TableRowCell" office:value-type="string">
            <text:p text:style-name="Table_20_Contents">Out</text:p>
          </table:table-cell>
          <table:table-cell table:style-name="TableRowCell" office:value-type="string">
            <text:p text:style-name="Table_20_Contents">Main memory CAS signal (lower data when light)</text:p>
          </table:table-cell>
        </table:table-row>
        <table:table-row>
          <table:table-cell table:style-name="TableRowCell" office:value-type="string">
            <text:p text:style-name="Table_20_Contents">47</text:p>
          </table:table-cell>
          <table:table-cell table:style-name="TableRowCell" office:value-type="string">
            <text:p text:style-name="Table_20_Contents">CASWRU</text:p>
          </table:table-cell>
          <table:table-cell table:style-name="TableRowCell" office:value-type="string">
            <text:p text:style-name="Table_20_Contents">Out</text:p>
          </table:table-cell>
          <table:table-cell table:style-name="TableRowCell" office:value-type="string">
            <text:p text:style-name="Table_20_Contents">Main memory CAS signal (upper data)</text:p>
          </table:table-cell>
        </table:table-row>
        <table:table-row>
          <table:table-cell table:style-name="TableRowCell" office:value-type="string">
            <text:p text:style-name="Table_20_Contents">48</text:p>
          </table:table-cell>
          <table:table-cell table:style-name="TableRowCell" office:value-type="string">
            <text:p text:style-name="Table_20_Contents">INH2</text:p>
          </table:table-cell>
          <table:table-cell table:style-name="TableRowCell" office:value-type="string">
            <text:p text:style-name="Table_20_Contents">Out</text:p>
          </table:table-cell>
          <table:table-cell table:style-name="TableRowCell" office:value-type="string">
            <text:p text:style-name="Table_20_Contents">Main memory refresh cycle</text:p>
          </table:table-cell>
        </table:table-row>
        <table:table-row>
          <table:table-cell table:style-name="TableRowCell" office:value-type="string">
            <text:p text:style-name="Table_20_Contents">49</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50</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able:table-cell>
        </table:table-row>
      </table:table>
      <text:p text:style-name="First_20_paragraph">(Page - 64 -)</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Terminal No.</text:p>
            </table:table-cell>
            <table:table-cell table:style-name="TableHeaderRowCell" office:value-type="string">
              <text:p text:style-name="Table_20_Heading">Symbo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10M</text:p>
          </table:table-cell>
          <table:table-cell table:style-name="TableRowCell" office:value-type="string">
            <text:p text:style-name="Table_20_Contents">Out</text:p>
          </table:table-cell>
          <table:table-cell table:style-name="TableRowCell" office:value-type="string">
            <text:p text:style-name="Table_20_Contents">10 MHz clock</text:p>
          </table:table-cell>
        </table:table-row>
        <table:table-row>
          <table:table-cell table:style-name="TableRowCell" office:value-type="string">
            <text:p text:style-name="Table_20_Contents">3</text:p>
          </table:table-cell>
          <table:table-cell table:style-name="TableRowCell" office:value-type="string">
            <text:p text:style-name="Table_20_Contents">10M</text:p>
          </table:table-cell>
          <table:table-cell table:style-name="TableRowCell" office:value-type="string">
            <text:p text:style-name="Table_20_Contents">Out</text:p>
          </table:table-cell>
          <table:table-cell table:style-name="TableRowCell" office:value-type="string">
            <text:p text:style-name="Table_20_Contents">10 MHz clock inverted signal</text:p>
          </table:table-cell>
        </table:table-row>
        <table:table-row>
          <table:table-cell table:style-name="TableRowCell" office:value-type="string">
            <text:p text:style-name="Table_20_Contents">4</text:p>
          </table:table-cell>
          <table:table-cell table:style-name="TableRowCell" office:value-type="string">
            <text:p text:style-name="Table_20_Contents">E</text:p>
          </table:table-cell>
          <table:table-cell table:style-name="TableRowCell" office:value-type="string">
            <text:p text:style-name="Table_20_Contents">Out</text:p>
          </table:table-cell>
          <table:table-cell table:style-name="TableRowCell" office:value-type="string">
            <text:p text:style-name="Table_20_Contents">Enable (68000 series peripheral control)</text:p>
          </table:table-cell>
        </table:table-row>
        <table:table-row>
          <table:table-cell table:style-name="TableRowCell" office:value-type="string">
            <text:p text:style-name="Table_20_Contents">5</text:p>
          </table:table-cell>
          <table:table-cell table:style-name="TableRowCell" office:value-type="string">
            <text:p text:style-name="Table_20_Contents">AB1</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6</text:p>
          </table:table-cell>
          <table:table-cell table:style-name="TableRowCell" office:value-type="string">
            <text:p text:style-name="Table_20_Contents">AB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AB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AB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AB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AB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AB7</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13</text:p>
          </table:table-cell>
          <table:table-cell table:style-name="TableRowCell" office:value-type="string">
            <text:p text:style-name="Table_20_Contents">AB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4</text:p>
          </table:table-cell>
          <table:table-cell table:style-name="TableRowCell" office:value-type="string">
            <text:p text:style-name="Table_20_Contents">AB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5</text:p>
          </table:table-cell>
          <table:table-cell table:style-name="TableRowCell" office:value-type="string">
            <text:p text:style-name="Table_20_Contents">AB1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6</text:p>
          </table:table-cell>
          <table:table-cell table:style-name="TableRowCell" office:value-type="string">
            <text:p text:style-name="Table_20_Contents">AB1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7</text:p>
          </table:table-cell>
          <table:table-cell table:style-name="TableRowCell" office:value-type="string">
            <text:p text:style-name="Table_20_Contents">AB1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8</text:p>
          </table:table-cell>
          <table:table-cell table:style-name="TableRowCell" office:value-type="string">
            <text:p text:style-name="Table_20_Contents">AB1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9</text:p>
          </table:table-cell>
          <table:table-cell table:style-name="TableRowCell" office:value-type="string">
            <text:p text:style-name="Table_20_Contents">AB1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0</text:p>
          </table:table-cell>
          <table:table-cell table:style-name="TableRowCell" office:value-type="string">
            <text:p text:style-name="Table_20_Contents">AB1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AB16</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23</text:p>
          </table:table-cell>
          <table:table-cell table:style-name="TableRowCell" office:value-type="string">
            <text:p text:style-name="Table_20_Contents">AB17</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4</text:p>
          </table:table-cell>
          <table:table-cell table:style-name="TableRowCell" office:value-type="string">
            <text:p text:style-name="Table_20_Contents">AB1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5</text:p>
          </table:table-cell>
          <table:table-cell table:style-name="TableRowCell" office:value-type="string">
            <text:p text:style-name="Table_20_Contents">AB1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6</text:p>
          </table:table-cell>
          <table:table-cell table:style-name="TableRowCell" office:value-type="string">
            <text:p text:style-name="Table_20_Contents">AB2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7</text:p>
          </table:table-cell>
          <table:table-cell table:style-name="TableRowCell" office:value-type="string">
            <text:p text:style-name="Table_20_Contents">AB2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8</text:p>
          </table:table-cell>
          <table:table-cell table:style-name="TableRowCell" office:value-type="string">
            <text:p text:style-name="Table_20_Contents">AB2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9</text:p>
          </table:table-cell>
          <table:table-cell table:style-name="TableRowCell" office:value-type="string">
            <text:p text:style-name="Table_20_Contents">AB2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30</text:p>
          </table:table-cell>
          <table:table-cell table:style-name="TableRowCell" office:value-type="string">
            <text:p text:style-name="Table_20_Contents">IDDIR</text:p>
          </table:table-cell>
          <table:table-cell table:style-name="TableRowCell" office:value-type="string">
            <text:p text:style-name="Table_20_Contents">Out</text:p>
          </table:table-cell>
          <table:table-cell table:style-name="TableRowCell" office:value-type="string">
            <text:p text:style-name="Table_20_Contents">Data bus transection direction control signal</text:p>
          </table:table-cell>
        </table:table-row>
        <table:table-row>
          <table:table-cell table:style-name="TableRowCell" office:value-type="string">
            <text:p text:style-name="Table_20_Contents">31</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32</text:p>
          </table:table-cell>
          <table:table-cell table:style-name="TableRowCell" office:value-type="string">
            <text:p text:style-name="Table_20_Contents">HSYNC</text:p>
          </table:table-cell>
          <table:table-cell table:style-name="TableRowCell" office:value-type="string">
            <text:p text:style-name="Table_20_Contents">Out</text:p>
          </table:table-cell>
          <table:table-cell table:style-name="TableRowCell" office:value-type="string">
            <text:p text:style-name="Table_20_Contents">Horizontal sync signal</text:p>
          </table:table-cell>
        </table:table-row>
        <table:table-row>
          <table:table-cell table:style-name="TableRowCell" office:value-type="string">
            <text:p text:style-name="Table_20_Contents">33</text:p>
          </table:table-cell>
          <table:table-cell table:style-name="TableRowCell" office:value-type="string">
            <text:p text:style-name="Table_20_Contents">VSYNC</text:p>
          </table:table-cell>
          <table:table-cell table:style-name="TableRowCell" office:value-type="string">
            <text:p text:style-name="Table_20_Contents">Out</text:p>
          </table:table-cell>
          <table:table-cell table:style-name="TableRowCell" office:value-type="string">
            <text:p text:style-name="Table_20_Contents">Vertical sync signal</text:p>
          </table:table-cell>
        </table:table-row>
        <table:table-row>
          <table:table-cell table:style-name="TableRowCell" office:value-type="string">
            <text:p text:style-name="Table_20_Contents">34</text:p>
          </table:table-cell>
          <table:table-cell table:style-name="TableRowCell" office:value-type="string">
            <text:p text:style-name="Table_20_Contents">DONE</text:p>
          </table:table-cell>
          <table:table-cell table:style-name="TableRowCell" office:value-type="string">
            <text:p text:style-name="Table_20_Contents">I/O</text:p>
          </table:table-cell>
          <table:table-cell table:style-name="TableRowCell" office:value-type="string">
            <text:p text:style-name="Table_20_Contents">Block data transfer complete (DMA)</text:p>
          </table:table-cell>
        </table:table-row>
        <table:table-row>
          <table:table-cell table:style-name="TableRowCell" office:value-type="string">
            <text:p text:style-name="Table_20_Contents">35</text:p>
          </table:table-cell>
          <table:table-cell table:style-name="TableRowCell" office:value-type="string">
            <text:p text:style-name="Table_20_Contents">DTC</text:p>
          </table:table-cell>
          <table:table-cell table:style-name="TableRowCell" office:value-type="string">
            <text:p text:style-name="Table_20_Contents">Out</text:p>
          </table:table-cell>
          <table:table-cell table:style-name="TableRowCell" office:value-type="string">
            <text:p text:style-name="Table_20_Contents">Device data transfer complete (DMA)</text:p>
          </table:table-cell>
        </table:table-row>
        <table:table-row>
          <table:table-cell table:style-name="TableRowCell" office:value-type="string">
            <text:p text:style-name="Table_20_Contents">36</text:p>
          </table:table-cell>
          <table:table-cell table:style-name="TableRowCell" office:value-type="string">
            <text:p text:style-name="Table_20_Contents">EXREQ</text:p>
          </table:table-cell>
          <table:table-cell table:style-name="TableRowCell" office:value-type="string">
            <text:p text:style-name="Table_20_Contents">In</text:p>
          </table:table-cell>
          <table:table-cell table:style-name="TableRowCell" office:value-type="string">
            <text:p text:style-name="Table_20_Contents">External request (DMA)</text:p>
          </table:table-cell>
        </table:table-row>
        <table:table-row>
          <table:table-cell table:style-name="TableRowCell" office:value-type="string">
            <text:p text:style-name="Table_20_Contents">37</text:p>
          </table:table-cell>
          <table:table-cell table:style-name="TableRowCell" office:value-type="string">
            <text:p text:style-name="Table_20_Contents">EXACK</text:p>
          </table:table-cell>
          <table:table-cell table:style-name="TableRowCell" office:value-type="string">
            <text:p text:style-name="Table_20_Contents">Out</text:p>
          </table:table-cell>
          <table:table-cell table:style-name="TableRowCell" office:value-type="string">
            <text:p text:style-name="Table_20_Contents">External permission (DMA)</text:p>
          </table:table-cell>
        </table:table-row>
        <table:table-row>
          <table:table-cell table:style-name="TableRowCell" office:value-type="string">
            <text:p text:style-name="Table_20_Contents">38</text:p>
          </table:table-cell>
          <table:table-cell table:style-name="TableRowCell" office:value-type="string">
            <text:p text:style-name="Table_20_Contents">EXPCL</text:p>
          </table:table-cell>
          <table:table-cell table:style-name="TableRowCell" office:value-type="string">
            <text:p text:style-name="Table_20_Contents">I/O</text:p>
          </table:table-cell>
          <table:table-cell table:style-name="TableRowCell" office:value-type="string">
            <text:p text:style-name="Table_20_Contents">External peripheral control (DMA)</text:p>
          </table:table-cell>
        </table:table-row>
        <table:table-row>
          <table:table-cell table:style-name="TableRowCell" office:value-type="string">
            <text:p text:style-name="Table_20_Contents">39</text:p>
          </table:table-cell>
          <table:table-cell table:style-name="TableRowCell" office:value-type="string">
            <text:p text:style-name="Table_20_Contents">EXOWN</text:p>
          </table:table-cell>
          <table:table-cell table:style-name="TableRowCell" office:value-type="string">
            <text:p text:style-name="Table_20_Contents">I/O</text:p>
          </table:table-cell>
          <table:table-cell table:style-name="TableRowCell" office:value-type="string">
            <text:p text:style-name="Table_20_Contents">External OWN (DMA)</text:p>
          </table:table-cell>
        </table:table-row>
        <table:table-row>
          <table:table-cell table:style-name="TableRowCell" office:value-type="string">
            <text:p text:style-name="Table_20_Contents">40</text:p>
          </table:table-cell>
          <table:table-cell table:style-name="TableRowCell" office:value-type="string">
            <text:p text:style-name="Table_20_Contents">EXNMI</text:p>
          </table:table-cell>
          <table:table-cell table:style-name="TableRowCell" office:value-type="string">
            <text:p text:style-name="Table_20_Contents">In</text:p>
          </table:table-cell>
          <table:table-cell table:style-name="TableRowCell" office:value-type="string">
            <text:p text:style-name="Table_20_Contents">External NMI</text:p>
          </table:table-cell>
        </table:table-row>
        <table:table-row>
          <table:table-cell table:style-name="TableRowCell" office:value-type="string">
            <text:p text:style-name="Table_20_Contents">4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2</text:p>
          </table:table-cell>
          <table:table-cell table:style-name="TableRowCell" office:value-type="string">
            <text:p text:style-name="Table_20_Contents">IRQ2-n</text:p>
          </table:table-cell>
          <table:table-cell table:style-name="TableRowCell" office:value-type="string">
            <text:p text:style-name="Table_20_Contents">In</text:p>
          </table:table-cell>
          <table:table-cell table:style-name="TableRowCell" office:value-type="string">
            <text:p text:style-name="Table_20_Contents">Interrupt request (n: slot 1 or 2)</text:p>
          </table:table-cell>
        </table:table-row>
        <table:table-row>
          <table:table-cell table:style-name="TableRowCell" office:value-type="string">
            <text:p text:style-name="Table_20_Contents">43</text:p>
          </table:table-cell>
          <table:table-cell table:style-name="TableRowCell" office:value-type="string">
            <text:p text:style-name="Table_20_Contents">IRQ4-n</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44</text:p>
          </table:table-cell>
          <table:table-cell table:style-name="TableRowCell" office:value-type="string">
            <text:p text:style-name="Table_20_Contents">IACK2-n</text:p>
          </table:table-cell>
          <table:table-cell table:style-name="TableRowCell" office:value-type="string">
            <text:p text:style-name="Table_20_Contents">Out</text:p>
          </table:table-cell>
          <table:table-cell table:style-name="TableRowCell" office:value-type="string">
            <text:p text:style-name="Table_20_Contents">Interrupt acknowledge (n: slot 1 or 2)</text:p>
          </table:table-cell>
        </table:table-row>
        <table:table-row>
          <table:table-cell table:style-name="TableRowCell" office:value-type="string">
            <text:p text:style-name="Table_20_Contents">45</text:p>
          </table:table-cell>
          <table:table-cell table:style-name="TableRowCell" office:value-type="string">
            <text:p text:style-name="Table_20_Contents">IRCK4-n</text:p>
          </table:table-cell>
          <table:table-cell table:style-name="TableRowCell" office:value-type="string">
            <text:p text:style-name="Table_20_Contents">Out</text:p>
          </table:table-cell>
          <table:table-cell table:style-name="TableRowCell" office:value-type="string">
            <text:p text:style-name="Table_20_Contents">"</text:p>
          </table:table-cell>
        </table:table-row>
        <table:table-row>
          <table:table-cell table:style-name="TableRowCell" office:value-type="string">
            <text:p text:style-name="Table_20_Contents">46</text:p>
          </table:table-cell>
          <table:table-cell table:style-name="TableRowCell" office:value-type="string">
            <text:p text:style-name="Table_20_Contents">BRn</text:p>
          </table:table-cell>
          <table:table-cell table:style-name="TableRowCell" office:value-type="string">
            <text:p text:style-name="Table_20_Contents">Out</text:p>
          </table:table-cell>
          <table:table-cell table:style-name="TableRowCell" office:value-type="string">
            <text:p text:style-name="Table_20_Contents">Bus request (n: slot 1 or 2)</text:p>
          </table:table-cell>
        </table:table-row>
        <table:table-row>
          <table:table-cell table:style-name="TableRowCell" office:value-type="string">
            <text:p text:style-name="Table_20_Contents">47</text:p>
          </table:table-cell>
          <table:table-cell table:style-name="TableRowCell" office:value-type="string">
            <text:p text:style-name="Table_20_Contents">BGn</text:p>
          </table:table-cell>
          <table:table-cell table:style-name="TableRowCell" office:value-type="string">
            <text:p text:style-name="Table_20_Contents">Out</text:p>
          </table:table-cell>
          <table:table-cell table:style-name="TableRowCell" office:value-type="string">
            <text:p text:style-name="Table_20_Contents">Bus grant (n: slot 1 or 2)</text:p>
          </table:table-cell>
        </table:table-row>
        <table:table-row>
          <table:table-cell table:style-name="TableRowCell" office:value-type="string">
            <text:p text:style-name="Table_20_Contents">48</text:p>
          </table:table-cell>
          <table:table-cell table:style-name="TableRowCell" office:value-type="string">
            <text:p text:style-name="Table_20_Contents">BGACK</text:p>
          </table:table-cell>
          <table:table-cell table:style-name="TableRowCell" office:value-type="string">
            <text:p text:style-name="Table_20_Contents">I/O</text:p>
          </table:table-cell>
          <table:table-cell table:style-name="TableRowCell" office:value-type="string">
            <text:p text:style-name="Table_20_Contents">Bus grant acknowledge (indicates other devices have bus master)</text:p>
          </table:table-cell>
        </table:table-row>
        <table:table-row>
          <table:table-cell table:style-name="TableRowCell" office:value-type="string">
            <text:p text:style-name="Table_20_Contents">49</text:p>
          </table:table-cell>
          <table:table-cell table:style-name="TableRowCell" office:value-type="string">
            <text:p text:style-name="Table_20_Contents">Vcc1</text:p>
          </table:table-cell>
          <table:table-cell table:style-name="TableRowCell" office:value-type="string">
    </table:table-cell>
          <table:table-cell table:style-name="TableRowCell" office:value-type="string">
            <text:p text:style-name="Table_20_Contents">+5V</text:p>
          </table:table-cell>
        </table:table-row>
        <table:table-row>
          <table:table-cell table:style-name="TableRowCell" office:value-type="string">
            <text:p text:style-name="Table_20_Contents">50</text:p>
          </table:table-cell>
          <table:table-cell table:style-name="TableRowCell" office:value-type="string">
            <text:p text:style-name="Table_20_Contents">Vcc1</text:p>
          </table:table-cell>
          <table:table-cell table:style-name="TableRowCell" office:value-type="string">
    </table:table-cell>
          <table:table-cell table:style-name="TableRowCell" office:value-type="string">
            <text:p text:style-name="Table_20_Contents">+5V</text:p>
          </table:table-cell>
        </table:table-row>
      </table:table>
      <text:p text:style-name="First_20_paragraph">This table appears to reference the pin designations and functions for an expansion I/O slot.</text:p>
      <text:p text:style-name="Text_20_body"><text:span text:style-name="Strong_20_Emphasis">CZ-634C-TN</text:span> <text:span text:style-name="Strong_20_Emphasis">CZ-644C-TN</text:span></text:p>
      <text:p text:style-name="Text_20_body"><text:span text:style-name="Strong_20_Emphasis">9-5. Various Connectors (The pin numbers of the connectors represent the view from the part side.)</text:span></text:p>
      <text:p text:style-name="Text_20_body">◎ Analog RGB Signal Output Connector</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text:p>
          </table:table-cell>
          <table:table-cell table:style-name="TableRowCell" office:value-type="string">
            <text:p text:style-name="Table_20_Contents">G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B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YS</text:p>
          </table:table-cell>
          <table:table-cell table:style-name="TableRowCell" office:value-type="string">
            <text:p text:style-name="Table_20_Contents">Out</text:p>
          </table:table-cell>
          <table:table-cell table:style-name="TableRowCell" office:value-type="string">
            <text:p text:style-name="Table_20_Contents">Indicates presence of computer data</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0</text:p>
          </table:table-cell>
          <table:table-cell table:style-name="TableRowCell" office:value-type="string">
            <text:p text:style-name="Table_20_Contents">AUDIO L</text:p>
          </table:table-cell>
          <table:table-cell table:style-name="TableRowCell" office:value-type="string">
            <text:p text:style-name="Table_20_Contents">Out</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11</text:p>
          </table:table-cell>
          <table:table-cell table:style-name="TableRowCell" office:value-type="string">
            <text:p text:style-name="Table_20_Contents">AUDIO R</text:p>
          </table:table-cell>
          <table:table-cell table:style-name="TableRowCell" office:value-type="string">
            <text:p text:style-name="Table_20_Contents">Out</text:p>
          </table:table-cell>
          <table:table-cell table:style-name="TableRowCell" office:value-type="string">
            <text:p text:style-name="Table_20_Contents">Audio signal right</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4</text:p>
          </table:table-cell>
          <table:table-cell table:style-name="TableRowCell" office:value-type="string">
            <text:p text:style-name="Table_20_Contents">HSYNC</text:p>
          </table:table-cell>
          <table:table-cell table:style-name="TableRowCell" office:value-type="string">
            <text:p text:style-name="Table_20_Contents">Out</text:p>
          </table:table-cell>
          <table:table-cell table:style-name="TableRowCell" office:value-type="string">
            <text:p text:style-name="Table_20_Contents">Horizontal sync signal TTL level</text:p>
          </table:table-cell>
        </table:table-row>
        <table:table-row>
          <table:table-cell table:style-name="TableRowCell" office:value-type="string">
            <text:p text:style-name="Table_20_Contents">15</text:p>
          </table:table-cell>
          <table:table-cell table:style-name="TableRowCell" office:value-type="string">
            <text:p text:style-name="Table_20_Contents">VSYNC</text:p>
          </table:table-cell>
          <table:table-cell table:style-name="TableRowCell" office:value-type="string">
            <text:p text:style-name="Table_20_Contents">Out</text:p>
          </table:table-cell>
          <table:table-cell table:style-name="TableRowCell" office:value-type="string">
            <text:p text:style-name="Table_20_Contents">Vertical sync signal TTL level</text:p>
          </table:table-cell>
        </table:table-row>
      </table:table>
      <text:p text:style-name="First_20_paragraph">◎ TV Control Connector</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XHSYNC</text:p>
          </table:table-cell>
          <table:table-cell table:style-name="TableRowCell" office:value-type="string">
            <text:p text:style-name="Table_20_Contents">In</text:p>
          </table:table-cell>
          <table:table-cell table:style-name="TableRowCell" office:value-type="string">
            <text:p text:style-name="Table_20_Contents">External horizontal sync signal TTL level</text:p>
          </table:table-cell>
        </table:table-row>
        <table:table-row>
          <table:table-cell table:style-name="TableRowCell" office:value-type="string">
            <text:p text:style-name="Table_20_Contents">2</text:p>
          </table:table-cell>
          <table:table-cell table:style-name="TableRowCell" office:value-type="string">
            <text:p text:style-name="Table_20_Contents">EXVSYNC</text:p>
          </table:table-cell>
          <table:table-cell table:style-name="TableRowCell" office:value-type="string">
            <text:p text:style-name="Table_20_Contents">In</text:p>
          </table:table-cell>
          <table:table-cell table:style-name="TableRowCell" office:value-type="string">
            <text:p text:style-name="Table_20_Contents">External vertical sync signal TTL level</text:p>
          </table:table-cell>
        </table:table-row>
        <table:table-row>
          <table:table-cell table:style-name="TableRowCell" office:value-type="string">
            <text:p text:style-name="Table_20_Contents">3</text:p>
          </table:table-cell>
          <table:table-cell table:style-name="TableRowCell" office:value-type="string">
            <text:p text:style-name="Table_20_Contents">TVPOWERON/OFF</text:p>
          </table:table-cell>
          <table:table-cell table:style-name="TableRowCell" office:value-type="string">
            <text:p text:style-name="Table_20_Contents">Out</text:p>
          </table:table-cell>
          <table:table-cell table:style-name="TableRowCell" office:value-type="string">
            <text:p text:style-name="Table_20_Contents">TV power on/off signal</text:p>
          </table:table-cell>
        </table:table-row>
        <table:table-row>
          <table:table-cell table:style-name="TableRowCell" office:value-type="string">
            <text:p text:style-name="Table_20_Contents">4</text:p>
          </table:table-cell>
          <table:table-cell table:style-name="TableRowCell" office:value-type="string">
            <text:p text:style-name="Table_20_Contents">TVREMOTE</text:p>
          </table:table-cell>
          <table:table-cell table:style-name="TableRowCell" office:value-type="string">
            <text:p text:style-name="Table_20_Contents">Out</text:p>
          </table:table-cell>
          <table:table-cell table:style-name="TableRowCell" office:value-type="string">
            <text:p text:style-name="Table_20_Contents">TV remote signal</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 IMAGE IN (Image Input Connector)</text:p>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DD11</text:p>
          </table:table-cell>
          <table:table-cell table:style-name="TableRowCell" office:value-type="string">
            <text:p text:style-name="Table_20_Contents">In</text:p>
          </table:table-cell>
          <table:table-cell table:style-name="TableRowCell" office:value-type="string">
            <text:p text:style-name="Table_20_Contents">Analog/digital conversion data</text:p>
          </table:table-cell>
        </table:table-row>
        <table:table-row>
          <table:table-cell table:style-name="TableRowCell" office:value-type="string">
            <text:p text:style-name="Table_20_Contents">2</text:p>
          </table:table-cell>
          <table:table-cell table:style-name="TableRowCell" office:value-type="string">
            <text:p text:style-name="Table_20_Contents">ADD10</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ADD9</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ADD8</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ADD7</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ADD6</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ADD5</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ADD4</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ADD3</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ADD2</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ADD1</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2</text:p>
          </table:table-cell>
          <table:table-cell table:style-name="TableRowCell" office:value-type="string">
            <text:p text:style-name="Table_20_Contents">ADD0</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3</text:p>
          </table:table-cell>
          <table:table-cell table:style-name="TableRowCell" office:value-type="string">
            <text:p text:style-name="Table_20_Contents">Q A</text:p>
          </table:table-cell>
          <table:table-cell table:style-name="TableRowCell" office:value-type="string">
            <text:p text:style-name="Table_20_Contents">Out</text:p>
          </table:table-cell>
          <table:table-cell table:style-name="TableRowCell" office:value-type="string">
            <text:p text:style-name="Table_20_Contents">Dot clock</text:p>
          </table:table-cell>
        </table:table-row>
        <table:table-row>
          <table:table-cell table:style-name="TableRowCell" office:value-type="string">
            <text:p text:style-name="Table_20_Contents">14</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15</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
      <text:p text:style-name="First_20_paragraph">(Page - 66)</text:p>
      <text:p text:style-name="Text_20_body"><text:span text:style-name="Strong_20_Emphasis">Terminal No. | Signal Name | I/O | Remarks | Notes</text:span></text:p>
      <text:p text:style-name="Preformatted_20_Text">16 | Vcc3 | Out | +12V</text:p>
      <text:p text:style-name="Preformatted_20_Text">17 | CD4 | Out | Computer control signal</text:p>
      <text:p text:style-name="Preformatted_20_Text">18 | CD3 | Out | Computer control signal</text:p>
      <text:p text:style-name="Preformatted_20_Text">19 | CD2 | Out | Computer control signal</text:p>
      <text:p text:style-name="Preformatted_20_Text">20 | CD1 | Out | Computer control signal</text:p>
      <text:p text:style-name="Preformatted_20_Text">21 | CD1 | Out | Computer control signal</text:p>
      <text:p text:style-name="Preformatted_20_Text">22 | ADD15 | In | Analog/Digital conversion data</text:p>
      <text:p text:style-name="Preformatted_20_Text">23 | ADD14 | In | Analog/Digital conversion data</text:p>
      <text:p text:style-name="Preformatted_20_Text">24 | ADD13 | In | Analog/Digital conversion data</text:p>
      <text:p text:style-name="Preformatted_20_Text">25 | ADD12 | In | Analog/Digital conversion data</text:p>
      <text:p text:style-name="First_20_paragraph"><text:span text:style-name="Strong_20_Emphasis">Printer Connector</text:span> <text:span text:style-name="Strong_20_Emphasis">(Pins diagram)</text:span></text:p>
      <text:p text:style-name="Text_20_body"><text:span text:style-name="Strong_20_Emphasis">Terminal No. | Signal Name | I/O | Remarks | Notes</text:span></text:p>
      <text:p text:style-name="Preformatted_20_Text">1 | STROBE | Out | Negative polarity print output strobe signal</text:p>
      <text:p text:style-name="Preformatted_20_Text">2 | PA0 | Out | Parallel data bus</text:p>
      <text:p text:style-name="Preformatted_20_Text">3 | PA1 | " | " </text:p>
      <text:p text:style-name="Preformatted_20_Text">4 | PA2 | " | "</text:p>
      <text:p text:style-name="Preformatted_20_Text">5 | PA3 | " | "</text:p>
      <text:p text:style-name="Preformatted_20_Text">6 | PA4 | " | "</text:p>
      <text:p text:style-name="Preformatted_20_Text">7 | PA5 | " | "</text:p>
      <text:p text:style-name="Preformatted_20_Text">8 | PA6 | " | "</text:p>
      <text:p text:style-name="Preformatted_20_Text">9 | PA7 | " | "</text:p>
      <text:p text:style-name="Preformatted_20_Text">10 | N.C | - | Not connected</text:p>
      <text:p text:style-name="Preformatted_20_Text">11 | BUSY | In | Printer 'LOW' level when ready</text:p>
      <text:p text:style-name="Preformatted_20_Text">12 | N.C | - | Not connected</text:p>
      <text:p text:style-name="Preformatted_20_Text">13 | GND | Out | Ground</text:p>
      <text:p text:style-name="Preformatted_20_Text">14 | GND | Out | Ground</text:p>
      <text:p text:style-name="First_20_paragraph"><text:span text:style-name="Strong_20_Emphasis">SEE THROUGH COLOR</text:span> <text:span text:style-name="Strong_20_Emphasis">(Pins diagram)</text:span></text:p>
      <text:p text:style-name="Text_20_body"><text:span text:style-name="Strong_20_Emphasis">Terminal No. | Signal Name | I/O | Remarks | Notes</text:span></text:p>
      <text:p text:style-name="Preformatted_20_Text">1 | VHT | Out | Video Half Tone (semi-transparent color)</text:p>
      <text:p text:style-name="Preformatted_20_Text">2 | GND | Out | Ground</text:p>
      <text:p text:style-name="First_20_paragraph"><text:span text:style-name="Strong_20_Emphasis">LINE IN</text:span> <text:span text:style-name="Strong_20_Emphasis">(Pins diagram)</text:span></text:p>
      <text:p text:style-name="Text_20_body"><text:span text:style-name="Strong_20_Emphasis">Terminal No. | Signal Name | I/O | Remarks | Notes</text:span></text:p>
      <text:p text:style-name="Preformatted_20_Text">1 | GND | Out | Ground</text:p>
      <text:p text:style-name="Preformatted_20_Text">2 | LINEIN | In | Audio synthesis input</text:p>
      <text:p text:style-name="Preformatted_20_Text">3 | N.C | - | Not connected</text:p>
      <text:p text:style-name="First_20_paragraph"><text:span text:style-name="Strong_20_Emphasis">LINE OUT</text:span> <text:span text:style-name="Strong_20_Emphasis">(Pins diagram)</text:span></text:p>
      <text:p text:style-name="Text_20_body"><text:span text:style-name="Strong_20_Emphasis">Terminal No. | Signal Name | I/O | Remarks | Notes</text:span></text:p>
      <text:p text:style-name="Preformatted_20_Text">1 | GND | Out | Ground</text:p>
      <text:p text:style-name="Preformatted_20_Text">2 | L | Out | Audio (left output)</text:p>
      <text:p text:style-name="Preformatted_20_Text">3 | R | Out | Audio (right output)</text:p>
      <text:p text:style-name="First_20_paragraph"><text:span text:style-name="Strong_20_Emphasis">Joystick Connector</text:span> <text:span text:style-name="Strong_20_Emphasis">Joystick 1</text:span></text:p>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OA0</text:p>
          </table:table-cell>
          <table:table-cell table:style-name="TableRowCell" office:value-type="string">
            <text:p text:style-name="Table_20_Contents">In</text:p>
          </table:table-cell>
          <table:table-cell table:style-name="TableRowCell" office:value-type="string">
            <text:p text:style-name="Table_20_Contents">8255 PA0 Pin</text:p>
          </table:table-cell>
        </table:table-row>
        <table:table-row>
          <table:table-cell table:style-name="TableRowCell" office:value-type="string">
            <text:p text:style-name="Table_20_Contents">2</text:p>
          </table:table-cell>
          <table:table-cell table:style-name="TableRowCell" office:value-type="string">
            <text:p text:style-name="Table_20_Contents">IOA1</text:p>
          </table:table-cell>
          <table:table-cell table:style-name="TableRowCell" office:value-type="string">
            <text:p text:style-name="Table_20_Contents">In</text:p>
          </table:table-cell>
          <table:table-cell table:style-name="TableRowCell" office:value-type="string">
            <text:p text:style-name="Table_20_Contents">PA1</text:p>
          </table:table-cell>
        </table:table-row>
        <table:table-row>
          <table:table-cell table:style-name="TableRowCell" office:value-type="string">
            <text:p text:style-name="Table_20_Contents">3</text:p>
          </table:table-cell>
          <table:table-cell table:style-name="TableRowCell" office:value-type="string">
            <text:p text:style-name="Table_20_Contents">IOA2</text:p>
          </table:table-cell>
          <table:table-cell table:style-name="TableRowCell" office:value-type="string">
            <text:p text:style-name="Table_20_Contents">In</text:p>
          </table:table-cell>
          <table:table-cell table:style-name="TableRowCell" office:value-type="string">
            <text:p text:style-name="Table_20_Contents">PA2</text:p>
          </table:table-cell>
        </table:table-row>
        <table:table-row>
          <table:table-cell table:style-name="TableRowCell" office:value-type="string">
            <text:p text:style-name="Table_20_Contents">4</text:p>
          </table:table-cell>
          <table:table-cell table:style-name="TableRowCell" office:value-type="string">
            <text:p text:style-name="Table_20_Contents">IOA3</text:p>
          </table:table-cell>
          <table:table-cell table:style-name="TableRowCell" office:value-type="string">
            <text:p text:style-name="Table_20_Contents">In</text:p>
          </table:table-cell>
          <table:table-cell table:style-name="TableRowCell" office:value-type="string">
            <text:p text:style-name="Table_20_Contents">PA3</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IOA5</text:p>
          </table:table-cell>
          <table:table-cell table:style-name="TableRowCell" office:value-type="string">
            <text:p text:style-name="Table_20_Contents">I/O</text:p>
          </table:table-cell>
          <table:table-cell table:style-name="TableRowCell" office:value-type="string">
            <text:p text:style-name="Table_20_Contents">PA5/PC6</text:p>
          </table:table-cell>
        </table:table-row>
        <table:table-row>
          <table:table-cell table:style-name="TableRowCell" office:value-type="string">
            <text:p text:style-name="Table_20_Contents">7</text:p>
          </table:table-cell>
          <table:table-cell table:style-name="TableRowCell" office:value-type="string">
            <text:p text:style-name="Table_20_Contents">IOA6</text:p>
          </table:table-cell>
          <table:table-cell table:style-name="TableRowCell" office:value-type="string">
            <text:p text:style-name="Table_20_Contents">I/O</text:p>
          </table:table-cell>
          <table:table-cell table:style-name="TableRowCell" office:value-type="string">
            <text:p text:style-name="Table_20_Contents">PA6/PC7</text:p>
          </table:table-cell>
        </table:table-row>
        <table:table-row>
          <table:table-cell table:style-name="TableRowCell" office:value-type="string">
            <text:p text:style-name="Table_20_Contents">8</text:p>
          </table:table-cell>
          <table:table-cell table:style-name="TableRowCell" office:value-type="string">
            <text:p text:style-name="Table_20_Contents">IOC4</text:p>
          </table:table-cell>
          <table:table-cell table:style-name="TableRowCell" office:value-type="string">
            <text:p text:style-name="Table_20_Contents">Out</text:p>
          </table:table-cell>
          <table:table-cell table:style-name="TableRowCell" office:value-type="string">
            <text:p text:style-name="Table_20_Contents">PC4</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Joystick 2</text:span></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OB0</text:p>
          </table:table-cell>
          <table:table-cell table:style-name="TableRowCell" office:value-type="string">
            <text:p text:style-name="Table_20_Contents">In</text:p>
          </table:table-cell>
          <table:table-cell table:style-name="TableRowCell" office:value-type="string">
            <text:p text:style-name="Table_20_Contents">8255 PB0 Pin</text:p>
          </table:table-cell>
        </table:table-row>
        <table:table-row>
          <table:table-cell table:style-name="TableRowCell" office:value-type="string">
            <text:p text:style-name="Table_20_Contents">2</text:p>
          </table:table-cell>
          <table:table-cell table:style-name="TableRowCell" office:value-type="string">
            <text:p text:style-name="Table_20_Contents">IOB1</text:p>
          </table:table-cell>
          <table:table-cell table:style-name="TableRowCell" office:value-type="string">
            <text:p text:style-name="Table_20_Contents">In</text:p>
          </table:table-cell>
          <table:table-cell table:style-name="TableRowCell" office:value-type="string">
            <text:p text:style-name="Table_20_Contents">PB1</text:p>
          </table:table-cell>
        </table:table-row>
        <table:table-row>
          <table:table-cell table:style-name="TableRowCell" office:value-type="string">
            <text:p text:style-name="Table_20_Contents">3</text:p>
          </table:table-cell>
          <table:table-cell table:style-name="TableRowCell" office:value-type="string">
            <text:p text:style-name="Table_20_Contents">IOB2</text:p>
          </table:table-cell>
          <table:table-cell table:style-name="TableRowCell" office:value-type="string">
            <text:p text:style-name="Table_20_Contents">In</text:p>
          </table:table-cell>
          <table:table-cell table:style-name="TableRowCell" office:value-type="string">
            <text:p text:style-name="Table_20_Contents">PB2</text:p>
          </table:table-cell>
        </table:table-row>
        <table:table-row>
          <table:table-cell table:style-name="TableRowCell" office:value-type="string">
            <text:p text:style-name="Table_20_Contents">4</text:p>
          </table:table-cell>
          <table:table-cell table:style-name="TableRowCell" office:value-type="string">
            <text:p text:style-name="Table_20_Contents">IOB3</text:p>
          </table:table-cell>
          <table:table-cell table:style-name="TableRowCell" office:value-type="string">
            <text:p text:style-name="Table_20_Contents">In</text:p>
          </table:table-cell>
          <table:table-cell table:style-name="TableRowCell" office:value-type="string">
            <text:p text:style-name="Table_20_Contents">PB3</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IOB5</text:p>
          </table:table-cell>
          <table:table-cell table:style-name="TableRowCell" office:value-type="string">
            <text:p text:style-name="Table_20_Contents">In</text:p>
          </table:table-cell>
          <table:table-cell table:style-name="TableRowCell" office:value-type="string">
            <text:p text:style-name="Table_20_Contents">PB5</text:p>
          </table:table-cell>
        </table:table-row>
        <table:table-row>
          <table:table-cell table:style-name="TableRowCell" office:value-type="string">
            <text:p text:style-name="Table_20_Contents">7</text:p>
          </table:table-cell>
          <table:table-cell table:style-name="TableRowCell" office:value-type="string">
            <text:p text:style-name="Table_20_Contents">IOB6</text:p>
          </table:table-cell>
          <table:table-cell table:style-name="TableRowCell" office:value-type="string">
            <text:p text:style-name="Table_20_Contents">In</text:p>
          </table:table-cell>
          <table:table-cell table:style-name="TableRowCell" office:value-type="string">
            <text:p text:style-name="Table_20_Contents">PB6</text:p>
          </table:table-cell>
        </table:table-row>
        <table:table-row>
          <table:table-cell table:style-name="TableRowCell" office:value-type="string">
            <text:p text:style-name="Table_20_Contents">8</text:p>
          </table:table-cell>
          <table:table-cell table:style-name="TableRowCell" office:value-type="string">
            <text:p text:style-name="Table_20_Contents">IOC5</text:p>
          </table:table-cell>
          <table:table-cell table:style-name="TableRowCell" office:value-type="string">
            <text:p text:style-name="Table_20_Contents">Out</text:p>
          </table:table-cell>
          <table:table-cell table:style-name="TableRowCell" office:value-type="string">
            <text:p text:style-name="Table_20_Contents">PC5</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RS-232C Connector</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G</text:p>
          </table:table-cell>
          <table:table-cell table:style-name="TableRowCell" office:value-type="string">
            <text:p text:style-name="Table_20_Contents">I/O</text:p>
          </table:table-cell>
          <table:table-cell table:style-name="TableRowCell" office:value-type="string">
            <text:p text:style-name="Table_20_Contents">Protective Earth</text:p>
          </table:table-cell>
          <table:table-cell table:style-name="TableRowCell" office:value-type="string">
            <text:p text:style-name="Table_20_Contents">14</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2</text:p>
          </table:table-cell>
          <table:table-cell table:style-name="TableRowCell" office:value-type="string">
            <text:p text:style-name="Table_20_Contents">TXD</text:p>
          </table:table-cell>
          <table:table-cell table:style-name="TableRowCell" office:value-type="string">
            <text:p text:style-name="Table_20_Contents">Out</text:p>
          </table:table-cell>
          <table:table-cell table:style-name="TableRowCell" office:value-type="string">
            <text:p text:style-name="Table_20_Contents">Transmit Data</text:p>
          </table:table-cell>
          <table:table-cell table:style-name="TableRowCell" office:value-type="string">
            <text:p text:style-name="Table_20_Contents">15</text:p>
          </table:table-cell>
          <table:table-cell table:style-name="TableRowCell" office:value-type="string">
            <text:p text:style-name="Table_20_Contents">ST2</text:p>
          </table:table-cell>
          <table:table-cell table:style-name="TableRowCell" office:value-type="string">
            <text:p text:style-name="Table_20_Contents">In</text:p>
          </table:table-cell>
          <table:table-cell table:style-name="TableRowCell" office:value-type="string">
            <text:p text:style-name="Table_20_Contents">Transmit Signal Element Timing</text:p>
          </table:table-cell>
        </table:table-row>
        <table:table-row>
          <table:table-cell table:style-name="TableRowCell" office:value-type="string">
            <text:p text:style-name="Table_20_Contents">3</text:p>
          </table:table-cell>
          <table:table-cell table:style-name="TableRowCell" office:value-type="string">
            <text:p text:style-name="Table_20_Contents">RXD</text:p>
          </table:table-cell>
          <table:table-cell table:style-name="TableRowCell" office:value-type="string">
            <text:p text:style-name="Table_20_Contents">In</text:p>
          </table:table-cell>
          <table:table-cell table:style-name="TableRowCell" office:value-type="string">
            <text:p text:style-name="Table_20_Contents">Receive Data</text:p>
          </table:table-cell>
          <table:table-cell table:style-name="TableRowCell" office:value-type="string">
            <text:p text:style-name="Table_20_Contents">16</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4</text:p>
          </table:table-cell>
          <table:table-cell table:style-name="TableRowCell" office:value-type="string">
            <text:p text:style-name="Table_20_Contents">RTS</text:p>
          </table:table-cell>
          <table:table-cell table:style-name="TableRowCell" office:value-type="string">
            <text:p text:style-name="Table_20_Contents">Out</text:p>
          </table:table-cell>
          <table:table-cell table:style-name="TableRowCell" office:value-type="string">
            <text:p text:style-name="Table_20_Contents">Request to Send</text:p>
          </table:table-cell>
          <table:table-cell table:style-name="TableRowCell" office:value-type="string">
            <text:p text:style-name="Table_20_Contents">17</text:p>
          </table:table-cell>
          <table:table-cell table:style-name="TableRowCell" office:value-type="string">
            <text:p text:style-name="Table_20_Contents">RT</text:p>
          </table:table-cell>
          <table:table-cell table:style-name="TableRowCell" office:value-type="string">
            <text:p text:style-name="Table_20_Contents">In</text:p>
          </table:table-cell>
          <table:table-cell table:style-name="TableRowCell" office:value-type="string">
            <text:p text:style-name="Table_20_Contents">Receive Signal Element Timing</text:p>
          </table:table-cell>
        </table:table-row>
        <table:table-row>
          <table:table-cell table:style-name="TableRowCell" office:value-type="string">
            <text:p text:style-name="Table_20_Contents">5</text:p>
          </table:table-cell>
          <table:table-cell table:style-name="TableRowCell" office:value-type="string">
            <text:p text:style-name="Table_20_Contents">CTS</text:p>
          </table:table-cell>
          <table:table-cell table:style-name="TableRowCell" office:value-type="string">
            <text:p text:style-name="Table_20_Contents">In</text:p>
          </table:table-cell>
          <table:table-cell table:style-name="TableRowCell" office:value-type="string">
            <text:p text:style-name="Table_20_Contents">Clear to Send</text:p>
          </table:table-cell>
          <table:table-cell table:style-name="TableRowCell" office:value-type="string">
            <text:p text:style-name="Table_20_Contents">1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6</text:p>
          </table:table-cell>
          <table:table-cell table:style-name="TableRowCell" office:value-type="string">
            <text:p text:style-name="Table_20_Contents">DSR</text:p>
          </table:table-cell>
          <table:table-cell table:style-name="TableRowCell" office:value-type="string">
            <text:p text:style-name="Table_20_Contents">In</text:p>
          </table:table-cell>
          <table:table-cell table:style-name="TableRowCell" office:value-type="string">
            <text:p text:style-name="Table_20_Contents">Data Set Ready</text:p>
          </table:table-cell>
          <table:table-cell table:style-name="TableRowCell" office:value-type="string">
            <text:p text:style-name="Table_20_Contents">1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7</text:p>
          </table:table-cell>
          <table:table-cell table:style-name="TableRowCell" office:value-type="string">
            <text:p text:style-name="Table_20_Contents">SG</text:p>
          </table:table-cell>
          <table:table-cell table:style-name="TableRowCell" office:value-type="string">
            <text:p text:style-name="Table_20_Contents">I/O</text:p>
          </table:table-cell>
          <table:table-cell table:style-name="TableRowCell" office:value-type="string">
            <text:p text:style-name="Table_20_Contents">Signal Ground</text:p>
          </table:table-cell>
          <table:table-cell table:style-name="TableRowCell" office:value-type="string">
            <text:p text:style-name="Table_20_Contents">20</text:p>
          </table:table-cell>
          <table:table-cell table:style-name="TableRowCell" office:value-type="string">
            <text:p text:style-name="Table_20_Contents">DTR</text:p>
          </table:table-cell>
          <table:table-cell table:style-name="TableRowCell" office:value-type="string">
            <text:p text:style-name="Table_20_Contents">Out</text:p>
          </table:table-cell>
          <table:table-cell table:style-name="TableRowCell" office:value-type="string">
            <text:p text:style-name="Table_20_Contents">Data Terminal Ready</text:p>
          </table:table-cell>
        </table:table-row>
        <table:table-row>
          <table:table-cell table:style-name="TableRowCell" office:value-type="string">
            <text:p text:style-name="Table_20_Contents">8</text:p>
          </table:table-cell>
          <table:table-cell table:style-name="TableRowCell" office:value-type="string">
            <text:p text:style-name="Table_20_Contents">CD</text:p>
          </table:table-cell>
          <table:table-cell table:style-name="TableRowCell" office:value-type="string">
            <text:p text:style-name="Table_20_Contents">In</text:p>
          </table:table-cell>
          <table:table-cell table:style-name="TableRowCell" office:value-type="string">
            <text:p text:style-name="Table_20_Contents">Carrier Detect</text:p>
          </table:table-cell>
          <table:table-cell table:style-name="TableRowCell" office:value-type="string">
            <text:p text:style-name="Table_20_Contents">21</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2</text:p>
          </table:table-cell>
          <table:table-cell table:style-name="TableRowCell" office:value-type="string">
            <text:p text:style-name="Table_20_Contents">CI</text:p>
          </table:table-cell>
          <table:table-cell table:style-name="TableRowCell" office:value-type="string">
            <text:p text:style-name="Table_20_Contents">In</text:p>
          </table:table-cell>
          <table:table-cell table:style-name="TableRowCell" office:value-type="string">
            <text:p text:style-name="Table_20_Contents">Ring Indicator</text:p>
          </table:table-cell>
        </table:table-row>
        <table:table-row>
          <table:table-cell table:style-name="TableRowCell" office:value-type="string">
            <text:p text:style-name="Table_20_Contents">10</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1</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4</text:p>
          </table:table-cell>
          <table:table-cell table:style-name="TableRowCell" office:value-type="string">
            <text:p text:style-name="Table_20_Contents">ST1</text:p>
          </table:table-cell>
          <table:table-cell table:style-name="TableRowCell" office:value-type="string">
            <text:p text:style-name="Table_20_Contents">Out</text:p>
          </table:table-cell>
          <table:table-cell table:style-name="TableRowCell" office:value-type="string">
            <text:p text:style-name="Table_20_Contents">Transmit Signal Element Timing</text:p>
          </table:table-cell>
        </table:table-row>
        <table:table-row>
          <table:table-cell table:style-name="TableRowCell" office:value-type="string">
            <text:p text:style-name="Table_20_Contents">1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5</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Note: "-" denotes that the pin is not used or not connected.)</text:p>
      <text:p text:style-name="Text_20_body"><text:span text:style-name="Strong_20_Emphasis">Key Jack</text:span></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Vcc2</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2</text:p>
          </table:table-cell>
          <table:table-cell table:style-name="TableRowCell" office:value-type="string">
            <text:p text:style-name="Table_20_Contents">MOUSE DATA</text:p>
          </table:table-cell>
          <table:table-cell table:style-name="TableRowCell" office:value-type="string">
            <text:p text:style-name="Table_20_Contents">In</text:p>
          </table:table-cell>
          <table:table-cell table:style-name="TableRowCell" office:value-type="string">
            <text:p text:style-name="Table_20_Contents">Mouse Data</text:p>
          </table:table-cell>
        </table:table-row>
        <table:table-row>
          <table:table-cell table:style-name="TableRowCell" office:value-type="string">
            <text:p text:style-name="Table_20_Contents">3</text:p>
          </table:table-cell>
          <table:table-cell table:style-name="TableRowCell" office:value-type="string">
            <text:p text:style-name="Table_20_Contents">KEYT × D</text:p>
          </table:table-cell>
          <table:table-cell table:style-name="TableRowCell" office:value-type="string">
            <text:p text:style-name="Table_20_Contents">In</text:p>
          </table:table-cell>
          <table:table-cell table:style-name="TableRowCell" office:value-type="string">
            <text:p text:style-name="Table_20_Contents">Key Receive Data</text:p>
          </table:table-cell>
        </table:table-row>
        <table:table-row>
          <table:table-cell table:style-name="TableRowCell" office:value-type="string">
            <text:p text:style-name="Table_20_Contents">4</text:p>
          </table:table-cell>
          <table:table-cell table:style-name="TableRowCell" office:value-type="string">
            <text:p text:style-name="Table_20_Contents">KEYR × D</text:p>
          </table:table-cell>
          <table:table-cell table:style-name="TableRowCell" office:value-type="string">
            <text:p text:style-name="Table_20_Contents">Out</text:p>
          </table:table-cell>
          <table:table-cell table:style-name="TableRowCell" office:value-type="string">
            <text:p text:style-name="Table_20_Contents">Key Send Data</text:p>
          </table:table-cell>
        </table:table-row>
        <table:table-row>
          <table:table-cell table:style-name="TableRowCell" office:value-type="string">
            <text:p text:style-name="Table_20_Contents">5</text:p>
          </table:table-cell>
          <table:table-cell table:style-name="TableRowCell" office:value-type="string">
            <text:p text:style-name="Table_20_Contents">READY</text:p>
          </table:table-cell>
          <table:table-cell table:style-name="TableRowCell" office:value-type="string">
            <text:p text:style-name="Table_20_Contents">Out</text:p>
          </table:table-cell>
          <table:table-cell table:style-name="TableRowCell" office:value-type="string">
            <text:p text:style-name="Table_20_Contents">Key Send Permission/Rejection</text:p>
          </table:table-cell>
        </table:table-row>
        <table:table-row>
          <table:table-cell table:style-name="TableRowCell" office:value-type="string">
            <text:p text:style-name="Table_20_Contents">6</text:p>
          </table:table-cell>
          <table:table-cell table:style-name="TableRowCell" office:value-type="string">
            <text:p text:style-name="Table_20_Contents">REMOTE</text:p>
          </table:table-cell>
          <table:table-cell table:style-name="TableRowCell" office:value-type="string">
            <text:p text:style-name="Table_20_Contents">In</text:p>
          </table:table-cell>
          <table:table-cell table:style-name="TableRowCell" office:value-type="string">
            <text:p text:style-name="Table_20_Contents">Remote Signal</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Headphone</text:span></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L</text:p>
          </table:table-cell>
          <table:table-cell table:style-name="TableRowCell" office:value-type="string">
            <text:p text:style-name="Table_20_Contents">Out</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3</text:p>
          </table:table-cell>
          <table:table-cell table:style-name="TableRowCell" office:value-type="string">
            <text:p text:style-name="Table_20_Contents">R</text:p>
          </table:table-cell>
          <table:table-cell table:style-name="TableRowCell" office:value-type="string">
            <text:p text:style-name="Table_20_Contents">Out</text:p>
          </table:table-cell>
          <table:table-cell table:style-name="TableRowCell" office:value-type="string">
            <text:p text:style-name="Table_20_Contents">Audio Signal (Right)</text:p>
          </table:table-cell>
        </table:table-row>
      </table:table>
      <text:p text:style-name="First_20_paragraph"><text:span text:style-name="Strong_20_Emphasis">Mouse Port</text:span></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MS CTRL</text:p>
          </table:table-cell>
          <table:table-cell table:style-name="TableRowCell" office:value-type="string">
            <text:p text:style-name="Table_20_Contents">Out</text:p>
          </table:table-cell>
          <table:table-cell table:style-name="TableRowCell" office:value-type="string">
            <text:p text:style-name="Table_20_Contents">Control Signal</text:p>
          </table:table-cell>
        </table:table-row>
        <table:table-row>
          <table:table-cell table:style-name="TableRowCell" office:value-type="string">
            <text:p text:style-name="Table_20_Contents">3</text:p>
          </table:table-cell>
          <table:table-cell table:style-name="TableRowCell" office:value-type="string">
            <text:p text:style-name="Table_20_Contents">MS DATA IN</text:p>
          </table:table-cell>
          <table:table-cell table:style-name="TableRowCell" office:value-type="string">
            <text:p text:style-name="Table_20_Contents">In</text:p>
          </table:table-cell>
          <table:table-cell table:style-name="TableRowCell" office:value-type="string">
            <text:p text:style-name="Table_20_Contents">Mouse Data</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3D Terminal</text:span> <text:span text:style-name="Strong_20_Emphasis">External Floppy Disk Connection Connector</text:span></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ISK TYPE SELECT</text:p>
          </table:table-cell>
          <table:table-cell table:style-name="TableRowCell" office:value-type="string">
            <text:p text:style-name="Table_20_Contents">Out</text:p>
          </table:table-cell>
          <table:table-cell table:style-name="TableRowCell" office:value-type="string">
            <text:p text:style-name="Table_20_Contents">Disk Type Selection Signal</text:p>
          </table:table-cell>
        </table:table-row>
        <table:table-row>
          <table:table-cell table:style-name="TableRowCell" office:value-type="string">
            <text:p text:style-name="Table_20_Contents">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3</text:p>
          </table:table-cell>
          <table:table-cell table:style-name="TableRowCell" office:value-type="string">
            <text:p text:style-name="Table_20_Contents">DRIVE SELECT 3</text:p>
          </table:table-cell>
          <table:table-cell table:style-name="TableRowCell" office:value-type="string">
            <text:p text:style-name="Table_20_Contents">Out</text:p>
          </table:table-cell>
          <table:table-cell table:style-name="TableRowCell" office:value-type="string">
            <text:p text:style-name="Table_20_Contents">Drive Select Signal 3</text:p>
          </table:table-cell>
        </table:table-row>
        <table:table-row>
          <table:table-cell table:style-name="TableRowCell" office:value-type="string">
            <text:p text:style-name="Table_20_Contents">4</text:p>
          </table:table-cell>
          <table:table-cell table:style-name="TableRowCell" office:value-type="string">
            <text:p text:style-name="Table_20_Contents">INDEX</text:p>
          </table:table-cell>
          <table:table-cell table:style-name="TableRowCell" office:value-type="string">
            <text:p text:style-name="Table_20_Contents">In</text:p>
          </table:table-cell>
          <table:table-cell table:style-name="TableRowCell" office:value-type="string">
            <text:p text:style-name="Table_20_Contents">Disk Index Signal</text:p>
          </table:table-cell>
        </table:table-row>
        <table:table-row>
          <table:table-cell table:style-name="TableRowCell" office:value-type="string">
            <text:p text:style-name="Table_20_Contents">5</text:p>
          </table:table-cell>
          <table:table-cell table:style-name="TableRowCell" office:value-type="string">
            <text:p text:style-name="Table_20_Contents">DRIVE SELECT 0</text:p>
          </table:table-cell>
          <table:table-cell table:style-name="TableRowCell" office:value-type="string">
            <text:p text:style-name="Table_20_Contents">Out</text:p>
          </table:table-cell>
          <table:table-cell table:style-name="TableRowCell" office:value-type="string">
            <text:p text:style-name="Table_20_Contents">Drive Select Signal 0</text:p>
          </table:table-cell>
        </table:table-row>
        <table:table-row>
          <table:table-cell table:style-name="TableRowCell" office:value-type="string">
            <text:p text:style-name="Table_20_Contents">6</text:p>
          </table:table-cell>
          <table:table-cell table:style-name="TableRowCell" office:value-type="string">
            <text:p text:style-name="Table_20_Contents">DRIVE SELECT 1</text:p>
          </table:table-cell>
          <table:table-cell table:style-name="TableRowCell" office:value-type="string">
            <text:p text:style-name="Table_20_Contents">Out</text:p>
          </table:table-cell>
          <table:table-cell table:style-name="TableRowCell" office:value-type="string">
            <text:p text:style-name="Table_20_Contents">Drive Select Signal 1</text:p>
          </table:table-cell>
        </table:table-row>
        <table:table-row>
          <table:table-cell table:style-name="TableRowCell" office:value-type="string">
            <text:p text:style-name="Table_20_Contents">7</text:p>
          </table:table-cell>
          <table:table-cell table:style-name="TableRowCell" office:value-type="string">
            <text:p text:style-name="Table_20_Contents">DRIVE SELECT 2</text:p>
          </table:table-cell>
          <table:table-cell table:style-name="TableRowCell" office:value-type="string">
            <text:p text:style-name="Table_20_Contents">Out</text:p>
          </table:table-cell>
          <table:table-cell table:style-name="TableRowCell" office:value-type="string">
            <text:p text:style-name="Table_20_Contents">Drive Select Signal 2</text:p>
          </table:table-cell>
        </table:table-row>
        <table:table-row>
          <table:table-cell table:style-name="TableRowCell" office:value-type="string">
            <text:p text:style-name="Table_20_Contents">8</text:p>
          </table:table-cell>
          <table:table-cell table:style-name="TableRowCell" office:value-type="string">
            <text:p text:style-name="Table_20_Contents">MOTOR ON</text:p>
          </table:table-cell>
          <table:table-cell table:style-name="TableRowCell" office:value-type="string">
            <text:p text:style-name="Table_20_Contents">Out</text:p>
          </table:table-cell>
          <table:table-cell table:style-name="TableRowCell" office:value-type="string">
            <text:p text:style-name="Table_20_Contents">Motor On Signal</text:p>
          </table:table-cell>
        </table:table-row>
        <table:table-row>
          <table:table-cell table:style-name="TableRowCell" office:value-type="string">
            <text:p text:style-name="Table_20_Contents">9</text:p>
          </table:table-cell>
          <table:table-cell table:style-name="TableRowCell" office:value-type="string">
            <text:p text:style-name="Table_20_Contents">DIRECTION</text:p>
          </table:table-cell>
          <table:table-cell table:style-name="TableRowCell" office:value-type="string">
            <text:p text:style-name="Table_20_Contents">Out</text:p>
          </table:table-cell>
          <table:table-cell table:style-name="TableRowCell" office:value-type="string">
            <text:p text:style-name="Table_20_Contents">Head Move Direction Signal</text:p>
          </table:table-cell>
        </table:table-row>
        <table:table-row>
          <table:table-cell table:style-name="TableRowCell" office:value-type="string">
            <text:p text:style-name="Table_20_Contents">10</text:p>
          </table:table-cell>
          <table:table-cell table:style-name="TableRowCell" office:value-type="string">
            <text:p text:style-name="Table_20_Contents">STEP</text:p>
          </table:table-cell>
          <table:table-cell table:style-name="TableRowCell" office:value-type="string">
            <text:p text:style-name="Table_20_Contents">Out</text:p>
          </table:table-cell>
          <table:table-cell table:style-name="TableRowCell" office:value-type="string">
            <text:p text:style-name="Table_20_Contents">Head Move Signal</text:p>
          </table:table-cell>
        </table:table-row>
        <table:table-row>
          <table:table-cell table:style-name="TableRowCell" office:value-type="string">
            <text:p text:style-name="Table_20_Contents">11</text:p>
          </table:table-cell>
          <table:table-cell table:style-name="TableRowCell" office:value-type="string">
            <text:p text:style-name="Table_20_Contents">WRITE DATA</text:p>
          </table:table-cell>
          <table:table-cell table:style-name="TableRowCell" office:value-type="string">
            <text:p text:style-name="Table_20_Contents">Out</text:p>
          </table:table-cell>
          <table:table-cell table:style-name="TableRowCell" office:value-type="string">
            <text:p text:style-name="Table_20_Contents">Write Data Signal</text:p>
          </table:table-cell>
        </table:table-row>
      </table:table>
      <text:p text:style-name="First_20_paragraph"><text:span text:style-name="Strong_20_Emphasis">(CZ-634C-TN / CZ-644C-TN)</text:span></text:p>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WRITE GATE</text:p>
          </table:table-cell>
          <table:table-cell table:style-name="TableRowCell" office:value-type="string">
            <text:p text:style-name="Table_20_Contents">Out</text:p>
          </table:table-cell>
          <table:table-cell table:style-name="TableRowCell" office:value-type="string">
            <text:p text:style-name="Table_20_Contents">Write Gate Signal</text:p>
          </table:table-cell>
        </table:table-row>
        <table:table-row>
          <table:table-cell table:style-name="TableRowCell" office:value-type="string">
            <text:p text:style-name="Table_20_Contents">13</text:p>
          </table:table-cell>
          <table:table-cell table:style-name="TableRowCell" office:value-type="string">
            <text:p text:style-name="Table_20_Contents">TRACK 00</text:p>
          </table:table-cell>
          <table:table-cell table:style-name="TableRowCell" office:value-type="string">
            <text:p text:style-name="Table_20_Contents">In</text:p>
          </table:table-cell>
          <table:table-cell table:style-name="TableRowCell" office:value-type="string">
            <text:p text:style-name="Table_20_Contents">Track 0</text:p>
          </table:table-cell>
        </table:table-row>
        <table:table-row>
          <table:table-cell table:style-name="TableRowCell" office:value-type="string">
            <text:p text:style-name="Table_20_Contents">14</text:p>
          </table:table-cell>
          <table:table-cell table:style-name="TableRowCell" office:value-type="string">
            <text:p text:style-name="Table_20_Contents">WRITE PROTECT</text:p>
          </table:table-cell>
          <table:table-cell table:style-name="TableRowCell" office:value-type="string">
            <text:p text:style-name="Table_20_Contents">In</text:p>
          </table:table-cell>
          <table:table-cell table:style-name="TableRowCell" office:value-type="string">
            <text:p text:style-name="Table_20_Contents">Write Protect Signal</text:p>
          </table:table-cell>
        </table:table-row>
        <table:table-row>
          <table:table-cell table:style-name="TableRowCell" office:value-type="string">
            <text:p text:style-name="Table_20_Contents">15</text:p>
          </table:table-cell>
          <table:table-cell table:style-name="TableRowCell" office:value-type="string">
            <text:p text:style-name="Table_20_Contents">READ DATA</text:p>
          </table:table-cell>
          <table:table-cell table:style-name="TableRowCell" office:value-type="string">
            <text:p text:style-name="Table_20_Contents">In</text:p>
          </table:table-cell>
          <table:table-cell table:style-name="TableRowCell" office:value-type="string">
            <text:p text:style-name="Table_20_Contents">Read Data Signal</text:p>
          </table:table-cell>
        </table:table-row>
        <table:table-row>
          <table:table-cell table:style-name="TableRowCell" office:value-type="string">
            <text:p text:style-name="Table_20_Contents">16</text:p>
          </table:table-cell>
          <table:table-cell table:style-name="TableRowCell" office:value-type="string">
            <text:p text:style-name="Table_20_Contents">SIDE SELECT</text:p>
          </table:table-cell>
          <table:table-cell table:style-name="TableRowCell" office:value-type="string">
            <text:p text:style-name="Table_20_Contents">Out</text:p>
          </table:table-cell>
          <table:table-cell table:style-name="TableRowCell" office:value-type="string">
            <text:p text:style-name="Table_20_Contents">Head Select Signal</text:p>
          </table:table-cell>
        </table:table-row>
        <table:table-row>
          <table:table-cell table:style-name="TableRowCell" office:value-type="string">
            <text:p text:style-name="Table_20_Contents">17</text:p>
          </table:table-cell>
          <table:table-cell table:style-name="TableRowCell" office:value-type="string">
            <text:p text:style-name="Table_20_Contents">READY</text:p>
          </table:table-cell>
          <table:table-cell table:style-name="TableRowCell" office:value-type="string">
            <text:p text:style-name="Table_20_Contents">In</text:p>
          </table:table-cell>
          <table:table-cell table:style-name="TableRowCell" office:value-type="string">
            <text:p text:style-name="Table_20_Contents">Drive Ready Signal</text:p>
          </table:table-cell>
        </table:table-row>
        <table:table-row>
          <table:table-cell table:style-name="TableRowCell" office:value-type="string">
            <text:p text:style-name="Table_20_Contents">1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20</text:p>
          </table:table-cell>
          <table:table-cell table:style-name="TableRowCell" office:value-type="string">
            <text:p text:style-name="Table_20_Contents">OPTION SELECT 0</text:p>
          </table:table-cell>
          <table:table-cell table:style-name="TableRowCell" office:value-type="string">
            <text:p text:style-name="Table_20_Contents">Out</text:p>
          </table:table-cell>
          <table:table-cell table:style-name="TableRowCell" office:value-type="string">
            <text:p text:style-name="Table_20_Contents">Option Select 0</text:p>
          </table:table-cell>
        </table:table-row>
        <table:table-row>
          <table:table-cell table:style-name="TableRowCell" office:value-type="string">
            <text:p text:style-name="Table_20_Contents">21</text:p>
          </table:table-cell>
          <table:table-cell table:style-name="TableRowCell" office:value-type="string">
            <text:p text:style-name="Table_20_Contents">OPTION SELECT 1</text:p>
          </table:table-cell>
          <table:table-cell table:style-name="TableRowCell" office:value-type="string">
            <text:p text:style-name="Table_20_Contents">Out</text:p>
          </table:table-cell>
          <table:table-cell table:style-name="TableRowCell" office:value-type="string">
            <text:p text:style-name="Table_20_Contents">Option Select 1</text:p>
          </table:table-cell>
        </table:table-row>
        <table:table-row>
          <table:table-cell table:style-name="TableRowCell" office:value-type="string">
            <text:p text:style-name="Table_20_Contents">22</text:p>
          </table:table-cell>
          <table:table-cell table:style-name="TableRowCell" office:value-type="string">
            <text:p text:style-name="Table_20_Contents">OPTION SELECT 2</text:p>
          </table:table-cell>
          <table:table-cell table:style-name="TableRowCell" office:value-type="string">
            <text:p text:style-name="Table_20_Contents">Out</text:p>
          </table:table-cell>
          <table:table-cell table:style-name="TableRowCell" office:value-type="string">
            <text:p text:style-name="Table_20_Contents">Option Select 2 CZ-600C dedicated signal</text:p>
          </table:table-cell>
        </table:table-row>
        <table:table-row>
          <table:table-cell table:style-name="TableRowCell" office:value-type="string">
            <text:p text:style-name="Table_20_Contents">23</text:p>
          </table:table-cell>
          <table:table-cell table:style-name="TableRowCell" office:value-type="string">
            <text:p text:style-name="Table_20_Contents">OPTION SELECT 3</text:p>
          </table:table-cell>
          <table:table-cell table:style-name="TableRowCell" office:value-type="string">
            <text:p text:style-name="Table_20_Contents">Out</text:p>
          </table:table-cell>
          <table:table-cell table:style-name="TableRowCell" office:value-type="string">
            <text:p text:style-name="Table_20_Contents">Option Select 3</text:p>
          </table:table-cell>
        </table:table-row>
        <table:table-row>
          <table:table-cell table:style-name="TableRowCell" office:value-type="string">
            <text:p text:style-name="Table_20_Contents">24</text:p>
          </table:table-cell>
          <table:table-cell table:style-name="TableRowCell" office:value-type="string">
            <text:p text:style-name="Table_20_Contents">EJECT</text:p>
          </table:table-cell>
          <table:table-cell table:style-name="TableRowCell" office:value-type="string">
            <text:p text:style-name="Table_20_Contents">Out</text:p>
          </table:table-cell>
          <table:table-cell table:style-name="TableRowCell" office:value-type="string">
            <text:p text:style-name="Table_20_Contents">Eject Signal</text:p>
          </table:table-cell>
        </table:table-row>
        <table:table-row>
          <table:table-cell table:style-name="TableRowCell" office:value-type="string">
            <text:p text:style-name="Table_20_Contents">25</text:p>
          </table:table-cell>
          <table:table-cell table:style-name="TableRowCell" office:value-type="string">
            <text:p text:style-name="Table_20_Contents">EJECT MASK</text:p>
          </table:table-cell>
          <table:table-cell table:style-name="TableRowCell" office:value-type="string">
            <text:p text:style-name="Table_20_Contents">Out</text:p>
          </table:table-cell>
          <table:table-cell table:style-name="TableRowCell" office:value-type="string">
            <text:p text:style-name="Table_20_Contents">Eject Mask Signal</text:p>
          </table:table-cell>
        </table:table-row>
        <table:table-row>
          <table:table-cell table:style-name="TableRowCell" office:value-type="string">
            <text:p text:style-name="Table_20_Contents">26</text:p>
          </table:table-cell>
          <table:table-cell table:style-name="TableRowCell" office:value-type="string">
            <text:p text:style-name="Table_20_Contents">LED BLINK</text:p>
          </table:table-cell>
          <table:table-cell table:style-name="TableRowCell" office:value-type="string">
            <text:p text:style-name="Table_20_Contents">Out</text:p>
          </table:table-cell>
          <table:table-cell table:style-name="TableRowCell" office:value-type="string">
            <text:p text:style-name="Table_20_Contents">LED Blink Signal</text:p>
          </table:table-cell>
        </table:table-row>
        <table:table-row>
          <table:table-cell table:style-name="TableRowCell" office:value-type="string">
            <text:p text:style-name="Table_20_Contents">27</text:p>
          </table:table-cell>
          <table:table-cell table:style-name="TableRowCell" office:value-type="string">
            <text:p text:style-name="Table_20_Contents">DISK IN</text:p>
          </table:table-cell>
          <table:table-cell table:style-name="TableRowCell" office:value-type="string">
            <text:p text:style-name="Table_20_Contents">In</text:p>
          </table:table-cell>
          <table:table-cell table:style-name="TableRowCell" office:value-type="string">
            <text:p text:style-name="Table_20_Contents">Disk Insert Signal</text:p>
          </table:table-cell>
        </table:table-row>
        <table:table-row>
          <table:table-cell table:style-name="TableRowCell" office:value-type="string">
            <text:p text:style-name="Table_20_Contents">28</text:p>
          </table:table-cell>
          <table:table-cell table:style-name="TableRowCell" office:value-type="string">
            <text:p text:style-name="Table_20_Contents">ERR DISK</text:p>
          </table:table-cell>
          <table:table-cell table:style-name="TableRowCell" office:value-type="string">
            <text:p text:style-name="Table_20_Contents">In</text:p>
          </table:table-cell>
          <table:table-cell table:style-name="TableRowCell" office:value-type="string">
            <text:p text:style-name="Table_20_Contents">Disk Insert Error Signal</text:p>
          </table:table-cell>
        </table:table-row>
        <table:table-row>
          <table:table-cell table:style-name="TableRowCell" office:value-type="string">
            <text:p text:style-name="Table_20_Contents">29</text:p>
          </table:table-cell>
          <table:table-cell table:style-name="TableRowCell" office:value-type="string">
            <text:p text:style-name="Table_20_Contents">FDD INT</text:p>
          </table:table-cell>
          <table:table-cell table:style-name="TableRowCell" office:value-type="string">
            <text:p text:style-name="Table_20_Contents">In</text:p>
          </table:table-cell>
          <table:table-cell table:style-name="TableRowCell" office:value-type="string">
            <text:p text:style-name="Table_20_Contents">Disk Interrupt Signal</text:p>
          </table:table-cell>
        </table:table-row>
        <table:table-row>
          <table:table-cell table:style-name="TableRowCell" office:value-type="string">
            <text:p text:style-name="Table_20_Contents">30</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1</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3</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5</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7</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 SCSI Device Connection Connector</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26</text:p>
          </table:table-cell>
          <table:table-cell table:style-name="TableRowCell" office:value-type="string">
            <text:p text:style-name="Table_20_Contents">D0</text:p>
          </table:table-cell>
          <table:table-cell table:style-name="TableRowCell" office:value-type="string">
            <text:p text:style-name="Table_20_Contents">I/O</text:p>
          </table:table-cell>
          <table:table-cell table:style-name="TableRowCell" office:value-type="string">
            <text:p text:style-name="Table_20_Contents">Data Signal</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27</text:p>
          </table:table-cell>
          <table:table-cell table:style-name="TableRowCell" office:value-type="string">
            <text:p text:style-name="Table_20_Contents">D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ext:p text:style-name="Table_20_Contents">28</text:p>
          </table:table-cell>
          <table:table-cell table:style-name="TableRowCell" office:value-type="string">
            <text:p text:style-name="Table_20_Contents">D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29</text:p>
          </table:table-cell>
          <table:table-cell table:style-name="TableRowCell" office:value-type="string">
            <text:p text:style-name="Table_20_Contents">D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GND</text:p>
          </table:table-cell>
          <table:table-cell table:style-name="TableRowCell" office:value-type="string">
            <text:p text:style-name="Table_20_Contents">30</text:p>
          </table:table-cell>
          <table:table-cell table:style-name="TableRowCell" office:value-type="string">
            <text:p text:style-name="Table_20_Contents">D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31</text:p>
          </table:table-cell>
          <table:table-cell table:style-name="TableRowCell" office:value-type="string">
            <text:p text:style-name="Table_20_Contents">D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32</text:p>
          </table:table-cell>
          <table:table-cell table:style-name="TableRowCell" office:value-type="string">
            <text:p text:style-name="Table_20_Contents">D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33</text:p>
          </table:table-cell>
          <table:table-cell table:style-name="TableRowCell" office:value-type="string">
            <text:p text:style-name="Table_20_Contents">D7</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34</text:p>
          </table:table-cell>
          <table:table-cell table:style-name="TableRowCell" office:value-type="string">
            <text:p text:style-name="Table_20_Contents">DBP</text:p>
          </table:table-cell>
          <table:table-cell table:style-name="TableRowCell" office:value-type="string">
            <text:p text:style-name="Table_20_Contents">-</text:p>
          </table:table-cell>
          <table:table-cell table:style-name="TableRowCell" office:value-type="string">
            <text:p text:style-name="Table_20_Contents">" Data Bus Parity Bit</text:p>
          </table:table-cell>
        </table:table-row>
        <table:table-row>
          <table:table-cell table:style-name="TableRowCell" office:value-type="string">
            <text:p text:style-name="Table_20_Contents">10</text:p>
          </table:table-cell>
          <table:table-cell table:style-name="TableRowCell" office:value-type="string">
            <text:p text:style-name="Table_20_Contents">GND</text:p>
          </table:table-cell>
          <table:table-cell table:style-name="TableRowCell" office:value-type="string">
            <text:p text:style-name="Table_20_Contents">35</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ext:p text:style-name="Table_20_Contents">36</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37</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header-rows>
          <table:table-row>
            <table:table-cell table:style-name="TableHeaderRowCell" office:value-type="string">
              <text:p text:style-name="Table_20_Heading">Pin</text:p>
            </table:table-cell>
            <table:table-cell table:style-name="TableHeaderRowCell" office:value-type="string">
              <text:p text:style-name="Table_20_Heading">Signal</text:p>
            </table:table-cell>
            <table:table-cell table:style-name="TableHeaderRowCell" office:value-type="string">
              <text:p text:style-name="Table_20_Heading">Pin</text:p>
            </table:table-cell>
            <table:table-cell table:style-name="TableHeaderRowCell" office:value-type="string">
              <text:p text:style-name="Table_20_Heading">Signal</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38</text:p>
          </table:table-cell>
          <table:table-cell table:style-name="TableRowCell" office:value-type="string">
            <text:p text:style-name="Table_20_Contents">TMPWR</text:p>
          </table:table-cell>
          <table:table-cell table:style-name="TableRowCell" office:value-type="string">
            <text:p text:style-name="Table_20_Contents">Out</text:p>
          </table:table-cell>
          <table:table-cell table:style-name="TableRowCell" office:value-type="string">
            <text:p text:style-name="Table_20_Contents">Termination circuit use power</text:p>
          </table:table-cell>
        </table:table-row>
        <table:table-row>
          <table:table-cell table:style-name="TableRowCell" office:value-type="string">
            <text:p text:style-name="Table_20_Contents">14</text:p>
          </table:table-cell>
          <table:table-cell table:style-name="TableRowCell" office:value-type="string">
            <text:p text:style-name="Table_20_Contents">GND</text:p>
          </table:table-cell>
          <table:table-cell table:style-name="TableRowCell" office:value-type="string">
            <text:p text:style-name="Table_20_Contents">3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5</text:p>
          </table:table-cell>
          <table:table-cell table:style-name="TableRowCell" office:value-type="string">
            <text:p text:style-name="Table_20_Contents">GND</text:p>
          </table:table-cell>
          <table:table-cell table:style-name="TableRowCell" office:value-type="string">
            <text:p text:style-name="Table_20_Contents">40</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6</text:p>
          </table:table-cell>
          <table:table-cell table:style-name="TableRowCell" office:value-type="string">
            <text:p text:style-name="Table_20_Contents">GND</text:p>
          </table:table-cell>
          <table:table-cell table:style-name="TableRowCell" office:value-type="string">
            <text:p text:style-name="Table_20_Contents">41</text:p>
          </table:table-cell>
          <table:table-cell table:style-name="TableRowCell" office:value-type="string">
            <text:p text:style-name="Table_20_Contents">ATN</text:p>
          </table:table-cell>
          <table:table-cell table:style-name="TableRowCell" office:value-type="string">
            <text:p text:style-name="Table_20_Contents">-</text:p>
          </table:table-cell>
          <table:table-cell table:style-name="TableRowCell" office:value-type="string">
            <text:p text:style-name="Table_20_Contents">Attention signal</text:p>
          </table:table-cell>
        </table:table-row>
        <table:table-row>
          <table:table-cell table:style-name="TableRowCell" office:value-type="string">
            <text:p text:style-name="Table_20_Contents">17</text:p>
          </table:table-cell>
          <table:table-cell table:style-name="TableRowCell" office:value-type="string">
            <text:p text:style-name="Table_20_Contents">GND</text:p>
          </table:table-cell>
          <table:table-cell table:style-name="TableRowCell" office:value-type="string">
            <text:p text:style-name="Table_20_Contents">4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8</text:p>
          </table:table-cell>
          <table:table-cell table:style-name="TableRowCell" office:value-type="string">
            <text:p text:style-name="Table_20_Contents">GND</text:p>
          </table:table-cell>
          <table:table-cell table:style-name="TableRowCell" office:value-type="string">
            <text:p text:style-name="Table_20_Contents">43</text:p>
          </table:table-cell>
          <table:table-cell table:style-name="TableRowCell" office:value-type="string">
            <text:p text:style-name="Table_20_Contents">BUSY</text:p>
          </table:table-cell>
          <table:table-cell table:style-name="TableRowCell" office:value-type="string">
            <text:p text:style-name="Table_20_Contents">In</text:p>
          </table:table-cell>
          <table:table-cell table:style-name="TableRowCell" office:value-type="string">
            <text:p text:style-name="Table_20_Contents">Controller active signal</text:p>
          </table:table-cell>
        </table:table-row>
        <table:table-row>
          <table:table-cell table:style-name="TableRowCell" office:value-type="string">
            <text:p text:style-name="Table_20_Contents">19</text:p>
          </table:table-cell>
          <table:table-cell table:style-name="TableRowCell" office:value-type="string">
            <text:p text:style-name="Table_20_Contents">GND</text:p>
          </table:table-cell>
          <table:table-cell table:style-name="TableRowCell" office:value-type="string">
            <text:p text:style-name="Table_20_Contents">44</text:p>
          </table:table-cell>
          <table:table-cell table:style-name="TableRowCell" office:value-type="string">
            <text:p text:style-name="Table_20_Contents">ACK</text:p>
          </table:table-cell>
          <table:table-cell table:style-name="TableRowCell" office:value-type="string">
            <text:p text:style-name="Table_20_Contents">Out</text:p>
          </table:table-cell>
          <table:table-cell table:style-name="TableRowCell" office:value-type="string">
            <text:p text:style-name="Table_20_Contents">Data transfer acknowledgment signal</text:p>
          </table:table-cell>
        </table:table-row>
        <table:table-row>
          <table:table-cell table:style-name="TableRowCell" office:value-type="string">
            <text:p text:style-name="Table_20_Contents">20</text:p>
          </table:table-cell>
          <table:table-cell table:style-name="TableRowCell" office:value-type="string">
            <text:p text:style-name="Table_20_Contents">GND</text:p>
          </table:table-cell>
          <table:table-cell table:style-name="TableRowCell" office:value-type="string">
            <text:p text:style-name="Table_20_Contents">45</text:p>
          </table:table-cell>
          <table:table-cell table:style-name="TableRowCell" office:value-type="string">
            <text:p text:style-name="Table_20_Contents">RESET</text:p>
          </table:table-cell>
          <table:table-cell table:style-name="TableRowCell" office:value-type="string">
            <text:p text:style-name="Table_20_Contents">Out</text:p>
          </table:table-cell>
          <table:table-cell table:style-name="TableRowCell" office:value-type="string">
            <text:p text:style-name="Table_20_Contents">Reset signal</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ext:p text:style-name="Table_20_Contents">46</text:p>
          </table:table-cell>
          <table:table-cell table:style-name="TableRowCell" office:value-type="string">
            <text:p text:style-name="Table_20_Contents">MSG</text:p>
          </table:table-cell>
          <table:table-cell table:style-name="TableRowCell" office:value-type="string">
            <text:p text:style-name="Table_20_Contents">In</text:p>
          </table:table-cell>
          <table:table-cell table:style-name="TableRowCell" office:value-type="string">
            <text:p text:style-name="Table_20_Contents">Command completion response signal</text:p>
          </table:table-cell>
        </table:table-row>
        <table:table-row>
          <table:table-cell table:style-name="TableRowCell" office:value-type="string">
            <text:p text:style-name="Table_20_Contents">22</text:p>
          </table:table-cell>
          <table:table-cell table:style-name="TableRowCell" office:value-type="string">
            <text:p text:style-name="Table_20_Contents">GND</text:p>
          </table:table-cell>
          <table:table-cell table:style-name="TableRowCell" office:value-type="string">
            <text:p text:style-name="Table_20_Contents">47</text:p>
          </table:table-cell>
          <table:table-cell table:style-name="TableRowCell" office:value-type="string">
            <text:p text:style-name="Table_20_Contents">SEL</text:p>
          </table:table-cell>
          <table:table-cell table:style-name="TableRowCell" office:value-type="string">
            <text:p text:style-name="Table_20_Contents">Out</text:p>
          </table:table-cell>
          <table:table-cell table:style-name="TableRowCell" office:value-type="string">
            <text:p text:style-name="Table_20_Contents">Select signal</text:p>
          </table:table-cell>
        </table:table-row>
        <table:table-row>
          <table:table-cell table:style-name="TableRowCell" office:value-type="string">
            <text:p text:style-name="Table_20_Contents">23</text:p>
          </table:table-cell>
          <table:table-cell table:style-name="TableRowCell" office:value-type="string">
            <text:p text:style-name="Table_20_Contents">GND</text:p>
          </table:table-cell>
          <table:table-cell table:style-name="TableRowCell" office:value-type="string">
            <text:p text:style-name="Table_20_Contents">48</text:p>
          </table:table-cell>
          <table:table-cell table:style-name="TableRowCell" office:value-type="string">
            <text:p text:style-name="Table_20_Contents">C/D</text:p>
          </table:table-cell>
          <table:table-cell table:style-name="TableRowCell" office:value-type="string">
            <text:p text:style-name="Table_20_Contents">In</text:p>
          </table:table-cell>
          <table:table-cell table:style-name="TableRowCell" office:value-type="string">
            <text:p text:style-name="Table_20_Contents">Command/data switching signal</text:p>
          </table:table-cell>
        </table:table-row>
        <table:table-row>
          <table:table-cell table:style-name="TableRowCell" office:value-type="string">
            <text:p text:style-name="Table_20_Contents">24</text:p>
          </table:table-cell>
          <table:table-cell table:style-name="TableRowCell" office:value-type="string">
            <text:p text:style-name="Table_20_Contents">GND</text:p>
          </table:table-cell>
          <table:table-cell table:style-name="TableRowCell" office:value-type="string">
            <text:p text:style-name="Table_20_Contents">49</text:p>
          </table:table-cell>
          <table:table-cell table:style-name="TableRowCell" office:value-type="string">
            <text:p text:style-name="Table_20_Contents">REQ</text:p>
          </table:table-cell>
          <table:table-cell table:style-name="TableRowCell" office:value-type="string">
            <text:p text:style-name="Table_20_Contents">In</text:p>
          </table:table-cell>
          <table:table-cell table:style-name="TableRowCell" office:value-type="string">
            <text:p text:style-name="Table_20_Contents">Data transfer request signal</text:p>
          </table:table-cell>
        </table:table-row>
        <table:table-row>
          <table:table-cell table:style-name="TableRowCell" office:value-type="string">
            <text:p text:style-name="Table_20_Contents">25</text:p>
          </table:table-cell>
          <table:table-cell table:style-name="TableRowCell" office:value-type="string">
            <text:p text:style-name="Table_20_Contents">GND</text:p>
          </table:table-cell>
          <table:table-cell table:style-name="TableRowCell" office:value-type="string">
            <text:p text:style-name="Table_20_Contents">50</text:p>
          </table:table-cell>
          <table:table-cell table:style-name="TableRowCell" office:value-type="string">
            <text:p text:style-name="Table_20_Contents">I/O</text:p>
          </table:table-cell>
          <table:table-cell table:style-name="TableRowCell" office:value-type="string">
            <text:p text:style-name="Table_20_Contents">In</text:p>
          </table:table-cell>
          <table:table-cell table:style-name="TableRowCell" office:value-type="string">
            <text:p text:style-name="Table_20_Contents">Input/output switching signal</text:p>
          </table:table-cell>
        </table:table-row>
      </table:table>
      <text:p text:style-name="First_20_paragraph">CZ-634C-TN CZ-644C-TN CZ-644C-TN</text:p>
      <text:list text:style-name="Numbering_20_1" text:start-value="10">
        <text:list-item>
          <text:p text:style-name="List_20_Number_20_Tight">Main Board</text:p>
        </text:list-item>
      </text:list>
      <text:p text:style-name="First_20_paragraph">[Main board component-layout diagram]</text:p>
      <text:p text:style-name="Text_20_body">"11. Main Circuit Diagram (1)"</text:p>
      <text:p text:style-name="Text_20_body"><draw:frame draw:name="img18" svg:width="480.0pt" svg:height="299.52pt"><draw:image xlink:href="Pictures/17.png" xlink:type="simple" xlink:show="embed" xlink:actuate="onLoad"/></draw:frame></text:p>
      <text:p text:style-name="Text_20_body">On the bottom left corner, it says:</text:p>
      <text:p text:style-name="Text_20_body">"- 75 -"</text:p>
      <text:p text:style-name="Text_20_body">On the bottom right corner, it says:</text:p>
      <text:p text:style-name="Text_20_body">"- 78 -"</text:p>
      <text:p text:style-name="Text_20_body">"12. Main basic wiring diagram (2)"</text:p>
      <text:p text:style-name="Text_20_body"><draw:frame draw:name="img19" svg:width="480.0pt" svg:height="295.68pt"><draw:image xlink:href="Pictures/18.png" xlink:type="simple" xlink:show="embed" xlink:actuate="onLoad"/></draw:frame></text:p>
      <text:p text:style-name="Text_20_body">The numbers at the bottom of the page, "- 77 -" and "- 78 -", probably indicate the page numbers in the document.</text:p>
      <text:p text:style-name="Text_20_body">"13. Main Basic Circuit Diagram (3)"</text:p>
      <text:p text:style-name="Text_20_body"><draw:frame draw:name="img20" svg:width="480.0pt" svg:height="339.36pt"><draw:image xlink:href="Pictures/19.png" xlink:type="simple" xlink:show="embed" xlink:actuate="onLoad"/></draw:frame></text:p>
      <text:p text:style-name="Text_20_body">"14. Main basic wiring diagram (4)"</text:p>
      <text:p text:style-name="Text_20_body"><draw:frame draw:name="img21" svg:width="480.0pt" svg:height="339.36pt"><draw:image xlink:href="Pictures/20.png" xlink:type="simple" xlink:show="embed" xlink:actuate="onLoad"/></draw:frame></text:p>
      <text:p text:style-name="Text_20_body">"— 81 —"</text:p>
      <text:p text:style-name="Text_20_body">"— 82 —"</text:p>
      <text:p text:style-name="Text_20_body">CZ-634C-TN CZ-644C-TN CZ-644C-TN</text:p>
      <text:list text:style-name="Numbering_20_1" text:start-value="15">
        <text:list-item>
          <text:p text:style-name="List_20_Number_20_Tight">Main Basic Wiring Diagram (5)</text:p>
        </text:list-item>
      </text:list>
      <text:p text:style-name="First_20_paragraph"><draw:frame draw:name="img22" svg:width="480.0pt" svg:height="339.36pt"><draw:image xlink:href="Pictures/21.png" xlink:type="simple" xlink:show="embed" xlink:actuate="onLoad"/></draw:frame></text:p>
      <text:p text:style-name="Text_20_body">[Main board schematic diagram]</text:p>
      <text:list text:style-name="Numbering_20_1" text:start-value="16">
        <text:list-item>
          <text:p text:style-name="List_20_Number_20_Tight">Control Basic Wiring Diagram</text:p>
        </text:list-item>
      </text:list>
      <text:p text:style-name="First_20_paragraph">(Schematic diagram — all labels are signal names, component designators, and part numbers in English/alphanumeric.)</text:p>
      <text:p text:style-name="Text_20_body"><draw:frame draw:name="img23" svg:width="480.0pt" svg:height="339.36pt"><draw:image xlink:href="Pictures/22.png" xlink:type="simple" xlink:show="embed" xlink:actuate="onLoad"/></draw:frame></text:p>
      <text:p text:style-name="Text_20_body">"17. Control Board"</text:p>
      <text:list text:style-name="Numbering_20_1" text:start-value="18">
        <text:list-item>
          <text:p text:style-name="List_20_Number_20_Tight">I/O, FD Connector, SCSI Connector, LED Basic Wiring Diagram</text:p>
        </text:list-item>
      </text:list>
      <text:p text:style-name="First_20_paragraph">Top right header boxes: CZ-634C-TN CZ-644C-TN</text:p>
      <text:p text:style-name="Text_20_body">(Schematic diagram — all labels are connector pin names, signal names, component designators, and part numbers in English/alphanumeric.)</text:p>
      <text:p text:style-name="Text_20_body"><draw:frame draw:name="img24" svg:width="480.0pt" svg:height="279.36pt"><draw:image xlink:href="Pictures/23.png" xlink:type="simple" xlink:show="embed" xlink:actuate="onLoad"/></draw:frame></text:p>
      <text:list text:style-name="Numbering_20_1" text:start-value="19">
        <text:list-item>
          <text:p text:style-name="List_20_Number_20_Tight">FD, I/O, SCSI Connector, Power LED, Eject, FD-LED Baseboard</text:p>
        </text:list-item>
      </text:list>
      <text:p text:style-name="First_20_paragraph">[Image 1]</text:p>
      <text:p text:style-name="Text_20_body">●FD Connector Baseboard</text:p>
      <text:p text:style-name="Text_20_body">[Image 2]</text:p>
      <text:p text:style-name="Text_20_body">●I/O Connector Baseboard</text:p>
      <text:p text:style-name="Text_20_body">[Image 3]</text:p>
      <text:p text:style-name="Text_20_body">●SCSI Connector Baseboard</text:p>
      <text:p text:style-name="Text_20_body">(Note: The "FD" in the text likely stands for "Floppy Disk")</text:p>
      <text:p text:style-name="Text_20_body">CZ-634C-TN CZ-644C-TN</text:p>
      <text:p text:style-name="Text_20_body">● Power LED Board</text:p>
      <text:p text:style-name="Text_20_body">● Eject Board ● FD-LED Board</text:p>
      <text:p text:style-name="Text_20_body">(PCB component-layout diagrams — all remaining labels are component designators and part values in English/alphanumeric.)</text:p>
      <text:p text:style-name="Text_20_body">CZ-634C-TN CZ-644C-TN</text:p>
      <text:list text:style-name="Numbering_20_1" text:start-value="20">
        <text:list-item>
          <text:p text:style-name="List_20_Number_20_Tight">Analog Basic Wiring Diagram</text:p>
        </text:list-item>
      </text:list>
      <text:p text:style-name="First_20_paragraph">(Schematic diagram labeled "ANALOG" — all remaining labels are signal names, pin names, component designators, transistor/IC part numbers, and component values in English/alphanumeric.)</text:p>
      <text:p text:style-name="Text_20_body"><draw:frame draw:name="img25" svg:width="480.0pt" svg:height="339.36pt"><draw:image xlink:href="Pictures/24.png" xlink:type="simple" xlink:show="embed" xlink:actuate="onLoad"/></draw:frame></text:p>
      <text:p text:style-name="Text_20_body">— 93 — — 94 —</text:p>
      <text:p text:style-name="Text_20_body">CZ-634C-TN CZ-644C-TN</text:p>
      <text:list text:style-name="Numbering_20_1" text:start-value="21">
        <text:list-item>
          <text:p text:style-name="List_20_Number_20_Tight">Analog board</text:p>
        </text:list-item>
      </text:list>
      <text:p text:style-name="First_20_paragraph">[PCB component layout diagram — Analog board. Component reference designators as silkscreened:]</text:p>
      <text:p text:style-name="Text_20_body">X7245CE</text:p>
      <text:p text:style-name="Text_20_body">Capacitors: C401–C418 Resistors: R401–R430 Transistors: Q401–Q409 Diodes: D401–D484 Ferrite beads / fuses: FB400–FB487 Variable resistors: VR401, VR402, VR403 ICs: IC401, IC482 PTC, CE, RM401</text:p>
      <text:p text:style-name="Text_20_body">Top-left corner: "22. Power Supply Unit Basic Circuit Diagram"</text:p>
      <text:p text:style-name="Text_20_body"><draw:frame draw:name="img26" svg:width="480.0pt" svg:height="339.36pt"><draw:image xlink:href="Pictures/25.png" xlink:type="simple" xlink:show="embed" xlink:actuate="onLoad"/></draw:frame></text:p>
      <text:p text:style-name="Text_20_body">Below the title: "The parts marked (triangle mark, square mark) are safety critical parts. When replacing, please use the specified parts at the specified locations to ensure safety and performance."</text:p>
      <text:p text:style-name="Text_20_body">(Note: The symbols, "triangle mark, square mark" are substituted for visual symbols in the actual text.)</text:p>
      <text:p text:style-name="Text_20_body">"23. Circuit Board"</text:p>
      <text:p text:style-name="Text_20_body">"KYOSAN"</text:p>
      <text:p text:style-name="Text_20_body">"AQ1716PA011D"</text:p>
      <text:p text:style-name="Text_20_body">CZ-634C-TN CZ-644C-TN</text:p>
      <text:list text:style-name="Numbering_20_1" text:start-value="24">
        <text:list-item>
          <text:p text:style-name="List_20_Number_20_Tight">Keyboard basic wiring diagram</text:p>
        </text:list-item>
      </text:list>
      <text:p text:style-name="First_20_paragraph"><draw:frame draw:name="img27" svg:width="480.0pt" svg:height="230.4pt"><draw:image xlink:href="Pictures/26.png" xlink:type="simple" xlink:show="embed" xlink:actuate="onLoad"/></draw:frame></text:p>
      <text:p text:style-name="Text_20_body">[Keyboard schematic diagram.]</text:p>
      <text:p text:style-name="Text_20_body">IC1 (microcontroller)</text:p>
      <text:p text:style-name="Preformatted_20_Text"><text:s text:c="2"/>XTAL1, XTAL2</text:p>
      <text:p text:style-name="Preformatted_20_Text"><text:s text:c="2"/>RESET</text:p>
      <text:p text:style-name="Preformatted_20_Text"><text:s text:c="2"/>P10–P17, P20–P27, P30–P37 (port lines)</text:p>
      <text:p text:style-name="Preformatted_20_Text"><text:s text:c="2"/>TXD REMOTE, RXD, STBY, RDY</text:p>
      <text:p text:style-name="First_20_paragraph">IC2 (LS374)</text:p>
      <text:p text:style-name="Text_20_body">Key matrix: row/column scan lines to key switches.</text:p>
      <text:p text:style-name="Text_20_body">LED indicators: RED, RED, RED, RED, RED, GREEN, GREEN</text:p>
      <text:p text:style-name="Text_20_body">Connector: keyboard cable / mouse connector</text:p>
      <text:p text:style-name="Text_20_body">-101- -102-</text:p>
      <text:p text:style-name="Text_20_body">"25. Keyboard Component Board"</text:p>
      <text:p text:style-name="Text_20_body">The numbers at the bottom indicate page numbers.</text:p>
      <text:p text:style-name="Text_20_body">The text located in the upper center of the image reads:</text:p>
      <text:p text:style-name="Text_20_body">"CZ-634C-TN CZ-644C-TN CZ-634C-TN CZ-644C-TN"</text:p>
      <text:p text:style-name="Text_20_body">"26. IC Pin Signal (1)</text:p>
      <text:p text:style-name="Text_20_body">RH-IX0906CEZZ G/ARRAY (CYNTHIA)</text:p>
      <text:p text:style-name="Text_20_body">Legend:</text:p>
      <text:list text:style-name="List_20_1">
        <text:list-item>
          <text:p text:style-name="List_20_Bullet_20_Tight">(dashed line) VDD (+5V)</text:p>
        </text:list-item>
        <text:list-item>
          <text:p text:style-name="List_20_Bullet_20_Tight">(solid circle) VSS (GND)</text:p>
        </text:list-item>
      </text:list>
      <text:p text:style-name="First_20_paragraph">RH-IX1095CEZZ G/ARRAY (VIPS)</text:p>
      <text:p text:style-name="Text_20_body">Legend:</text:p>
      <text:list text:style-name="List_20_1">
        <text:list-item>
          <text:p text:style-name="List_20_Bullet">(dashed line) VDD (+5V)</text:p>
        </text:list-item>
        <text:list-item>
          <text:p text:style-name="List_20_Bullet">(solid circle) VSS (GND)</text:p>
        </text:list-item>
        <text:list-item>
          <text:p text:style-name="List_20_Bullet">105 -"</text:p>
        </text:list-item>
      </text:list>
      <text:p text:style-name="First_20_paragraph">Top left diagram: CZ-634C-TN CZ-644C-TN</text:p>
      <text:p text:style-name="Text_20_body">RH-IX1604CEZZ G/ARRAY (PEDE/C)</text:p>
      <text:p text:style-name="Text_20_body">Top pin labels (from left to right): 70, 69, 68, 67, 66, 65, 64, 63, 62, 61, 60, 59, 58, 57, 56, 55, 54, 53, 52, 51</text:p>
      <text:p text:style-name="Text_20_body">Right pin labels (from top to bottom): 50, 49, 48, 47, 46, 45, 44, 43, 42, 41, 40, 39, 38, 37, 36, 35, 34, 33, 32, 31</text:p>
      <text:p text:style-name="Text_20_body">Bottom pin labels (from left to right): 1, 2, 3, 4, 5, 6, 7, 8, 9, 10, 11, 12, 13, 14, 15, 16, 17, 18, 19, 20</text:p>
      <text:p text:style-name="Text_20_body">Left pin labels (from top to bottom): 30, 29, 28, 27, 26, 25, 24, 23, 22, 21</text:p>
      <text:p text:style-name="Text_20_body">Pin functions (clockwise from top left, starting at pin 30): DQ0, A1, A2, A3, A4, A5, A6, A7, A8, AG, AD, RDQ, OE2, DQ3, DCLK, VO, VP, DO, DE, DF, LVC2, NC, TV</text:p>
      <text:p text:style-name="Text_20_body">Top right diagram: RH-IX1603CEZZ MB89352</text:p>
      <text:p text:style-name="Text_20_body">Pin functions (clockwise from top left, starting at pin ATN): ATN, ACK, REQ, MSG, DBC, SE, IO, CD, RD, SD7, SD6, SD5, SD4, SD3, SD2, SD1, SD0, SOF, A7, A6, A5, A4, A3, A2, A1, A0, GND, VCC, RST, WR, RD, INO, OE2, DQ, DRQC, DACK, REG, ADR, FC, CF, ST, RE, ATR2</text:p>
      <text:p text:style-name="Text_20_body">Middle right diagram: RH-IXI81CEZZ MN4464S</text:p>
      <text:p text:style-name="Text_20_body">Pin top (from left to right): VCC, CE2, A8, A9, A10, A11, A12, A3, A4, A2, A3, A4, A5, A6, A7, MD9, MD7, MD4, MD2, MD0, IO0/ID0, IO1/ID1</text:p>
      <text:p text:style-name="Text_20_body">Bottom right diagram: RH-IX091CEZZ (74ALS244)</text:p>
      <text:p text:style-name="Text_20_body">Pin functions (clockwise from left top, starting at VCC): VCC, CE2, A8, AO, A1, A2, A3, A4, A5, A6, A7, GND, OE1, IO8, IO7, IO6, IO5, IO4, IO3, IO2, IO0, IO1</text:p>
      <text:p text:style-name="Text_20_body">Bottom middle diagram: NJM2073D-1 (NJM2073 Dual Power Amplifier)</text:p>
      <text:p text:style-name="Preformatted_20_Text">Function:</text:p>
      <text:p text:style-name="Preformatted_20_Text"><text:s text:c="3"/>1 SS</text:p>
      <text:p text:style-name="Preformatted_20_Text"><text:s text:c="3"/>2 EO</text:p>
      <text:p text:style-name="Preformatted_20_Text"><text:s text:c="3"/>3 P1</text:p>
      <text:p text:style-name="Preformatted_20_Text"><text:s text:c="3"/>4 VS1</text:p>
      <text:p text:style-name="Preformatted_20_Text"><text:s text:c="3"/>5 SG</text:p>
      <text:p text:style-name="Preformatted_20_Text"><text:s text:c="3"/>6 OUT2</text:p>
      <text:p text:style-name="Preformatted_20_Text"><text:s text:c="3"/>7 VCC</text:p>
      <text:p text:style-name="Preformatted_20_Text"><text:s text:c="3"/>8 SG</text:p>
      <text:p text:style-name="Preformatted_20_Text"><text:s text:c="3"/>9 OUT1</text:p>
      <text:p text:style-name="Preformatted_20_Text"><text:s text:c="3"/>10 AB</text:p>
      <text:p text:style-name="First_20_paragraph">CZ-634C-TN CZ-644C-TN</text:p>
      <text:p text:style-name="Text_20_body">IC Terminal Signals (2)</text:p>
      <text:p text:style-name="Text_20_body">[IC pin assignment diagrams.]</text:p>
      <text:p text:style-name="Text_20_body">RH-IX1102CEZZ MSM6258VGS-K</text:p>
      <text:p text:style-name="Text_20_body">RH-IX1108CEZZ (SN74LS486N)</text:p>
      <text:p text:style-name="Text_20_body">RH-IX1146CEZZ (SN74ALS05)</text:p>
      <text:p text:style-name="Text_20_body">RH-IX1096CEZZ G/ARRAY10SC(AN)</text:p>
      <text:p text:style-name="Text_20_body">RH-IX1094CEZZ G/ARRAY (CATHY)</text:p>
      <text:p text:style-name="Text_20_body">CZ-634C-TN CZ-644C-TN</text:p>
      <text:p text:style-name="Text_20_body">RH-IX1093CEZZ G/ARRAY (V/CON)</text:p>
      <text:p text:style-name="Text_20_body">CZ-634C-TN CZ-644C-TN</text:p>
      <text:list text:style-name="Numbering_20_1" text:start-value="27">
        <text:list-item>
          <text:p text:style-name="List_20_Number_20_Tight">Set packaging method</text:p>
        </text:list-item>
      </text:list>
      <text:p text:style-name="First_20_paragraph">[Exploded packaging diagram with item callouts:]</text:p>
      <text:p text:style-name="Text_20_body">RGB cable TV control cable Protective cover Keyboard Mouse I/O board extraction tool Cushioning material</text:p>
      <text:p text:style-name="Text_20_body">[Box (upper right):] System disk Dictionary disk Word processor SX-WINDOW A SX-WINDOW B</text:p>
      <text:p text:style-name="Text_20_body">[Box (lower left):] Function label Key top label Poly bag Instruction manual Service shop guide OS manual Basic manual Utility manual SX-WINDOW manual</text:p>
      <text:p text:style-name="Text_20_body">Poly bag</text:p>
      <text:p text:style-name="Text_20_body">Warranty certificate X68000 Exe card Packing case NO. label</text:p>
      <text:list text:style-name="Numbering_20_1" text:start-value="28">
        <text:list-item>
          <text:p text:style-name="List_20_Number_20_Tight">Procedure for Disassembling the Circuit Board</text:p>
        </text:list-item>
      </text:list>
      <text:p text:style-name="First_20_paragraph">Please remove the screws and connectors marked with circles in the order of the numbers.</text:p>
      <text:p text:style-name="Text_20_body">CZ-634C-TN CZ-644C-TN</text:p>
      <text:list text:style-name="Numbering_20_1">
        <text:list-item>
          <text:p text:style-name="List_20_Number_20_Tight">Top case screws</text:p>
        </text:list-item>
        <text:list-item>
          <text:p text:style-name="List_20_Number_20_Tight">Floppy Disk Drive fixing screws</text:p>
        </text:list-item>
        <text:list-item>
          <text:p text:style-name="List_20_Number_20_Tight">Power cable for Floppy Disk Drive</text:p>
        </text:list-item>
        <text:list-item>
          <text:p text:style-name="List_20_Number_20_Tight">Floppy Disk Drive data cable</text:p>
        </text:list-item>
        <text:list-item>
          <text:p text:style-name="List_20_Number_20_Tight">Power Supply Unit fixing screws</text:p>
        </text:list-item>
        <text:list-item>
          <text:p text:style-name="List_20_Number_20_Tight">Power Supply Unit</text:p>
        </text:list-item>
        <text:list-item>
          <text:p text:style-name="List_20_Number_20_Tight">Fan fixing screws</text:p>
        </text:list-item>
        <text:list-item>
          <text:p text:style-name="List_20_Number_20_Tight">CD-ROM Drive fixing screws</text:p>
        </text:list-item>
        <text:list-item>
          <text:p text:style-name="List_20_Number_20_Tight">CD-ROM Drive</text:p>
        </text:list-item>
        <text:list-item>
          <text:p text:style-name="List_20_Number_20_Tight">CD-ROM Drive data cable</text:p>
        </text:list-item>
        <text:list-item>
          <text:p text:style-name="List_20_Number_20_Tight">CD-ROM Drive chassis screws</text:p>
        </text:list-item>
        <text:list-item>
          <text:p text:style-name="List_20_Number_20_Tight">CD-ROM Drive chassis</text:p>
        </text:list-item>
      </text:list>
      <text:p text:style-name="First_20_paragraph">The document seems to be a disassembly diagram for a computer, specifically for models CZ-634C-TN and CZ-644C-T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X68000 Service Manual (CZ-634C / CZ-644C)</dc:title>
    <dc:description/>
    <dc:subject/>
    <meta:keyword/>
    <meta:initial-creator/>
    <dc:creator/>
    <meta:creation-date>2026-06-19T20:40:39Z</meta:creation-date>
    <dc:date>2026-06-19T20:40:39Z</dc:date>
    <meta:user-defined meta:name="subtitle" meta:value-type="string">English translation from the Japanese original</meta:user-defined>
  </office:meta>
</office:document-meta>
</file>