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19T19:36:15Z</meta:creation-date>
    <dc:date>2026-06-19T19:36:15Z</dc:date>
    <meta:user-defined meta:name="subtitle" meta:value-type="string">English translation from the Japanese original</meta:user-defined>
  </office:meta>
</office:document-meta>
</file>