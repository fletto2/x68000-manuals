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Sharp Hard Disk Unit IT-X640 / IT-X680 — User's Manual</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SHARP X68000 supported HARD DISK UNIT IT-X640/IT-X680</text:p>
      <text:p text:style-name="Text_20_body">User's Manual itec i-tec Co., Ltd.</text:p>
      <text:p text:style-name="Text_20_body"><text:span text:style-name="Strong_20_Emphasis">HARD DISK UNIT</text:span> 40MB/80MB Hard Disk</text:p>
      <text:p text:style-name="Text_20_body">IT-X640/IT-X680</text:p>
      <text:list text:style-name="Numbering_20_1">
        <text:list-item>
          <text:p text:style-name="List_20_Number_20_Tight">It is prohibited to reproduce any part or all of this document without permission.</text:p>
        </text:list-item>
        <text:list-item>
          <text:p text:style-name="List_20_Number_20_Tight">The contents of this document may be changed without notice.</text:p>
        </text:list-item>
        <text:list-item>
          <text:p text:style-name="List_20_Number_20_Tight">We have taken great care to ensure the accuracy of the contents of this document; however, if you notice any errors or omissions, please contact the store where you purchased the product or our customer support.</text:p>
        </text:list-item>
        <text:list-item>
          <text:p text:style-name="List_20_Number_20_Tight">We do not assume responsibility for any consequential impact resulting from the use of this product, so please acknowledge this in advance.</text:p>
        </text:list-item>
      </text:list>
      <text:p text:style-name="First_20_paragraph"><text:span text:style-name="Strong_20_Emphasis">Introduction</text:span></text:p>
      <text:p text:style-name="Text_20_body">Thank you very much for purchasing the I-Tech hard disk unit TX series.</text:p>
      <text:p text:style-name="Text_20_body">This product is an external hard disk unit (40MB, 80MB) compatible with the Sharp Corporation PC-X68000 series personal computers.</text:p>
      <text:p text:style-name="Text_20_body">Handling the hard disk unit TX series requires careful attention, and there are certain things that must be done. Please read this manual thoroughly and use this product effectively. Before using the TX series, please acquire sufficient knowledge of the OS.</text:p>
      <text:p text:style-name="Text_20_body">This manual does not explain the usage of application programs related to the TX series. Please refer to their respective manuals for the application programs.</text:p>
      <text:p text:style-name="Text_20_body"><text:span text:style-name="Strong_20_Emphasis">Product Contents</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No</text:p>
            </table:table-cell>
            <table:table-cell table:style-name="TableHeaderRowCell" office:value-type="string">
              <text:p text:style-name="Table_20_Heading">Item 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Hard Disk Unit</text:p>
          </table:table-cell>
        </table:table-row>
        <table:table-row>
          <table:table-cell table:style-name="TableRowCell" office:value-type="string">
            <text:p text:style-name="Table_20_Contents">2</text:p>
          </table:table-cell>
          <table:table-cell table:style-name="TableRowCell" office:value-type="string">
            <text:p text:style-name="Table_20_Contents">Connection Cable</text:p>
          </table:table-cell>
        </table:table-row>
        <table:table-row>
          <table:table-cell table:style-name="TableRowCell" office:value-type="string">
            <text:p text:style-name="Table_20_Contents">3</text:p>
          </table:table-cell>
          <table:table-cell table:style-name="TableRowCell" office:value-type="string">
            <text:p text:style-name="Table_20_Contents">User Manual</text:p>
          </table:table-cell>
        </table:table-row>
        <table:table-row>
          <table:table-cell table:style-name="TableRowCell" office:value-type="string">
            <text:p text:style-name="Table_20_Contents">4</text:p>
          </table:table-cell>
          <table:table-cell table:style-name="TableRowCell" office:value-type="string">
            <text:p text:style-name="Table_20_Contents">Warranty Card</text:p>
          </table:table-cell>
        </table:table-row>
        <table:table-row>
          <table:table-cell table:style-name="TableRowCell" office:value-type="string">
            <text:p text:style-name="Table_20_Contents">5</text:p>
          </table:table-cell>
          <table:table-cell table:style-name="TableRowCell" office:value-type="string">
            <text:p text:style-name="Table_20_Contents">User Registration Card</text:p>
          </table:table-cell>
        </table:table-row>
      </table:table>
      <text:list text:style-name="List_20_1">
        <text:list-item>
          <text:p text:style-name="List_20_Bullet_20_Tight">Note: The external terminator (terminator resistor) is sold separately.</text:p>
        </text:list-item>
      </text:list>
      <text:p text:style-name="First_20_paragraph"><text:span text:style-name="Emphasis">(Blank page in the original.)</text:span></text:p>
      <text:p text:style-name="Text_20_body"><text:span text:style-name="Strong_20_Emphasis">Table of Contents</text:span></text:p>
      <text:p text:style-name="Text_20_body">Chapter 1: Features and Precautions</text:p>
      <text:list text:style-name="Numbering_20_1">
        <text:list-item>
          <text:p text:style-name="List_20_Number_20_Tight">ITX Series Features ........................................................... 1</text:p>
        </text:list-item>
        <text:list-item>
          <text:p text:style-name="List_20_Number_20_Tight">Precautions for Use ........................................................... 3</text:p>
        </text:list-item>
      </text:list>
      <text:p text:style-name="First_20_paragraph">Chapter 2: Names and Roles of Each Part ...................................... 5</text:p>
      <text:p text:style-name="Text_20_body">Chapter 3: Connecting to the Computer ......................................... 7</text:p>
      <text:list text:style-name="List_20_1">
        <text:list-item>
          <text:p text:style-name="List_20_Bullet_20_Tight">Configuration Diagram of Hard Disk for X68000 ............................. 7</text:p>
        </text:list-item>
        <text:list-item>
          <text:p text:style-name="List_20_Bullet_20_Tight">Relationship between ID Number and Device Number of Hard Disk for X68000... 7</text:p>
        </text:list-item>
      </text:list>
      <text:p text:style-name="First_20_paragraph">Chapter 4: Formatting .............................................................. 9</text:p>
      <text:list text:style-name="Numbering_20_1">
        <text:list-item>
          <text:p text:style-name="List_20_Number_20_Tight">Human68K Ver 2.0 .......................................................... 9</text:p>
        </text:list-item>
        <text:list-item>
          <text:p text:style-name="List_20_Number_20_Tight">OS-9/X68000 .......................................................... 18</text:p>
        </text:list-item>
      </text:list>
      <text:p text:style-name="Preformatted_20_Text"><text:s text:c="3"/>(1) Procedures for Initializing Hard Disk with Device Number “0” .......... 18</text:p>
      <text:p text:style-name="Preformatted_20_Text"><text:s text:c="3"/>(2) Procedures for Initializing Hard Disk with Device Numbers “1” to “3” ... 23</text:p>
      <text:list text:style-name="Numbering_20_1" text:start-value="3">
        <text:list-item>
          <text:p text:style-name="List_20_Number_20_Tight">MSX2 HD Interface ......................................................... 25</text:p>
        </text:list-item>
      </text:list>
      <text:p text:style-name="First_20_paragraph">Chapter 5: Troubleshooting ....................................................... 27</text:p>
      <text:list text:style-name="Numbering_20_1">
        <text:list-item>
          <text:p text:style-name="List_20_Number_20_Tight">When ITX Series Does Not Operate Even When Phone Is On .............. 27</text:p>
        </text:list-item>
        <text:list-item>
          <text:p text:style-name="List_20_Number_20_Tight">When Power Supply Is Provided to ITX Series but It Does Not Operate ... 27</text:p>
        </text:list-item>
      </text:list>
      <text:p text:style-name="First_20_paragraph">Chapter 6: Basic Specifications of ITX Series ................................... 29</text:p>
      <text:p text:style-name="Text_20_body">Chapter 7: Maintenance Guide ...................................................... 31</text:p>
      <text:p text:style-name="Text_20_body">Appendix: OS-9/X68000 Supplemental User Manual</text:p>
      <text:p text:style-name="Text_20_body"><text:span text:style-name="Emphasis">(Blank page in the original.)</text:span></text:p>
      <text:p text:style-name="Text_20_body"><text:span text:style-name="Strong_20_Emphasis">Chapter 1 Characteristics and Precautions</text:span></text:p>
      <text:p text:style-name="Text_20_body"><text:span text:style-name="Strong_20_Emphasis">1. Characteristics of the ITX Series</text:span></text:p>
      <text:list text:style-name="Numbering_20_1">
        <text:list-item>
          <text:p text:style-name="List_20_Number_20_Tight">Human68k Ver 2.0 or higher:</text:p>
          <text:list text:style-name="List_20_1">
            <text:list-item>
              <text:p text:style-name="List_20_Bullet_20_Tight">You can use the IT-X640 and IT-X680 by installing them additionally.</text:p>
            </text:list-item>
          </text:list>
        </text:list-item>
        <text:list-item>
          <text:p text:style-name="List_20_Number_20_Tight">It can be used with OS-9.</text:p>
        </text:list-item>
        <text:list-item>
          <text:p text:style-name="List_20_Number_20_Tight">From one to eight units, the ID number can be easily set with the switch.</text:p>
        </text:list-item>
        <text:list-item>
          <text:p text:style-name="List_20_Number_20_Tight">It can also be connected to internal hard disk types.</text:p>
        </text:list-item>
        <text:list-item>
          <text:p text:style-name="List_20_Number_20_Tight">There are two new designs in black and gray.</text:p>
        </text:list-item>
        <text:list-item>
          <text:p text:style-name="List_20_Number_20_Tight">IT-X640 can be used with the MSX2 HD Interface connection.</text:p>
        </text:list-item>
      </text:list>
      <text:p text:style-name="First_20_paragraph"><text:span text:style-name="Strong_20_Emphasis">Notes:</text:span></text:p>
      <text:list text:style-name="List_20_1">
        <text:list-item>
          <text:p text:style-name="List_20_Bullet_20_Tight">External terminator (termination resistor) is sold separately.</text:p>
        </text:list-item>
        <text:list-item>
          <text:p text:style-name="List_20_Bullet_20_Tight">Human68k (Ver2.0 or higher) only supports up to 40MB on a single drive. With the IT-X680, it is fixed to a 40MB setting.</text:p>
        </text:list-item>
        <text:list-item>
          <text:p text:style-name="List_20_Bullet_20_Tight">IT-X403 can be used as a single unit.</text:p>
        </text:list-item>
      </text:list>
      <text:p text:style-name="First_20_paragraph"><text:span text:style-name="Strong_20_Emphasis">Remarks:</text:span></text:p>
      <text:list text:style-name="List_20_1">
        <text:list-item>
          <text:p text:style-name="List_20_Bullet_20_Tight">IT-X403 has a built-in terminator, so an external terminator is not required.</text:p>
        </text:list-item>
      </text:list>
      <text:p text:style-name="First_20_paragraph"><text:span text:style-name="Strong_20_Emphasis">◆ Hard Disk Configuration Diagram for X68000 ◆</text:span></text:p>
      <text:p text:style-name="Text_20_body">X68000 │ ├── IT-X680 │ │ │ ├── HDD │ └── Additional HDD │ ├── IT-X640 │ │ │ ├── HDD │ └── Additional HDD │ └── HDD └── Additional HDD</text:p>
      <text:p text:style-name="Text_20_body">In the X68000 series, it is possible to connect up to 16 hard disks. (Using Human68k Ver. 2.0)</text:p>
      <text:p text:style-name="Text_20_body">By changing the ID numbers of the master to 0-7, you can connect up to 8 hard disks, and further increase the number by adding one slave (additional hard disk) to each master.</text:p>
      <text:p text:style-name="Text_20_body">IT-X640 is dedicated for master use only. IT-X680 (40MB x 2 units) will use 1 unit as master and 2nd unit as slave.</text:p>
      <text:p text:style-name="Text_20_body">In X68000, when formatting a hard disk, you specify the disk by device number, so below, the relationship between ID number and device number is documented.</text:p>
      <text:p text:style-name="Text_20_body">Relation between ID number and Device number of hard disks for X68000 X68000</text:p>
      <text:p text:style-name="Text_20_body">Master Side: ID Number = 0 Device Number = 0</text:p>
      <text:p text:style-name="Text_20_body">ID Number = 1 Device Number = 2</text:p>
      <text:p text:style-name="Text_20_body">ID Number = 2 Device Number = 4</text:p>
      <text:p text:style-name="Text_20_body">ID Number = 3 Device Number = 6</text:p>
      <text:p text:style-name="Text_20_body">ID Number = 4 Device Number = 8</text:p>
      <text:p text:style-name="Text_20_body">ID Number = 5 Device Number = 10</text:p>
      <text:p text:style-name="Text_20_body">ID Number = 6 Device Number = 12</text:p>
      <text:p text:style-name="Text_20_body">ID Number = 7 Device Number = 14</text:p>
      <text:p text:style-name="Text_20_body">Slave Side: Additional HDD Device Number = 1</text:p>
      <text:p text:style-name="Text_20_body">Device Number = 3</text:p>
      <text:p text:style-name="Text_20_body">Device Number = 5</text:p>
      <text:p text:style-name="Text_20_body">Device Number = 7</text:p>
      <text:p text:style-name="Text_20_body">Device Number = 9</text:p>
      <text:p text:style-name="Text_20_body">Device Number = 11</text:p>
      <text:p text:style-name="Text_20_body">Device Number = 13</text:p>
      <text:p text:style-name="Text_20_body">Device Number = 15</text:p>
      <text:list text:style-name="Numbering_20_1" text:start-value="2">
        <text:list-item>
          <text:p text:style-name="List_20_Number">Precautions for Use</text:p>
        </text:list-item>
        <text:list-item>
          <text:p text:style-name="List_20_Number">When taking the box out of storage, please confirm immediately that there are no missing items against the accessory list. Delays in checking may cause issues later. If you discover any missing items upon confirmation, please contact the store where you purchased the product without delay.</text:p>
        </text:list-item>
        <text:list-item>
          <text:p text:style-name="List_20_Number">Do not dispose of the packaging material. It will be necessary for repairs or shipping. Hard disks are extremely vulnerable to vibration and shock. So please store the packaging material safely as shock can cause faults.</text:p>
        </text:list-item>
        <text:list-item>
          <text:p text:style-name="List_20_Number">Before connecting the ITX series to a computer, confirm that all equipment is in an off state.</text:p>
        </text:list-item>
        <text:list-item>
          <text:p text:style-name="List_20_Number">Please strictly avoid placing it in the following environments:</text:p>
        </text:list-item>
      </text:list>
      <text:p text:style-name="Preformatted_20_Text"><text:s text:c="3"/>★ Places exposed to direct sunlight </text:p>
      <text:p text:style-name="Preformatted_20_Text"><text:s text:c="3"/>★ Hot and humid places</text:p>
      <text:p text:style-name="Preformatted_20_Text"><text:s text:c="3"/>★ Places with extreme temperature changes</text:p>
      <text:p text:style-name="Preformatted_20_Text"><text:s text:c="3"/>★ Places with poor ventilation </text:p>
      <text:p text:style-name="Preformatted_20_Text"><text:s text:c="3"/>★ Places with a lot of movement </text:p>
      <text:p text:style-name="Preformatted_20_Text"><text:s text:c="3"/>★ Places with a lot of dust </text:p>
      <text:p text:style-name="Preformatted_20_Text"><text:s text:c="3"/>★ Near heating appliances </text:p>
      <text:p text:style-name="Preformatted_20_Text"><text:s text:c="3"/>★ Near equipment that generates strong magnetic fields</text:p>
      <text:p text:style-name="Preformatted_20_Text"><text:s text:c="3"/>★ Installations on tilted surfaces </text:p>
      <text:list text:style-name="Numbering_20_1" text:start-value="5">
        <text:list-item>
          <text:p text:style-name="List_20_Number">The ITX series contains precision electronic parts, so do not allow it to be subjected to vibration or shock.</text:p>
        </text:list-item>
        <text:list-item>
          <text:p text:style-name="List_20_Number">Do not block the fan and ventilation holes on the back. This will trap heat and can cause trouble due to overheating.</text:p>
        </text:list-item>
        <text:list-item>
          <text:p text:style-name="List_20_Number">Do not use the product in areas where pharmaceuticals emit steam or chemicals are in the air.</text:p>
        </text:list-item>
        <text:list-item>
          <text:p text:style-name="List_20_Number">Never remove the ITX series cover or front panel while the power is on. Doing so can void the warranty.</text:p>
        </text:list-item>
        <text:list-item>
          <text:p text:style-name="List_20_Number">Do not place it near radios or televisions as it can cause noise. Likewise, placing it near equipment that generates strong magnetic fields can damage the ITX series through interference.</text:p>
        </text:list-item>
        <text:list-item>
          <text:p text:style-name="List_20_Number">For storage of the ITX series, observe the same precautions as for use.</text:p>
        </text:list-item>
      </text:list>
      <text:p text:style-name="First_20_paragraph">※ To clean the ITX series, use a soft cloth with neutral detergent and wipe gently. Do not use benzene or thinner as it may cause discoloration or deformation.</text:p>
      <text:p text:style-name="Text_20_body">"MEMO"</text:p>
      <text:p text:style-name="Text_20_body">Chapter 2 Names and Functions of Each Part</text:p>
      <text:p text:style-name="Text_20_body">Names and Functions of Each Part of the ITX Series</text:p>
      <text:p text:style-name="Text_20_body">Front and Rear of the ITX Series</text:p>
      <text:p text:style-name="Text_20_body"><draw:frame draw:name="img1" svg:width="480.0pt" svg:height="224.16pt"><draw:image xlink:href="Pictures/0.png" xlink:type="simple" xlink:show="embed" xlink:actuate="onLoad"/></draw:frame></text:p>
      <text:p text:style-name="Text_20_body">1 Power Lamp (Green) Lights up when the power (electricity) switch is turned on. 2 Access Lamp (Red) Blinks when accessing the ITX series. 3 Ventilation Hole Air intake/exhaust to prevent temperature rise. 4 Connection Connector Connects to the X68000 main unit's hard disk connector. 5 Expansion Connector Connect cables when installing on another unit. 6 Changeover Switch Switches the setup from Unit 1 to Unit 8. 7 Power Cable Supplies power to the ITX series. 8 Cooling Fan Fan for cooling the drive and power supply.</text:p>
      <text:p text:style-name="Text_20_body">It says:</text:p>
      <text:p text:style-name="Text_20_body">"M E M O"</text:p>
      <text:p text:style-name="Text_20_body">and at the bottom:</text:p>
      <text:p text:style-name="Text_20_body">"- 6 -"</text:p>
      <text:p text:style-name="Text_20_body">Chapter 3: Connecting to a Computer</text:p>
      <text:p text:style-name="Text_20_body">This section explains important points necessary to connect the ITX series to a computer. If the connection is made incorrectly, it could cause trouble, so please be careful.</text:p>
      <text:p text:style-name="Text_20_body">Connecting to a Computer</text:p>
      <text:list text:style-name="Numbering_20_1">
        <text:list-item>
          <text:p text:style-name="List_20_Number_20_Tight">Turn off the power to all devices (including the computer).</text:p>
        </text:list-item>
        <text:list-item>
          <text:p text:style-name="List_20_Number_20_Tight">Connect the hard disk drive connector on the main computer unit to the ITX series connector using the connection cable.</text:p>
        </text:list-item>
        <text:list-item>
          <text:p text:style-name="List_20_Number_20_Tight">Plug the power cable into an outlet.</text:p>
        </text:list-item>
        <text:list-item>
          <text:p text:style-name="List_20_Number_20_Tight">Set the switch. Refer to the diagram below and set the ID number.</text:p>
        </text:list-item>
      </text:list>
      <text:list text:style-name="List_20_1">
        <text:list-item>
          <text:p text:style-name="List_20_Bullet_20_Tight">Connection Diagram</text:p>
        </text:list-item>
      </text:list>
      <text:p text:style-name="First_20_paragraph">● When connecting a single unit</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First_20_paragraph">External Terminator</text:p>
      <text:p text:style-name="Text_20_body">● When connecting additional units</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Preformatted_20_Text"><text:s text:c="6"/>|———— IT-X640 OR IT-X680 (ID Number = 1)</text:p>
      <text:p text:style-name="Preformatted_20_Text"><text:s text:c="6"/>|</text:p>
      <text:p text:style-name="Preformatted_20_Text"><text:s text:c="6"/>|———— IT-X640 OR IT-X680 (ID Number = 2-7)</text:p>
      <text:p text:style-name="Preformatted_20_Text"><text:s text:c="6"/>|</text:p>
      <text:p text:style-name="First_20_paragraph">External Terminator</text:p>
      <text:p text:style-name="Text_20_body">● When connecting with IT-X403 mixed in</text:p>
      <text:p text:style-name="Preformatted_20_Text"><text:s text:c="36"/>IT-X640 <text:s text:c="6"/>ID number = 1</text:p>
      <text:p text:style-name="Preformatted_20_Text"><text:s text:c="36"/>OR</text:p>
      <text:p text:style-name="First_20_paragraph">X68000 IT-X680</text:p>
      <text:p text:style-name="Preformatted_20_Text"><text:s text:c="36"/>IT-X640 <text:s text:c="6"/>ID number = 2</text:p>
      <text:p text:style-name="Preformatted_20_Text"><text:s text:c="37"/>OR</text:p>
      <text:p text:style-name="Preformatted_20_Text"><text:s text:c="36"/>IT-X680</text:p>
      <text:p text:style-name="Preformatted_20_Text"><text:s text:c="36"/>IT-X640 <text:s text:c="7"/>ID number = 3~7</text:p>
      <text:p text:style-name="Preformatted_20_Text"><text:s text:c="37"/>OR</text:p>
      <text:p text:style-name="Preformatted_20_Text"><text:s text:c="35"/>IT-X680</text:p>
      <text:p text:style-name="Preformatted_20_Text"/>
      <text:p text:style-name="Preformatted_20_Text"><text:s text:c="35"/>IT-X403 <text:s text:c="4"/>ID number = 0</text:p>
      <text:p text:style-name="Preformatted_20_Text"><text:s text:c="25"/>(built-in terminator)</text:p>
      <text:p text:style-name="First_20_paragraph">※ Notes</text:p>
      <text:p text:style-name="Text_20_body">• In the case of a built-in hard disk type of the X68000, the ID number of the built-in hard disk is fixed at "0", so if you add IT-X640 or IT-X680, please set the ID number to "1".</text:p>
      <text:p text:style-name="Text_20_body">• The IT-X403 has its ID number fixed at "0", so if you add IT-X640 or IT-X680 as described above, please set the ID number to "1".</text:p>
      <text:p text:style-name="Text_20_body">• Be careful not to set the same ID number.</text:p>
      <text:p text:style-name="Text_20_body">• The external terminator (sold separately for 4,000 yen) is attached to the last connected device. However, the IT-X403 has a built-in terminator.</text:p>
      <text:p text:style-name="Text_20_body">• Human68K Ver 2.0 only supports up to 40MB per drive, so the IT-X680 is fixed to a setting of 2 x 40MB drives.</text:p>
      <text:list text:style-name="List_20_1">
        <text:list-item>
          <text:p text:style-name="List_20_Bullet_20_Tight">If 80MB will be supported in the future, the setting will be changed to 80MB if the short jumper plug for Drive JP1 is removed.</text:p>
        </text:list-item>
      </text:list>
      <text:p text:style-name="First_20_paragraph">Chapter 4 Format</text:p>
      <text:p text:style-name="Text_20_body">The ITX series cannot be used without performing a process called formatting. Here, we will explain the basics for using Human 68K Ver 2.0 on OS-9.</text:p>
      <text:list text:style-name="Numbering_20_1">
        <text:list-item>
          <text:p text:style-name="List_20_Number_20_Tight">Human 68K Ver 2.0</text:p>
        </text:list-item>
      </text:list>
      <text:p text:style-name="First_20_paragraph">◎Procedure</text:p>
      <text:p text:style-name="Preformatted_20_Text">1 Turn on the power to the peripheral devices, then turn on the power to the computer itself.</text:p>
      <text:p text:style-name="Preformatted_20_Text">2 Start Human 68K Ver 2.0.</text:p>
      <text:p text:style-name="Preformatted_20_Text">3 When the window is displayed, match the mouse cursor to "COMMAND. X" and click (press) the left button twice.</text:p>
      <text:p text:style-name="Preformatted_20_Text">4 When prompted, enter "SWITCH" and press the key.</text:p>
      <text:p text:style-name="First_20_paragraph">A&gt; SWITCH</text:p>
      <text:p text:style-name="Text_20_body">When a hard disk is connected to the X68000, set the number of connected hard disks with this "SWITCH" command.</text:p>
      <text:p text:style-name="Text_20_body">※ One important thing to note here is that the number of hard disks connected with the SWITCH command refers to the maximum device number + 1.</text:p>
      <text:p text:style-name="Text_20_body">◆How to obtain device numbers</text:p>
      <text:list text:style-name="List_20_1">
        <text:list-item>
          <text:p text:style-name="List_20_Bullet_20_Tight">For the main machine</text:p>
        </text:list-item>
      </text:list>
      <text:p text:style-name="First_20_paragraph">Device number = ID number x 2</text:p>
      <text:list text:style-name="List_20_1">
        <text:list-item>
          <text:p text:style-name="List_20_Bullet_20_Tight">For sub-machines</text:p>
        </text:list-item>
      </text:list>
      <text:p text:style-name="First_20_paragraph">Device number = main machine's ID number x 2 + 1</text:p>
      <text:p text:style-name="Text_20_body"><text:span text:style-name="Strong_20_Emphasis">SWITCH for X68000 Version 2.01 Copyright 1989 SHARP / Huds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Keyword</text:p>
            </table:table-cell>
            <table:table-cell table:style-name="TableHeaderRowCell" office:value-type="string">
              <text:p text:style-name="Table_20_Heading">Current Value</text:p>
            </table:table-cell>
            <table:table-cell table:style-name="TableHeaderRowCell" office:value-type="string">
              <text:p text:style-name="Table_20_Heading">Setting Range</text:p>
            </table:table-cell>
          </table:table-row>
        </table:table-header-rows>
        <table:table-row>
          <table:table-cell table:style-name="TableRowCell" office:value-type="string">
            <text:p text:style-name="Table_20_Contents">RS232C</text:p>
          </table:table-cell>
          <table:table-cell table:style-name="TableRowCell" office:value-type="string">
            <text:p text:style-name="Table_20_Contents">[AUX] 9600 baud 8-bit parity none</text:p>
          </table:table-cell>
          <table:table-cell table:style-name="TableRowCell" office:value-type="string">
            <text:p text:style-name="Table_20_Contents">[AUXn] 9600 baud 8-bit parity none</text:p>
          </table:table-cell>
        </table:table-row>
        <table:table-row>
          <table:table-cell table:style-name="TableRowCell" office:value-type="string">
    </table:table-cell>
          <table:table-cell table:style-name="TableRowCell" office:value-type="string">
            <text:p text:style-name="Table_20_Contents">Stop 1 Xon</text:p>
          </table:table-cell>
          <table:table-cell table:style-name="TableRowCell" office:value-type="string">
            <text:p text:style-name="Table_20_Contents">Stop 1 Xon [AUXn] = (1,2,3,4,5)</text:p>
          </table:table-cell>
        </table:table-row>
        <table:table-row>
          <table:table-cell table:style-name="TableRowCell" office:value-type="string">
            <text:p text:style-name="Table_20_Contents">MEMORY</text:p>
          </table:table-cell>
          <table:table-cell table:style-name="TableRowCell" office:value-type="string">
            <text:p text:style-name="Table_20_Contents">1024 KB</text:p>
          </table:table-cell>
          <table:table-cell table:style-name="TableRowCell" office:value-type="string">
            <text:p text:style-name="Table_20_Contents">1024 KB (1024KB~12288KB)</text:p>
          </table:table-cell>
        </table:table-row>
        <table:table-row>
          <table:table-cell table:style-name="TableRowCell" office:value-type="string">
            <text:p text:style-name="Table_20_Contents">BOOT</text:p>
          </table:table-cell>
          <table:table-cell table:style-name="TableRowCell" office:value-type="string">
            <text:p text:style-name="Table_20_Contents">STD</text:p>
          </table:table-cell>
          <table:table-cell table:style-name="TableRowCell" office:value-type="string">
            <text:p text:style-name="Table_20_Contents">STD (STD/HD?/2HD?/ROM?$ /RAM?$)</text:p>
          </table:table-cell>
        </table:table-row>
        <table:table-row>
          <table:table-cell table:style-name="TableRowCell" office:value-type="string">
            <text:p text:style-name="Table_20_Contents">EJECT</text:p>
          </table:table-cell>
          <table:table-cell table:style-name="TableRowCell" office:value-type="string">
            <text:p text:style-name="Table_20_Contents">Off</text:p>
          </table:table-cell>
          <table:table-cell table:style-name="TableRowCell" office:value-type="string">
            <text:p text:style-name="Table_20_Contents">Off (Off/On)</text:p>
          </table:table-cell>
        </table:table-row>
        <table:table-row>
          <table:table-cell table:style-name="TableRowCell" office:value-type="string">
            <text:p text:style-name="Table_20_Contents">OPT2KEY</text:p>
          </table:table-cell>
          <table:table-cell table:style-name="TableRowCell" office:value-type="string">
            <text:p text:style-name="Table_20_Contents">Tvctrl</text:p>
          </table:table-cell>
          <table:table-cell table:style-name="TableRowCell" office:value-type="string">
            <text:p text:style-name="Table_20_Contents">Tvctrl (TvCTRL/Normal)</text:p>
          </table:table-cell>
        </table:table-row>
        <table:table-row>
          <table:table-cell table:style-name="TableRowCell" office:value-type="string">
            <text:p text:style-name="Table_20_Contents">CONTRAST</text:p>
          </table:table-cell>
          <table:table-cell table:style-name="TableRowCell" office:value-type="string">
            <text:p text:style-name="Table_20_Contents">14</text:p>
          </table:table-cell>
          <table:table-cell table:style-name="TableRowCell" office:value-type="string">
            <text:p text:style-name="Table_20_Contents">14 (5~15)</text:p>
          </table:table-cell>
        </table:table-row>
        <table:table-row>
          <table:table-cell table:style-name="TableRowCell" office:value-type="string">
            <text:p text:style-name="Table_20_Contents">KANA</text:p>
          </table:table-cell>
          <table:table-cell table:style-name="TableRowCell" office:value-type="string">
            <text:p text:style-name="Table_20_Contents">Jis</text:p>
          </table:table-cell>
          <table:table-cell table:style-name="TableRowCell" office:value-type="string">
            <text:p text:style-name="Table_20_Contents">Jis (Jis/Aiu)</text:p>
          </table:table-cell>
        </table:table-row>
        <table:table-row>
          <table:table-cell table:style-name="TableRowCell" office:value-type="string">
            <text:p text:style-name="Table_20_Contents">TV.CTRL</text:p>
          </table:table-cell>
          <table:table-cell table:style-name="TableRowCell" office:value-type="string">
            <text:p text:style-name="Table_20_Contents">Off</text:p>
          </table:table-cell>
          <table:table-cell table:style-name="TableRowCell" office:value-type="string">
            <text:p text:style-name="Table_20_Contents">Off (Tv/Off/1~$3F)</text:p>
          </table:table-cell>
        </table:table-row>
        <table:table-row>
          <table:table-cell table:style-name="TableRowCell" office:value-type="string">
            <text:p text:style-name="Table_20_Contents">LCD.MODE</text:p>
          </table:table-cell>
          <table:table-cell table:style-name="TableRowCell" office:value-type="string">
            <text:p text:style-name="Table_20_Contents">Lcd</text:p>
          </table:table-cell>
          <table:table-cell table:style-name="TableRowCell" office:value-type="string">
            <text:p text:style-name="Table_20_Contents">Lcd (Lcd/Normal)</text:p>
          </table:table-cell>
        </table:table-row>
        <table:table-row>
          <table:table-cell table:style-name="TableRowCell" office:value-type="string">
            <text:p text:style-name="Table_20_Contents">SRAM</text:p>
          </table:table-cell>
          <table:table-cell table:style-name="TableRowCell" office:value-type="string">
            <text:p text:style-name="Table_20_Contents">No.use</text:p>
          </table:table-cell>
          <table:table-cell table:style-name="TableRowCell" office:value-type="string">
            <text:p text:style-name="Table_20_Contents">No.use (No.use/Ramdisk/Program)</text:p>
          </table:table-cell>
        </table:table-row>
        <table:table-row>
          <table:table-cell table:style-name="TableRowCell" office:value-type="string">
            <text:p text:style-name="Table_20_Contents">P0</text:p>
          </table:table-cell>
          <table:table-cell table:style-name="TableRowCell" office:value-type="string">
            <text:p text:style-name="Table_20_Contents">$0 G-$0 R-$0 B-$0</text:p>
          </table:table-cell>
          <table:table-cell table:style-name="TableRowCell" office:value-type="string">
            <text:p text:style-name="Table_20_Contents">$0 G-$0 R-$0 B-$0</text:p>
          </table:table-cell>
        </table:table-row>
        <table:table-row>
          <table:table-cell table:style-name="TableRowCell" office:value-type="string">
            <text:p text:style-name="Table_20_Contents">P1</text:p>
          </table:table-cell>
          <table:table-cell table:style-name="TableRowCell" office:value-type="string">
            <text:p text:style-name="Table_20_Contents">$F38E G-$1F R-$0 B-$1F</text:p>
          </table:table-cell>
          <table:table-cell table:style-name="TableRowCell" office:value-type="string">
            <text:p text:style-name="Table_20_Contents">$F38E G-$1F R-$0 B-$1F</text:p>
          </table:table-cell>
        </table:table-row>
        <table:table-row>
          <table:table-cell table:style-name="TableRowCell" office:value-type="string">
            <text:p text:style-name="Table_20_Contents">P2</text:p>
          </table:table-cell>
          <table:table-cell table:style-name="TableRowCell" office:value-type="string">
            <text:p text:style-name="Table_20_Contents">$FFC0 G-$1F R-$1F B-$0</text:p>
          </table:table-cell>
          <table:table-cell table:style-name="TableRowCell" office:value-type="string">
            <text:p text:style-name="Table_20_Contents">$FFC0 G-$1F R-$1F B-$0</text:p>
          </table:table-cell>
        </table:table-row>
        <table:table-row>
          <table:table-cell table:style-name="TableRowCell" office:value-type="string">
            <text:p text:style-name="Table_20_Contents">P3</text:p>
          </table:table-cell>
          <table:table-cell table:style-name="TableRowCell" office:value-type="string">
            <text:p text:style-name="Table_20_Contents">$FFFE G-$1F R-$1F B-$1F</text:p>
          </table:table-cell>
          <table:table-cell table:style-name="TableRowCell" office:value-type="string">
            <text:p text:style-name="Table_20_Contents">$FFFE G-$1F R-$1F B-$1F</text:p>
          </table:table-cell>
        </table:table-row>
        <table:table-row>
          <table:table-cell table:style-name="TableRowCell" office:value-type="string">
            <text:p text:style-name="Table_20_Contents">P4</text:p>
          </table:table-cell>
          <table:table-cell table:style-name="TableRowCell" office:value-type="string">
            <text:p text:style-name="Table_20_Contents">$DF30 G-$1B R-$1C B-$18</text:p>
          </table:table-cell>
          <table:table-cell table:style-name="TableRowCell" office:value-type="string">
            <text:p text:style-name="Table_20_Contents">$DF30 G-$1B R-$19 B-$16</text:p>
          </table:table-cell>
        </table:table-row>
        <table:table-row>
          <table:table-cell table:style-name="TableRowCell" office:value-type="string">
            <text:p text:style-name="Table_20_Contents">P8</text:p>
          </table:table-cell>
          <table:table-cell table:style-name="TableRowCell" office:value-type="string">
            <text:p text:style-name="Table_20_Contents">$806 G-$1 R-$0 B-$3</text:p>
          </table:table-cell>
          <table:table-cell table:style-name="TableRowCell" office:value-type="string">
            <text:p text:style-name="Table_20_Contents">$806 G-$8 R-$0 B-$11</text:p>
          </table:table-cell>
        </table:table-row>
        <table:table-row>
          <table:table-cell table:style-name="TableRowCell" office:value-type="string">
            <text:p text:style-name="Table_20_Contents">XCHG</text:p>
          </table:table-cell>
          <table:table-cell table:style-name="TableRowCell" office:value-type="string">
            <text:p text:style-name="Table_20_Contents">0</text:p>
          </table:table-cell>
          <table:table-cell table:style-name="TableRowCell" office:value-type="string">
            <text:p text:style-name="Table_20_Contents">0 (0~7)</text:p>
          </table:table-cell>
        </table:table-row>
        <table:table-row>
          <table:table-cell table:style-name="TableRowCell" office:value-type="string">
            <text:p text:style-name="Table_20_Contents">HD.MAX</text:p>
          </table:table-cell>
          <table:table-cell table:style-name="TableRowCell" office:value-type="string">
            <text:p text:style-name="Table_20_Contents">1</text:p>
          </table:table-cell>
          <table:table-cell table:style-name="TableRowCell" office:value-type="string">
            <text:p text:style-name="Table_20_Contents">1 (0~16)</text:p>
          </table:table-cell>
        </table:table-row>
        <table:table-row>
          <table:table-cell table:style-name="TableRowCell" office:value-type="string">
            <text:p text:style-name="Table_20_Contents">WAIT.PRN</text:p>
          </table:table-cell>
          <table:table-cell table:style-name="TableRowCell" office:value-type="string">
            <text:p text:style-name="Table_20_Contents">5 sec</text:p>
          </table:table-cell>
          <table:table-cell table:style-name="TableRowCell" office:value-type="string">
            <text:p text:style-name="Table_20_Contents">5 sec 5 sec~$80000</text:p>
          </table:table-cell>
        </table:table-row>
        <table:table-row>
          <table:table-cell table:style-name="TableRowCell" office:value-type="string">
            <text:p text:style-name="Table_20_Contents">FIRST.KY</text:p>
          </table:table-cell>
          <table:table-cell table:style-name="TableRowCell" office:value-type="string">
            <text:p text:style-name="Table_20_Contents">3 500ms</text:p>
          </table:table-cell>
          <table:table-cell table:style-name="TableRowCell" office:value-type="string">
            <text:p text:style-name="Table_20_Contents">3 (0~15) ms=200ms+100×n</text:p>
          </table:table-cell>
        </table:table-row>
        <table:table-row>
          <table:table-cell table:style-name="TableRowCell" office:value-type="string">
            <text:p text:style-name="Table_20_Contents">NEXT.KEY</text:p>
          </table:table-cell>
          <table:table-cell table:style-name="TableRowCell" office:value-type="string">
            <text:p text:style-name="Table_20_Contents">2 50ms</text:p>
          </table:table-cell>
          <table:table-cell table:style-name="TableRowCell" office:value-type="string">
            <text:p text:style-name="Table_20_Contents">2 (0~15) ms=30ms+5×n 2</text:p>
          </table:table-cell>
        </table:table-row>
        <table:table-row>
          <table:table-cell table:style-name="TableRowCell" office:value-type="string">
            <text:p text:style-name="Table_20_Contents">END</text:p>
          </table:table-cell>
          <table:table-cell table:style-name="TableRowCell" office:value-type="string">
    </table:table-cell>
          <table:table-cell table:style-name="TableRowCell" office:value-type="string">
    </table:table-cell>
        </table:table-row>
      </table:table>
      <text:p text:style-name="First_20_paragraph">You can set the number of connected hard disks.</text:p>
      <text:p text:style-name="Text_20_body">(Select) (Confirm) ESC (Exit without registration)</text:p>
      <text:p text:style-name="Text_20_body">Since it is displayed as above, move the cursor to HD.MAX with the cursor keys and press the return key.</text:p>
      <text:p text:style-name="Text_20_body">HD.MAX:</text:p>
      <text:p text:style-name="Text_20_body">Please specify the number of connected hard disks (maximum device number + 1).</text:p>
      <text:p text:style-name="Text_20_body">(Select) (Confirm) ESC (Go back)</text:p>
      <text:p text:style-name="Text_20_body">The cursor will move as above, so use the cursor keys (↑↓) to set the value to the connected hard disk's maximum device number + 1.</text:p>
      <text:p text:style-name="Text_20_body">Press the Return key, then move the cursor to the next point and press the Return key.</text:p>
      <text:p text:style-name="Text_20_body">Do you want to save the changes to the memory switch? Is this okay? <text:span text:style-name="Source_20_Text">Y</text:span>: (Save and Exit) <text:span text:style-name="Source_20_Text">N</text:span>: (Exit without Saving) <text:span text:style-name="Source_20_Text">ESC</text:span>: (Go back)</text:p>
      <text:p text:style-name="Text_20_body">If you press <text:span text:style-name="Source_20_Text">Y</text:span>, the content of the memory switch will be changed and saved, and a prompt will be displayed.</text:p>
      <text:list text:style-name="Numbering_20_1" text:start-value="5">
        <text:list-item>
          <text:p text:style-name="List_20_Number_20_Tight">Since we will initialize the hard disk, please enter "FORMAT".</text:p>
        </text:list-item>
      </text:list>
      <text:p text:style-name="First_20_paragraph">A&gt;FORMAT</text:p>
      <text:p text:style-name="Text_20_body">● Hard Disk Format</text:p>
      <text:p text:style-name="Text_20_body">FORMAT for X68000 Version 2.01 Copyright 1989 SHARP/Hudson</text:p>
      <text:p text:style-name="Text_20_body">Floppy Disk End</text:p>
      <text:p text:style-name="Text_20_body">Please specify the item</text:p>
      <text:list text:style-name="List_20_1">
        <text:list-item>
          <text:p text:style-name="List_20_Bullet_20_Tight">(Select) ●(Confirm) ESC (End)</text:p>
        </text:list-item>
      </text:list>
      <text:p text:style-name="First_20_paragraph">Use the cursor key to move the cursor to "Hard Disk" and press the Return key.</text:p>
      <text:list text:style-name="List_20_1">
        <text:list-item>
          <text:p text:style-name="List_20_Bullet_20_Tight">In the case of device number 0, the first device (ID number = 0) is IT-X640, and the second device (ID number = 1) is IT-X640. If the device number 1 is not connected here, it will be an error if selected for initialization.</text:p>
        </text:list-item>
      </text:list>
      <text:p text:style-name="First_20_paragraph">6Select "Device Initialization"</text:p>
      <text:p text:style-name="Text_20_body">FORMAT for X68000 Version 2.01 Copyright 1989 SHARP/Hudson</text:p>
      <text:p text:style-name="Text_20_body">Device Name: Hard Disk Device Number: 0</text:p>
      <text:p text:style-name="Text_20_body">Confirm Area Release Area Select Area *Initialize Device Change Device End</text:p>
      <text:p text:style-name="Text_20_body">Management information is corrupted. Please initialize the device.</text:p>
      <text:p text:style-name="Text_20_body">Please specify an item.</text:p>
      <text:p text:style-name="Text_20_body">(Select) (OK) ESC (Return)</text:p>
      <text:p text:style-name="Text_20_body">Use the cursor key to align the cursor to "Initialize Device" and press the return key.</text:p>
      <text:p text:style-name="Text_20_body">10M 20M 40M</text:p>
      <text:p text:style-name="Text_20_body">Use the cursor key to align the cursor to "40M" and press the return key.</text:p>
      <text:p text:style-name="Text_20_body">Initialize the entire device. Is this okay? (Execute) (N: Return) ESC (Return)</text:p>
      <text:p text:style-name="Text_20_body">Press "Y" here to start initialization. To cancel, press the "ESC" key. You will return to the previous screen.</text:p>
      <text:p text:style-name="Text_20_body">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0 10 20 30 40 50 60 70 80 90 100 %</text:p>
      <text:p text:style-name="Text_20_body">40 MB Initializing...</text:p>
      <text:p text:style-name="Text_20_body">A horizontal graph will be displayed, and a message will appear during initialization. Initialization ends when it reaches 100%.</text:p>
      <text:list text:style-name="Numbering_20_1" text:start-value="7">
        <text:list-item>
          <text:p text:style-name="List_20_Number_20_Tight">Select Area Confirmation.</text:p>
        </text:list-item>
      </text:list>
      <text:p text:style-name="First_20_paragraph">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Specify Item (Select) (Confirm) (ESC: Go Back)</text:p>
      <text:p text:style-name="Text_20_body">Move the cursor with the cursor key and press the return key to select "Domain Secure".</text:p>
      <text:p text:style-name="Text_20_body">● Specify the Capacity</text:p>
      <text:p text:style-name="Text_20_body">Capacity Overall Device Capacity 40MB Volume Name Maximum Secured Capacity 40MB System Transfer Available Capacity 40MB Execute End</text:p>
      <text:p text:style-name="Text_20_body">Move the cursor with the cursor key and press the return key to select "Capacity".</text:p>
      <text:p text:style-name="Text_20_body">Specify the capacity to secure.</text:p>
      <text:p text:style-name="Text_20_body">ESC: (Return to previous)</text:p>
      <text:p text:style-name="Text_20_body">If you want to secure the entire hard disk capacity as a domain, enter "40" and press the return key. If you want to partition the domain, enter the capacity to partition.</text:p>
      <text:p text:style-name="Text_20_body">● Specify the Volume Name</text:p>
      <text:p text:style-name="Text_20_body">Capacity Overall Device Capacity 40MB Volume Name Maximum Secured Capacity 40MB System Transfer Available Capacity 40MB Execute End</text:p>
      <text:p text:style-name="Text_20_body">Move the cursor with the cursor key and press the return key to select "Volume Name". If the volume name is not required, select "System Transfer".</text:p>
      <text:p text:style-name="Text_20_body">Specify the volume name.</text:p>
      <text:p text:style-name="Text_20_body">ESC: (Return to previous)</text:p>
      <text:p text:style-name="Text_20_body">Enter the volume name and press the return key.</text:p>
      <text:p text:style-name="Text_20_body">● Specifying System Transfer</text:p>
      <text:p text:style-name="Text_20_body">Capacity Total Capacity of Device 40 MB Volume Name Maximum Capacity Available 40 MB :: System Transfer Available Capacity 40 MB Execute Finish</text:p>
      <text:p text:style-name="Text_20_body">Use the cursor key to select "System Transfer" and press the return key.</text:p>
      <text:p text:style-name="Preformatted_20_Text"><text:s text:c="12"/>Don't</text:p>
      <text:p text:style-name="First_20_paragraph">If you are transferring the Human68K system, place the cursor on "Do". If you are not transferring the system, place the cursor on "Don't" and press the return key.</text:p>
      <text:p text:style-name="Text_20_body">● Execution</text:p>
      <text:p text:style-name="Text_20_body">Capacity Total Capacity of Device 40 MB Volume Name Maximum Capacity Available 40 MB System Transfer Available Capacity 40 MB Execute Finish</text:p>
      <text:p text:style-name="Text_20_body">Use the cursor key to select "Execute" and press the return key.</text:p>
      <text:p text:style-name="Text_20_body">Are you sure you want to secure the area? Is that okay? :: Execute: (Y) ESC: (Go back) Confirmation message will appear. Press the "Y" key.</text:p>
      <text:p text:style-name="Text_20_body"><text:span text:style-name="Strong_20_Emphasis">FORMAT for X68000 Version 2.01 Copyright 1989 SHARP/Hudson</text:span></text:p>
      <text:p text:style-name="Text_20_body">Device Name: Hard Disk Device Number: 0</text:p>
      <text:p text:style-name="Text_20_body">Capacity: 40 Volume Name:<text:line-break/>System Transfer: Yes Execute End</text:p>
      <text:p text:style-name="Text_20_body">Total Device Capacity: 40 MB Maximum Usable Capacity: 40 MB Free Capacity: 40 MB</text:p>
      <text:p text:style-name="Text_20_body">0 10 20 30 40 50 60 70 80 90 100 %</text:p>
      <text:p text:style-name="Text_20_body">[Area confirmation in progress...]</text:p>
      <text:p text:style-name="Text_20_body">A message will be displayed with a horizontal bar graph during area confirmation. It will be completed if it reaches 100%.</text:p>
      <text:p text:style-name="Text_20_body"><text:span text:style-name="Strong_20_Emphasis">FORMAT for X68000 Version 2.01 Copyright 1989 SHARP/Hudson</text:span></text:p>
      <text:p text:style-name="Text_20_body">Device Name: Hard Disk Device Number: 0</text:p>
      <text:p text:style-name="Text_20_body">Capacity: 40 Volume Name: System Transfer: Yes Execute End</text:p>
      <text:p text:style-name="Text_20_body">Total Device Capacity: 40 MB (1) Autostart: Human68K 40 MB Maximum Usable Capacity: 0 MB Free Capacity: 0 MB</text:p>
      <text:p text:style-name="Text_20_body">Please specify an item ↑↓(Select) ¥(Confirm) ESC(Return to previous)</text:p>
      <text:p text:style-name="Text_20_body">As mentioned above, "(1) Auto-boot: Human68K" will be ensured.</text:p>
      <text:p text:style-name="Text_20_body">Select 9 Finish.</text:p>
      <text:p text:style-name="Text_20_body">[Box Content] FORMAT for X68000 Version 2.01 Copyright 1989 SHARP/Hudson</text:p>
      <text:p text:style-name="Text_20_body">Floppy Disk Hard Disk</text:p>
      <text:list text:style-name="List_20_1">
        <text:list-item>
          <text:p text:style-name="List_20_Bullet_20_Tight">[Blank]</text:p>
        </text:list-item>
      </text:list>
      <text:p text:style-name="First_20_paragraph">Please specify an item (Select) *: (Confirm) ESC: (Exit)</text:p>
      <text:p text:style-name="Text_20_body">Use the cursor key to align the cursor with "Finish" and press the return key.</text:p>
      <text:p text:style-name="Text_20_body">Using the hard disk requires a reboot. Do you want to reset? Y: (Execute) N: (Go Back) ESC: (Go Back)</text:p>
      <text:p text:style-name="Text_20_body">You cannot use the hard disk immediately after formatting it. When the above message is displayed, press the 'Y' key.</text:p>
      <text:list text:style-name="List_20_1">
        <text:list-item>
          <text:p text:style-name="List_20_Bullet_20_Tight">After booting with the system disk again, copy the system to the hard disk, and from the next time, you can boot "Human68K" from the hard disk.</text:p>
        </text:list-item>
      </text:list>
      <text:p text:style-name="First_20_paragraph">Note: If you want to change the boot device number, change the BOOT in the SWITCH command.</text:p>
      <text:p text:style-name="Text_20_body">Page 17</text:p>
      <text:list text:style-name="Numbering_20_1" text:start-value="2">
        <text:list-item>
          <text:p text:style-name="List_20_Number_20_Tight">OS-9/X68000</text:p>
        </text:list-item>
      </text:list>
      <text:p text:style-name="First_20_paragraph">Notes: The hard disk supported by OS-9/X68000 is up to device numbers 0 to 3. If it is a built-in type hard disk, it will be as follows:</text:p>
      <text:p text:style-name="Text_20_body">Device number 0 ····· Built-in hard disk Device number 1 ····· Cannot be used Device number 2 ····· External hard disk (ID number=1) Device number 3 ····· External expansion hard disk</text:p>
      <text:p text:style-name="Text_20_body">(1) Procedure for initializing hard disk of device number “0”</text:p>
      <text:list text:style-name="Numbering_20_1">
        <text:list-item>
          <text:p text:style-name="List_20_Number_20_Tight">Turn on the power of peripheral devices and then turn on the power of the computer itself.</text:p>
        </text:list-item>
        <text:list-item>
          <text:p text:style-name="List_20_Number_20_Tight">Start OS-9/X68000.</text:p>
        </text:list-item>
        <text:list-item>
          <text:p text:style-name="List_20_Number_20_Tight">When “Your name?:” is displayed, press the return key. The prompt “$” will be displayed as shown below.</text:p>
        </text:list-item>
      </text:list>
      <text:p text:style-name="First_20_paragraph">■shell win0 Japanese front processor A S K 6 8 K for X68000 version 1.10 Copyright 1987,88 SHARP Corp. / ACCESS CO., LTD.</text:p>
      <text:p text:style-name="Text_20_body">$</text:p>
      <text:list text:style-name="Numbering_20_1" text:start-value="4">
        <text:list-item>
          <text:p text:style-name="List_20_Number_20_Tight">Initialize the hard disk of device number “0”. Please input and enter “init-hd-40m” as shown below.</text:p>
        </text:list-item>
      </text:list>
      <text:p text:style-name="First_20_paragraph">■shell win0 Japanese front processor A S K 6 8 K for X68000 version 1.10 Copyright 1987,88 SHARP Corp. / ACCESS CO., LTD.</text:p>
      <text:p text:style-name="Text_20_body">$ init-hd-40m</text:p>
      <text:p text:style-name="Text_20_body"><text:span text:style-name="Strong_20_Emphasis">If not yet initialized</text:span></text:p>
      <text:p text:style-name="Text_20_body"><text:span text:style-name="Strong_20_Emphasis">shell win0</text:span></text:p>
      <text:p text:style-name="Text_20_body">Japanese Front Processor ASK68K for X68000 version 1.10<text:line-break/>Copyright 1987,88 SHARP Corp. / ACCESS CO., LTD.</text:p>
      <text:p text:style-name="Text_20_body">$ init-hd-40m tmode nopause -w=1 chd CMDS./BOOTOBJS load -d rrhbd0.40m hpu /win0</text:p>
      <text:p text:style-name="Text_20_body">Partition data is not initialized.<text:line-break/>Do you want to initialize? Y<text:line-break/>Enter the IPL file name. :</text:p>
      <text:p text:style-name="Text_20_body">★★★ System area management information is as follows ★★★<text:line-break/>Total installation capacity: 40 MB<text:line-break/>Free space: 39 MB</text:p>
      <text:p text:style-name="Text_20_body">1: Secure area 2: Release area 3: Create descriptor 4: Exit :</text:p>
      <text:p text:style-name="Text_20_body">For a newly purchased hard disk, it is not initialized yet. As shown above, enter "Y" and press the return key twice, then proceed to (1) Secure area.</text:p>
      <text:p text:style-name="Text_20_body"><text:span text:style-name="Strong_20_Emphasis">If already used with Human68K</text:span></text:p>
      <text:p text:style-name="Text_20_body"><text:span text:style-name="Strong_20_Emphasis">shell win0</text:span></text:p>
      <text:p text:style-name="Text_20_body">★★★ System area management information is as follows ★★★<text:line-break/>Total installation capacity: 40 MB<text:line-break/>Block (1): Human68k 39 MB<text:line-break/>Free space: 0 MB</text:p>
      <text:p text:style-name="Text_20_body">1: Secure area 2: Release area 3: Create descriptor 4: Exit :</text:p>
      <text:p text:style-name="Text_20_body">If it has already been used with Human68K, the allocated area will be displayed as shown above. Release the area as shown below.</text:p>
      <text:p text:style-name="Text_20_body">Page 19</text:p>
      <text:p text:style-name="Text_20_body">1: Domain Confirmation 2: Domain Release 3: Disk Reap Creation 4: End : 2</text:p>
      <text:p text:style-name="Text_20_body">Please enter the partition number. (1,2,3,4..15) : 1</text:p>
      <text:p text:style-name="Text_20_body">★★★★ System domain management information is as follows ★★★★ Total device capacity 40 MB Free domain 39 MB</text:p>
      <text:p text:style-name="Text_20_body">1: Domain Confirmation 2: Domain Release 3: Disk Reap Creation 4: End :</text:p>
      <text:p text:style-name="Text_20_body">When you enter '2' and press the return key, "Domain Release" will be selected, and it will ask for the partition number. When you enter '1' and press the return key, the domain of 'Block (1): Human68k' will be released.</text:p>
      <text:p text:style-name="Text_20_body">Confirm domain: Enter '1' as shown below and press the return key, "Domain Confirmation" will be selected, and it will ask for the capacity to confirm. Enter '39' and press the return key if using with OS-9.</text:p>
      <text:list text:style-name="List_20_1">
        <text:list-item>
          <text:p text:style-name="List_20_Bullet_20_Tight">When sharing with Human68k, enter the capacity to be used with OS-9.</text:p>
        </text:list-item>
      </text:list>
      <text:p text:style-name="First_20_paragraph">1: Domain Confirmation 2: Domain Release 3: Disk Reap Creation 4: End : 1 How many MB to confirm? : 39</text:p>
      <text:p text:style-name="Text_20_body">★★★★ System domain management information is as follows ★★★★ Total device capacity 40 MB Block (1) : OS-9/68k 39 MB Free domain 0 MB</text:p>
      <text:p text:style-name="Text_20_body">1: Domain Confirmation 2: Domain Release 3: Disk Reap Creation 4: End :</text:p>
      <text:list text:style-name="Numbering_20_1" text:start-value="6">
        <text:list-item>
          <text:p text:style-name="List_20_Number_20_Tight">Create a disk script. Enter '3' and press the return key to select 'Create Disk Script', then enter the partition number to create and the disk script file name as shown in the diagram below.</text:p>
        </text:list-item>
      </text:list>
      <text:p text:style-name="First_20_paragraph">1: Confirm Region 2: Release Region 3: Create Disk Script 4: End : 3</text:p>
      <text:p text:style-name="Text_20_body">Please enter the partition number. (1, 2, 3, 4..15) : 1 Enter the name of the original disk script file. : h0.40m Enter the name of the disk script file to be created. : h0.p1</text:p>
      <text:p text:style-name="Text_20_body">★★★ Management information for the system region is as follows ★★★ Total device capacity: 40 MB Block (1): OS-9/68k 39 MB Free region: 0 MB</text:p>
      <text:p text:style-name="Text_20_body">1: Confirm Region 2: Release Region 3: Create Disk Script 4: End :</text:p>
      <text:h text:style-name="Heading_20_5" text:outline-level="5"/>
      <text:p text:style-name="First_20_paragraph">7 Finally, enter "4: End" and press the return key. The hard disk with device number "0" will be automatically formatted.</text:p>
      <text:p text:style-name="Text_20_body">1: Protect area 2: Release area 3: Create descriptor 4: End : 4</text:p>
      <text:p text:style-name="Text_20_body">unlink h0 load -d h0.p1 format /h0 -rv=OS-9/68000 Disk format command OS-9/68000 V2.2R1 SHARP X68000 .................Format data.................</text:p>
      <text:p text:style-name="Text_20_body">Fixed values: Disk type: Hard Sector/track: 33 Segment allocation size: 8</text:p>
      <text:p text:style-name="Text_20_body">Variable values: Cylinders: 604 Recording surface heads: 8 Sector interleave offset: 1</text:p>
      <text:p text:style-name="Text_20_body">Formatting device: /h0 Is this ok? Hard disk. Is this ok? Perform physical format? Verify physically? 000 001 002 003 ....</text:p>
      <text:p text:style-name="Text_20_body">Normal sectors: $00026ee0 159456 Bad sectors: $00000000 0 Verify sectors: $00026ee0 159456 Writing root directory.</text:p>
      <text:p text:style-name="Text_20_body">※ For using the hard disk with device number "0" as a data disk, please enter the following commands.</text:p>
      <text:p text:style-name="Text_20_body">$ chd /d0/CMDS/BOOTOBJS $ load -d rbhddrv h0.pl $ iniz h0</text:p>
      <text:p text:style-name="Text_20_body">— Page 22 —</text:p>
      <text:p text:style-name="Text_20_body">※If you want to boot the OS-9 system from the hard disk with device number "0," please input the following.</text:p>
      <text:p text:style-name="Text_20_body">$ make.h0.xxx</text:p>
      <text:p text:style-name="Text_20_body">Here, "xxx" is as follows.</text:p>
      <text:p text:style-name="Text_20_body">avs Creates a system for the AV-RIDER environment. txt Creates a system for the multi-screen environment. wnd Creates a system for the personal window environment.</text:p>
      <text:p text:style-name="Text_20_body">For more details, please refer to "6.14 System Reconstruction" in the OS-9/X68000 user manual.</text:p>
      <text:p text:style-name="Text_20_body">(2) Procedure for initializing hard disks with device numbers "1 to 3."</text:p>
      <text:p text:style-name="Text_20_body">※ In the OS-9/X68000, a procedure file like "init_hd.40m" is not provided for initializing hard disks with device numbers "1 to 3," so the following steps are necessary.</text:p>
      <text:p text:style-name="Text_20_body">■Procedure to create a procedure file</text:p>
      <text:list text:style-name="Numbering_20_1">
        <text:list-item>
          <text:p text:style-name="List_20_Number_20_Tight">Change the current data directory to PROC.</text:p>
        </text:list-item>
      </text:list>
      <text:p text:style-name="First_20_paragraph">$ chd PROC</text:p>
      <text:list text:style-name="Numbering_20_1" text:start-value="2">
        <text:list-item>
          <text:p text:style-name="List_20_Number_20_Tight">Copy the original procedure file.</text:p>
        </text:list-item>
      </text:list>
      <text:p text:style-name="First_20_paragraph">※ If device number is 1, it's h1; if 2, it's h2; and if 3, it's h3. For example, if it's device number 1:</text:p>
      <text:p text:style-name="Text_20_body">$ copy init_hd.40m init_h1.40m</text:p>
      <text:list text:style-name="Numbering_20_1" text:start-value="3">
        <text:list-item>
          <text:p text:style-name="List_20_Number_20_Tight">Use EDT (line editor) to change the device number in init_h1.40m.</text:p>
        </text:list-item>
      </text:list>
      <text:p text:style-name="First_20_paragraph">$ EDT init_h1.40m</text:p>
      <text:list text:style-name="Pandoc_5f_Numbering_5f_1" text:start-value="4">
        <text:list-item>
          <text:p text:style-name="List_20_Number_20_Tight">Use the string replacement command to change the device number. Please enter "c* h0 hl".</text:p>
        </text:list-item>
      </text:list>
      <text:p text:style-name="First_20_paragraph"><text:span text:style-name="Emphasis">0001 -t E: c</text:span> h0 hl *0004 load -d rbhddrv hl1.40m *0006 unlink hl *0007 load -d hl1.p1 *0008 format /hl1 -rv=OS-9/68000 E:</text:p>
      <text:list text:style-name="Pandoc_5f_Numbering_5f_1" text:start-value="5">
        <text:list-item>
          <text:p text:style-name="List_20_Number_20_Tight">Move the pointer of the line editor back to 0001 and use the string replacement command again to change the device number. Please enter "0001" and "c* hpu hpu /hl1".</text:p>
        </text:list-item>
      </text:list>
      <text:p text:style-name="First_20_paragraph">E: 0001 <text:span text:style-name="Emphasis">0001 -t E: c</text:span> hpu hpu /hl1 *0005 hpu /hl1 &lt;/win0 E:</text:p>
      <text:list text:style-name="Pandoc_5f_Numbering_5f_1" text:start-value="6">
        <text:list-item>
          <text:p text:style-name="List_20_Number_20_Tight">Confirm if the device number has been correctly changed. Please enter "0001" and "/13".</text:p>
        </text:list-item>
      </text:list>
      <text:p text:style-name="First_20_paragraph">E: 0001 *0001 -t E: /13 *0001 -t</text:p>
      <text:p text:style-name="Preformatted_20_Text">0002 <text:s text:c="3"/>tmode nopause -w=1</text:p>
      <text:p text:style-name="Preformatted_20_Text">0003 <text:s text:c="3"/>chd CMDS/BOOTOBJS</text:p>
      <text:p text:style-name="Preformatted_20_Text">0004 <text:s text:c="3"/>load -d rbhddrv h1.40m</text:p>
      <text:p text:style-name="Preformatted_20_Text">0005 <text:s text:c="3"/>hpu /hl1 &lt;/win0</text:p>
      <text:p text:style-name="Preformatted_20_Text">0006 <text:s text:c="3"/>unlink hl</text:p>
      <text:p text:style-name="Preformatted_20_Text">0007 <text:s text:c="3"/>load -d hl1.p1</text:p>
      <text:p text:style-name="Preformatted_20_Text">0008 <text:s text:c="3"/>format /hl1 -rv=OS-9/68000</text:p>
      <text:p text:style-name="Preformatted_20_Text">0009 <text:s text:c="3"/>y</text:p>
      <text:p text:style-name="Preformatted_20_Text">0010 <text:s text:c="3"/>y</text:p>
      <text:p text:style-name="Preformatted_20_Text">0011 <text:s text:c="3"/>y</text:p>
      <text:p text:style-name="Preformatted_20_Text">0012 <text:s text:c="3"/>y</text:p>
      <text:p text:style-name="First_20_paragraph">E:</text:p>
      <text:list text:style-name="Pandoc_5f_Numbering_5f_1" text:start-value="7">
        <text:list-item>
          <text:p text:style-name="List_20_Number_20_Tight">If the device number has been correctly changed, please enter "Q". init.hl1.40m is saved and restored to the original prompt state.</text:p>
        </text:list-item>
      </text:list>
      <text:p text:style-name="First_20_paragraph">E: Q</text:p>
      <text:list text:style-name="Pandoc_5f_Numbering_5f_1" text:start-value="8">
        <text:list-item>
          <text:p text:style-name="List_20_Number_20_Tight">Return to the original current data directory.</text:p>
        </text:list-item>
      </text:list>
      <text:p text:style-name="First_20_paragraph">$ chd ..</text:p>
      <text:p text:style-name="Text_20_body">Page 24</text:p>
      <text:p text:style-name="Text_20_body">Above, by executing "init.h1.40m", it is possible to initialize the hard disk of device number 1.</text:p>
      <text:list text:style-name="List_20_1">
        <text:list-item>
          <text:p text:style-name="List_20_Bullet_20_Tight">If you use the hard disk of device number "1 - 3" as data disks, please change the device number h0 as below.</text:p>
        </text:list-item>
      </text:list>
      <text:p text:style-name="First_20_paragraph">$ cd CMDS/BOOTOBJS $ load -d rbhddrv h0.pl $ iniz h0</text:p>
      <text:p text:style-name="Text_20_body">Notes:</text:p>
      <text:p text:style-name="Text_20_body">If you need to boot the OS-9 system from the hard disks of device numbers 1 to 3, you must change the device number of the "make.h0.xxx" project file, but if the device number is attached inside the procedure file in "make.h0.xxx", you must also change the device number there.</text:p>
      <text:p text:style-name="Text_20_body">In OS-9/X68000, there are many procedure files prepared for using device number "0" for the hard disk, but there are not many procedure files regarding device numbers "1 - 3".</text:p>
      <text:p text:style-name="Text_20_body">For beginners of OS-9/X68000, it is recommended to use device number "0" for the hard disk. Please use device numbers "1 - 3" as data disks.</text:p>
      <text:list text:style-name="Numbering_20_1" text:start-value="3">
        <text:list-item>
          <text:p text:style-name="List_20_Number_20_Tight">MSX2 HD Interface</text:p>
        </text:list-item>
      </text:list>
      <text:p text:style-name="First_20_paragraph">By purchasing the ASCII-made MSX2 HD Interface IT-X640, it is possible to use with MSX2 and MSX2+.</text:p>
      <text:list text:style-name="List_20_1">
        <text:list-item>
          <text:p text:style-name="List_20_Bullet_20_Tight">For hard disk initialization and handling methods, please refer to the user manual of the MSX2 HD Interface.</text:p>
        </text:list-item>
      </text:list>
      <text:p text:style-name="First_20_paragraph">Important Notes:</text:p>
      <text:list text:style-name="List_20_1">
        <text:list-item>
          <text:p text:style-name="List_20_Bullet_20_Tight">When using the IT-X640 with MSX2 HD Interface, make sure to always set the ID number of IT-X640 to "0".</text:p>
        </text:list-item>
        <text:list-item>
          <text:p text:style-name="List_20_Bullet_20_Tight">IT-X680 cannot be connected to and used with MSX2 HD Interface.</text:p>
        </text:list-item>
      </text:list>
      <text:p text:style-name="First_20_paragraph">"M E M O"</text:p>
      <text:p text:style-name="Text_20_body">And at the bottom of the page:</text:p>
      <text:p text:style-name="Text_20_body">"— 26 —"</text:p>
      <text:p text:style-name="Text_20_body">Chapter 5: Steps to Take During Troubles</text:p>
      <text:p text:style-name="Text_20_body">In case of trouble, please carefully read this chapter and re-confirm the issue. If the trouble cannot be resolved, please consult with the store where you purchased the product or our user support.</text:p>
      <text:list text:style-name="Numbering_20_1">
        <text:list-item>
          <text:p text:style-name="List_20_Number_20_Tight">If the ITX series does not operate even when the power is turned on:</text:p>
        </text:list-item>
      </text:list>
      <text:list text:style-name="List_20_1">
        <text:list-item>
          <text:p text:style-name="List_20_Bullet_20_Tight">Is the power plug properly connected to the AC outlet?</text:p>
        </text:list-item>
      </text:list>
      <text:list text:style-name="Numbering_20_1" text:start-value="2">
        <text:list-item>
          <text:p text:style-name="List_20_Number_20_Tight">If power is supplied to the ITX series but it does not operate:</text:p>
        </text:list-item>
      </text:list>
      <text:p text:style-name="First_20_paragraph">1 System does not start</text:p>
      <text:list text:style-name="List_20_1">
        <text:list-item>
          <text:p text:style-name="List_20_Bullet_20_Tight">Is the computer's power supply normal?</text:p>
        </text:list-item>
        <text:list-item>
          <text:p text:style-name="List_20_Bullet_20_Tight">Is the system disk correctly set in the drive you are trying to start?</text:p>
        </text:list-item>
      </text:list>
      <text:p text:style-name="First_20_paragraph">2 ITX series is not recognized</text:p>
      <text:list text:style-name="List_20_1">
        <text:list-item>
          <text:p text:style-name="List_20_Bullet_20_Tight">Are you using Human 68K Ver 2.0 or later?</text:p>
        </text:list-item>
        <text:list-item>
          <text:p text:style-name="List_20_Bullet_20_Tight">Is the memory switch setting correct?</text:p>
        </text:list-item>
        <text:list-item>
          <text:p text:style-name="List_20_Bullet_20_Tight">Are the connection cables correctly and securely connected?</text:p>
        </text:list-item>
        <text:list-item>
          <text:p text:style-name="List_20_Bullet_20_Tight">Is the ID switching switch setting correct?</text:p>
        </text:list-item>
        <text:list-item>
          <text:p text:style-name="List_20_Bullet_20_Tight">Did you correctly perform the format?</text:p>
        </text:list-item>
        <text:list-item>
          <text:p text:style-name="List_20_Bullet_20_Tight">Did you restart after formatting?</text:p>
        </text:list-item>
        <text:list-item>
          <text:p text:style-name="List_20_Bullet_20_Tight">Are the terminators correctly attached?</text:p>
        </text:list-item>
        <text:list-item>
          <text:p text:style-name="List_20_Bullet_20_Tight">Is the memory switch setting correct?</text:p>
        </text:list-item>
      </text:list>
      <text:p text:style-name="First_20_paragraph">The text is:</text:p>
      <text:p text:style-name="Text_20_body">MEMO</text:p>
      <text:p text:style-name="Text_20_body">This text does not appear to be in Japanese; it is in English.</text:p>
      <text:p text:style-name="Text_20_body">Chapter 6 Basic Specifications of the ITX Series</text:p>
      <text:list text:style-name="List_20_1">
        <text:list-item>
          <text:p text:style-name="List_20_Bullet_20_Tight">Performance Specifications</text:p>
        </text:list-item>
      </text:list>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Item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Storage Capacity (When formatte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vice (MB)</text:p>
          </table:table-cell>
          <table:table-cell table:style-name="TableRowCell" office:value-type="string">
            <text:p text:style-name="Table_20_Contents">42.0</text:p>
          </table:table-cell>
          <table:table-cell table:style-name="TableRowCell" office:value-type="string">
            <text:p text:style-name="Table_20_Contents">85.8</text:p>
          </table:table-cell>
        </table:table-row>
        <table:table-row>
          <table:table-cell table:style-name="TableRowCell" office:value-type="string">
            <text:p text:style-name="Table_20_Contents">Cylinder (KB)</text:p>
          </table:table-cell>
          <table:table-cell table:style-name="TableRowCell" office:value-type="string">
            <text:p text:style-name="Table_20_Contents">65,536</text:p>
          </table:table-cell>
          <table:table-cell table:style-name="TableRowCell" office:value-type="string">
            <text:p text:style-name="Table_20_Contents">92,160</text:p>
          </table:table-cell>
        </table:table-row>
        <table:table-row>
          <table:table-cell table:style-name="TableRowCell" office:value-type="string">
            <text:p text:style-name="Table_20_Contents">Track (KB)</text:p>
          </table:table-cell>
          <table:table-cell table:style-name="TableRowCell" office:value-type="string">
            <text:p text:style-name="Table_20_Contents">8,192</text:p>
          </table:table-cell>
          <table:table-cell table:style-name="TableRowCell" office:value-type="string">
            <text:p text:style-name="Table_20_Contents">18,432</text:p>
          </table:table-cell>
        </table:table-row>
        <table:table-row>
          <table:table-cell table:style-name="TableRowCell" office:value-type="string">
            <text:p text:style-name="Table_20_Contents">Sector (KB)</text:p>
          </table:table-cell>
          <table:table-cell table:style-name="TableRowCell" office:value-type="string">
            <text:p text:style-name="Table_20_Contents">256</text:p>
          </table:table-cell>
          <table:table-cell table:style-name="TableRowCell" office:value-type="string">
            <text:p text:style-name="Table_20_Contents">512</text:p>
          </table:table-cell>
        </table:table-row>
        <table:table-row>
          <table:table-cell table:style-name="TableRowCell" office:value-type="string">
            <text:p text:style-name="Table_20_Contents">Disk Configu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umber of Disks</text:p>
          </table:table-cell>
          <table:table-cell table:style-name="TableRowCell" office:value-type="string">
            <text:p text:style-name="Table_20_Contents">4</text:p>
          </table:table-cell>
          <table:table-cell table:style-name="TableRowCell" office:value-type="string">
            <text:p text:style-name="Table_20_Contents">3</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8</text:p>
          </table:table-cell>
          <table:table-cell table:style-name="TableRowCell" office:value-type="string">
            <text:p text:style-name="Table_20_Contents">5</text:p>
          </table:table-cell>
        </table:table-row>
        <table:table-row>
          <table:table-cell table:style-name="TableRowCell" office:value-type="string">
            <text:p text:style-name="Table_20_Contents">Total Cylinders</text:p>
          </table:table-cell>
          <table:table-cell table:style-name="TableRowCell" office:value-type="string">
            <text:p text:style-name="Table_20_Contents">642</text:p>
          </table:table-cell>
          <table:table-cell table:style-name="TableRowCell" office:value-type="string">
            <text:p text:style-name="Table_20_Contents">932</text:p>
          </table:table-cell>
        </table:table-row>
        <table:table-row>
          <table:table-cell table:style-name="TableRowCell" office:value-type="string">
            <text:p text:style-name="Table_20_Contents">Total Tracks</text:p>
          </table:table-cell>
          <table:table-cell table:style-name="TableRowCell" office:value-type="string">
            <text:p text:style-name="Table_20_Contents">5,136</text:p>
          </table:table-cell>
          <table:table-cell table:style-name="TableRowCell" office:value-type="string">
            <text:p text:style-name="Table_20_Contents">4,660</text:p>
          </table:table-cell>
        </table:table-row>
        <table:table-row>
          <table:table-cell table:style-name="TableRowCell" office:value-type="string">
            <text:p text:style-name="Table_20_Contents">Data Transfer Rate (Mbit/s)</text:p>
          </table:table-cell>
          <table:table-cell table:style-name="TableRowCell" office:value-type="string">
            <text:p text:style-name="Table_20_Contents">5</text:p>
          </table:table-cell>
          <table:table-cell table:style-name="TableRowCell" office:value-type="string">
            <text:p text:style-name="Table_20_Contents">10</text:p>
          </table:table-cell>
        </table:table-row>
        <table:table-row>
          <table:table-cell table:style-name="TableRowCell" office:value-type="string">
            <text:p text:style-name="Table_20_Contents">Access Ti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etween tracks (ms)</text:p>
          </table:table-cell>
          <table:table-cell table:style-name="TableRowCell" office:value-type="string">
            <text:p text:style-name="Table_20_Contents">8</text:p>
          </table:table-cell>
          <table:table-cell table:style-name="TableRowCell" office:value-type="string">
            <text:p text:style-name="Table_20_Contents">7</text:p>
          </table:table-cell>
        </table:table-row>
        <table:table-row>
          <table:table-cell table:style-name="TableRowCell" office:value-type="string">
            <text:p text:style-name="Table_20_Contents">Average Seek Time (ms)</text:p>
          </table:table-cell>
          <table:table-cell table:style-name="TableRowCell" office:value-type="string">
            <text:p text:style-name="Table_20_Contents">28</text:p>
          </table:table-cell>
          <table:table-cell table:style-name="TableRowCell" office:value-type="string">
            <text:p text:style-name="Table_20_Contents">20</text:p>
          </table:table-cell>
        </table:table-row>
        <table:table-row>
          <table:table-cell table:style-name="TableRowCell" office:value-type="string">
            <text:p text:style-name="Table_20_Contents">Maximum Seek Time (ms)</text:p>
          </table:table-cell>
          <table:table-cell table:style-name="TableRowCell" office:value-type="string">
            <text:p text:style-name="Table_20_Contents">54</text:p>
          </table:table-cell>
          <table:table-cell table:style-name="TableRowCell" office:value-type="string">
            <text:p text:style-name="Table_20_Contents">39</text:p>
          </table:table-cell>
        </table:table-row>
        <table:table-row>
          <table:table-cell table:style-name="TableRowCell" office:value-type="string">
            <text:p text:style-name="Table_20_Contents">Disk Rotation Speed (rpm)</text:p>
          </table:table-cell>
          <table:table-cell table:style-name="TableRowCell" office:value-type="string">
            <text:p text:style-name="Table_20_Contents">3,600</text:p>
          </table:table-cell>
          <table:table-cell table:style-name="TableRowCell" office:value-type="string">
            <text:p text:style-name="Table_20_Contents">3,600</text:p>
          </table:table-cell>
        </table:table-row>
        <table:table-row>
          <table:table-cell table:style-name="TableRowCell" office:value-type="string">
            <text:p text:style-name="Table_20_Contents">Average Rotational Latency (ms)</text:p>
          </table:table-cell>
          <table:table-cell table:style-name="TableRowCell" office:value-type="string">
            <text:p text:style-name="Table_20_Contents">8.33</text:p>
          </table:table-cell>
          <table:table-cell table:style-name="TableRowCell" office:value-type="string">
            <text:p text:style-name="Table_20_Contents">8.33</text:p>
          </table:table-cell>
        </table:table-row>
        <table:table-row>
          <table:table-cell table:style-name="TableRowCell" office:value-type="string">
            <text:p text:style-name="Table_20_Contents">Recording Media Type</text:p>
          </table:table-cell>
          <table:table-cell table:style-name="TableRowCell" office:value-type="string">
            <text:p text:style-name="Table_20_Contents">MFM</text:p>
          </table:table-cell>
          <table:table-cell table:style-name="TableRowCell" office:value-type="string">
            <text:p text:style-name="Table_20_Contents">2-7 RLL</text:p>
          </table:table-cell>
        </table:table-row>
        <table:table-row>
          <table:table-cell table:style-name="TableRowCell" office:value-type="string">
            <text:p text:style-name="Table_20_Contents">Recording Densit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it Density (BPI)</text:p>
          </table:table-cell>
          <table:table-cell table:style-name="TableRowCell" office:value-type="string">
            <text:p text:style-name="Table_20_Contents">14,000</text:p>
          </table:table-cell>
          <table:table-cell table:style-name="TableRowCell" office:value-type="string">
            <text:p text:style-name="Table_20_Contents">28,000</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850</text:p>
          </table:table-cell>
          <table:table-cell table:style-name="TableRowCell" office:value-type="string">
            <text:p text:style-name="Table_20_Contents">1,175</text:p>
          </table:table-cell>
        </table:table-row>
        <table:table-row>
          <table:table-cell table:style-name="TableRowCell" office:value-type="string">
            <text:p text:style-name="Table_20_Contents">Interface</text:p>
          </table:table-cell>
          <table:table-cell table:style-name="TableRowCell" office:value-type="string">
            <text:p text:style-name="Table_20_Contents">SASI</text:p>
          </table:table-cell>
          <table:table-cell table:style-name="TableRowCell" office:value-type="string">
            <text:p text:style-name="Table_20_Contents">SASI</text:p>
          </table:table-cell>
        </table:table-row>
      </table:table>
      <text:p text:style-name="First_20_paragraph"><text:span text:style-name="Strong_20_Emphasis">External Specifications</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External Dimensions (W×H×D mm)</text:p>
          </table:table-cell>
          <table:table-cell table:style-name="TableRowCell" office:value-type="string">
            <text:p text:style-name="Table_20_Contents">87×142×260</text:p>
          </table:table-cell>
          <table:table-cell table:style-name="TableRowCell" office:value-type="string">
            <text:p text:style-name="Table_20_Contents">87×142×260</text:p>
          </table:table-cell>
        </table:table-row>
        <table:table-row>
          <table:table-cell table:style-name="TableRowCell" office:value-type="string">
            <text:p text:style-name="Table_20_Contents">Weight (Kg)</text:p>
          </table:table-cell>
          <table:table-cell table:style-name="TableRowCell" office:value-type="string">
            <text:p text:style-name="Table_20_Contents">2.4</text:p>
          </table:table-cell>
          <table:table-cell table:style-name="TableRowCell" office:value-type="string">
            <text:p text:style-name="Table_20_Contents">2.3</text:p>
          </table:table-cell>
        </table:table-row>
        <table:table-row>
          <table:table-cell table:style-name="TableRowCell" office:value-type="string">
            <text:p text:style-name="Table_20_Contents">Power Consumption (W)</text:p>
          </table:table-cell>
          <table:table-cell table:style-name="TableRowCell" office:value-type="string">
            <text:p text:style-name="Table_20_Contents">28</text:p>
          </table:table-cell>
          <table:table-cell table:style-name="TableRowCell" office:value-type="string">
            <text:p text:style-name="Table_20_Contents">35</text:p>
          </table:table-cell>
        </table:table-row>
      </table:table>
      <text:p text:style-name="First_20_paragraph"><text:span text:style-name="Strong_20_Emphasis">Environmental Condition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able:table-cell>
            <table:table-cell table:style-name="TableHeaderRowCell" office:value-type="string">
              <text:p text:style-name="Table_20_Heading">IT-X680</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row>
        <table:table-row>
          <table:table-cell table:style-name="TableRowCell" office:value-type="string">
            <text:p text:style-name="Table_20_Contents">Temperature</text:p>
          </table:table-cell>
          <table:table-cell table:style-name="TableRowCell" office:value-type="string">
            <text:p text:style-name="Table_20_Contents">5~45°C</text:p>
          </table:table-cell>
          <table:table-cell table:style-name="TableRowCell" office:value-type="string">
            <text:p text:style-name="Table_20_Contents">-40~60°C</text:p>
          </table:table-cell>
          <table:table-cell table:style-name="TableRowCell" office:value-type="string">
            <text:p text:style-name="Table_20_Contents">5~45°C</text:p>
          </table:table-cell>
          <table:table-cell table:style-name="TableRowCell" office:value-type="string">
            <text:p text:style-name="Table_20_Contents">-20~60°C</text:p>
          </table:table-cell>
        </table:table-row>
        <table:table-row>
          <table:table-cell table:style-name="TableRowCell" office:value-type="string">
            <text:p text:style-name="Table_20_Contents">Temperature Gradient</text:p>
          </table:table-cell>
          <table:table-cell table:style-name="TableRowCell" office:value-type="string">
            <text:p text:style-name="Table_20_Contents">10°C/H</text:p>
          </table:table-cell>
          <table:table-cell table:style-name="TableRowCell" office:value-type="string">
            <text:p text:style-name="Table_20_Contents">No condensation</text:p>
          </table:table-cell>
          <table:table-cell table:style-name="TableRowCell" office:value-type="string">
            <text:p text:style-name="Table_20_Contents">10°C/H</text:p>
          </table:table-cell>
          <table:table-cell table:style-name="TableRowCell" office:value-type="string">
            <text:p text:style-name="Table_20_Contents">10°C/H</text:p>
          </table:table-cell>
        </table:table-row>
        <table:table-row>
          <table:table-cell table:style-name="TableRowCell" office:value-type="string">
            <text:p text:style-name="Table_20_Contents">Relative Humidity</text:p>
          </table:table-cell>
          <table:table-cell table:style-name="TableRowCell" office:value-type="string">
            <text:p text:style-name="Table_20_Contents">8~80%</text:p>
          </table:table-cell>
          <table:table-cell table:style-name="TableRowCell" office:value-type="string">
            <text:p text:style-name="Table_20_Contents">No condensation</text:p>
          </table:table-cell>
          <table:table-cell table:style-name="TableRowCell" office:value-type="string">
            <text:p text:style-name="Table_20_Contents">5~80%</text:p>
          </table:table-cell>
          <table:table-cell table:style-name="TableRowCell" office:value-type="string">
            <text:p text:style-name="Table_20_Contents">5~90%</text:p>
          </table:table-cell>
        </table:table-row>
        <table:table-row>
          <table:table-cell table:style-name="TableRowCell" office:value-type="string">
            <text:p text:style-name="Table_20_Contents">Shock</text:p>
          </table:table-cell>
          <table:table-cell table:style-name="TableRowCell" office:value-type="string">
            <text:p text:style-name="Table_20_Contents">2G</text:p>
          </table:table-cell>
          <table:table-cell table:style-name="TableRowCell" office:value-type="string">
            <text:p text:style-name="Table_20_Contents">40G</text:p>
          </table:table-cell>
          <table:table-cell table:style-name="TableRowCell" office:value-type="string">
            <text:p text:style-name="Table_20_Contents">2G</text:p>
          </table:table-cell>
          <table:table-cell table:style-name="TableRowCell" office:value-type="string">
            <text:p text:style-name="Table_20_Contents">50G</text:p>
          </table:table-cell>
        </table:table-row>
      </table:table>
      <text:p text:style-name="First_20_paragraph"><text:span text:style-name="Strong_20_Emphasis">Chapter 7: Maintenance Information</text:span></text:p>
      <text:p text:style-name="Text_20_body">Thank you for purchasing our product from Aitek Corporation. We take every measure to ensure the quality of our products, but in the event that repairs are needed due to an accident, we offer repair services. The details are as follows:</text:p>
      <text:list text:style-name="Numbering_20_1">
        <text:list-item>
          <text:p text:style-name="List_20_Number"><text:span text:style-name="Strong_20_Emphasis">Bringing in Repairs</text:span> If damage occurs, you can bring the malfunctioning unit to the shop where you purchased it to fulfill the conditions for repair.</text:p>
        </text:list-item>
        <text:list-item>
          <text:p text:style-name="List_20_Number"><text:span text:style-name="Strong_20_Emphasis">Repairs by Courier</text:span> If damage occurs and it is inconvenient for you to bring the malfunctioning unit to the shop where you purchased it, you can send it to us by courier. In this case, you are responsible for the shipping cost. Please consult with the shop where you purchased the unit about packaging for shipment.</text:p>
        </text:list-item>
        <text:list-item>
          <text:p text:style-name="List_20_Number"><text:span text:style-name="Strong_20_Emphasis">Repair Time</text:span> Repair time varies depending on the extent and content of the damage, but generally, it will be completed within 2 weeks.</text:p>
        </text:list-item>
        <text:list-item>
          <text:p text:style-name="List_20_Number"><text:span text:style-name="Strong_20_Emphasis">Warranty Repairs</text:span> If the repair is within the warranty period of one year, it will be done free of charge. However, even within the warranty period, some cases may incur charges depending on the warranty terms.</text:p>
        </text:list-item>
        <text:list-item>
          <text:p text:style-name="List_20_Number"><text:span text:style-name="Strong_20_Emphasis">Important Warranty Notice</text:span> Keep the warranty card in a safe place. If you do not have the warranty card, the warranty repair may not be provided even within the warranty period.</text:p>
        </text:list-item>
        <text:list-item>
          <text:p text:style-name="List_20_Number"><text:span text:style-name="Strong_20_Emphasis">Repairs After Warranty</text:span> After the warranty period, repairs will be charged. The basic repair fees are shown in the table below.</text:p>
        </text:list-item>
      </text:list>
      <text:p text:style-name="First_20_paragraph"><text:span text:style-name="Strong_20_Emphasis">Please note that the prices listed below do not include consumption tax.</text:span></text:p>
      <text:p text:style-name="Text_20_body">| <text:span text:style-name="Strong_20_Emphasis">Simple Repair (Technical Fee)</text:span> | <text:span text:style-name="Strong_20_Emphasis">3,000 Yen</text:span> | | <text:span text:style-name="Strong_20_Emphasis">General Repair (Technical Fee)</text:span> | <text:span text:style-name="Strong_20_Emphasis">5,000 Yen</text:span> | | <text:span text:style-name="Strong_20_Emphasis">Parts Charges</text:span> | <text:span text:style-name="Strong_20_Emphasis">Actual Cost</text:span> | | <text:span text:style-name="Strong_20_Emphasis">Shipping Cost</text:span> | <text:span text:style-name="Strong_20_Emphasis">Customer's Responsibility</text:span> |</text:p>
      <text:p text:style-name="Text_20_body">※ The ownership rights of defective parts replaced during the repair will belong to Aitec Co., Ltd.</text:p>
      <text:list text:style-name="Numbering_20_1" text:start-value="7">
        <text:list-item>
          <text:p text:style-name="List_20_Number_20_Tight">For those who wish to receive a replacement machine due to the convenience of the customer, we have prepared a 40MB hard disk as follows.</text:p>
        </text:list-item>
      </text:list>
      <text:p text:style-name="First_20_paragraph">| Within the Warranty Period | Up to 1 week after the repaired product arrives at the customer's place is free After that, an additional 1500 yen per day | | Outside the Warranty Period | The first week is 5,000 yen. After that, an additional 1,500 yen per day |</text:p>
      <text:p text:style-name="Text_20_body">Appendix</text:p>
      <text:p text:style-name="Text_20_body">User's Manual OS-9/X68000 Supplement Edition</text:p>
      <text:p text:style-name="Text_20_body">(blank page)</text:p>
      <text:p text:style-name="Text_20_body"><text:span text:style-name="Strong_20_Emphasis">Introduction</text:span></text:p>
      <text:p text:style-name="Text_20_body">The basic handling method is explained in the IT-X640 / IT-X680 user manual, but this book is a supplementary user manual for handling OS-9 / X68000 and IT-X640 · IT-X680.</text:p>
      <text:p text:style-name="Text_20_body">The main contents are as follows:</text:p>
      <text:list text:style-name="List_20_1">
        <text:list-item>
          <text:p text:style-name="List_20_Bullet_20_Tight">How to initialize the additional hard disk</text:p>
        </text:list-item>
        <text:list-item>
          <text:p text:style-name="List_20_Bullet_20_Tight">How to register an additional hard disk to the system</text:p>
        </text:list-item>
        <text:list-item>
          <text:p text:style-name="List_20_Bullet_20_Tight">How to coexist with Human68K (Ver2.0)</text:p>
        </text:list-item>
        <text:list-item>
          <text:p text:style-name="List_20_Bullet_20_Tight">How to reconfigure the system</text:p>
        </text:list-item>
      </text:list>
      <text:p text:style-name="First_20_paragraph"><text:span text:style-name="Strong_20_Emphasis">Caution</text:span></text:p>
      <text:p text:style-name="Text_20_body">Within OS-9 Version 2.2, there are cases where initialization cannot be done when using IT-X680. (There is no problem with the IT-X640)</text:p>
      <text:p text:style-name="Text_20_body">According to our research, this version covers serial numbers up to SS13000; from SS13001 onwards it can be used with IT-X680 without any problems.</text:p>
      <text:p text:style-name="Text_20_body">If you are using OS-9 with serial numbers up to SS13000, please contact the address below.</text:p>
      <text:p text:style-name="Text_20_body"><text:span text:style-name="Strong_20_Emphasis">Contact Information</text:span> Postal code 162 8 Ichigaya-Yawatacho, Shinjuku-ku, Tokyo Sharp Corporation, TV Business Division, Product Planning Department 4 Phone: (03) 260-1161</text:p>
      <text:p text:style-name="Text_20_body">(blank page)</text:p>
      <text:p text:style-name="Text_20_body">Table of Contents</text:p>
      <text:p text:style-name="Text_20_body">Chapter 1: Precautions for Using OS-9/X68000 .......................................... 1 1.1 Relationship Between ITX Series and Device Number ............ 1 ■ When connecting the ITX series to the X68000 series .......... 1 ● IT-X640 connecting two units ............................................ 1 ● IT-X640.IT X680 connecting .................................................................. 1 ● IT-X680 connecting two units ............................................. 2 ■ When connecting the internal hard disk type ITX68000 series .... 2 ITX series connecting .............................................................. 2 ● IT-X640 connecting ..................................................... 2 ● IT-X680 connecting ..................................................... 2</text:p>
      <text:p text:style-name="Text_20_body">Chapter 2: How to Initialize the Additional Hard Disk ..................... 3 2.1 Precautions (for device number "0") .......................................... 3 ◎ When the ITX series is connected to the X68000 series ................ 3 ◎ Hard Disk (20 MB) Internal Type X68000 series ............................ 3 2.2 How to Initialize for Device Number "1" ...................................... 3 2.3 How to Initialize for Device Number "2" ..................................... 5 2.4 How to Initialize for Device Number "3" ...................................... 7</text:p>
      <text:p text:style-name="Text_20_body">Chapter 3: Registering the Additional Hard Disk to the System ...... 10 3.1 Changing the StartUp File .......................................................... 10 3.2 Creating the InitHD File .............................................................. 11</text:p>
      <text:p text:style-name="Text_20_body">Chapter 4: How to Manage When Mixed with Human68K (Ver 2.0) ... 15 4.1 Startup Menu ...................................................................... 15</text:p>
      <text:p text:style-name="Text_20_body">Chapter 5: System Reconfiguration ............................................ 16 5.1 How to Reconfigure the System ......................................... 16 5.2 When the Device Number is "1" or More and Hard Disk Devices .... 16 ■Precautions When Creating a Project File .................................. 16 ■How to Execute a Project File .................................................. 17</text:p>
      <text:p text:style-name="Text_20_body"><text:span text:style-name="Emphasis">(Blank page in the original.)</text:span></text:p>
      <text:p text:style-name="Text_20_body">Chapter 1 Precautions for Using OS-9/X68000</text:p>
      <text:p text:style-name="Text_20_body">In OS-9, there are no concepts such as logical drives (A: B: C: D:) like Human68K, but rather, fixed drives are specified. Up to 4 hard disk devices supported by OS-9 can be used, h0 through h3. (Device numbers "0" to "3")</text:p>
      <text:p text:style-name="Text_20_body">The procedure files related to hard disk devices provided on the OS-9 system disk, such as [init_hd_40m] and [make_h0_wnd], are prepared only for device number "0"; device numbers "1" to "3" must be created independently.</text:p>
      <text:p text:style-name="Text_20_body">1.1 Relationship between ITX Series and Device Numbers</text:p>
      <text:p text:style-name="Text_20_body">■ When connecting the ITX series to the X68000 series ● In case of connecting two IT-X640 units</text:p>
      <text:p text:style-name="Preformatted_20_Text"><text:s text:c="22"/>ID Number "0" <text:s text:c="13"/>ID Number "1"</text:p>
      <text:p text:style-name="Preformatted_20_Text"><text:s text:c="2"/>X68000 ——— IT-X640 ——— IT-X640</text:p>
      <text:p text:style-name="Preformatted_20_Text"><text:s text:c="22"/>Device Number "0" <text:s text:c="9"/>Device Number "2"</text:p>
      <text:p text:style-name="Preformatted_20_Text"><text:s text:c="22"/>No Device Number "1" <text:s text:c="6"/>No Device Number "3"</text:p>
      <text:p text:style-name="First_20_paragraph">● When connecting IT-X640/IT-X680</text:p>
      <text:p text:style-name="Preformatted_20_Text"><text:s text:c="22"/>ID Number "0" <text:s text:c="13"/>ID Number "1"</text:p>
      <text:p text:style-name="Preformatted_20_Text"><text:s text:c="2"/>X68000 ——— IT-X640 ——— IT-X680</text:p>
      <text:p text:style-name="Preformatted_20_Text"><text:s text:c="22"/>Device Number "0" <text:s text:c="9"/>Device Number "2"</text:p>
      <text:p text:style-name="Preformatted_20_Text"><text:s text:c="22"/>No Device Number "1" <text:s text:c="6"/>Device Number "3"</text:p>
      <text:p text:style-name="Preformatted_20_Text"/>
      <text:p text:style-name="Preformatted_20_Text"><text:s text:c="22"/>ID Number "0" <text:s text:c="13"/>ID Number "1"</text:p>
      <text:p text:style-name="Preformatted_20_Text"><text:s text:c="2"/>X68000 ——— IT-X680 ——— IT-X640</text:p>
      <text:p text:style-name="Preformatted_20_Text"><text:s text:c="22"/>Device Number "0" <text:s text:c="9"/>Device Number "2"</text:p>
      <text:p text:style-name="Preformatted_20_Text"><text:s text:c="22"/>Device Number "1" <text:s text:c="9"/>No Device Number "3"</text:p>
      <text:p text:style-name="First_20_paragraph">● When connecting two IT-X680 units</text:p>
      <text:p text:style-name="Preformatted_20_Text"><text:s text:c="40"/>ID number = "0" <text:s text:c="66"/>ID number = "1"</text:p>
      <text:p text:style-name="Preformatted_20_Text"/>
      <text:p text:style-name="Preformatted_20_Text"><text:s text:c="35"/>IT-X680 <text:s text:c="82"/>IT-X680</text:p>
      <text:p text:style-name="First_20_paragraph">X68000 Device number "0" X68000 Device number "2" Device number "1" Device number "3"</text:p>
      <text:p text:style-name="Text_20_body">● When connecting the ITX series to the X68000 series with built-in hard disk type ■ When connecting IT-X640</text:p>
      <text:p text:style-name="Preformatted_20_Text"><text:s text:c="40"/>ID number = "1"</text:p>
      <text:p text:style-name="Preformatted_20_Text"/>
      <text:p text:style-name="Preformatted_20_Text"><text:s text:c="30"/>IT-X640</text:p>
      <text:p text:style-name="First_20_paragraph">X68000 (Built-in HDD) Device number "0" X68000 (Built-in HDD) Device number "2" Device number "1" absent Device number "3" absent</text:p>
      <text:p text:style-name="Text_20_body">● When connecting IT-X680</text:p>
      <text:p text:style-name="Preformatted_20_Text"><text:s text:c="40"/>ID number = "1"</text:p>
      <text:p text:style-name="Preformatted_20_Text"/>
      <text:p text:style-name="Preformatted_20_Text"><text:s text:c="27"/>IT-X680</text:p>
      <text:p text:style-name="First_20_paragraph">X68000 (Built-in HDD) Device number "0" X68000 (Built-in HDD) Device number "2" Device number "1" absent Device number "3" absent</text:p>
      <text:p text:style-name="Text_20_body">When connecting IT-X640, please note that the next device number will be empty. Even if the device number is empty for logical drive purposes in Human68K (Ver. 2.0), it will automatically become A, B, C, etc. in order. However, in OS-9, empty device numbers cannot be used for specifying fixed drives.</text:p>
      <text:h text:style-name="Heading_20_1" text:outline-level="1"><text:bookmark-start text:name="chapter-2-how-to-initialize-the-additional-hard-disk"/>Chapter 2: How to Initialize the Additional Hard Disk<text:bookmark-end text:name="chapter-2-how-to-initialize-the-additional-hard-disk"/></text:h>
      <text:p text:style-name="First_20_paragraph">When initializing a hard disk (device number "0"), use <text:span text:style-name="Source_20_Text">init_hd_xx.x</text:span>. (For detailed instructions, refer to the IT-X640/IT-X680 User Manual.)</text:p>
      <text:h text:style-name="Heading_20_1" text:outline-level="1"><text:bookmark-start text:name="id_21-precautions-for-device-number-0"/>2.1 Precautions (For device number "0")<text:bookmark-end text:name="id_21-precautions-for-device-number-0"/></text:h>
      <text:p text:style-name="First_20_paragraph"><text:span text:style-name="Strong_20_Emphasis">1. If connected to the ITX series in the X68000 series:</text:span></text:p>
      <text:list text:style-name="List_20_1">
        <text:list-item>
          <text:p text:style-name="List_20_Bullet_20_Tight">Perform initialization using <text:span text:style-name="Source_20_Text">init_hd_40m</text:span>.</text:p>
        </text:list-item>
        <text:list-item>
          <text:p text:style-name="List_20_Bullet_20_Tight">Input the disk descriptor file <text:span text:style-name="Source_20_Text">h0_40mh0_p1</text:span>.</text:p>
        </text:list-item>
      </text:list>
      <text:p text:style-name="First_20_paragraph"><text:span text:style-name="Strong_20_Emphasis">2. For a 20MB internal type hard disk in the X68000 series:</text:span></text:p>
      <text:list text:style-name="List_20_1">
        <text:list-item>
          <text:p text:style-name="List_20_Bullet_20_Tight">Perform initialization using <text:span text:style-name="Source_20_Text">init_hd_20m</text:span>.</text:p>
        </text:list-item>
        <text:list-item>
          <text:p text:style-name="List_20_Bullet_20_Tight">Input the disk descriptor file <text:span text:style-name="Source_20_Text">h0_20mh0_p1</text:span>.</text:p>
        </text:list-item>
      </text:list>
      <text:h text:style-name="Heading_20_1" text:outline-level="1"><text:bookmark-start text:name="id_22-how-to-initialize-a-device-numbered-1"/>2.2 How to Initialize a Device Numbered "1"<text:bookmark-end text:name="id_22-how-to-initialize-a-device-numbered-1"/></text:h>
      <text:p text:style-name="First_20_paragraph"><text:span text:style-name="Strong_20_Emphasis">Note:</text:span> When connected with IT-X680 and ID number is "0" in the X68000 series. Internal type hard disks in the X68000 series do not include a "1" device number.</text:p>
      <text:list text:style-name="Numbering_20_1">
        <text:list-item>
          <text:p text:style-name="List_20_Number_20_Tight">First, create an initial project file for device number "1".</text:p>
        </text:list-item>
      </text:list>
      <text:p text:style-name="Preformatted_20_Text"><text:s text:c="3"/>Change the current data directory to PROC.</text:p>
      <text:p text:style-name="Preformatted_20_Text"><text:s text:c="3"/>$ chd PROC</text:p>
      <text:list text:style-name="Numbering_20_1" text:start-value="2">
        <text:list-item>
          <text:p text:style-name="List_20_Number">Copy the original project file. $ copy init-hd_40m init-h1_40m</text:p>
        </text:list-item>
        <text:list-item>
          <text:p text:style-name="List_20_Number">In EDT (Line Editor), change the device number of <text:span text:style-name="Source_20_Text">init_h1_40m</text:span>. $ EDT init_h1_40m</text:p>
        </text:list-item>
      </text:list>
      <text:p text:style-name="First_20_paragraph">4 Convert the device number using the string substitution command. Please enter "0 0 0 1", "c:* " h0" h1" ". *0001 - t</text:p>
      <text:p text:style-name="Preformatted_20_Text"><text:s text:c="1"/>E: c:* " h0" h1"</text:p>
      <text:p text:style-name="Preformatted_20_Text"><text:s text:c="1"/>*0004 load -d rbhddrv h1_40m</text:p>
      <text:p text:style-name="Preformatted_20_Text"><text:s text:c="1"/>*0006 unlink h1</text:p>
      <text:p text:style-name="Preformatted_20_Text"><text:s text:c="1"/>*0007 load h1_p1</text:p>
      <text:p text:style-name="Preformatted_20_Text"><text:s text:c="1"/>*0008 format /h1 -rv = OS-9 / 68000</text:p>
      <text:p text:style-name="Preformatted_20_Text"><text:s text:c="1"/>E:</text:p>
      <text:p text:style-name="First_20_paragraph">5 Return the pointer of the line editor to 0 0 0 1, and convert the device number again using the string substitution command. Please enter "0 0 0 1", "c:* " hpu" / h1 " ".</text:p>
      <text:p text:style-name="Preformatted_20_Text"><text:s text:c="1"/>E: 0 0 0 1</text:p>
      <text:p text:style-name="Preformatted_20_Text"><text:s text:c="1"/>*0001 -t</text:p>
      <text:p text:style-name="Preformatted_20_Text"><text:s text:c="1"/>E: c:* " hpu" hpu / h1"</text:p>
      <text:p text:style-name="Preformatted_20_Text"><text:s text:c="1"/>*0005 hpu /h1 &lt;/ win0</text:p>
      <text:p text:style-name="Preformatted_20_Text"><text:s text:c="1"/>E:</text:p>
      <text:p text:style-name="First_20_paragraph">6 Check that the device number has been converted correctly. Please enter "0 0 0 1", "113".</text:p>
      <text:p text:style-name="Preformatted_20_Text"><text:s text:c="1"/>E: 0 0 0 1</text:p>
      <text:p text:style-name="Preformatted_20_Text"><text:s text:c="1"/>*0001 -t</text:p>
      <text:p text:style-name="Preformatted_20_Text"><text:s text:c="1"/>E: 113</text:p>
      <text:p text:style-name="Preformatted_20_Text"><text:s text:c="1"/>*0001 -t</text:p>
      <text:p text:style-name="Preformatted_20_Text"><text:s text:c="1"/>0002 tmode nopause - w=1</text:p>
      <text:p text:style-name="Preformatted_20_Text"><text:s text:c="1"/>0003 chd CMDS / BOOTOBJS</text:p>
      <text:p text:style-name="Preformatted_20_Text"><text:s text:c="1"/>0004 load -d rbhddrv h1_40m</text:p>
      <text:p text:style-name="Preformatted_20_Text"><text:s text:c="1"/>0005 hpu / h1 &lt;/ win0</text:p>
      <text:p text:style-name="Preformatted_20_Text"><text:s text:c="1"/>0006 unlink h1</text:p>
      <text:p text:style-name="Preformatted_20_Text"><text:s text:c="1"/>0007 load -d h1_p1</text:p>
      <text:p text:style-name="Preformatted_20_Text"><text:s text:c="1"/>0008 format / h1 -rv= OS-9 / 68000</text:p>
      <text:p text:style-name="Preformatted_20_Text"><text:s text:c="1"/>0009 y</text:p>
      <text:p text:style-name="Preformatted_20_Text"><text:s text:c="1"/>0010 y</text:p>
      <text:p text:style-name="Preformatted_20_Text"><text:s text:c="1"/>0011 y</text:p>
      <text:p text:style-name="Preformatted_20_Text"><text:s text:c="1"/>0012 y</text:p>
      <text:p text:style-name="Preformatted_20_Text"><text:s text:c="1"/>E:</text:p>
      <text:p text:style-name="First_20_paragraph">7 If the device number has been changed correctly, please enter "q". init_h1_40m will be saved and will return to the original prompt state.</text:p>
      <text:p text:style-name="Preformatted_20_Text">E: q</text:p>
      <text:p text:style-name="First_20_paragraph">8 Return to the current data directory.</text:p>
      <text:p text:style-name="Preformatted_20_Text">$ chd ..</text:p>
      <text:p text:style-name="First_20_paragraph">9 Initialize the hard disk with device number "1".</text:p>
      <text:p text:style-name="Preformatted_20_Text">$ init_h1_40m</text:p>
      <text:p text:style-name="First_20_paragraph">10 The operation method is the same as for device number "0". However, for descriptor creation, enter "h1_40m2h1_p1".</text:p>
      <text:p text:style-name="Text_20_body">2.3 How to initialize device number "2"</text:p>
      <text:list text:style-name="List_20_1">
        <text:list-item>
          <text:p text:style-name="List_20_Bullet_20_Tight">When connected with ITX series using ID number "1" for X68000 series (including hard disk embedded type).</text:p>
        </text:list-item>
      </text:list>
      <text:p text:style-name="First_20_paragraph">1 First, create the initialization procedure file for device number "2". Change the current data directory to PROC.</text:p>
      <text:p text:style-name="Preformatted_20_Text">$ chd PROC</text:p>
      <text:p text:style-name="First_20_paragraph">2 Copy the original procedure file.</text:p>
      <text:p text:style-name="Preformatted_20_Text">$ copy init_hd_40m init_h2_40m</text:p>
      <text:p text:style-name="First_20_paragraph">3 Using EDT (line editor), change the device number in init_h2_40m.</text:p>
      <text:p text:style-name="Preformatted_20_Text">$ EDT init_h2_40m</text:p>
      <text:p text:style-name="First_20_paragraph">4 Use the string substitution command to replace the device number. Enter "fc* h0" h2".</text:p>
      <text:p text:style-name="Text_20_body"><text:span text:style-name="Emphasis">0001 -t E: c</text:span> "h0" h2" *0004 load -d rbhddrv h2_40m *0006 unlink h2 *0007 load -d h2_p1 *0008 format /h2 -rv=OS-9/68000 E:</text:p>
      <text:p text:style-name="Text_20_body">5 Return the line editor pointer to 0001, and use the string substitution command again to replace the device number. Enter "0001 fc* hpu" hpu /h2".</text:p>
      <text:p text:style-name="Text_20_body">E:0001 <text:span text:style-name="Emphasis">0001 -t E: c</text:span> "hpu" hpu /h2" *0005 hpu /h2 &lt; /win0 E:</text:p>
      <text:p text:style-name="Text_20_body">6 Confirm that the device number has been correctly replaced. Enter "0001" and "113".</text:p>
      <text:p text:style-name="Text_20_body">E:0001 *0001 -t E:113 *0001 -t</text:p>
      <text:p text:style-name="Preformatted_20_Text">0002 tmode nopause -w=1</text:p>
      <text:p text:style-name="Preformatted_20_Text">0003 chd CMDS/BOOTOBJS</text:p>
      <text:p text:style-name="Preformatted_20_Text">0004 load -d rbhddrv h2_40m</text:p>
      <text:p text:style-name="Preformatted_20_Text">0005 hpu /h2 &lt; /win0</text:p>
      <text:p text:style-name="Preformatted_20_Text">0006 unlink h2</text:p>
      <text:p text:style-name="Preformatted_20_Text">0007 load -d h2_p1</text:p>
      <text:p text:style-name="Preformatted_20_Text">0008 format /h2 -rv=OS-9/68000</text:p>
      <text:p text:style-name="Preformatted_20_Text">0009 y</text:p>
      <text:p text:style-name="Preformatted_20_Text">0010 y</text:p>
      <text:p text:style-name="Preformatted_20_Text">0011 y</text:p>
      <text:p text:style-name="Preformatted_20_Text">0012 y</text:p>
      <text:p text:style-name="First_20_paragraph">E:</text:p>
      <text:p text:style-name="Text_20_body">Page 6</text:p>
      <text:p text:style-name="Text_20_body">7 If the device number has been correctly replaced, input 'q' and press enter. init_h2_40m will be saved, and the state will be returned to the original prompt. E: q</text:p>
      <text:p text:style-name="Text_20_body">8 Return to the original current data directory. $ chd ..</text:p>
      <text:p text:style-name="Text_20_body">9 Initialize the hard disk with device number "2". $ init_h2_40m</text:p>
      <text:p text:style-name="Text_20_body">10 The operation method is the same as for device number "0". However, when creating a descriptor, input "h2_40meh2_p1" as shown.</text:p>
      <text:p text:style-name="Text_20_body">2.4 Initialization Method for Device Number "3"</text:p>
      <text:p text:style-name="Text_20_body">※ For X68000 Series (including the internal hard disk type), when connecting IT-X680 to ID Number="1", follow the instructions from point 2.</text:p>
      <text:p text:style-name="Text_20_body">1 First, create an initialization procedure file for device number "3". Change the current data directory to PROC. $ chd PROC</text:p>
      <text:p text:style-name="Text_20_body">2 Copy the original procedure file. $ copy init_hd_40m init_h3_40m</text:p>
      <text:p text:style-name="Text_20_body">3 Edit (line editor) init_h3_40m to change the device number. $ EDT init_h3_40m</text:p>
      <text:list text:style-name="Numbering_20_1" text:start-value="4">
        <text:list-item>
          <text:p text:style-name="List_20_Number_20_Tight">Use the string replacement command to change the device number. Enter "fc* "h0" "h3"".</text:p>
        </text:list-item>
      </text:list>
      <text:p text:style-name="Preformatted_20_Text"><text:s text:c="1"/>* 0001 <text:s text:c="4"/>-t</text:p>
      <text:p text:style-name="Preformatted_20_Text"><text:s text:c="2"/>E: c* ”h0” “h3”</text:p>
      <text:p text:style-name="Preformatted_20_Text"><text:s text:c="1"/>* 0004 <text:s text:c="4"/>load -d rbhddrv h3_40m</text:p>
      <text:p text:style-name="Preformatted_20_Text"><text:s text:c="1"/>* 0006 <text:s text:c="4"/>unlink h3</text:p>
      <text:p text:style-name="Preformatted_20_Text"><text:s text:c="1"/>* 0007 <text:s text:c="4"/>load -d h3_p1</text:p>
      <text:p text:style-name="Preformatted_20_Text"><text:s text:c="1"/>* 0008 <text:s text:c="4"/>format /h3 -rv=OS-9/68000</text:p>
      <text:p text:style-name="Preformatted_20_Text"><text:s text:c="1"/>E:</text:p>
      <text:list text:style-name="Numbering_20_1" text:start-value="5">
        <text:list-item>
          <text:p text:style-name="List_20_Number_20_Tight">Return the line editor pointer to 0001, and again use the string replacement command to change the device number. Enter "fc* "hpu" hpu /h3"".</text:p>
        </text:list-item>
      </text:list>
      <text:p text:style-name="Preformatted_20_Text"><text:s text:c="1"/>E: 0001</text:p>
      <text:p text:style-name="Preformatted_20_Text"><text:s text:c="1"/>* 0001 <text:s text:c="4"/>-t</text:p>
      <text:p text:style-name="Preformatted_20_Text"><text:s text:c="2"/>E: c* ”hpu” hpu /h3 ”</text:p>
      <text:p text:style-name="Preformatted_20_Text"><text:s text:c="1"/>* 0005 <text:s text:c="4"/>hpu /h3 &lt;/win0</text:p>
      <text:p text:style-name="Preformatted_20_Text"><text:s text:c="1"/>E:</text:p>
      <text:list text:style-name="Numbering_20_1" text:start-value="6">
        <text:list-item>
          <text:p text:style-name="List_20_Number_20_Tight">Confirm that the device number has been changed correctly. Enter "0001" and "113".</text:p>
        </text:list-item>
      </text:list>
      <text:p text:style-name="Preformatted_20_Text"><text:s text:c="1"/>E: 0001</text:p>
      <text:p text:style-name="Preformatted_20_Text"><text:s text:c="1"/>* 0001 <text:s text:c="4"/>-t</text:p>
      <text:p text:style-name="Preformatted_20_Text"><text:s text:c="2"/>E: 113</text:p>
      <text:p text:style-name="Preformatted_20_Text"><text:s text:c="1"/>* 0001 <text:s text:c="4"/>-t</text:p>
      <text:p text:style-name="Preformatted_20_Text"><text:s text:c="2"/>0002 <text:s text:c="5"/>tmode nopause -w=1</text:p>
      <text:p text:style-name="Preformatted_20_Text"><text:s text:c="2"/>0003 <text:s text:c="5"/>chd CMDS/BOOTOBJS</text:p>
      <text:p text:style-name="Preformatted_20_Text"><text:s text:c="2"/>0004 <text:s text:c="5"/>load -d rbhddrv h3_40m</text:p>
      <text:p text:style-name="Preformatted_20_Text"><text:s text:c="2"/>0005 <text:s text:c="5"/>hpu /h3 &lt;/win0</text:p>
      <text:p text:style-name="Preformatted_20_Text"><text:s text:c="2"/>0006 <text:s text:c="5"/>unlink h3</text:p>
      <text:p text:style-name="Preformatted_20_Text"><text:s text:c="2"/>0007 <text:s text:c="5"/>load -d h3_p1</text:p>
      <text:p text:style-name="Preformatted_20_Text"><text:s text:c="2"/>0008 <text:s text:c="5"/>format /h3 -rv=OS-9/68000</text:p>
      <text:p text:style-name="Preformatted_20_Text"><text:s text:c="2"/>0009 <text:s text:c="5"/>y</text:p>
      <text:p text:style-name="Preformatted_20_Text"><text:s text:c="2"/>0010 <text:s text:c="5"/>y</text:p>
      <text:p text:style-name="Preformatted_20_Text"><text:s text:c="2"/>0011 <text:s text:c="5"/>y</text:p>
      <text:p text:style-name="Preformatted_20_Text"><text:s text:c="2"/>0012 <text:s text:c="5"/>y</text:p>
      <text:p text:style-name="Preformatted_20_Text"><text:s text:c="1"/>E:</text:p>
      <text:p text:style-name="First_20_paragraph">7 If the device number has been correctly changed, enter "q". init_h3_40m will be saved and return to the original prompt state.</text:p>
      <text:p text:style-name="Preformatted_20_Text">Example: </text:p>
      <text:p text:style-name="Preformatted_20_Text"><text:s text:c="4"/>E: q</text:p>
      <text:p text:style-name="First_20_paragraph">8 Return to the original current data directory. $ chd .. 9 Execute hard disk initialization for device number "3". $ init_h3_40m 10 The operation method is the same as for device number "0". However, when creating a disk script, enter "h3_40m &amp; h3_p1".</text:p>
      <text:p text:style-name="Text_20_body">Note:</text:p>
      <text:p text:style-name="Text_20_body">If you add -np to the format within init_h3_40m, physical formatting will not be performed, so it will save time for reinitialization. (In this case, remove "0009 to 0012" options) *0008 format /h3 -rv=OS-9/68000 -np</text:p>
      <text:p text:style-name="Text_20_body">If you add -nv to the format within init_h3_40m, verify (bad sector detection) will not be performed, so reinitialization will be processed quite quickly. However, if the number of bad sectors is displayed during initialization with the verify function, be sure to perform initialization with this option. (In this case, remove "0009 to 0012" options) *0008 format /h3 -rv=OS-9/68000 -nv</text:p>
      <text:p text:style-name="Text_20_body">When rebuilding the system, it is necessary to perform reinitialization, so the above options are convenient.</text:p>
      <text:p text:style-name="Text_20_body">Chapter 3: How to Register the Additional Hard Disk System</text:p>
      <text:p text:style-name="Text_20_body">After initializing the hard disk device, it can recognize the hard disk device as there are drivers in the memory, but if you reboot OS-9, the hard disk device will not be recognized. Therefore, it is necessary to register the hard disk device in the system.</text:p>
      <text:p text:style-name="Text_20_body">In the case of Device Number "0", if you execute "make_h0_xxx", h0 will be registered automatically, but if you start up from the OS-9 system floppy disk, h0 will not be recognized, so please change it as follows.</text:p>
      <text:p text:style-name="Text_20_body">3.1 StartUp File Changes</text:p>
      <text:p text:style-name="Text_20_body">※When starting from a hard disk device with device number "0", change the StartUp file to /h0/SYS/StartUp. ※When starting from an OS-9 system floppy disk, change the StartUp file to /d0/SYS/StartUp.</text:p>
      <text:p text:style-name="Text_20_body">1Change the current data directory of the startup drive to SYS. $ chd SYS</text:p>
      <text:p text:style-name="Text_20_body">2Change the StartUp file with the EDT (Line Editor).</text:p>
      <text:p text:style-name="Preformatted_20_Text"><text:s text:c="3"/>$ EDT StartUp</text:p>
      <text:p text:style-name="Preformatted_20_Text"><text:s text:c="5"/>*0001 <text:s text:c="2"/>-xt</text:p>
      <text:p text:style-name="Preformatted_20_Text"><text:s text:c="5"/>E:</text:p>
      <text:p text:style-name="First_20_paragraph">3Enter the next keys in the E: state. ["0020" • " SYS/InitHD" • " *" • "0023" • "q"]</text:p>
      <text:p text:style-name="Preformatted_20_Text"><text:s text:c="4"/>(Enter a space at the beginning for [" SYS/InitHD" • " *"])</text:p>
      <text:p text:style-name="Preformatted_20_Text"/>
      <text:p text:style-name="Preformatted_20_Text"><text:s text:c="3"/>E: 0020</text:p>
      <text:p text:style-name="Preformatted_20_Text"><text:s text:c="3"/>*0020 <text:s text:c="4"/>* END OF STARTUP</text:p>
      <text:p text:style-name="Preformatted_20_Text"><text:s text:c="3"/>E: SYS/InitHD</text:p>
      <text:p text:style-name="Preformatted_20_Text"><text:s text:c="3"/>*0021 <text:s text:c="4"/>* END OF STARTUP</text:p>
      <text:p text:style-name="Preformatted_20_Text"><text:s text:c="3"/>E: *</text:p>
      <text:p text:style-name="Preformatted_20_Text"><text:s text:c="3"/>*0022 <text:s text:c="4"/>* END OF STARTUP</text:p>
      <text:p text:style-name="Preformatted_20_Text"><text:s text:c="3"/>E: 0023</text:p>
      <text:p text:style-name="Preformatted_20_Text"><text:s text:c="3"/>*0023</text:p>
      <text:p text:style-name="Preformatted_20_Text"><text:s text:c="3"/>E: q</text:p>
      <text:p text:style-name="First_20_paragraph">4 Check the modified StartUp file with the list command.</text:p>
      <text:p text:style-name="Text_20_body">$ list StartUp -xt *</text:p>
      <text:list text:style-name="List_20_1">
        <text:list-item>
          <text:p text:style-name="List_20_Bullet_20_Tight">OS-9 / 68000 Level I V2.2</text:p>
        </text:list-item>
        <text:list-item>
          <text:p text:style-name="List_20_Bullet_20_Tight">Copyright 1984 by Microware Systems Corporation</text:p>
        </text:list-item>
        <text:list-item>
  </text:list-item>
        <text:list-item>
          <text:p text:style-name="List_20_Bullet_20_Tight">OS-9 / X68000</text:p>
        </text:list-item>
        <text:list-item>
          <text:p text:style-name="List_20_Bullet_20_Tight">Copyright 1988 by Microware Japan, LTD.</text:p>
        </text:list-item>
        <text:list-item>
  </text:list-item>
        <text:list-item>
          <text:p text:style-name="List_20_Bullet_20_Tight">The commands in this file are highly system dependent and should</text:p>
        </text:list-item>
        <text:list-item>
          <text:p text:style-name="List_20_Bullet_20_Tight">be modified by the user.</text:p>
        </text:list-item>
        <text:list-item>
  </text:list-item>
      </text:list>
      <text:p text:style-name="First_20_paragraph">link shell cio load math * iniz syscon setime -s * SYS/InitDD * SYS/InitHD *</text:p>
      <text:list text:style-name="List_20_1">
        <text:list-item>
          <text:p text:style-name="List_20_Bullet_20_Tight">END OF STARTUP</text:p>
        </text:list-item>
      </text:list>
      <text:p text:style-name="First_20_paragraph">3.2 Creating the InitHD File</text:p>
      <text:p text:style-name="Text_20_body">*If you are booting from the hard disk system with device number "0", create the /h0/SYS/InitHD file.</text:p>
      <text:p text:style-name="Text_20_body">*If you are booting from an OS-9 system floppy disk, create the /d0/SYS/InitHD file.</text:p>
      <text:p text:style-name="Text_20_body">1 Set the current data directory of the boot drive to SYS.</text:p>
      <text:p text:style-name="Text_20_body">$ chd SYS</text:p>
      <text:p text:style-name="Text_20_body">2 Create the InitHD file using EDT (line editor).</text:p>
      <text:p text:style-name="Text_20_body">$ EDT InitHD</text:p>
      <text:p text:style-name="Text_20_body"><text:span text:style-name="Emphasis">Please enter the initial line.</text:span></text:p>
      <text:p text:style-name="Text_20_body">chd C:\MDS\BOOTOBOJS</text:p>
      <text:p text:style-name="Text_20_body">*If booting from the OS-9 system floppy disk, /h0 is not recognized, so include /d0 /SYS/InitHD file. <text:span text:style-name="Emphasis">It is not necessary when booting from /h0 /SYS/InitHD file.</text:span></text:p>
      <text:p text:style-name="Text_20_body">load -d rbhddrv h0=_p1 iniz h0</text:p>
      <text:p text:style-name="Text_20_body"><text:span text:style-name="Emphasis">When the hard disk built-in type is the 68000 series, /h1 does not exist.</text:span> <text:span text:style-name="Emphasis">If IT-X680 is connected with ID number "0" on the second unit with an OS-9 area, please enter it.</text:span></text:p>
      <text:p text:style-name="Text_20_body">load -d rbhddrv h1=_p1 iniz h1</text:p>
      <text:p text:style-name="Text_20_body"><text:span text:style-name="Emphasis">If ITX series is connected with ID number "1" on the second unit with an OS-9 area, please enter it.</text:span></text:p>
      <text:p text:style-name="Text_20_body">load -d rbhddrv h2=_p1 iniz h2</text:p>
      <text:p text:style-name="Text_20_body"><text:span text:style-name="Emphasis">If IT-X680 is connected with ID number "1" on the second unit with an OS-9 area, please enter it.</text:span></text:p>
      <text:p text:style-name="Text_20_body">load -d rbhddrv h3=_p1 iniz h3</text:p>
      <text:p text:style-name="Text_20_body">Example 1</text:p>
      <text:p text:style-name="Text_20_body">When connecting two IT-X640 units (ID numbers "0" and "1") in the X68000 series and booting from the OS-9 system floppy disk (When inserting a new line with a line editor, be sure to insert a space first)</text:p>
      <text:p text:style-name="Text_20_body">● The current data directory is /d0/SYS. $ EDT InitHD *0001 E: chd CMDS/BOOTOBJS *0002 E: load -d rbhddrv h0_p1 *0003 E: iniz h0 *0004 E: load -d rbhddrv h2_p1 *0005 E: iniz h2 E: q</text:p>
      <text:p text:style-name="Text_20_body">Example 2</text:p>
      <text:p text:style-name="Text_20_body">When connecting two IT-X680 units (ID numbers "0" and "1") in the X68000 series and booting OS-9 from the hard disk device with device number "0"</text:p>
      <text:p text:style-name="Text_20_body">● The current data directory is /h0/SYS. $ EDT InitHD *0001 E: chd CMDS/BOOTOBJS *0002 E: load -d rbhddrv h1_p1 *0003 E: iniz h1 E: load -d rbhddrv h2_p1 *0004 E: iniz h2 *0005 E: load -d rbhddrv h3_p1 *0006 E: iniz h3 *0007 E: q</text:p>
      <text:p text:style-name="Text_20_body"><text:span text:style-name="Strong_20_Emphasis">Example 3</text:span></text:p>
      <text:p text:style-name="Text_20_body">※ When connecting IT-X640 (ID number is "1") to the built-in hard disk type X68000 series and booting OS-9 from the built-in hard disk device</text:p>
      <text:p text:style-name="Text_20_body">● The current data directory is /h0/SYS.</text:p>
      <text:p text:style-name="Text_20_body">$ EDT InitHD</text:p>
      <text:list text:style-name="List_20_1">
        <text:list-item>
          <text:p text:style-name="List_20_Bullet_20_Tight">0001 E: : chd CMDS/BOOTOBJS</text:p>
        </text:list-item>
        <text:list-item>
          <text:p text:style-name="List_20_Bullet_20_Tight">0002 E: : load -d rbhddrv h2_p1</text:p>
        </text:list-item>
        <text:list-item>
          <text:p text:style-name="List_20_Bullet_20_Tight">0003 E: : iniz h2</text:p>
        </text:list-item>
        <text:list-item>
          <text:p text:style-name="List_20_Bullet_20_Tight">0004 E: q</text:p>
        </text:list-item>
      </text:list>
      <text:p text:style-name="First_20_paragraph"><text:span text:style-name="Strong_20_Emphasis">Example 4</text:span></text:p>
      <text:p text:style-name="Text_20_body">※ When connecting IT-X680 (ID number is "1") to the built-in hard disk type X68000 series and booting from the OS-9 system floppy disk</text:p>
      <text:p text:style-name="Text_20_body">● The current data directory is /d0/SYS.</text:p>
      <text:p text:style-name="Text_20_body">$ EDT InitHD</text:p>
      <text:list text:style-name="List_20_1">
        <text:list-item>
          <text:p text:style-name="List_20_Bullet_20_Tight">0001 E: : chd CMDS/BOOTOBJS</text:p>
        </text:list-item>
        <text:list-item>
          <text:p text:style-name="List_20_Bullet_20_Tight">0002 E: : load -d rbhddrv h0_p1</text:p>
        </text:list-item>
        <text:list-item>
          <text:p text:style-name="List_20_Bullet_20_Tight">0003 E: : iniz h0</text:p>
        </text:list-item>
        <text:list-item>
          <text:p text:style-name="List_20_Bullet_20_Tight">0004 E: : load -d rbhddrv h2_p1</text:p>
        </text:list-item>
        <text:list-item>
          <text:p text:style-name="List_20_Bullet_20_Tight">0005 E: : iniz h2</text:p>
        </text:list-item>
        <text:list-item>
          <text:p text:style-name="List_20_Bullet_20_Tight">0006 E: : load -d rbhddrv h3_p1</text:p>
        </text:list-item>
        <text:list-item>
          <text:p text:style-name="List_20_Bullet_20_Tight">0007 E: : iniz h3</text:p>
        </text:list-item>
        <text:list-item>
          <text:p text:style-name="List_20_Bullet_20_Tight">0008 E: q</text:p>
        </text:list-item>
      </text:list>
      <text:p text:style-name="First_20_paragraph">Please make sure to copy the file h×_p1 created when running init_h×_40m to the device's CMDS/BOOTOBJS where InitHD is located.</text:p>
      <text:p text:style-name="Text_20_body">Chapter 4: How to Handle Mixing Human 68K (Ver2.0)</text:p>
      <text:p text:style-name="Text_20_body">If you prioritize Human 68K area verification first and then prioritize OS-9 area verification, the following message may be displayed, indicating that OS-9 area verification cannot be performed. In that case, please perform the area verification with OS-9 first, then verify the area with Human 68K later.</text:p>
      <text:p text:style-name="Text_20_body">『"×××" MB cannot be allocated. The starting cylinder is too large.』</text:p>
      <text:p text:style-name="Text_20_body">The initialization method is the same as “Chapter 2: Initialization Method for Expanded Hard Disk.”</text:p>
      <text:p text:style-name="Text_20_body">Please enter the capacity you are verifying when you select “1: Area Verification.”</text:p>
      <text:p text:style-name="Text_20_body">If “3: Create Disk Script” is selected and a disk script file name ending in “_p1” is specified, you will be asked whether to overwrite the h0_p1 created during the previous initialization, if one exists.</text:p>
      <text:p text:style-name="Text_20_body">If you overwrite h0_p1, make sure to copy CMD S/BOOTOBJS from the device with InitHD.</text:p>
      <text:p text:style-name="Text_20_body">The disk script file h0_p1 contains hard disk device information, if this disk script file is incorrect, you may face problems, so please handle it carefully.</text:p>
      <text:p text:style-name="Text_20_body">4.1 Boot Menu</text:p>
      <text:p text:style-name="Text_20_body">When OS-9 and Human 68K are mixed, a menu screen will be displayed during boot, allowing you to select which OS to boot from.</text:p>
      <text:p text:style-name="Text_20_body">X68000 HARD DISK IPL MENU</text:p>
      <text:p text:style-name="Preformatted_20_Text">1 OS-9/68K</text:p>
      <text:p text:style-name="Preformatted_20_Text">2 Human 68K</text:p>
      <text:p text:style-name="First_20_paragraph">Select with the cursor key and press the return key</text:p>
      <text:h text:style-name="Heading_20_1" text:outline-level="1"><text:bookmark-start text:name="chapter-5-method-for-system-reconstruction"/>Chapter 5: Method for System Reconstruction<text:bookmark-end text:name="chapter-5-method-for-system-reconstruction"/></text:h>
      <text:p text:style-name="First_20_paragraph"><text:span text:style-name="Strong_20_Emphasis">5.1 Method for System Reconstruction</text:span></text:p>
      <text:p text:style-name="Text_20_body">The files for reconstructing the system for hard disk device number "0" are prepared as follows:</text:p>
      <text:list text:style-name="List_20_1">
        <text:list-item>
          <text:p text:style-name="List_20_Bullet_20_Tight">make_h0_wnd: Create a system for the personal window environment.</text:p>
        </text:list-item>
        <text:list-item>
          <text:p text:style-name="List_20_Bullet_20_Tight">make_h0_txt: Create a system for the multi-screen environment.</text:p>
        </text:list-item>
        <text:list-item>
          <text:p text:style-name="List_20_Bullet_20_Tight">make_h0_avs: Create a system for the AV-RIDER environment.</text:p>
        </text:list-item>
      </text:list>
      <text:p text:style-name="First_20_paragraph"><text:span text:style-name="Strong_20_Emphasis">5.2 In the Case of Hard Disk Device Number "1" or Above</text:span></text:p>
      <text:p text:style-name="Text_20_body">The reconstruction procedure files for the system for hard disk are specifically for device number "0"; there are no files prepared for device numbers "1" through "3".</text:p>
      <text:p text:style-name="Text_20_body">Because OS-9 fixes the device drive, you cannot reconstruct the system simply for device numbers "1" through "3". We recommend using the method described below.</text:p>
      <text:p text:style-name="Text_20_body">Typically, you can copy the procedure file operating on device number "0" and run it on device number "1".</text:p>
      <text:p text:style-name="Text_20_body"><text:span text:style-name="Strong_20_Emphasis">Notes When Creating Procedure Files</text:span></text:p>
      <text:p text:style-name="Text_20_body">You can execute procedure files by removing the drive specification and including only the current data directory, so if you are creating a new procedure file, ensure that no drive specification is included.</text:p>
      <text:p text:style-name="Text_20_body"><text:span text:style-name="Strong_20_Emphasis">Example: In the Case of InitHD</text:span></text:p>
      <text:p text:style-name="Text_20_body">The floppy drive is fixed at “0”.</text:p>
      <text:p text:style-name="Text_20_body">$ list InitHD chd /d0/CMDS/BOOTOBJS load -d rbhddrv h2_p1 iniz h2</text:p>
      <text:p text:style-name="Text_20_body">Page: 16</text:p>
      <text:p text:style-name="Text_20_body">● The hard disk device is fixed to "0".</text:p>
      <text:p text:style-name="Preformatted_20_Text"><text:s text:c="2"/>$ list InitHD</text:p>
      <text:p text:style-name="Preformatted_20_Text"><text:s text:c="2"/>chd /h0/CMDS_/BOOTOBOJS</text:p>
      <text:p text:style-name="Preformatted_20_Text"><text:s text:c="2"/>load -d rbhddrv h2 _p1</text:p>
      <text:p text:style-name="Preformatted_20_Text"><text:s text:c="2"/>iniz h2</text:p>
      <text:p text:style-name="First_20_paragraph">● Both floppy drive "0" and hard disk device "0" can be used.</text:p>
      <text:p text:style-name="Preformatted_20_Text"><text:s text:c="2"/>(However, the current data directory needs to be changed)</text:p>
      <text:p text:style-name="Preformatted_20_Text"/>
      <text:p text:style-name="Preformatted_20_Text"><text:s text:c="2"/>$ list InitHD</text:p>
      <text:p text:style-name="Preformatted_20_Text"><text:s text:c="2"/>chd CMDS_/BOOTOBOJS</text:p>
      <text:p text:style-name="Preformatted_20_Text"><text:s text:c="2"/>load -d rbhddrv h2 _p1</text:p>
      <text:p text:style-name="Preformatted_20_Text"><text:s text:c="2"/>iniz h2</text:p>
      <text:p text:style-name="First_20_paragraph">■ How to run the procedure file</text:p>
      <text:p text:style-name="Text_20_body">After reconstructing the system with the hard disk of device number "0", secure the free space to execute the procedure file.</text:p>
      <text:p text:style-name="Text_20_body">When executing the newly created procedure file from a hard disk device other than device number "1", copy it to the hard disk device "0" and run it on the device number "0".</text:p>
      <text:p text:style-name="Text_20_body">In this way, there is no need to prepare several types of procedure files for device number "0" and device number "1" that perform the same task.</text:p>
      <text:p text:style-name="Text_20_body">Furthermore, data such as utilization data can be used commonly by specifying a fixed data area in the hard disk device of device number "0" and assigning a drive, even for more than one hard disk device with device number "1".</text:p>
      <text:p text:style-name="Text_20_body">This usage method explained in the OS-9/X68000 supplementary manual is explained for beginners, so it does not mean that there is a predetermined usage method.</text:p>
      <text:p text:style-name="Text_20_body">In practical use with the OS-9 hard disk environment: The use of OS-9 to facilitate the management of files and data is encouraged.</text:p>
      <text:p text:style-name="Text_20_body"><text:span text:style-name="Emphasis">(Blank page in the original.)</text:span></text:p>
      <text:p text:style-name="Text_20_body">itec</text:p>
      <text:p text:style-name="Text_20_body">Aitec Co., Ltd.</text:p>
      <text:p text:style-name="Text_20_body">Postal code 550 1-25-14 Shinmachi, Nishi-ku, Osaka-shi</text:p>
      <text:p text:style-name="Text_20_body">TEL 06-532-0120</text:p>
      <text:p text:style-name="Text_20_body">FAX 06-532-0543</text:p>
      <text:p text:style-name="Text_20_body">User Support 06-532-0320</text:p>
      <text:p text:style-name="Text_20_body">"i tec Itec Corpo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Sharp Hard Disk Unit IT-X640 / IT-X680 — User's Manual</dc:title>
    <dc:description/>
    <dc:subject/>
    <meta:keyword/>
    <meta:initial-creator/>
    <dc:creator/>
    <meta:creation-date>2026-06-20T00:35:55Z</meta:creation-date>
    <dc:date>2026-06-20T00:35:55Z</dc:date>
    <meta:user-defined meta:name="subtitle" meta:value-type="string">English translation from the Japanese original</meta:user-defined>
  </office:meta>
</office:document-meta>
</file>