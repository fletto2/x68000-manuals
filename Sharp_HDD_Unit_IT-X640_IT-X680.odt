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h text:style-name="Heading_20_1" text:outline-level="1"><text:bookmark-start text:name="sharp-hdd-unit-it-x640it-x680-users-manual"/>Sharp HDD Unit IT-X640/IT-X680 User's Manual<text:bookmark-end text:name="sharp-hdd-unit-it-x640it-x680-users-manual"/></text:h>
      <text:p text:style-name="First_20_paragraph"><text:span text:style-name="Emphasis">English translation from the Japanese original — 64 pages.</text:span></text:p>
      <text:p text:style-name="Horizontal_20_Line"/>
      <text:h text:style-name="Heading_20_2" text:outline-level="2"><text:bookmark-start text:name="man_-000001"/>man_-000001<text:bookmark-end text:name="man_-000001"/></text:h>
      <text:p text:style-name="First_20_paragraph">SHARP X68000 supported HARD DISK UNIT IT-X640/IT-X680</text:p>
      <text:p text:style-name="Text_20_body">User's Manual itec i-tec Co., Ltd.</text:p>
      <text:p text:style-name="Horizontal_20_Line"/>
      <text:h text:style-name="Heading_20_2" text:outline-level="2"><text:bookmark-start text:name="man_-000002"/>man_-000002<text:bookmark-end text:name="man_-000002"/></text:h>
      <text:p text:style-name="First_20_paragraph"><text:span text:style-name="Strong_20_Emphasis">HARD DISK UNIT</text:span> 40MB/80MB Hard Disk</text:p>
      <text:p text:style-name="Text_20_body">IT-X640/IT-X680</text:p>
      <text:p text:style-name="Text_20_body"><text:span text:style-name="Strong_20_Emphasis">User's Manual</text:span></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Horizontal_20_Line"/>
      <text:h text:style-name="Heading_20_2" text:outline-level="2"><text:bookmark-start text:name="man_-000003"/>man_-000003<text:bookmark-end text:name="man_-000003"/></text:h>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Horizontal_20_Line"/>
      <text:h text:style-name="Heading_20_2" text:outline-level="2"><text:bookmark-start text:name="man_-000004"/>man_-000004<text:bookmark-end text:name="man_-000004"/></text:h>
      <text:p text:style-name="First_20_paragraph"><text:span text:style-name="Emphasis">(Blank page in the original.)</text:span></text:p>
      <text:p text:style-name="Horizontal_20_Line"/>
      <text:h text:style-name="Heading_20_2" text:outline-level="2"><text:bookmark-start text:name="man_-000005"/>man_-000005<text:bookmark-end text:name="man_-000005"/></text:h>
      <text:p text:style-name="First_20_paragraph"><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Horizontal_20_Line"/>
      <text:h text:style-name="Heading_20_2" text:outline-level="2"><text:bookmark-start text:name="man_-000006"/>man_-000006<text:bookmark-end text:name="man_-000006"/></text:h>
      <text:p text:style-name="First_20_paragraph"><text:span text:style-name="Emphasis">(Blank page in the original.)</text:span></text:p>
      <text:p text:style-name="Horizontal_20_Line"/>
      <text:h text:style-name="Heading_20_2" text:outline-level="2"><text:bookmark-start text:name="man_-000007"/>man_-000007<text:bookmark-end text:name="man_-000007"/></text:h>
      <text:p text:style-name="First_20_paragraph"><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list text:style-name="List_20_1">
        <text:list-item>
          <text:p text:style-name="List_20_Bullet_20_Tight">1 -</text:p>
        </text:list-item>
      </text:list>
      <text:p text:style-name="Horizontal_20_Line"/>
      <text:h text:style-name="Heading_20_2" text:outline-level="2"><text:bookmark-start text:name="man_-000008"/>man_-000008<text:bookmark-end text:name="man_-000008"/></text:h>
      <text:p text:style-name="First_20_paragraph">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Additional HDD Device Number = 3</text:p>
      <text:p text:style-name="Text_20_body">Additional HDD Device Number = 5</text:p>
      <text:p text:style-name="Text_20_body">Additional HDD Device Number = 7</text:p>
      <text:p text:style-name="Text_20_body">Additional HDD Device Number = 9</text:p>
      <text:p text:style-name="Text_20_body">Additional HDD Device Number = 11</text:p>
      <text:p text:style-name="Text_20_body">Additional HDD Device Number = 13</text:p>
      <text:p text:style-name="Text_20_body">Additional HDD Device Number = 15</text:p>
      <text:p text:style-name="Text_20_body">-2-</text:p>
      <text:p text:style-name="Horizontal_20_Line"/>
      <text:h text:style-name="Heading_20_2" text:outline-level="2"><text:bookmark-start text:name="man_-000009"/>man_-000009<text:bookmark-end text:name="man_-000009"/></text:h>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Horizontal_20_Line"/>
      <text:h text:style-name="Heading_20_2" text:outline-level="2"><text:bookmark-start text:name="man_-000010"/>man_-000010<text:bookmark-end text:name="man_-000010"/></text:h>
      <text:p text:style-name="First_20_paragraph">"MEMO"</text:p>
      <text:p text:style-name="Text_20_body">There is no other text in Japanese on the image.</text:p>
      <text:p text:style-name="Horizontal_20_Line"/>
      <text:h text:style-name="Heading_20_2" text:outline-level="2"><text:bookmark-start text:name="man_-000011"/>man_-000011<text:bookmark-end text:name="man_-000011"/></text:h>
      <text:p text:style-name="First_20_paragraph">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Horizontal_20_Line"/>
      <text:h text:style-name="Heading_20_2" text:outline-level="2"><text:bookmark-start text:name="man_-000012"/>man_-000012<text:bookmark-end text:name="man_-000012"/></text:h>
      <text:p text:style-name="First_20_paragraph">The text on the image is already in English.</text:p>
      <text:p text:style-name="Text_20_body">It says:</text:p>
      <text:p text:style-name="Text_20_body">"M E M O"</text:p>
      <text:p text:style-name="Text_20_body">and at the bottom:</text:p>
      <text:p text:style-name="Text_20_body">"- 6 -"</text:p>
      <text:p text:style-name="Horizontal_20_Line"/>
      <text:h text:style-name="Heading_20_2" text:outline-level="2"><text:bookmark-start text:name="man_-000013"/>man_-000013<text:bookmark-end text:name="man_-000013"/></text:h>
      <text:p text:style-name="First_20_paragraph">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7 —</text:p>
      <text:p text:style-name="Horizontal_20_Line"/>
      <text:h text:style-name="Heading_20_2" text:outline-level="2"><text:bookmark-start text:name="man_-000014"/>man_-000014<text:bookmark-end text:name="man_-000014"/></text:h>
      <text:p text:style-name="First_20_paragraph">●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 8 —</text:p>
      <text:p text:style-name="Horizontal_20_Line"/>
      <text:h text:style-name="Heading_20_2" text:outline-level="2"><text:bookmark-start text:name="man_-000015"/>man_-000015<text:bookmark-end text:name="man_-000015"/></text:h>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 1 Turn on the power to the peripheral devices, then turn on the power to the computer itself. 2 Start Human 68K Ver 2.0. 3 When the window is displayed, match the mouse cursor to "COMMAND. X" and click (press) the left button twice. 4 When prompted, enter "SWITCH" and press the key.</text:p>
      <text:p text:style-name="Text_20_body">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9—</text:p>
      <text:p text:style-name="Horizontal_20_Line"/>
      <text:h text:style-name="Heading_20_2" text:outline-level="2"><text:bookmark-start text:name="man_-000016"/>man_-000016<text:bookmark-end text:name="man_-000016"/></text:h>
      <text:p text:style-name="First_20_paragraph"><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Horizontal_20_Line"/>
      <text:h text:style-name="Heading_20_2" text:outline-level="2"><text:bookmark-start text:name="man_-000017"/>man_-000017<text:bookmark-end text:name="man_-000017"/></text:h>
      <text:p text:style-name="Horizontal_20_Line"/>
      <text:p text:style-name="First_20_paragraph">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text:span text:style-name="Emphasis">Floppy Disk</text:span>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p text:style-name="Text_20_body">0 1 2</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Horizontal_20_Line"/>
      <text:p text:style-name="Horizontal_20_Line"/>
      <text:h text:style-name="Heading_20_2" text:outline-level="2"><text:bookmark-start text:name="man_-000018"/>man_-000018<text:bookmark-end text:name="man_-000018"/></text:h>
      <text:p text:style-name="Horizontal_20_Line"/>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Horizontal_20_Line"/>
      <text:p text:style-name="Horizontal_20_Line"/>
      <text:h text:style-name="Heading_20_2" text:outline-level="2"><text:bookmark-start text:name="man_-000019"/>man_-000019<text:bookmark-end text:name="man_-000019"/></text:h>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list text:style-name="List_20_1">
        <text:list-item>
          <text:p text:style-name="List_20_Bullet_20_Tight">13 -</text:p>
        </text:list-item>
      </text:list>
      <text:p text:style-name="Horizontal_20_Line"/>
      <text:h text:style-name="Heading_20_2" text:outline-level="2"><text:bookmark-start text:name="man_-000020"/>man_-000020<text:bookmark-end text:name="man_-000020"/></text:h>
      <text:p text:style-name="First_20_paragraph">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 40</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list text:style-name="List_20_1">
        <text:list-item>
          <text:p text:style-name="List_20_Bullet_20_Tight">14 -</text:p>
        </text:list-item>
      </text:list>
      <text:p text:style-name="Horizontal_20_Line"/>
      <text:h text:style-name="Heading_20_2" text:outline-level="2"><text:bookmark-start text:name="man_-000021"/>man_-000021<text:bookmark-end text:name="man_-000021"/></text:h>
      <text:p text:style-name="First_20_paragraph">●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list text:style-name="List_20_1">
        <text:list-item>
          <text:p text:style-name="List_20_Bullet_20_Tight">15 -</text:p>
        </text:list-item>
      </text:list>
      <text:p text:style-name="Horizontal_20_Line"/>
      <text:h text:style-name="Heading_20_2" text:outline-level="2"><text:bookmark-start text:name="man_-000022"/>man_-000022<text:bookmark-end text:name="man_-000022"/></text:h>
      <text:p text:style-name="Horizontal_20_Line"/>
      <text:p text:style-name="First_20_paragraph"><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Horizontal_20_Line"/>
      <text:p text:style-name="First_20_paragraph"><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Horizontal_20_Line"/>
      <text:p text:style-name="First_20_paragraph">Please specify an item ↑↓(Select) ¥(Confirm) ESC(Return to previous)</text:p>
      <text:p text:style-name="Text_20_body">— 16 —</text:p>
      <text:p text:style-name="Horizontal_20_Line"/>
      <text:h text:style-name="Heading_20_2" text:outline-level="2"><text:bookmark-start text:name="man_-000023"/>man_-000023<text:bookmark-end text:name="man_-000023"/></text:h>
      <text:p text:style-name="Horizontal_20_Line"/>
      <text:p text:style-name="First_20_paragraph">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Horizontal_20_Line"/>
      <text:p text:style-name="First_20_paragraph">Page 17</text:p>
      <text:p text:style-name="Horizontal_20_Line"/>
      <text:h text:style-name="Heading_20_2" text:outline-level="2"><text:bookmark-start text:name="man_-000024"/>man_-000024<text:bookmark-end text:name="man_-000024"/></text:h>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list text:style-name="List_20_1">
        <text:list-item>
          <text:p text:style-name="List_20_Bullet_20_Tight">18 -</text:p>
        </text:list-item>
      </text:list>
      <text:p text:style-name="Horizontal_20_Line"/>
      <text:h text:style-name="Heading_20_2" text:outline-level="2"><text:bookmark-start text:name="man_-000025"/>man_-000025<text:bookmark-end text:name="man_-000025"/></text:h>
      <text:h text:style-name="Heading_20_3" text:outline-level="3"><text:bookmark-start text:name="if-not-yet-initialized"/>If not yet initialized<text:bookmark-end text:name="if-not-yet-initialized"/></text:h>
      <text:h text:style-name="Heading_20_4" text:outline-level="4"><text:bookmark-start text:name="shell-win0"/>shell win0<text:bookmark-end text:name="shell-win0"/></text:h>
      <text:p text:style-name="First_20_paragraph">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Horizontal_20_Line"/>
      <text:h text:style-name="Heading_20_3" text:outline-level="3"><text:bookmark-start text:name="if-already-used-with-human68k"/>If already used with Human68K<text:bookmark-end text:name="if-already-used-with-human68k"/></text:h>
      <text:h text:style-name="Heading_20_4" text:outline-level="4"><text:bookmark-start text:name="shell-win0-1"/>shell win0<text:bookmark-end text:name="shell-win0-1"/></text:h>
      <text:p text:style-name="First_20_paragraph">★★★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Horizontal_20_Line"/>
      <text:p text:style-name="First_20_paragraph">Page 19</text:p>
      <text:p text:style-name="Horizontal_20_Line"/>
      <text:h text:style-name="Heading_20_2" text:outline-level="2"><text:bookmark-start text:name="man_-000026"/>man_-000026<text:bookmark-end text:name="man_-000026"/></text:h>
      <text:p text:style-name="Horizontal_20_Line"/>
      <text:p text:style-name="First_20_paragraph">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p text:style-name="Horizontal_20_Line"/>
      <text:p text:style-name="Horizontal_20_Line"/>
      <text:h text:style-name="Heading_20_2" text:outline-level="2"><text:bookmark-start text:name="man_-000027"/>man_-000027<text:bookmark-end text:name="man_-000027"/></text:h>
      <text:h text:style-name="Heading_20_5" text:outline-level="5"/>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p text:style-name="Text_20_body">-21-</text:p>
      <text:h text:style-name="Heading_20_5" text:outline-level="5"><text:bookmark-start text:name="id_-1"/><text:bookmark-end text:name="id_-1"/></text:h>
      <text:p text:style-name="Horizontal_20_Line"/>
      <text:h text:style-name="Heading_20_2" text:outline-level="2"><text:bookmark-start text:name="man_-000028"/>man_-000028<text:bookmark-end text:name="man_-000028"/></text:h>
      <text:p text:style-name="Horizontal_20_Line"/>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Horizontal_20_Line"/>
      <text:p text:style-name="Horizontal_20_Line"/>
      <text:h text:style-name="Heading_20_2" text:outline-level="2"><text:bookmark-start text:name="man_-000029"/>man_-000029<text:bookmark-end text:name="man_-000029"/></text:h>
      <text:p text:style-name="Horizontal_20_Line"/>
      <text:p text:style-name="First_20_paragraph">※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p text:style-name="Horizontal_20_Line"/>
      <text:list text:style-name="List_20_1">
        <text:list-item>
          <text:p text:style-name="List_20_Bullet_20_Tight">23 -</text:p>
        </text:list-item>
      </text:list>
      <text:p text:style-name="Horizontal_20_Line"/>
      <text:h text:style-name="Heading_20_2" text:outline-level="2"><text:bookmark-start text:name="man_-000030"/>man_-000030<text:bookmark-end text:name="man_-000030"/></text:h>
      <text:p text:style-name="Horizontal_20_Line"/>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 0002 tmode nopause -w=1 0003 chd CMDS/BOOTOBJS 0004 load -d rbhddrv h1.40m 0005 hpu /hl1 &lt;/win0 0006 unlink hl 0007 load -d hl1.p1 0008 format /hl1 -rv=OS-9/68000 0009 y 0010 y 0011 y 0012 y 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Horizontal_20_Line"/>
      <text:p text:style-name="First_20_paragraph">Page 24</text:p>
      <text:p text:style-name="Horizontal_20_Line"/>
      <text:h text:style-name="Heading_20_2" text:outline-level="2"><text:bookmark-start text:name="man_-000031"/>man_-000031<text:bookmark-end text:name="man_-000031"/></text:h>
      <text:p text:style-name="Horizontal_20_Line"/>
      <text:p text:style-name="First_20_paragraph">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Horizontal_20_Line"/>
      <text:p text:style-name="Horizontal_20_Line"/>
      <text:h text:style-name="Heading_20_2" text:outline-level="2"><text:bookmark-start text:name="man_-000032"/>man_-000032<text:bookmark-end text:name="man_-000032"/></text:h>
      <text:p text:style-name="First_20_paragraph">"M E M O"</text:p>
      <text:p text:style-name="Text_20_body">And at the bottom of the page:</text:p>
      <text:p text:style-name="Text_20_body">"— 26 —"</text:p>
      <text:p text:style-name="Horizontal_20_Line"/>
      <text:h text:style-name="Heading_20_2" text:outline-level="2"><text:bookmark-start text:name="man_-000033"/>man_-000033<text:bookmark-end text:name="man_-000033"/></text:h>
      <text:p text:style-name="First_20_paragraph">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27-</text:p>
      <text:p text:style-name="Horizontal_20_Line"/>
      <text:h text:style-name="Heading_20_2" text:outline-level="2"><text:bookmark-start text:name="man_-000034"/>man_-000034<text:bookmark-end text:name="man_-000034"/></text:h>
      <text:p text:style-name="First_20_paragraph">The text is:</text:p>
      <text:p text:style-name="Text_20_body">MEMO</text:p>
      <text:p text:style-name="Text_20_body">— 28 —</text:p>
      <text:p text:style-name="Text_20_body">This text does not appear to be in Japanese; it is in English.</text:p>
      <text:p text:style-name="Horizontal_20_Line"/>
      <text:h text:style-name="Heading_20_2" text:outline-level="2"><text:bookmark-start text:name="man_-000035"/>man_-000035<text:bookmark-end text:name="man_-000035"/></text:h>
      <text:p text:style-name="First_20_paragraph">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29-</text:p>
      <text:p text:style-name="Horizontal_20_Line"/>
      <text:h text:style-name="Heading_20_2" text:outline-level="2"><text:bookmark-start text:name="man_-000036"/>man_-000036<text:bookmark-end text:name="man_-000036"/></text:h>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 30 —</text:p>
      <text:p text:style-name="Horizontal_20_Line"/>
      <text:h text:style-name="Heading_20_2" text:outline-level="2"><text:bookmark-start text:name="man_-000037"/>man_-000037<text:bookmark-end text:name="man_-000037"/></text:h>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31 —</text:p>
      <text:p text:style-name="Horizontal_20_Line"/>
      <text:h text:style-name="Heading_20_2" text:outline-level="2"><text:bookmark-start text:name="man_-000038"/>man_-000038<text:bookmark-end text:name="man_-000038"/></text:h>
      <text:p text:style-name="Horizontal_20_Line"/>
      <text:p text:style-name="First_20_paragraph">※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 32 —</text:p>
      <text:p text:style-name="Horizontal_20_Line"/>
      <text:p text:style-name="Horizontal_20_Line"/>
      <text:h text:style-name="Heading_20_2" text:outline-level="2"><text:bookmark-start text:name="man_-000039"/>man_-000039<text:bookmark-end text:name="man_-000039"/></text:h>
      <text:p text:style-name="First_20_paragraph">Appendix</text:p>
      <text:p text:style-name="Text_20_body">User's Manual OS-9/X68000 Supplement Edition</text:p>
      <text:p text:style-name="Horizontal_20_Line"/>
      <text:h text:style-name="Heading_20_2" text:outline-level="2"><text:bookmark-start text:name="man_-000040"/>man_-000040<text:bookmark-end text:name="man_-000040"/></text:h>
      <text:p text:style-name="First_20_paragraph">(blank page)</text:p>
      <text:p text:style-name="Horizontal_20_Line"/>
      <text:h text:style-name="Heading_20_2" text:outline-level="2"><text:bookmark-start text:name="man_-000041"/>man_-000041<text:bookmark-end text:name="man_-000041"/></text:h>
      <text:p text:style-name="First_20_paragraph"><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Horizontal_20_Line"/>
      <text:h text:style-name="Heading_20_2" text:outline-level="2"><text:bookmark-start text:name="man_-000042"/>man_-000042<text:bookmark-end text:name="man_-000042"/></text:h>
      <text:p text:style-name="First_20_paragraph">(blank page)</text:p>
      <text:p text:style-name="Horizontal_20_Line"/>
      <text:h text:style-name="Heading_20_2" text:outline-level="2"><text:bookmark-start text:name="man_-000043"/>man_-000043<text:bookmark-end text:name="man_-000043"/></text:h>
      <text:p text:style-name="Horizontal_20_Line"/>
      <text:p text:style-name="First_20_paragraph">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Horizontal_20_Line"/>
      <text:h text:style-name="Heading_20_2" text:outline-level="2"><text:bookmark-start text:name="man_-000044"/>man_-000044<text:bookmark-end text:name="man_-000044"/></text:h>
      <text:p text:style-name="First_20_paragraph"><text:span text:style-name="Emphasis">(Blank page in the original.)</text:span></text:p>
      <text:p text:style-name="Horizontal_20_Line"/>
      <text:h text:style-name="Heading_20_2" text:outline-level="2"><text:bookmark-start text:name="man_-000045"/>man_-000045<text:bookmark-end text:name="man_-000045"/></text:h>
      <text:p text:style-name="First_20_paragraph">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1 —</text:p>
      <text:p text:style-name="Horizontal_20_Line"/>
      <text:h text:style-name="Heading_20_2" text:outline-level="2"><text:bookmark-start text:name="man_-000046"/>man_-000046<text:bookmark-end text:name="man_-000046"/></text:h>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p text:style-name="Preformatted_20_Text"><text:s text:c="52"/>-2-</text:p>
      <text:p text:style-name="Horizontal_20_Line"/>
      <text:h text:style-name="Heading_20_2" text:outline-level="2"><text:bookmark-start text:name="man_-000047"/>man_-000047<text:bookmark-end text:name="man_-000047"/></text:h>
      <text:h text:style-name="Heading_20_3" text:outline-level="3"><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4" text:outline-level="4"><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4" text:outline-level="4"><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3-</text:p>
      <text:p text:style-name="Horizontal_20_Line"/>
      <text:h text:style-name="Heading_20_2" text:outline-level="2"><text:bookmark-start text:name="man_-000048"/>man_-000048<text:bookmark-end text:name="man_-000048"/></text:h>
      <text:p text:style-name="Horizontal_20_Line"/>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list text:style-name="List_20_1">
        <text:list-item>
          <text:p text:style-name="List_20_Bullet_20_Tight">4 -</text:p>
        </text:list-item>
      </text:list>
      <text:p text:style-name="Horizontal_20_Line"/>
      <text:p text:style-name="Horizontal_20_Line"/>
      <text:h text:style-name="Heading_20_2" text:outline-level="2"><text:bookmark-start text:name="man_-000049"/>man_-000049<text:bookmark-end text:name="man_-000049"/></text:h>
      <text:p text:style-name="Horizontal_20_Line"/>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Horizontal_20_Line"/>
      <text:p text:style-name="Horizontal_20_Line"/>
      <text:h text:style-name="Heading_20_2" text:outline-level="2"><text:bookmark-start text:name="man_-000050"/>man_-000050<text:bookmark-end text:name="man_-000050"/></text:h>
      <text:p text:style-name="Horizontal_20_Line"/>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 0002 tmode nopause -w=1 0003 chd CMDS/BOOTOBJS 0004 load -d rbhddrv h2_40m 0005 hpu /h2 &lt; /win0 0006 unlink h2 0007 load -d h2_p1 0008 format /h2 -rv=OS-9/68000 0009 y 0010 y 0011 y 0012 y E:</text:p>
      <text:p text:style-name="Horizontal_20_Line"/>
      <text:p text:style-name="First_20_paragraph">Page 6</text:p>
      <text:p text:style-name="Horizontal_20_Line"/>
      <text:h text:style-name="Heading_20_2" text:outline-level="2"><text:bookmark-start text:name="man_-000051"/>man_-000051<text:bookmark-end text:name="man_-000051"/></text:h>
      <text:p text:style-name="Horizontal_20_Line"/>
      <text:p text:style-name="First_20_paragraph">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p text:style-name="Horizontal_20_Line"/>
      <text:p text:style-name="First_20_paragraph">-7-</text:p>
      <text:p text:style-name="Horizontal_20_Line"/>
      <text:p text:style-name="Horizontal_20_Line"/>
      <text:h text:style-name="Heading_20_2" text:outline-level="2"><text:bookmark-start text:name="man_-000052"/>man_-000052<text:bookmark-end text:name="man_-000052"/></text:h>
      <text:p text:style-name="Horizontal_20_Line"/>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Horizontal_20_Line"/>
      <text:p text:style-name="Horizontal_20_Line"/>
      <text:h text:style-name="Heading_20_2" text:outline-level="2"><text:bookmark-start text:name="man_-000053"/>man_-000053<text:bookmark-end text:name="man_-000053"/></text:h>
      <text:p text:style-name="Horizontal_20_Line"/>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Horizontal_20_Line"/>
      <text:p text:style-name="Horizontal_20_Line"/>
      <text:h text:style-name="Heading_20_2" text:outline-level="2"><text:bookmark-start text:name="man_-000054"/>man_-000054<text:bookmark-end text:name="man_-000054"/></text:h>
      <text:p text:style-name="First_20_paragraph">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10---</text:p>
      <text:p text:style-name="Horizontal_20_Line"/>
      <text:h text:style-name="Heading_20_2" text:outline-level="2"><text:bookmark-start text:name="man_-000055"/>man_-000055<text:bookmark-end text:name="man_-000055"/></text:h>
      <text:p text:style-name="Horizontal_20_Line"/>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Horizontal_20_Line"/>
      <text:p text:style-name="Horizontal_20_Line"/>
      <text:h text:style-name="Heading_20_2" text:outline-level="2"><text:bookmark-start text:name="man_-000056"/>man_-000056<text:bookmark-end text:name="man_-000056"/></text:h>
      <text:p text:style-name="Horizontal_20_Line"/>
      <text:p text:style-name="First_20_paragraph"><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12-</text:p>
      <text:p text:style-name="Horizontal_20_Line"/>
      <text:h text:style-name="Heading_20_2" text:outline-level="2"><text:bookmark-start text:name="man_-000057"/>man_-000057<text:bookmark-end text:name="man_-000057"/></text:h>
      <text:p text:style-name="First_20_paragraph">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0006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Horizontal_20_Line"/>
      <text:h text:style-name="Heading_20_2" text:outline-level="2"><text:bookmark-start text:name="man_-000058"/>man_-000058<text:bookmark-end text:name="man_-000058"/></text:h>
      <text:h text:style-name="Heading_20_3" text:outline-level="3"><text:bookmark-start text:name="example-3"/>Example 3<text:bookmark-end text:name="example-3"/></text:h>
      <text:p text:style-name="First_20_paragraph">※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h text:style-name="Heading_20_3" text:outline-level="3"><text:bookmark-start text:name="example-4"/>Example 4<text:bookmark-end text:name="example-4"/></text:h>
      <text:p text:style-name="First_20_paragraph">※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Horizontal_20_Line"/>
      <text:h text:style-name="Heading_20_2" text:outline-level="2"><text:bookmark-start text:name="man_-000059"/>man_-000059<text:bookmark-end text:name="man_-000059"/></text:h>
      <text:p text:style-name="First_20_paragraph">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Text_20_body">1 OS-9/68K 2 Human 68K</text:p>
      <text:p text:style-name="Text_20_body">Select with the cursor key and press the return key</text:p>
      <text:p text:style-name="Text_20_body">—15—</text:p>
      <text:p text:style-name="Horizontal_20_Line"/>
      <text:h text:style-name="Heading_20_2" text:outline-level="2"><text:bookmark-start text:name="man_-000060"/>man_-000060<text:bookmark-end text:name="man_-000060"/></text:h>
      <text:h text:style-name="Heading_20_3" text:outline-level="3"><text:bookmark-start text:name="chapter-5-method-for-system-reconstruction"/>Chapter 5: Method for System Reconstruction<text:bookmark-end text:name="chapter-5-method-for-system-reconstruction"/></text:h>
      <text:p text:style-name="Horizontal_20_Line"/>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h text:style-name="Heading_20_4" text:outline-level="4"><text:bookmark-start text:name="notes-when-creating-procedure-files"/>Notes When Creating Procedure Files<text:bookmark-end text:name="notes-when-creating-procedure-files"/></text:h>
      <text:p text:style-name="First_20_paragraph">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Horizontal_20_Line"/>
      <text:p text:style-name="First_20_paragraph">Page: 16</text:p>
      <text:p text:style-name="Horizontal_20_Line"/>
      <text:h text:style-name="Heading_20_2" text:outline-level="2"><text:bookmark-start text:name="man_-000061"/>man_-000061<text:bookmark-end text:name="man_-000061"/></text:h>
      <text:p text:style-name="First_20_paragraph">●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Preformatted_20_Text"><text:s text:c="24"/>— 17 —</text:p>
      <text:p text:style-name="Horizontal_20_Line"/>
      <text:h text:style-name="Heading_20_2" text:outline-level="2"><text:bookmark-start text:name="man_-000062"/>man_-000062<text:bookmark-end text:name="man_-000062"/></text:h>
      <text:p text:style-name="First_20_paragraph"><text:span text:style-name="Emphasis">(Blank page in the original.)</text:span></text:p>
      <text:p text:style-name="Horizontal_20_Line"/>
      <text:h text:style-name="Heading_20_2" text:outline-level="2"><text:bookmark-start text:name="man_-000063"/>man_-000063<text:bookmark-end text:name="man_-000063"/></text:h>
      <text:p text:style-name="First_20_paragraph">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Horizontal_20_Line"/>
      <text:h text:style-name="Heading_20_2" text:outline-level="2"><text:bookmark-start text:name="man_-000064"/>man_-000064<text:bookmark-end text:name="man_-000064"/></text:h>
      <text:p text:style-name="First_20_paragraph">"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0:46Z</meta:creation-date>
    <dc:date>2026-06-19T16:20:46Z</dc:date>
  </office:meta>
</office:document-meta>
</file>