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ext:list text:style-name="Numbering_20_1">
        <text:list-item>
          <text:p text:style-name="List_20_Number_20_Tight">ITX Series Features ........................................................... 1</text:p>
        </text:list-item>
        <text:list-item>
          <text:p text:style-name="List_20_Number_20_Tight">Precautions for Use ........................................................... 3</text:p>
        </text:list-item>
      </text:list>
      <text:p text:style-name="First_20_paragraph">Chapter 2: Names and Roles of Each Part ...................................... 5</text:p>
      <text:p text:style-name="Text_20_body">Chapter 3: Connecting to the Computer ......................................... 7</text:p>
      <text:list text:style-name="List_20_1">
        <text:list-item>
          <text:p text:style-name="List_20_Bullet_20_Tight">Configuration Diagram of Hard Disk for X68000 ............................. 7</text:p>
        </text:list-item>
        <text:list-item>
          <text:p text:style-name="List_20_Bullet_20_Tight">Relationship between ID Number and Device Number of Hard Disk for X68000... 7</text:p>
        </text:list-item>
      </text:list>
      <text:p text:style-name="First_20_paragraph">Chapter 4: Formatting .............................................................. 9</text:p>
      <text:list text:style-name="Numbering_20_1">
        <text:list-item>
          <text:p text:style-name="List_20_Number_20_Tight">Human68K Ver 2.0 .......................................................... 9</text:p>
        </text:list-item>
        <text:list-item>
          <text:p text:style-name="List_20_Number_20_Tight">OS-9/X68000 .......................................................... 18</text:p>
        </text:list-item>
      </text:list>
      <text:p text:style-name="Preformatted_20_Text"><text:s text:c="3"/>(1) Procedures for Initializing Hard Disk with Device Number “0” .......... 18</text:p>
      <text:p text:style-name="Preformatted_20_Text"><text:s text:c="3"/>(2) Procedures for Initializing Hard Disk with Device Numbers “1” to “3” ... 23</text:p>
      <text:list text:style-name="Numbering_20_1" text:start-value="3">
        <text:list-item>
          <text:p text:style-name="List_20_Number_20_Tight">MSX2 HD Interface ......................................................... 25</text:p>
        </text:list-item>
      </text:list>
      <text:p text:style-name="First_20_paragraph">Chapter 5: Troubleshooting ....................................................... 27</text:p>
      <text:list text:style-name="Numbering_20_1">
        <text:list-item>
          <text:p text:style-name="List_20_Number_20_Tight">When ITX Series Does Not Operate Even When Phone Is On .............. 27</text:p>
        </text:list-item>
        <text:list-item>
          <text:p text:style-name="List_20_Number_20_Tight">When Power Supply Is Provided to ITX Series but It Does Not Operate ... 27</text:p>
        </text:list-item>
      </text:list>
      <text:p text:style-name="First_20_paragraph">Chapter 6: Basic Specifications of ITX Series ................................... 29</text:p>
      <text:p text:style-name="Text_20_body">Chapter 7: Maintenance Guide ...................................................... 31</text:p>
      <text:p text:style-name="Text_20_body">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Device Number = 3</text:p>
      <text:p text:style-name="Text_20_body">Device Number = 5</text:p>
      <text:p text:style-name="Text_20_body">Device Number = 7</text:p>
      <text:p text:style-name="Text_20_body">Device Number = 9</text:p>
      <text:p text:style-name="Text_20_body">Device Number = 11</text:p>
      <text:p text:style-name="Text_20_body">Device Number = 13</text:p>
      <text:p text:style-name="Text_20_body">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Chapter 2 Names and Functions of Each Part</text:p>
      <text:p text:style-name="Text_20_body">Names and Functions of Each Part of the ITX Series</text:p>
      <text:p text:style-name="Text_20_body">Front and Rear of the ITX Series</text:p>
      <text:p text:style-name="Text_20_body"><draw:frame draw:name="img1" svg:width="480.0pt" svg:height="224.16pt"><draw:image xlink:href="Pictures/0.png" xlink:type="simple" xlink:show="embed" xlink:actuate="onLoad"/></draw:frame></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ext:p text:style-name="Text_20_body">Chapter 1: Precautions for Using OS-9/X68000 .......................................... 1 1.1 Relationship Between ITX Series and Device Number ............ 1 ■ When connecting the ITX series to the X68000 series .......... 1 ● IT-X640 connecting two units ............................................ 1 ● IT-X640.IT X680 connecting .................................................................. 1 ● IT-X680 connecting two units ............................................. 2 ■ When connecting the internal hard disk type ITX68000 series .... 2 ITX series connecting .............................................................. 2 ● IT-X640 connecting ..................................................... 2 ● IT-X680 connecting ..................................................... 2</text:p>
      <text:p text:style-name="Text_20_body">Chapter 2: How to Initialize the Additional Hard Disk ..................... 3 2.1 Precautions (for device number "0") .......................................... 3 ◎ When the ITX series is connected to the X68000 series ................ 3 ◎ Hard Disk (20 MB) Internal Type X68000 series ............................ 3 2.2 How to Initialize for Device Number "1" ...................................... 3 2.3 How to Initialize for Device Number "2" ..................................... 5 2.4 How to Initialize for Device Number "3" ...................................... 7</text:p>
      <text:p text:style-name="Text_20_body">Chapter 3: Registering the Additional Hard Disk to the System ...... 10 3.1 Changing the StartUp File .......................................................... 10 3.2 Creating the InitHD File .............................................................. 11</text:p>
      <text:p text:style-name="Text_20_body">Chapter 4: How to Manage When Mixed with Human68K (Ver 2.0) ... 15 4.1 Startup Menu ...................................................................... 15</text:p>
      <text:p text:style-name="Text_20_body">Chapter 5: System Reconfiguration ............................................ 16 5.1 How to Reconfigure the System ......................................... 16 5.2 When the Device Number is "1" or More and Hard Disk Devices .... 16 ■Precautions When Creating a Project File .................................. 16 ■How to Execute a Project File .................................................. 17</text:p>
      <text:p text:style-name="Text_20_body"><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20T01:40:38Z</meta:creation-date>
    <dc:date>2026-06-20T01:40:38Z</dc:date>
    <meta:user-defined meta:name="subtitle" meta:value-type="string">English translation from the Japanese original</meta:user-defined>
  </office:meta>
</office:document-meta>
</file>