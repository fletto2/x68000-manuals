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Sharp Hard Disk Unit IT-X640 / IT-X680 — User's Manual</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SHARP X68000 supported HARD DISK UNIT IT-X640/IT-X680</text:p>
      <text:p text:style-name="Text_20_body">User's Manual itec i-tec Co., Ltd.</text:p>
      <text:p text:style-name="Text_20_body"><text:span text:style-name="Strong_20_Emphasis">HARD DISK UNIT</text:span> 40MB/80MB Hard Disk</text:p>
      <text:p text:style-name="Text_20_body">IT-X640/IT-X680</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First_20_paragraph"><text:span text:style-name="Emphasis">(Blank page in the original.)</text:span></text:p>
      <text:p text:style-name="Text_20_body"><text:span text:style-name="Strong_20_Emphasis">Table of Contents</text:span></text:p>
      <text:p text:style-name="Text_20_body">Chapter 1: Features and Precautions</text:p>
      <table:table table:name="Table2" table:style-name="Table2">
        <table:table-column table:style-name="Table2.A"/>
        <table:table-column table:style-name="Table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 ITX Series Features</text:p>
          </table:table-cell>
          <table:table-cell table:style-name="TableRowCell" office:value-type="string">
            <text:p text:style-name="P2">1</text:p>
          </table:table-cell>
        </table:table-row>
        <table:table-row>
          <table:table-cell table:style-name="TableRowCell" office:value-type="string">
            <text:p text:style-name="Table_20_Contents">2. Precautions for Use</text:p>
          </table:table-cell>
          <table:table-cell table:style-name="TableRowCell" office:value-type="string">
            <text:p text:style-name="P2">3</text:p>
          </table:table-cell>
        </table:table-row>
        <table:table-row>
          <table:table-cell table:style-name="TableRowCell" office:value-type="string">
            <text:p text:style-name="Table_20_Contents">Chapter 2: Names and Roles of Each Part</text:p>
          </table:table-cell>
          <table:table-cell table:style-name="TableRowCell" office:value-type="string">
            <text:p text:style-name="P2">5</text:p>
          </table:table-cell>
        </table:table-row>
        <table:table-row>
          <table:table-cell table:style-name="TableRowCell" office:value-type="string">
            <text:p text:style-name="Table_20_Contents">Chapter 3: Connecting to the Computer</text:p>
          </table:table-cell>
          <table:table-cell table:style-name="TableRowCell" office:value-type="string">
            <text:p text:style-name="P2">7</text:p>
          </table:table-cell>
        </table:table-row>
        <table:table-row>
          <table:table-cell table:style-name="TableRowCell" office:value-type="string">
            <text:p text:style-name="Table_20_Contents">- Configuration Diagram of Hard Disk for X68000</text:p>
          </table:table-cell>
          <table:table-cell table:style-name="TableRowCell" office:value-type="string">
            <text:p text:style-name="P2">7</text:p>
          </table:table-cell>
        </table:table-row>
        <table:table-row>
          <table:table-cell table:style-name="TableRowCell" office:value-type="string">
            <text:p text:style-name="Table_20_Contents">- Relationship between ID Number and Device Number of Hard Disk for X68000</text:p>
          </table:table-cell>
          <table:table-cell table:style-name="TableRowCell" office:value-type="string">
            <text:p text:style-name="P2">7</text:p>
          </table:table-cell>
        </table:table-row>
        <table:table-row>
          <table:table-cell table:style-name="TableRowCell" office:value-type="string">
            <text:p text:style-name="Table_20_Contents">Chapter 4: Formatting</text:p>
          </table:table-cell>
          <table:table-cell table:style-name="TableRowCell" office:value-type="string">
            <text:p text:style-name="P2">9</text:p>
          </table:table-cell>
        </table:table-row>
        <table:table-row>
          <table:table-cell table:style-name="TableRowCell" office:value-type="string">
            <text:p text:style-name="Table_20_Contents">1. Human68K Ver 2.0</text:p>
          </table:table-cell>
          <table:table-cell table:style-name="TableRowCell" office:value-type="string">
            <text:p text:style-name="P2">9</text:p>
          </table:table-cell>
        </table:table-row>
        <table:table-row>
          <table:table-cell table:style-name="TableRowCell" office:value-type="string">
            <text:p text:style-name="Table_20_Contents">2. OS-9/X68000</text:p>
          </table:table-cell>
          <table:table-cell table:style-name="TableRowCell" office:value-type="string">
            <text:p text:style-name="P2">18</text:p>
          </table:table-cell>
        </table:table-row>
        <table:table-row>
          <table:table-cell table:style-name="TableRowCell" office:value-type="string">
            <text:p text:style-name="Table_20_Contents">(1) Procedures for Initializing Hard Disk with Device Number “0”</text:p>
          </table:table-cell>
          <table:table-cell table:style-name="TableRowCell" office:value-type="string">
            <text:p text:style-name="P2">18</text:p>
          </table:table-cell>
        </table:table-row>
        <table:table-row>
          <table:table-cell table:style-name="TableRowCell" office:value-type="string">
            <text:p text:style-name="Table_20_Contents">(2) Procedures for Initializing Hard Disk with Device Numbers “1” to “3”</text:p>
          </table:table-cell>
          <table:table-cell table:style-name="TableRowCell" office:value-type="string">
            <text:p text:style-name="P2">23</text:p>
          </table:table-cell>
        </table:table-row>
        <table:table-row>
          <table:table-cell table:style-name="TableRowCell" office:value-type="string">
            <text:p text:style-name="Table_20_Contents">3. MSX2 HD Interface</text:p>
          </table:table-cell>
          <table:table-cell table:style-name="TableRowCell" office:value-type="string">
            <text:p text:style-name="P2">25</text:p>
          </table:table-cell>
        </table:table-row>
        <table:table-row>
          <table:table-cell table:style-name="TableRowCell" office:value-type="string">
            <text:p text:style-name="Table_20_Contents">Chapter 5: Troubleshooting</text:p>
          </table:table-cell>
          <table:table-cell table:style-name="TableRowCell" office:value-type="string">
            <text:p text:style-name="P2">27</text:p>
          </table:table-cell>
        </table:table-row>
        <table:table-row>
          <table:table-cell table:style-name="TableRowCell" office:value-type="string">
            <text:p text:style-name="Table_20_Contents">1. When ITX Series Does Not Operate Even When Phone Is On</text:p>
          </table:table-cell>
          <table:table-cell table:style-name="TableRowCell" office:value-type="string">
            <text:p text:style-name="P2">27</text:p>
          </table:table-cell>
        </table:table-row>
        <table:table-row>
          <table:table-cell table:style-name="TableRowCell" office:value-type="string">
            <text:p text:style-name="Table_20_Contents">2. When Power Supply Is Provided to ITX Series but It Does Not Operate</text:p>
          </table:table-cell>
          <table:table-cell table:style-name="TableRowCell" office:value-type="string">
            <text:p text:style-name="P2">27</text:p>
          </table:table-cell>
        </table:table-row>
        <table:table-row>
          <table:table-cell table:style-name="TableRowCell" office:value-type="string">
            <text:p text:style-name="Table_20_Contents">Chapter 6: Basic Specifications of ITX Series</text:p>
          </table:table-cell>
          <table:table-cell table:style-name="TableRowCell" office:value-type="string">
            <text:p text:style-name="P2">29</text:p>
          </table:table-cell>
        </table:table-row>
        <table:table-row>
          <table:table-cell table:style-name="TableRowCell" office:value-type="string">
            <text:p text:style-name="Table_20_Contents">Chapter 7: Maintenance Guide</text:p>
          </table:table-cell>
          <table:table-cell table:style-name="TableRowCell" office:value-type="string">
            <text:p text:style-name="P2">31</text:p>
          </table:table-cell>
        </table:table-row>
      </table:table>
      <text:p text:style-name="First_20_paragraph">Appendix: OS-9/X68000 Supplemental User Manual</text:p>
      <text:p text:style-name="Text_20_body"><text:span text:style-name="Emphasis">(Blank page in the original.)</text:span></text:p>
      <text:p text:style-name="Text_20_body"><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p text:style-name="Text_20_body">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Device Number = 3</text:p>
      <text:p text:style-name="Text_20_body">Device Number = 5</text:p>
      <text:p text:style-name="Text_20_body">Device Number = 7</text:p>
      <text:p text:style-name="Text_20_body">Device Number = 9</text:p>
      <text:p text:style-name="Text_20_body">Device Number = 11</text:p>
      <text:p text:style-name="Text_20_body">Device Number = 13</text:p>
      <text:p text:style-name="Text_20_body">Device Number = 15</text:p>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Text_20_body">"MEMO"</text:p>
      <text:p text:style-name="Text_20_body">Chapter 2 Names and Functions of Each Part</text:p>
      <text:p text:style-name="Text_20_body">Names and Functions of Each Part of the ITX Series</text:p>
      <text:p text:style-name="Text_20_body">Front and Rear of the ITX Series</text:p>
      <text:p text:style-name="Text_20_body"><draw:frame draw:name="img1" svg:width="480.0pt" svg:height="224.16pt"><draw:image xlink:href="Pictures/0.png" xlink:type="simple" xlink:show="embed" xlink:actuate="onLoad"/></draw:frame></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Text_20_body">It says:</text:p>
      <text:p text:style-name="Text_20_body">"M E M O"</text:p>
      <text:p text:style-name="Text_20_body">and at the bottom:</text:p>
      <text:p text:style-name="Text_20_body">"- 6 -"</text:p>
      <text:p text:style-name="Text_20_body">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text:p>
      <text:p text:style-name="Preformatted_20_Text">1 Turn on the power to the peripheral devices, then turn on the power to the computer itself.</text:p>
      <text:p text:style-name="Preformatted_20_Text">2 Start Human 68K Ver 2.0.</text:p>
      <text:p text:style-name="Preformatted_20_Text">3 When the window is displayed, match the mouse cursor to "COMMAND. X" and click (press) the left button twice.</text:p>
      <text:p text:style-name="Preformatted_20_Text">4 When prompted, enter "SWITCH" and press the key.</text:p>
      <text:p text:style-name="First_20_paragraph">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text:span text:style-name="Strong_20_Emphasis">SWITCH for X68000 Version 2.01 Copyright 1989 SHARP / Hudson</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Text_20_body">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Text_20_body">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p text:style-name="Text_20_body">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p text:style-name="Text_20_body">●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p text:style-name="Text_20_body"><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Text_20_body"><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Text_20_body">Please specify an item ↑↓(Select) ¥(Confirm) ESC(Return to previous)</text:p>
      <text:p text:style-name="Text_20_body">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Text_20_body">Page 17</text:p>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p text:style-name="Text_20_body"><text:span text:style-name="Strong_20_Emphasis">If not yet initialized</text:span></text:p>
      <text:p text:style-name="Text_20_body"><text:span text:style-name="Strong_20_Emphasis">shell win0</text:span></text:p>
      <text:p text:style-name="Text_20_body">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Text_20_body"><text:span text:style-name="Strong_20_Emphasis">If already used with Human68K</text:span></text:p>
      <text:p text:style-name="Text_20_body"><text:span text:style-name="Strong_20_Emphasis">shell win0</text:span></text:p>
      <text:p text:style-name="Text_20_body">★★★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Text_20_body">Page 19</text:p>
      <text:p text:style-name="Text_20_body">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h text:style-name="Heading_20_5" text:outline-level="5"/>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Text_20_body">※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text:p>
      <text:p text:style-name="Preformatted_20_Text">0002 <text:s text:c="3"/>tmode nopause -w=1</text:p>
      <text:p text:style-name="Preformatted_20_Text">0003 <text:s text:c="3"/>chd CMDS/BOOTOBJS</text:p>
      <text:p text:style-name="Preformatted_20_Text">0004 <text:s text:c="3"/>load -d rbhddrv h1.40m</text:p>
      <text:p text:style-name="Preformatted_20_Text">0005 <text:s text:c="3"/>hpu /hl1 &lt;/win0</text:p>
      <text:p text:style-name="Preformatted_20_Text">0006 <text:s text:c="3"/>unlink hl</text:p>
      <text:p text:style-name="Preformatted_20_Text">0007 <text:s text:c="3"/>load -d hl1.p1</text:p>
      <text:p text:style-name="Preformatted_20_Text">0008 <text:s text:c="3"/>format /hl1 -rv=OS-9/68000</text:p>
      <text:p text:style-name="Preformatted_20_Text">0009 <text:s text:c="3"/>y</text:p>
      <text:p text:style-name="Preformatted_20_Text">0010 <text:s text:c="3"/>y</text:p>
      <text:p text:style-name="Preformatted_20_Text">0011 <text:s text:c="3"/>y</text:p>
      <text:p text:style-name="Preformatted_20_Text">0012 <text:s text:c="3"/>y</text:p>
      <text:p text:style-name="First_20_paragraph">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Text_20_body">Page 24</text:p>
      <text:p text:style-name="Text_20_body">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First_20_paragraph">"M E M O"</text:p>
      <text:p text:style-name="Text_20_body">And at the bottom of the page:</text:p>
      <text:p text:style-name="Text_20_body">"— 26 —"</text:p>
      <text:p text:style-name="Text_20_body">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The text is:</text:p>
      <text:p text:style-name="Text_20_body">MEMO</text:p>
      <text:p text:style-name="Text_20_body">This text does not appear to be in Japanese; it is in English.</text:p>
      <text:p text:style-name="Text_20_body">Chapter 6 Basic Specifications of the ITX Series</text:p>
      <text:list text:style-name="List_20_1">
        <text:list-item>
          <text:p text:style-name="List_20_Bullet_20_Tight">Performance Specifications</text:p>
        </text:list-item>
      </text:list>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text:span text:style-name="Strong_20_Emphasis">External Specifications</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Appendix</text:p>
      <text:p text:style-name="Text_20_body">User's Manual OS-9/X68000 Supplement Edition</text:p>
      <text:p text:style-name="Text_20_body">(blank page)</text:p>
      <text:p text:style-name="Text_20_body"><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Text_20_body">(blank page)</text:p>
      <text:p text:style-name="Text_20_body">Table of Content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Chapter 1: Precautions for Using OS-9/X68000</text:p>
          </table:table-cell>
          <table:table-cell table:style-name="TableRowCell" office:value-type="string">
            <text:p text:style-name="P4">1</text:p>
          </table:table-cell>
        </table:table-row>
        <table:table-row>
          <table:table-cell table:style-name="TableRowCell" office:value-type="string">
            <text:p text:style-name="Table_20_Contents">1.1 Relationship Between ITX Series and Device Number</text:p>
          </table:table-cell>
          <table:table-cell table:style-name="TableRowCell" office:value-type="string">
            <text:p text:style-name="P4">1</text:p>
          </table:table-cell>
        </table:table-row>
        <table:table-row>
          <table:table-cell table:style-name="TableRowCell" office:value-type="string">
            <text:p text:style-name="Table_20_Contents">■ When connecting the ITX series to the X68000 series</text:p>
          </table:table-cell>
          <table:table-cell table:style-name="TableRowCell" office:value-type="string">
            <text:p text:style-name="P4">1</text:p>
          </table:table-cell>
        </table:table-row>
        <table:table-row>
          <table:table-cell table:style-name="TableRowCell" office:value-type="string">
            <text:p text:style-name="Table_20_Contents">● IT-X640 connecting two units</text:p>
          </table:table-cell>
          <table:table-cell table:style-name="TableRowCell" office:value-type="string">
            <text:p text:style-name="P4">1</text:p>
          </table:table-cell>
        </table:table-row>
        <table:table-row>
          <table:table-cell table:style-name="TableRowCell" office:value-type="string">
            <text:p text:style-name="Table_20_Contents"><text:span text:style-name="Strong_20_Emphasis">● IT-X640.IT</text:span></text:p>
          </table:table-cell>
          <table:table-cell table:style-name="TableRowCell" office:value-type="string">
    </table:table-cell>
        </table:table-row>
        <table:table-row>
          <table:table-cell table:style-name="TableRowCell" office:value-type="string">
            <text:p text:style-name="Table_20_Contents">X680 connecting</text:p>
          </table:table-cell>
          <table:table-cell table:style-name="TableRowCell" office:value-type="string">
            <text:p text:style-name="P4">1</text:p>
          </table:table-cell>
        </table:table-row>
        <table:table-row>
          <table:table-cell table:style-name="TableRowCell" office:value-type="string">
            <text:p text:style-name="Table_20_Contents">● IT-X680 connecting two units</text:p>
          </table:table-cell>
          <table:table-cell table:style-name="TableRowCell" office:value-type="string">
            <text:p text:style-name="P4">2</text:p>
          </table:table-cell>
        </table:table-row>
        <table:table-row>
          <table:table-cell table:style-name="TableRowCell" office:value-type="string">
            <text:p text:style-name="Table_20_Contents">■ When connecting the internal hard disk type ITX68000 series</text:p>
          </table:table-cell>
          <table:table-cell table:style-name="TableRowCell" office:value-type="string">
            <text:p text:style-name="P4">2</text:p>
          </table:table-cell>
        </table:table-row>
        <table:table-row>
          <table:table-cell table:style-name="TableRowCell" office:value-type="string">
            <text:p text:style-name="Table_20_Contents">ITX series connecting</text:p>
          </table:table-cell>
          <table:table-cell table:style-name="TableRowCell" office:value-type="string">
            <text:p text:style-name="P4">2</text:p>
          </table:table-cell>
        </table:table-row>
        <table:table-row>
          <table:table-cell table:style-name="TableRowCell" office:value-type="string">
            <text:p text:style-name="Table_20_Contents">● IT-X640 connecting</text:p>
          </table:table-cell>
          <table:table-cell table:style-name="TableRowCell" office:value-type="string">
            <text:p text:style-name="P4">2</text:p>
          </table:table-cell>
        </table:table-row>
        <table:table-row>
          <table:table-cell table:style-name="TableRowCell" office:value-type="string">
            <text:p text:style-name="Table_20_Contents">● IT-X680 connecting</text:p>
          </table:table-cell>
          <table:table-cell table:style-name="TableRowCell" office:value-type="string">
            <text:p text:style-name="P4">2</text:p>
          </table:table-cell>
        </table:table-row>
        <table:table-row>
          <table:table-cell table:style-name="TableRowCell" office:value-type="string">
            <text:p text:style-name="Table_20_Contents">Chapter 2: How to Initialize the Additional Hard Disk</text:p>
          </table:table-cell>
          <table:table-cell table:style-name="TableRowCell" office:value-type="string">
            <text:p text:style-name="P4">3</text:p>
          </table:table-cell>
        </table:table-row>
        <table:table-row>
          <table:table-cell table:style-name="TableRowCell" office:value-type="string">
            <text:p text:style-name="Table_20_Contents">2.1 Precautions (for device number "0")</text:p>
          </table:table-cell>
          <table:table-cell table:style-name="TableRowCell" office:value-type="string">
            <text:p text:style-name="P4">3</text:p>
          </table:table-cell>
        </table:table-row>
        <table:table-row>
          <table:table-cell table:style-name="TableRowCell" office:value-type="string">
            <text:p text:style-name="Table_20_Contents">◎ When the ITX series is connected to the X68000 series</text:p>
          </table:table-cell>
          <table:table-cell table:style-name="TableRowCell" office:value-type="string">
            <text:p text:style-name="P4">3</text:p>
          </table:table-cell>
        </table:table-row>
        <table:table-row>
          <table:table-cell table:style-name="TableRowCell" office:value-type="string">
            <text:p text:style-name="Table_20_Contents">◎ Hard Disk (20 MB) Internal Type X68000 series</text:p>
          </table:table-cell>
          <table:table-cell table:style-name="TableRowCell" office:value-type="string">
            <text:p text:style-name="P4">3</text:p>
          </table:table-cell>
        </table:table-row>
        <table:table-row>
          <table:table-cell table:style-name="TableRowCell" office:value-type="string">
            <text:p text:style-name="Table_20_Contents">2.2 How to Initialize for Device Number "1"</text:p>
          </table:table-cell>
          <table:table-cell table:style-name="TableRowCell" office:value-type="string">
            <text:p text:style-name="P4">3</text:p>
          </table:table-cell>
        </table:table-row>
        <table:table-row>
          <table:table-cell table:style-name="TableRowCell" office:value-type="string">
            <text:p text:style-name="Table_20_Contents">2.3 How to Initialize for Device Number "2"</text:p>
          </table:table-cell>
          <table:table-cell table:style-name="TableRowCell" office:value-type="string">
            <text:p text:style-name="P4">5</text:p>
          </table:table-cell>
        </table:table-row>
        <table:table-row>
          <table:table-cell table:style-name="TableRowCell" office:value-type="string">
            <text:p text:style-name="Table_20_Contents">2.4 How to Initialize for Device Number "3"</text:p>
          </table:table-cell>
          <table:table-cell table:style-name="TableRowCell" office:value-type="string">
            <text:p text:style-name="P4">7</text:p>
          </table:table-cell>
        </table:table-row>
        <table:table-row>
          <table:table-cell table:style-name="TableRowCell" office:value-type="string">
            <text:p text:style-name="Table_20_Contents">Chapter 3: Registering the Additional Hard Disk to the System</text:p>
          </table:table-cell>
          <table:table-cell table:style-name="TableRowCell" office:value-type="string">
            <text:p text:style-name="P4">10</text:p>
          </table:table-cell>
        </table:table-row>
        <table:table-row>
          <table:table-cell table:style-name="TableRowCell" office:value-type="string">
            <text:p text:style-name="Table_20_Contents">3.1 Changing the StartUp File</text:p>
          </table:table-cell>
          <table:table-cell table:style-name="TableRowCell" office:value-type="string">
            <text:p text:style-name="P4">10</text:p>
          </table:table-cell>
        </table:table-row>
        <table:table-row>
          <table:table-cell table:style-name="TableRowCell" office:value-type="string">
            <text:p text:style-name="Table_20_Contents">3.2 Creating the InitHD File</text:p>
          </table:table-cell>
          <table:table-cell table:style-name="TableRowCell" office:value-type="string">
            <text:p text:style-name="P4">11</text:p>
          </table:table-cell>
        </table:table-row>
        <table:table-row>
          <table:table-cell table:style-name="TableRowCell" office:value-type="string">
            <text:p text:style-name="Table_20_Contents">Chapter 4: How to Manage When Mixed with Human68K (Ver 2.0)</text:p>
          </table:table-cell>
          <table:table-cell table:style-name="TableRowCell" office:value-type="string">
            <text:p text:style-name="P4">15</text:p>
          </table:table-cell>
        </table:table-row>
        <table:table-row>
          <table:table-cell table:style-name="TableRowCell" office:value-type="string">
            <text:p text:style-name="Table_20_Contents">4.1 Startup Menu</text:p>
          </table:table-cell>
          <table:table-cell table:style-name="TableRowCell" office:value-type="string">
            <text:p text:style-name="P4">15</text:p>
          </table:table-cell>
        </table:table-row>
        <table:table-row>
          <table:table-cell table:style-name="TableRowCell" office:value-type="string">
            <text:p text:style-name="Table_20_Contents">Chapter 5: System Reconfiguration</text:p>
          </table:table-cell>
          <table:table-cell table:style-name="TableRowCell" office:value-type="string">
            <text:p text:style-name="P4">16</text:p>
          </table:table-cell>
        </table:table-row>
        <table:table-row>
          <table:table-cell table:style-name="TableRowCell" office:value-type="string">
            <text:p text:style-name="Table_20_Contents">5.1 How to Reconfigure the System</text:p>
          </table:table-cell>
          <table:table-cell table:style-name="TableRowCell" office:value-type="string">
            <text:p text:style-name="P4">16</text:p>
          </table:table-cell>
        </table:table-row>
        <table:table-row>
          <table:table-cell table:style-name="TableRowCell" office:value-type="string">
            <text:p text:style-name="Table_20_Contents">5.2 When the Device Number is "1" or More and Hard Disk Devices</text:p>
          </table:table-cell>
          <table:table-cell table:style-name="TableRowCell" office:value-type="string">
            <text:p text:style-name="P4">16</text:p>
          </table:table-cell>
        </table:table-row>
        <table:table-row>
          <table:table-cell table:style-name="TableRowCell" office:value-type="string">
            <text:p text:style-name="Table_20_Contents">■Precautions When Creating a Project File</text:p>
          </table:table-cell>
          <table:table-cell table:style-name="TableRowCell" office:value-type="string">
            <text:p text:style-name="P4">16</text:p>
          </table:table-cell>
        </table:table-row>
        <table:table-row>
          <table:table-cell table:style-name="TableRowCell" office:value-type="string">
            <text:p text:style-name="Table_20_Contents">■How to Execute a Project File</text:p>
          </table:table-cell>
          <table:table-cell table:style-name="TableRowCell" office:value-type="string">
            <text:p text:style-name="P4">17</text:p>
          </table:table-cell>
        </table:table-row>
      </table:table>
      <text:p text:style-name="First_20_paragraph"><text:span text:style-name="Emphasis">(Blank page in the original.)</text:span></text:p>
      <text:p text:style-name="Text_20_body">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h text:style-name="Heading_20_1" text:outline-level="1"><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1" text:outline-level="1"><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1" text:outline-level="1"><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text:p>
      <text:p text:style-name="Preformatted_20_Text">0002 tmode nopause -w=1</text:p>
      <text:p text:style-name="Preformatted_20_Text">0003 chd CMDS/BOOTOBJS</text:p>
      <text:p text:style-name="Preformatted_20_Text">0004 load -d rbhddrv h2_40m</text:p>
      <text:p text:style-name="Preformatted_20_Text">0005 hpu /h2 &lt; /win0</text:p>
      <text:p text:style-name="Preformatted_20_Text">0006 unlink h2</text:p>
      <text:p text:style-name="Preformatted_20_Text">0007 load -d h2_p1</text:p>
      <text:p text:style-name="Preformatted_20_Text">0008 format /h2 -rv=OS-9/68000</text:p>
      <text:p text:style-name="Preformatted_20_Text">0009 y</text:p>
      <text:p text:style-name="Preformatted_20_Text">0010 y</text:p>
      <text:p text:style-name="Preformatted_20_Text">0011 y</text:p>
      <text:p text:style-name="Preformatted_20_Text">0012 y</text:p>
      <text:p text:style-name="First_20_paragraph">E:</text:p>
      <text:p text:style-name="Text_20_body">Page 6</text:p>
      <text:p text:style-name="Text_20_body">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Text_20_body">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Text_20_body"><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Text_20_body"><text:span text:style-name="Strong_20_Emphasis">Example 3</text:span></text:p>
      <text:p text:style-name="Text_20_body">※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p text:style-name="First_20_paragraph"><text:span text:style-name="Strong_20_Emphasis">Example 4</text:span></text:p>
      <text:p text:style-name="Text_20_body">※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Text_20_body">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Preformatted_20_Text">1 OS-9/68K</text:p>
      <text:p text:style-name="Preformatted_20_Text">2 Human 68K</text:p>
      <text:p text:style-name="First_20_paragraph">Select with the cursor key and press the return key</text:p>
      <text:h text:style-name="Heading_20_1" text:outline-level="1"><text:bookmark-start text:name="chapter-5-method-for-system-reconstruction"/>Chapter 5: Method for System Reconstruction<text:bookmark-end text:name="chapter-5-method-for-system-reconstruction"/></text:h>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p text:style-name="Text_20_body"><text:span text:style-name="Strong_20_Emphasis">Notes When Creating Procedure Files</text:span></text:p>
      <text:p text:style-name="Text_20_body">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Text_20_body">Page: 16</text:p>
      <text:p text:style-name="Text_20_body">●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Text_20_body"><text:span text:style-name="Emphasis">(Blank page in the original.)</text:span></text:p>
      <text:p text:style-name="Text_20_body">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Text_20_body">"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Sharp Hard Disk Unit IT-X640 / IT-X680 — User's Manual</dc:title>
    <dc:description/>
    <dc:subject/>
    <meta:keyword/>
    <meta:initial-creator/>
    <dc:creator/>
    <meta:creation-date>2026-06-20T14:52:24Z</meta:creation-date>
    <dc:date>2026-06-20T14:52:24Z</dc:date>
    <meta:user-defined meta:name="subtitle" meta:value-type="string">English translation from the Japanese original</meta:user-defined>
  </office:meta>
</office:document-meta>
</file>