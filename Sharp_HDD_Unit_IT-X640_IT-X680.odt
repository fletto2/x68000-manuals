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p text:style-name="Text_20_body"><text:span text:style-name="Strong_20_Emphasis">User's Manual</text:span></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Additional HDD Device Number = 3</text:p>
      <text:p text:style-name="Text_20_body">Additional HDD Device Number = 5</text:p>
      <text:p text:style-name="Text_20_body">Additional HDD Device Number = 7</text:p>
      <text:p text:style-name="Text_20_body">Additional HDD Device Number = 9</text:p>
      <text:p text:style-name="Text_20_body">Additional HDD Device Number = 11</text:p>
      <text:p text:style-name="Text_20_body">Additional HDD Device Number = 13</text:p>
      <text:p text:style-name="Text_20_body">Additional HDD 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There is no other text in Japanese on the image.</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The text on the image is already in English.</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text:span text:style-name="Emphasis">Floppy Disk</text:span>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18:03:40Z</meta:creation-date>
    <dc:date>2026-06-19T18:03:40Z</dc:date>
    <meta:user-defined meta:name="subtitle" meta:value-type="string">English translation from the Japanese original</meta:user-defined>
  </office:meta>
</office:document-meta>
</file>